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Adaptive Resource Management Engine (ARME) with Context-Aware Prioritization</text:span></text:h>
      <text:h text:style-name="Heading_20_2" text:outline-level="2"><text:span text:style-name="Strong_20_Emphasis">1. Core Architecture: Dynamic Priority Management System</text:span></text:h>
      <text:h text:style-name="Heading_20_3" text:outline-level="3"><text:span text:style-name="Strong_20_Emphasis">A. Resource-Aware Task Manager</text:span></text:h>
      <text:p text:style-name="Text_20_body">python</text:p>
      <text:p text:style-name="Preformatted_20_Text">class AdaptiveResourceManager:</text:p>
      <text:p text:style-name="Preformatted_20_Text"><text:s text:c="4"/>def __init__(self, hardware_monitor, context_engine):</text:p>
      <text:p text:style-name="Preformatted_20_Text"><text:s text:c="8"/>self.hardware_monitor = hardware_monitor</text:p>
      <text:p text:style-name="Preformatted_20_Text"><text:s text:c="8"/>self.context_engine = context_engine</text:p>
      <text:p text:style-name="Preformatted_20_Text"><text:s text:c="8"/>self.task_registry = {}</text:p>
      <text:p text:style-name="Preformatted_20_Text"><text:s text:c="8"/>self.running_tasks = {}</text:p>
      <text:p text:style-name="Preformatted_20_Text"><text:s text:c="8"/>self.deferred_tasks = Queue()</text:p>
      <text:p text:style-name="Preformatted_20_Text"><text:s text:c="8"/>self.reflection_queue = Queue()</text:p>
      <text:p text:style-name="Preformatted_20_Text"><text:s text:c="8"/>self.resource_pools = {</text:p>
      <text:p text:style-name="Preformatted_20_Text"><text:s text:c="12"/>'critical': {'cpu': 0.3, 'memory': 0.4, 'npu': 0.2},</text:p>
      <text:p text:style-name="Preformatted_20_Text"><text:s text:c="12"/>'essential': {'cpu': 0.4, 'memory': 0.4, 'npu': 0.3},</text:p>
      <text:p text:style-name="Preformatted_20_Text"><text:s text:c="12"/>'background': {'cpu': 0.2, 'memory': 0.1, 'npu': 0.1},</text:p>
      <text:p text:style-name="Preformatted_20_Text"><text:s text:c="12"/>'reflection': {'cpu': 0.1, 'memory': 0.1, 'npu': 0.0}</text:p>
      <text:p text:style-name="Preformatted_20_Text"><text:s text:c="8"/>}</text:p>
      <text:p text:style-name="Preformatted_20_Text"><text:s text:c="8"/></text:p>
      <text:p text:style-name="Preformatted_20_Text"><text:s text:c="4"/>def register_task(self, task_id, task_config):</text:p>
      <text:p text:style-name="Preformatted_20_Text"><text:s text:c="8"/>"""</text:p>
      <text:p text:style-name="Preformatted_20_Text"><text:s text:c="8"/>Register a task with its resource profile and priority rules</text:p>
      <text:p text:style-name="Preformatted_20_Text"><text:s text:c="8"/>"""</text:p>
      <text:p text:style-name="Preformatted_20_Text"><text:s text:c="8"/>self.task_registry[task_id] = {</text:p>
      <text:p text:style-name="Preformatted_20_Text"><text:s text:c="12"/>'function': task_config['function'],</text:p>
      <text:p text:style-name="Preformatted_20_Text"><text:s text:c="12"/>'base_priority': task_config.get('base_priority', 50),</text:p>
      <text:p text:style-name="Preformatted_20_Text"><text:s text:c="12"/>'resource_profile': self.calculate_resource_profile(task_config),</text:p>
      <text:p text:style-name="Preformatted_20_Text"><text:s text:c="12"/>'context_sensitivity': task_config.get('context_sensitivity', {}),</text:p>
      <text:p text:style-name="Preformatted_20_Text"><text:s text:c="12"/>'deferrable': task_config.get('deferrable', True),</text:p>
      <text:p text:style-name="Preformatted_20_Text"><text:s text:c="12"/>'max_deferral_time': task_config.get('max_deferral_time', 300),</text:p>
      <text:p text:style-name="Preformatted_20_Text"><text:s text:c="12"/>'reflection_analysis': task_config.get('reflection_analysis', True),</text:p>
      <text:p text:style-name="Preformatted_20_Text"><text:s text:c="12"/>'essential_override': task_config.get('essential_override', []),</text:p>
      <text:p text:style-name="Preformatted_20_Text"><text:s text:c="12"/>'performance_metrics': {</text:p>
      <text:p text:style-name="Preformatted_20_Text"><text:s text:c="16"/>'avg_execution_time': 0,</text:p>
      <text:p text:style-name="Preformatted_20_Text"><text:s text:c="16"/>'avg_cpu_usage': 0,</text:p>
      <text:p text:style-name="Preformatted_20_Text"><text:s text:c="16"/>'avg_memory_usage': 0,</text:p>
      <text:p text:style-name="Preformatted_20_Text"><text:s text:c="16"/>'success_rate': 1.0</text:p>
      <text:p text:style-name="Preformatted_20_Text"><text:s text:c="12"/>}</text:p>
      <text:p text:style-name="Preformatted_20_Text"><text:s text:c="8"/>}</text:p>
      <text:p text:style-name="Preformatted_20_Text"><text:s text:c="4"/></text:p>
      <text:p text:style-name="Preformatted_20_Text"><text:s text:c="4"/>def calculate_dynamic_priority(self, task_id, current_context):</text:p>
      <text:p text:style-name="Preformatted_20_Text"><text:s text:c="8"/>"""</text:p>
      <text:p text:style-name="Preformatted_20_Text"><text:s text:c="8"/>Calculate real-time priority based on context and system state</text:p>
      <text:p text:style-name="Preformatted_20_Text"><text:s text:c="8"/>"""</text:p>
      <text:p text:style-name="Preformatted_20_Text"><text:s text:c="8"/>task = self.task_registry[task_id]</text:p>
      <text:p text:style-name="Preformatted_20_Text"><text:s text:c="8"/></text:p>
      <text:p text:style-name="Preformatted_20_Text"><text:s text:c="8"/># Base priority</text:p>
      <text:p text:style-name="Preformatted_20_Text"><text:s text:c="8"/>priority = task['base_priority']</text:p>
      <text:p text:style-name="Preformatted_20_Text"><text:s text:c="8"/></text:p>
      <text:p text:style-name="Preformatted_20_Text"><text:s text:c="8"/># Context adjustment</text:p>
      <text:p text:style-name="Preformatted_20_Text"><text:s text:c="8"/>context_boost = self.calculate_context_boost(task_id, current_context)</text:p>
      <text:p text:style-name="Preformatted_20_Text"><text:s text:c="8"/>priority += context_boost * 20</text:p>
      <text:p text:style-name="Preformatted_20_Text"><text:s text:c="8"/></text:p>
      <text:p text:style-name="Preformatted_20_Text"><text:soft-page-break/><text:s text:c="8"/># Resource availability adjustment</text:p>
      <text:p text:style-name="Preformatted_20_Text"><text:s text:c="8"/>resource_factor = self.calculate_resource_factor(task_id)</text:p>
      <text:p text:style-name="Preformatted_20_Text"><text:s text:c="8"/>priority *= resource_factor</text:p>
      <text:p text:style-name="Preformatted_20_Text"><text:s text:c="8"/></text:p>
      <text:p text:style-name="Preformatted_20_Text"><text:s text:c="8"/># Urgency factor (how long deferred)</text:p>
      <text:p text:style-name="Preformatted_20_Text"><text:s text:c="8"/>if task_id in self.deferred_tasks:</text:p>
      <text:p text:style-name="Preformatted_20_Text"><text:s text:c="12"/>urgency = self.calculate_urgency(task_id)</text:p>
      <text:p text:style-name="Preformatted_20_Text"><text:s text:c="12"/>priority += urgency * 10</text:p>
      <text:p text:style-name="Preformatted_20_Text"><text:s text:c="8"/></text:p>
      <text:p text:style-name="Preformatted_20_Text"><text:s text:c="8"/># Safety override (essential functions always high)</text:p>
      <text:p text:style-name="Preformatted_20_Text"><text:s text:c="8"/>if self.is_essential_in_context(task_id, current_context):</text:p>
      <text:p text:style-name="Preformatted_20_Text"><text:s text:c="12"/>priority = min(priority, 90) <text:s/># Cap at 90 for essential</text:p>
      <text:p text:style-name="Preformatted_20_Text"><text:s text:c="8"/></text:p>
      <text:p text:style-name="Preformatted_20_Text"><text:s text:c="8"/>return max(1, min(100, priority))</text:p>
      <text:p text:style-name="Preformatted_20_Text"><text:s text:c="4"/></text:p>
      <text:p text:style-name="Preformatted_20_Text"><text:s text:c="4"/>def calculate_context_boost(self, task_id, current_context):</text:p>
      <text:p text:style-name="Preformatted_20_Text"><text:s text:c="8"/>"""</text:p>
      <text:p text:style-name="Preformatted_20_Text"><text:s text:c="8"/>Determine how important this task is in current context</text:p>
      <text:p text:style-name="Preformatted_20_Text"><text:s text:c="8"/>"""</text:p>
      <text:p text:style-name="Preformatted_20_Text"><text:s text:c="8"/>task = self.task_registry[task_id]</text:p>
      <text:p text:style-name="Preformatted_20_Text"><text:s text:c="8"/>sensitivity = task['context_sensitivity']</text:p>
      <text:p text:style-name="Preformatted_20_Text"><text:s text:c="8"/></text:p>
      <text:p text:style-name="Preformatted_20_Text"><text:s text:c="8"/># Check for direct context match</text:p>
      <text:p text:style-name="Preformatted_20_Text"><text:s text:c="8"/>if current_context['primary'] in sensitivity:</text:p>
      <text:p text:style-name="Preformatted_20_Text"><text:s text:c="12"/>return sensitivity[current_context['primary']]</text:p>
      <text:p text:style-name="Preformatted_20_Text"><text:s text:c="8"/></text:p>
      <text:p text:style-name="Preformatted_20_Text"><text:s text:c="8"/># Check for secondary context relevance</text:p>
      <text:p text:style-name="Preformatted_20_Text"><text:s text:c="8"/>for secondary_context in current_context.get('secondary', []):</text:p>
      <text:p text:style-name="Preformatted_20_Text"><text:s text:c="12"/>if secondary_context in sensitivity:</text:p>
      <text:p text:style-name="Preformatted_20_Text"><text:s text:c="16"/>return sensitivity[secondary_context] * 0.7</text:p>
      <text:p text:style-name="Preformatted_20_Text"><text:s text:c="8"/></text:p>
      <text:p text:style-name="Preformatted_20_Text"><text:s text:c="8"/># Default low relevance</text:p>
      <text:p text:style-name="Preformatted_20_Text"><text:s text:c="8"/>return 0.1</text:p>
      <text:p text:style-name="Preformatted_20_Text"><text:s text:c="4"/></text:p>
      <text:p text:style-name="Preformatted_20_Text"><text:s text:c="4"/>def is_essential_in_context(self, task_id, current_context):</text:p>
      <text:p text:style-name="Preformatted_20_Text"><text:s text:c="8"/>"""</text:p>
      <text:p text:style-name="Preformatted_20_Text"><text:s text:c="8"/>Check if task is essential in current context (cannot be deferred)</text:p>
      <text:p text:style-name="Preformatted_20_Text"><text:s text:c="8"/>"""</text:p>
      <text:p text:style-name="Preformatted_20_Text"><text:s text:c="8"/>task = self.task_registry[task_id]</text:p>
      <text:p text:style-name="Preformatted_20_Text"><text:s text:c="8"/>essential_contexts = task.get('essential_override', [])</text:p>
      <text:p text:style-name="Preformatted_20_Text"><text:s text:c="8"/></text:p>
      <text:p text:style-name="Preformatted_20_Text"><text:s text:c="8"/># Always essential contexts</text:p>
      <text:p text:style-name="Preformatted_20_Text"><text:s text:c="8"/>always_essential = ['crisis', 'emergency', 'safety_breach']</text:p>
      <text:p text:style-name="Preformatted_20_Text"><text:s text:c="8"/></text:p>
      <text:p text:style-name="Preformatted_20_Text"><text:s text:c="8"/>return (current_context['primary'] in always_essential or </text:p>
      <text:p text:style-name="P7"><text:s text:c="16"/>current_context['primary'] in essential_contexts)</text:p>
      <text:h text:style-name="Heading_20_3" text:outline-level="3"><text:span text:style-name="Strong_20_Emphasis">B. Context-Aware Task Scheduler</text:span></text:h>
      <text:p text:style-name="Text_20_body">python</text:p>
      <text:p text:style-name="Preformatted_20_Text">class ContextAwareScheduler:</text:p>
      <text:p text:style-name="Preformatted_20_Text"><text:s text:c="4"/>def __init__(self, resource_manager):</text:p>
      <text:p text:style-name="Preformatted_20_Text"><text:s text:c="8"/>self.resource_manager = resource_manager</text:p>
      <text:p text:style-name="Preformatted_20_Text"><text:s text:c="8"/>self.context_history = deque(maxlen=100)</text:p>
      <text:p text:style-name="Preformatted_20_Text"><text:s text:c="8"/>self.context_transition_times = {}</text:p>
      <text:p text:style-name="Preformatted_20_Text"><text:s text:c="8"/>self.active_context = {</text:p>
      <text:p text:style-name="Preformatted_20_Text"><text:s text:c="12"/>'primary': 'normal',</text:p>
      <text:p text:style-name="Preformatted_20_Text"><text:s text:c="12"/>'secondary': [],</text:p>
      <text:p text:style-name="Preformatted_20_Text"><text:s text:c="12"/>'stability_score': 1.0,</text:p>
      <text:p text:style-name="Preformatted_20_Text"><text:s text:c="12"/>'duration': 0</text:p>
      <text:p text:style-name="Preformatted_20_Text"><text:s text:c="8"/>}</text:p>
      <text:p text:style-name="Preformatted_20_Text"><text:s text:c="8"/></text:p>
      <text:p text:style-name="Preformatted_20_Text"><text:soft-page-break/><text:s text:c="4"/>def update_context(self, sensor_data, user_interaction, system_state):</text:p>
      <text:p text:style-name="Preformatted_20_Text"><text:s text:c="8"/>"""</text:p>
      <text:p text:style-name="Preformatted_20_Text"><text:s text:c="8"/>Determine current context based on multiple inputs</text:p>
      <text:p text:style-name="Preformatted_20_Text"><text:s text:c="8"/>"""</text:p>
      <text:p text:style-name="Preformatted_20_Text"><text:s text:c="8"/>new_context = {</text:p>
      <text:p text:style-name="Preformatted_20_Text"><text:s text:c="12"/>'primary': self.determine_primary_context(sensor_data, user_interaction),</text:p>
      <text:p text:style-name="Preformatted_20_Text"><text:s text:c="12"/>'secondary': self.determine_secondary_contexts(sensor_data, user_interaction),</text:p>
      <text:p text:style-name="Preformatted_20_Text"><text:s text:c="12"/>'stability_score': self.calculate_context_stability(),</text:p>
      <text:p text:style-name="Preformatted_20_Text"><text:s text:c="12"/>'duration': self.calculate_context_duration(),</text:p>
      <text:p text:style-name="Preformatted_20_Text"><text:s text:c="12"/>'transition_likelihood': self.calculate_transition_likelihood()</text:p>
      <text:p text:style-name="Preformatted_20_Text"><text:s text:c="8"/>}</text:p>
      <text:p text:style-name="Preformatted_20_Text"><text:s text:c="8"/></text:p>
      <text:p text:style-name="Preformatted_20_Text"><text:s text:c="8"/># Log context transition</text:p>
      <text:p text:style-name="Preformatted_20_Text"><text:s text:c="8"/>if new_context['primary'] != self.active_context['primary']:</text:p>
      <text:p text:style-name="Preformatted_20_Text"><text:s text:c="12"/>self.log_context_transition(self.active_context, new_context)</text:p>
      <text:p text:style-name="Preformatted_20_Text"><text:s text:c="8"/></text:p>
      <text:p text:style-name="Preformatted_20_Text"><text:s text:c="8"/>self.active_context = new_context</text:p>
      <text:p text:style-name="Preformatted_20_Text"><text:s text:c="8"/>self.context_history.append(new_context)</text:p>
      <text:p text:style-name="Preformatted_20_Text"><text:s text:c="8"/></text:p>
      <text:p text:style-name="Preformatted_20_Text"><text:s text:c="8"/># Update task priorities based on new context</text:p>
      <text:p text:style-name="Preformatted_20_Text"><text:s text:c="8"/>self.adjust_task_priorities_for_context()</text:p>
      <text:p text:style-name="Preformatted_20_Text"><text:s text:c="8"/></text:p>
      <text:p text:style-name="Preformatted_20_Text"><text:s text:c="8"/>return new_context</text:p>
      <text:p text:style-name="Preformatted_20_Text"><text:s text:c="4"/></text:p>
      <text:p text:style-name="Preformatted_20_Text"><text:s text:c="4"/>def determine_primary_context(self, sensor_data, user_interaction):</text:p>
      <text:p text:style-name="Preformatted_20_Text"><text:s text:c="8"/>"""</text:p>
      <text:p text:style-name="Preformatted_20_Text"><text:s text:c="8"/>Determine the primary operational context</text:p>
      <text:p text:style-name="Preformatted_20_Text"><text:s text:c="8"/>"""</text:p>
      <text:p text:style-name="Preformatted_20_Text"><text:s text:c="8"/># Check for safety emergencies</text:p>
      <text:p text:style-name="Preformatted_20_Text"><text:s text:c="8"/>if self.detect_safety_emergency(sensor_data):</text:p>
      <text:p text:style-name="Preformatted_20_Text"><text:s text:c="12"/>return 'crisis_emergency'</text:p>
      <text:p text:style-name="Preformatted_20_Text"><text:s text:c="8"/></text:p>
      <text:p text:style-name="Preformatted_20_Text"><text:s text:c="8"/># Check for user-engaged activities</text:p>
      <text:p text:style-name="Preformatted_20_Text"><text:s text:c="8"/>if user_interaction.get('activity_type') == 'tea_party':</text:p>
      <text:p text:style-name="Preformatted_20_Text"><text:s text:c="12"/>return 'tea_party_active'</text:p>
      <text:p text:style-name="Preformatted_20_Text"><text:s text:c="8"/>elif user_interaction.get('activity_type') == 'drawing':</text:p>
      <text:p text:style-name="Preformatted_20_Text"><text:s text:c="12"/>return 'creative_session'</text:p>
      <text:p text:style-name="Preformatted_20_Text"><text:s text:c="8"/>elif user_interaction.get('activity_type') == 'game_playing':</text:p>
      <text:p text:style-name="Preformatted_20_Text"><text:s text:c="12"/>return 'game_session'</text:p>
      <text:p text:style-name="Preformatted_20_Text"><text:s text:c="8"/></text:p>
      <text:p text:style-name="Preformatted_20_Text"><text:s text:c="8"/># Check for therapeutic states</text:p>
      <text:p text:style-name="Preformatted_20_Text"><text:s text:c="8"/>if sensor_data.get('user_emotional_state') in ['distressed', 'anxious']:</text:p>
      <text:p text:style-name="Preformatted_20_Text"><text:s text:c="12"/>return 'therapeutic_support'</text:p>
      <text:p text:style-name="Preformatted_20_Text"><text:s text:c="8"/></text:p>
      <text:p text:style-name="Preformatted_20_Text"><text:s text:c="8"/># Check for learning opportunities</text:p>
      <text:p text:style-name="Preformatted_20_Text"><text:s text:c="8"/>if self.detect_learning_opportunity(user_interaction):</text:p>
      <text:p text:style-name="Preformatted_20_Text"><text:s text:c="12"/>return 'learning_opportunity'</text:p>
      <text:p text:style-name="Preformatted_20_Text"><text:s text:c="8"/></text:p>
      <text:p text:style-name="Preformatted_20_Text"><text:s text:c="8"/># Default based on time and patterns</text:p>
      <text:p text:style-name="Preformatted_20_Text"><text:s text:c="8"/>return self.determine_default_context()</text:p>
      <text:p text:style-name="Preformatted_20_Text"><text:s text:c="4"/></text:p>
      <text:p text:style-name="Preformatted_20_Text"><text:s text:c="4"/>def determine_secondary_contexts(self, sensor_data, user_interaction):</text:p>
      <text:p text:style-name="Preformatted_20_Text"><text:s text:c="8"/>"""</text:p>
      <text:p text:style-name="Preformatted_20_Text"><text:s text:c="8"/>Determine secondary contexts that modify primary behavior</text:p>
      <text:p text:style-name="Preformatted_20_Text"><text:s text:c="8"/>"""</text:p>
      <text:p text:style-name="Preformatted_20_Text"><text:s text:c="8"/>secondary_contexts = []</text:p>
      <text:p text:style-name="Preformatted_20_Text"><text:s text:c="8"/></text:p>
      <text:p text:style-name="Preformatted_20_Text"><text:s text:c="8"/># Add resource-aware contexts</text:p>
      <text:p text:style-name="Preformatted_20_Text"><text:s text:c="8"/>hardware_state = self.resource_manager.hardware_monitor.get_state()</text:p>
      <text:p text:style-name="Preformatted_20_Text"><text:s text:c="8"/>if hardware_state['cpu_temp'] &gt; 70:</text:p>
      <text:p text:style-name="Preformatted_20_Text"><text:s text:c="12"/>secondary_contexts.append('thermal_throttling')</text:p>
      <text:p text:style-name="Preformatted_20_Text"><text:s text:c="8"/>if hardware_state['cpu_usage'] &gt; 85:</text:p>
      <text:p text:style-name="Preformatted_20_Text"><text:soft-page-break/><text:s text:c="12"/>secondary_contexts.append('high_load')</text:p>
      <text:p text:style-name="Preformatted_20_Text"><text:s text:c="8"/></text:p>
      <text:p text:style-name="Preformatted_20_Text"><text:s text:c="8"/># Add user state contexts</text:p>
      <text:p text:style-name="Preformatted_20_Text"><text:s text:c="8"/>if sensor_data.get('user_attention_level', 0.5) &lt; 0.3:</text:p>
      <text:p text:style-name="Preformatted_20_Text"><text:s text:c="12"/>secondary_contexts.append('low_attention')</text:p>
      <text:p text:style-name="Preformatted_20_Text"><text:s text:c="8"/>if sensor_data.get('user_engagement', 0.5) &gt; 0.8:</text:p>
      <text:p text:style-name="Preformatted_20_Text"><text:s text:c="12"/>secondary_contexts.append('high_engagement')</text:p>
      <text:p text:style-name="Preformatted_20_Text"><text:s text:c="8"/></text:p>
      <text:p text:style-name="Preformatted_20_Text"><text:s text:c="8"/># Add environmental contexts</text:p>
      <text:p text:style-name="Preformatted_20_Text"><text:s text:c="8"/>if sensor_data.get('ambient_noise', 0) &gt; 70: <text:s/># dB</text:p>
      <text:p text:style-name="Preformatted_20_Text"><text:s text:c="12"/>secondary_contexts.append('noisy_environment')</text:p>
      <text:p text:style-name="Preformatted_20_Text"><text:s text:c="8"/>if sensor_data.get('ambient_light', 0) &lt; 20: <text:s/># lux</text:p>
      <text:p text:style-name="Preformatted_20_Text"><text:s text:c="12"/>secondary_contexts.append('low_light')</text:p>
      <text:p text:style-name="Preformatted_20_Text"><text:s text:c="8"/></text:p>
      <text:p text:style-name="Preformatted_20_Text"><text:s text:c="8"/>return secondary_contexts</text:p>
      <text:p text:style-name="Preformatted_20_Text"><text:s text:c="4"/></text:p>
      <text:p text:style-name="Preformatted_20_Text"><text:s text:c="4"/>def adjust_task_priorities_for_context(self):</text:p>
      <text:p text:style-name="Preformatted_20_Text"><text:s text:c="8"/>"""</text:p>
      <text:p text:style-name="Preformatted_20_Text"><text:s text:c="8"/>Adjust all task priorities based on current context</text:p>
      <text:p text:style-name="Preformatted_20_Text"><text:s text:c="8"/>"""</text:p>
      <text:p text:style-name="Preformatted_20_Text"><text:s text:c="8"/>for task_id in self.resource_manager.task_registry:</text:p>
      <text:p text:style-name="Preformatted_20_Text"><text:s text:c="12"/>new_priority = self.resource_manager.calculate_dynamic_priority(</text:p>
      <text:p text:style-name="Preformatted_20_Text"><text:s text:c="16"/>task_id, </text:p>
      <text:p text:style-name="Preformatted_20_Text"><text:s text:c="16"/>self.active_context</text:p>
      <text:p text:style-name="Preformatted_20_Text"><text:s text:c="12"/>)</text:p>
      <text:p text:style-name="Preformatted_20_Text"><text:s text:c="12"/></text:p>
      <text:p text:style-name="Preformatted_20_Text"><text:s text:c="12"/># Update task's effective priority</text:p>
      <text:p text:style-name="Preformatted_20_Text"><text:s text:c="12"/>self.resource_manager.task_registry[task_id]['effective_priority'] = new_priority</text:p>
      <text:p text:style-name="Preformatted_20_Text"><text:s text:c="12"/></text:p>
      <text:p text:style-name="Preformatted_20_Text"><text:s text:c="12"/># If task is running and should be suspended</text:p>
      <text:p text:style-name="Preformatted_20_Text"><text:s text:c="12"/>if task_id in self.resource_manager.running_tasks:</text:p>
      <text:p text:style-name="Preformatted_20_Text"><text:s text:c="16"/>if self.should_suspend_task(task_id):</text:p>
      <text:p text:style-name="P7"><text:s text:c="20"/>self.suspend_task_for_reflection(task_id)</text:p>
      <text:h text:style-name="Heading_20_2" text:outline-level="2"><text:span text:style-name="Strong_20_Emphasis">2. Three-Layer Task Execution System</text:span></text:h>
      <text:h text:style-name="Heading_20_3" text:outline-level="3"><text:span text:style-name="Strong_20_Emphasis">A. Task Execution Orchestrator</text:span></text:h>
      <text:p text:style-name="Text_20_body">python</text:p>
      <text:p text:style-name="Preformatted_20_Text">class ThreeLayerTaskOrchestrator:</text:p>
      <text:p text:style-name="Preformatted_20_Text"><text:s text:c="4"/>def __init__(self, resource_manager):</text:p>
      <text:p text:style-name="Preformatted_20_Text"><text:s text:c="8"/>self.resource_manager = resource_manager</text:p>
      <text:p text:style-name="Preformatted_20_Text"><text:s text:c="8"/>self.execution_layers = {</text:p>
      <text:p text:style-name="Preformatted_20_Text"><text:s text:c="12"/>'real_time': {</text:p>
      <text:p text:style-name="Preformatted_20_Text"><text:s text:c="16"/>'max_tasks': 3,</text:p>
      <text:p text:style-name="Preformatted_20_Text"><text:s text:c="16"/>'priority_threshold': 80,</text:p>
      <text:p text:style-name="Preformatted_20_Text"><text:s text:c="16"/>'tasks': {},</text:p>
      <text:p text:style-name="Preformatted_20_Text"><text:s text:c="16"/>'resources': {'cpu': 0.4, 'memory': 0.5}</text:p>
      <text:p text:style-name="Preformatted_20_Text"><text:s text:c="12"/>},</text:p>
      <text:p text:style-name="Preformatted_20_Text"><text:s text:c="12"/>'near_real_time': {</text:p>
      <text:p text:style-name="Preformatted_20_Text"><text:s text:c="16"/>'max_tasks': 5,</text:p>
      <text:p text:style-name="Preformatted_20_Text"><text:s text:c="16"/>'priority_threshold': 60,</text:p>
      <text:p text:style-name="Preformatted_20_Text"><text:s text:c="16"/>'tasks': {},</text:p>
      <text:p text:style-name="Preformatted_20_Text"><text:s text:c="16"/>'resources': {'cpu': 0.3, 'memory': 0.3}</text:p>
      <text:p text:style-name="Preformatted_20_Text"><text:s text:c="12"/>},</text:p>
      <text:p text:style-name="Preformatted_20_Text"><text:s text:c="12"/>'background': {</text:p>
      <text:p text:style-name="Preformatted_20_Text"><text:s text:c="16"/>'max_tasks': 10,</text:p>
      <text:p text:style-name="Preformatted_20_Text"><text:s text:c="16"/>'priority_threshold': 30,</text:p>
      <text:p text:style-name="Preformatted_20_Text"><text:s text:c="16"/>'tasks': {},</text:p>
      <text:p text:style-name="Preformatted_20_Text"><text:soft-page-break/><text:s text:c="16"/>'resources': {'cpu': 0.2, 'memory': 0.1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4"/>def execute_task(self, task_id, input_data=None):</text:p>
      <text:p text:style-name="Preformatted_20_Text"><text:s text:c="8"/>"""</text:p>
      <text:p text:style-name="Preformatted_20_Text"><text:s text:c="8"/>Execute task in appropriate layer based on priority and resources</text:p>
      <text:p text:style-name="Preformatted_20_Text"><text:s text:c="8"/>"""</text:p>
      <text:p text:style-name="Preformatted_20_Text"><text:s text:c="8"/>task = self.resource_manager.task_registry[task_id]</text:p>
      <text:p text:style-name="Preformatted_20_Text"><text:s text:c="8"/>priority = task.get('effective_priority', task['base_priority'])</text:p>
      <text:p text:style-name="Preformatted_20_Text"><text:s text:c="8"/></text:p>
      <text:p text:style-name="Preformatted_20_Text"><text:s text:c="8"/># Determine execution layer</text:p>
      <text:p text:style-name="Preformatted_20_Text"><text:s text:c="8"/>if priority &gt;= self.execution_layers['real_time']['priority_threshold']:</text:p>
      <text:p text:style-name="Preformatted_20_Text"><text:s text:c="12"/>layer = 'real_time'</text:p>
      <text:p text:style-name="Preformatted_20_Text"><text:s text:c="8"/>elif priority &gt;= self.execution_layers['near_real_time']['priority_threshold']:</text:p>
      <text:p text:style-name="Preformatted_20_Text"><text:s text:c="12"/>layer = 'near_real_time'</text:p>
      <text:p text:style-name="Preformatted_20_Text"><text:s text:c="8"/>else:</text:p>
      <text:p text:style-name="Preformatted_20_Text"><text:s text:c="12"/>layer = 'background'</text:p>
      <text:p text:style-name="Preformatted_20_Text"><text:s text:c="8"/></text:p>
      <text:p text:style-name="Preformatted_20_Text"><text:s text:c="8"/># Check if layer has capacity</text:p>
      <text:p text:style-name="Preformatted_20_Text"><text:s text:c="8"/>if not self.layer_has_capacity(layer):</text:p>
      <text:p text:style-name="Preformatted_20_Text"><text:s text:c="12"/># Try to move to higher layer if possible</text:p>
      <text:p text:style-name="Preformatted_20_Text"><text:s text:c="12"/>layer = self.find_available_layer(priority)</text:p>
      <text:p text:style-name="Preformatted_20_Text"><text:s text:c="12"/>if not layer:</text:p>
      <text:p text:style-name="Preformatted_20_Text"><text:s text:c="16"/># No capacity - defer task</text:p>
      <text:p text:style-name="Preformatted_20_Text"><text:s text:c="16"/>return self.defer_task(task_id, input_data)</text:p>
      <text:p text:style-name="Preformatted_20_Text"><text:s text:c="8"/></text:p>
      <text:p text:style-name="Preformatted_20_Text"><text:s text:c="8"/># Execute in selected layer</text:p>
      <text:p text:style-name="Preformatted_20_Text"><text:s text:c="8"/>return self.execute_in_layer(task_id, layer, input_data)</text:p>
      <text:p text:style-name="Preformatted_20_Text"><text:s text:c="4"/></text:p>
      <text:p text:style-name="Preformatted_20_Text"><text:s text:c="4"/>def execute_in_layer(self, task_id, layer, input_data):</text:p>
      <text:p text:style-name="Preformatted_20_Text"><text:s text:c="8"/>"""</text:p>
      <text:p text:style-name="Preformatted_20_Text"><text:s text:c="8"/>Execute task with layer-specific resource constraints</text:p>
      <text:p text:style-name="Preformatted_20_Text"><text:s text:c="8"/>"""</text:p>
      <text:p text:style-name="Preformatted_20_Text"><text:s text:c="8"/>task_config = self.resource_manager.task_registry[task_id]</text:p>
      <text:p text:style-name="Preformatted_20_Text"><text:s text:c="8"/></text:p>
      <text:p text:style-name="Preformatted_20_Text"><text:s text:c="8"/># Create constrained execution environment</text:p>
      <text:p text:style-name="Preformatted_20_Text"><text:s text:c="8"/>constraints = self.execution_layers[layer]['resources']</text:p>
      <text:p text:style-name="Preformatted_20_Text"><text:s text:c="8"/></text:p>
      <text:p text:style-name="Preformatted_20_Text"><text:s text:c="8"/>if layer == 'real_time':</text:p>
      <text:p text:style-name="Preformatted_20_Text"><text:s text:c="12"/># Execute immediately with priority</text:p>
      <text:p text:style-name="Preformatted_20_Text"><text:s text:c="12"/>result = self.execute_realtime(task_config['function'], input_data, constraints)</text:p>
      <text:p text:style-name="Preformatted_20_Text"><text:s text:c="12"/></text:p>
      <text:p text:style-name="Preformatted_20_Text"><text:s text:c="8"/>elif layer == 'near_real_time':</text:p>
      <text:p text:style-name="Preformatted_20_Text"><text:s text:c="12"/># Execute with small delay</text:p>
      <text:p text:style-name="Preformatted_20_Text"><text:s text:c="12"/>result = self.execute_near_realtime(task_config['function'], input_data, constraints)</text:p>
      <text:p text:style-name="Preformatted_20_Text"><text:s text:c="12"/></text:p>
      <text:p text:style-name="Preformatted_20_Text"><text:s text:c="8"/>else: <text:s/># background</text:p>
      <text:p text:style-name="Preformatted_20_Text"><text:s text:c="12"/># Execute when resources available</text:p>
      <text:p text:style-name="Preformatted_20_Text"><text:s text:c="12"/>result = self.execute_background(task_config['function'], input_data, constraints)</text:p>
      <text:p text:style-name="Preformatted_20_Text"><text:s text:c="8"/></text:p>
      <text:p text:style-name="Preformatted_20_Text"><text:s text:c="8"/># Track execution</text:p>
      <text:p text:style-name="Preformatted_20_Text"><text:s text:c="8"/>self.track_execution_metrics(task_id, layer, result)</text:p>
      <text:p text:style-name="Preformatted_20_Text"><text:s text:c="8"/></text:p>
      <text:p text:style-name="Preformatted_20_Text"><text:s text:c="8"/>return result</text:p>
      <text:p text:style-name="Preformatted_20_Text"><text:s text:c="4"/></text:p>
      <text:p text:style-name="Preformatted_20_Text"><text:s text:c="4"/>def execute_realtime(self, task_function, input_data, constraints):</text:p>
      <text:p text:style-name="Preformatted_20_Text"><text:s text:c="8"/>"""</text:p>
      <text:p text:style-name="Preformatted_20_Text"><text:s text:c="8"/>Execute with real-time constraints</text:p>
      <text:p text:style-name="Preformatted_20_Text"><text:s text:c="8"/>"""</text:p>
      <text:p text:style-name="Preformatted_20_Text"><text:soft-page-break/><text:s text:c="8"/># Apply CPU limiting</text:p>
      <text:p text:style-name="Preformatted_20_Text"><text:s text:c="8"/>with CPULimiter(constraints['cpu']):</text:p>
      <text:p text:style-name="Preformatted_20_Text"><text:s text:c="12"/># Apply memory limiting</text:p>
      <text:p text:style-name="Preformatted_20_Text"><text:s text:c="12"/>with MemoryLimiter(constraints['memory'] * 1024): <text:s/># Convert to MB</text:p>
      <text:p text:style-name="Preformatted_20_Text"><text:s text:c="16"/># Execute with timeout</text:p>
      <text:p text:style-name="Preformatted_20_Text"><text:s text:c="16"/>try:</text:p>
      <text:p text:style-name="Preformatted_20_Text"><text:s text:c="20"/>result = task_function(input_data)</text:p>
      <text:p text:style-name="Preformatted_20_Text"><text:s text:c="20"/>return {'status': 'success', 'result': result, 'layer': 'real_time'}</text:p>
      <text:p text:style-name="Preformatted_20_Text"><text:s text:c="16"/>except TimeoutError:</text:p>
      <text:p text:style-name="Preformatted_20_Text"><text:s text:c="20"/>return {'status': 'timeout', 'layer': 'real_time', 'suggested': 'defer'}</text:p>
      <text:p text:style-name="Preformatted_20_Text"><text:s text:c="16"/>except Exception as e:</text:p>
      <text:p text:style-name="Preformatted_20_Text"><text:s text:c="20"/>return {'status': 'error', 'error': str(e), 'layer': 'real_time'}</text:p>
      <text:p text:style-name="Preformatted_20_Text"><text:s text:c="4"/></text:p>
      <text:p text:style-name="Preformatted_20_Text"><text:s text:c="4"/>def execute_background(self, task_function, input_data, constraints):</text:p>
      <text:p text:style-name="Preformatted_20_Text"><text:s text:c="8"/>"""</text:p>
      <text:p text:style-name="Preformatted_20_Text"><text:s text:c="8"/>Execute in background with checkpointing</text:p>
      <text:p text:style-name="Preformatted_20_Text"><text:s text:c="8"/>"""</text:p>
      <text:p text:style-name="Preformatted_20_Text"><text:s text:c="8"/># Save input data to disk</text:p>
      <text:p text:style-name="Preformatted_20_Text"><text:s text:c="8"/>checkpoint_id = self.create_checkpoint(input_data)</text:p>
      <text:p text:style-name="Preformatted_20_Text"><text:s text:c="8"/></text:p>
      <text:p text:style-name="Preformatted_20_Text"><text:s text:c="8"/># Execute in low-priority thread</text:p>
      <text:p text:style-name="Preformatted_20_Text"><text:s text:c="8"/>def background_worker():</text:p>
      <text:p text:style-name="Preformatted_20_Text"><text:s text:c="12"/>try:</text:p>
      <text:p text:style-name="Preformatted_20_Text"><text:s text:c="16"/># Load from checkpoint</text:p>
      <text:p text:style-name="Preformatted_20_Text"><text:s text:c="16"/>loaded_data = self.load_checkpoint(checkpoint_id)</text:p>
      <text:p text:style-name="Preformatted_20_Text"><text:s text:c="16"/></text:p>
      <text:p text:style-name="Preformatted_20_Text"><text:s text:c="16"/># Execute with aggressive limits</text:p>
      <text:p text:style-name="Preformatted_20_Text"><text:s text:c="16"/>with CPULimiter(constraints['cpu'] * 0.5): <text:s/># Use half of allocated</text:p>
      <text:p text:style-name="Preformatted_20_Text"><text:s text:c="20"/>result = task_function(loaded_data)</text:p>
      <text:p text:style-name="Preformatted_20_Text"><text:s text:c="16"/></text:p>
      <text:p text:style-name="Preformatted_20_Text"><text:s text:c="16"/># Save result for later retrieval</text:p>
      <text:p text:style-name="Preformatted_20_Text"><text:s text:c="16"/>self.save_result(checkpoint_id, result)</text:p>
      <text:p text:style-name="Preformatted_20_Text"><text:s text:c="16"/></text:p>
      <text:p text:style-name="Preformatted_20_Text"><text:s text:c="16"/># Cleanup</text:p>
      <text:p text:style-name="Preformatted_20_Text"><text:s text:c="16"/>self.delete_checkpoint(checkpoint_id)</text:p>
      <text:p text:style-name="Preformatted_20_Text"><text:s text:c="16"/></text:p>
      <text:p text:style-name="Preformatted_20_Text"><text:s text:c="12"/>except Exception as e:</text:p>
      <text:p text:style-name="Preformatted_20_Text"><text:s text:c="16"/># Log error for reflection analysis</text:p>
      <text:p text:style-name="Preformatted_20_Text"><text:s text:c="16"/>self.log_background_error(checkpoint_id, str(e))</text:p>
      <text:p text:style-name="Preformatted_20_Text"><text:s text:c="8"/></text:p>
      <text:p text:style-name="Preformatted_20_Text"><text:s text:c="8"/># Start background thread</text:p>
      <text:p text:style-name="Preformatted_20_Text"><text:s text:c="8"/>thread = threading.Thread(target=background_worker, daemon=True)</text:p>
      <text:p text:style-name="Preformatted_20_Text"><text:s text:c="8"/>thread.start()</text:p>
      <text:p text:style-name="Preformatted_20_Text"><text:s text:c="8"/></text:p>
      <text:p text:style-name="Preformatted_20_Text"><text:s text:c="8"/>return {</text:p>
      <text:p text:style-name="Preformatted_20_Text"><text:s text:c="12"/>'status': 'deferred',</text:p>
      <text:p text:style-name="Preformatted_20_Text"><text:s text:c="12"/>'checkpoint_id': checkpoint_id,</text:p>
      <text:p text:style-name="Preformatted_20_Text"><text:s text:c="12"/>'layer': 'background',</text:p>
      <text:p text:style-name="Preformatted_20_Text"><text:s text:c="12"/>'estimated_completion': self.estimate_completion_time(task_function)</text:p>
      <text:p text:style-name="P7"><text:s text:c="8"/>}</text:p>
      <text:h text:style-name="Heading_20_3" text:outline-level="3"><text:span text:style-name="Strong_20_Emphasis">B. Intelligent Task Deferral System</text:span></text:h>
      <text:p text:style-name="Text_20_body">python</text:p>
      <text:p text:style-name="Preformatted_20_Text">class IntelligentDeferralSystem:</text:p>
      <text:p text:style-name="Preformatted_20_Text"><text:s text:c="4"/>def __init__(self, storage_path):</text:p>
      <text:p text:style-name="Preformatted_20_Text"><text:s text:c="8"/>self.storage_path = storage_path</text:p>
      <text:p text:style-name="Preformatted_20_Text"><text:s text:c="8"/>self.deferred_tasks = {}</text:p>
      <text:p text:style-name="Preformatted_20_Text"><text:soft-page-break/><text:s text:c="8"/>self.deferral_reasons = {}</text:p>
      <text:p text:style-name="Preformatted_20_Text"><text:s text:c="8"/>self.resumption_triggers = {}</text:p>
      <text:p text:style-name="Preformatted_20_Text"><text:s text:c="8"/></text:p>
      <text:p text:style-name="Preformatted_20_Text"><text:s text:c="4"/>def defer_task(self, task_id, input_data, reason, estimated_importance):</text:p>
      <text:p text:style-name="Preformatted_20_Text"><text:s text:c="8"/>"""</text:p>
      <text:p text:style-name="Preformatted_20_Text"><text:s text:c="8"/>Defer task with metadata for later execution</text:p>
      <text:p text:style-name="Preformatted_20_Text"><text:s text:c="8"/>"""</text:p>
      <text:p text:style-name="Preformatted_20_Text"><text:s text:c="8"/>deferral_id = f"{task_id}_{int(time.time())}"</text:p>
      <text:p text:style-name="Preformatted_20_Text"><text:s text:c="8"/></text:p>
      <text:p text:style-name="Preformatted_20_Text"><text:s text:c="8"/># Create deferral package</text:p>
      <text:p text:style-name="Preformatted_20_Text"><text:s text:c="8"/>deferral_package = {</text:p>
      <text:p text:style-name="Preformatted_20_Text"><text:s text:c="12"/>'task_id': task_id,</text:p>
      <text:p text:style-name="Preformatted_20_Text"><text:s text:c="12"/>'input_data': input_data,</text:p>
      <text:p text:style-name="Preformatted_20_Text"><text:s text:c="12"/>'timestamp': time.time(),</text:p>
      <text:p text:style-name="Preformatted_20_Text"><text:s text:c="12"/>'reason': reason,</text:p>
      <text:p text:style-name="Preformatted_20_Text"><text:s text:c="12"/>'estimated_importance': estimated_importance,</text:p>
      <text:p text:style-name="Preformatted_20_Text"><text:s text:c="12"/>'dependencies': self.get_task_dependencies(task_id),</text:p>
      <text:p text:style-name="Preformatted_20_Text"><text:s text:c="12"/>'context_at_deferral': self.get_current_context(),</text:p>
      <text:p text:style-name="Preformatted_20_Text"><text:s text:c="12"/>'expected_resource_requirements': self.estimate_resource_requirements(task_id),</text:p>
      <text:p text:style-name="Preformatted_20_Text"><text:s text:c="12"/>'optimal_execution_conditions': self.determine_optimal_conditions(task_id)</text:p>
      <text:p text:style-name="Preformatted_20_Text"><text:s text:c="8"/>}</text:p>
      <text:p text:style-name="Preformatted_20_Text"><text:s text:c="8"/></text:p>
      <text:p text:style-name="Preformatted_20_Text"><text:s text:c="8"/># Save to storage</text:p>
      <text:p text:style-name="Preformatted_20_Text"><text:s text:c="8"/>self.save_to_storage(deferral_id, deferral_package)</text:p>
      <text:p text:style-name="Preformatted_20_Text"><text:s text:c="8"/></text:p>
      <text:p text:style-name="Preformatted_20_Text"><text:s text:c="8"/># Add to active deferral tracking</text:p>
      <text:p text:style-name="Preformatted_20_Text"><text:s text:c="8"/>self.deferred_tasks[deferral_id] = {</text:p>
      <text:p text:style-name="Preformatted_20_Text"><text:s text:c="12"/>'status': 'waiting',</text:p>
      <text:p text:style-name="Preformatted_20_Text"><text:s text:c="12"/>'priority': estimated_importance,</text:p>
      <text:p text:style-name="Preformatted_20_Text"><text:s text:c="12"/>'next_check': time.time() + 60 <text:s/># Check in 1 minute</text:p>
      <text:p text:style-name="Preformatted_20_Text"><text:s text:c="8"/>}</text:p>
      <text:p text:style-name="Preformatted_20_Text"><text:s text:c="8"/></text:p>
      <text:p text:style-name="Preformatted_20_Text"><text:s text:c="8"/># Set up resumption triggers</text:p>
      <text:p text:style-name="Preformatted_20_Text"><text:s text:c="8"/>self.setup_resumption_triggers(deferral_id, deferral_package)</text:p>
      <text:p text:style-name="Preformatted_20_Text"><text:s text:c="8"/></text:p>
      <text:p text:style-name="Preformatted_20_Text"><text:s text:c="8"/>return deferral_id</text:p>
      <text:p text:style-name="Preformatted_20_Text"><text:s text:c="4"/></text:p>
      <text:p text:style-name="Preformatted_20_Text"><text:s text:c="4"/>def setup_resumption_triggers(self, deferral_id, deferral_package):</text:p>
      <text:p text:style-name="Preformatted_20_Text"><text:s text:c="8"/>"""</text:p>
      <text:p text:style-name="Preformatted_20_Text"><text:s text:c="8"/>Set up conditions for when to resume this task</text:p>
      <text:p text:style-name="Preformatted_20_Text"><text:s text:c="8"/>"""</text:p>
      <text:p text:style-name="Preformatted_20_Text"><text:s text:c="8"/>triggers = []</text:p>
      <text:p text:style-name="Preformatted_20_Text"><text:s text:c="8"/></text:p>
      <text:p text:style-name="Preformatted_20_Text"><text:s text:c="8"/># Resource availability trigger</text:p>
      <text:p text:style-name="Preformatted_20_Text"><text:s text:c="8"/>triggers.append({</text:p>
      <text:p text:style-name="Preformatted_20_Text"><text:s text:c="12"/>'type': 'resource_available',</text:p>
      <text:p text:style-name="Preformatted_20_Text"><text:s text:c="12"/>'conditions': {</text:p>
      <text:p text:style-name="Preformatted_20_Text"><text:s text:c="16"/>'cpu_available': deferral_package['expected_resource_requirements']['cpu'],</text:p>
      <text:p text:style-name="Preformatted_20_Text"><text:s text:c="16"/>'memory_available': deferral_package['expected_resource_requirements']['memory']</text:p>
      <text:p text:style-name="Preformatted_20_Text"><text:s text:c="12"/>},</text:p>
      <text:p text:style-name="Preformatted_20_Text"><text:s text:c="12"/>'check_interval': 30 <text:s/># Check every 30 seconds</text:p>
      <text:p text:style-name="Preformatted_20_Text"><text:s text:c="8"/>})</text:p>
      <text:p text:style-name="Preformatted_20_Text"><text:s text:c="8"/></text:p>
      <text:p text:style-name="Preformatted_20_Text"><text:s text:c="8"/># Context match trigger</text:p>
      <text:p text:style-name="Preformatted_20_Text"><text:s text:c="8"/>if deferral_package['optimal_execution_conditions'].get('preferred_contexts'):</text:p>
      <text:p text:style-name="Preformatted_20_Text"><text:s text:c="12"/>triggers.append({</text:p>
      <text:p text:style-name="Preformatted_20_Text"><text:s text:c="16"/>'type': 'context_match',</text:p>
      <text:p text:style-name="Preformatted_20_Text"><text:s text:c="16"/>'conditions': deferral_package['optimal_execution_conditions']['preferred_contexts'],</text:p>
      <text:p text:style-name="Preformatted_20_Text"><text:soft-page-break/><text:s text:c="16"/>'check_interval': 10</text:p>
      <text:p text:style-name="Preformatted_20_Text"><text:s text:c="12"/>})</text:p>
      <text:p text:style-name="Preformatted_20_Text"><text:s text:c="8"/></text:p>
      <text:p text:style-name="Preformatted_20_Text"><text:s text:c="8"/># Time-based trigger (don't defer forever)</text:p>
      <text:p text:style-name="Preformatted_20_Text"><text:s text:c="8"/>triggers.append({</text:p>
      <text:p text:style-name="Preformatted_20_Text"><text:s text:c="12"/>'type': 'timeout',</text:p>
      <text:p text:style-name="Preformatted_20_Text"><text:s text:c="12"/>'max_wait': deferral_package.get('max_deferral_time', 300),</text:p>
      <text:p text:style-name="Preformatted_20_Text"><text:s text:c="12"/>'check_interval': 60</text:p>
      <text:p text:style-name="Preformatted_20_Text"><text:s text:c="8"/>})</text:p>
      <text:p text:style-name="Preformatted_20_Text"><text:s text:c="8"/></text:p>
      <text:p text:style-name="Preformatted_20_Text"><text:s text:c="8"/>self.resumption_triggers[deferral_id] = triggers</text:p>
      <text:p text:style-name="Preformatted_20_Text"><text:s text:c="4"/></text:p>
      <text:p text:style-name="Preformatted_20_Text"><text:s text:c="4"/>def check_resumption_conditions(self):</text:p>
      <text:p text:style-name="Preformatted_20_Text"><text:s text:c="8"/>"""</text:p>
      <text:p text:style-name="Preformatted_20_Text"><text:s text:c="8"/>Check if any deferred tasks can be resumed</text:p>
      <text:p text:style-name="Preformatted_20_Text"><text:s text:c="8"/>"""</text:p>
      <text:p text:style-name="Preformatted_20_Text"><text:s text:c="8"/>resumable_tasks = []</text:p>
      <text:p text:style-name="Preformatted_20_Text"><text:s text:c="8"/></text:p>
      <text:p text:style-name="Preformatted_20_Text"><text:s text:c="8"/>for deferral_id, task_info in self.deferred_tasks.items():</text:p>
      <text:p text:style-name="Preformatted_20_Text"><text:s text:c="12"/>if task_info['status'] == 'waiting' and time.time() &gt; task_info['next_check']:</text:p>
      <text:p text:style-name="Preformatted_20_Text"><text:s text:c="16"/># Check all triggers</text:p>
      <text:p text:style-name="Preformatted_20_Text"><text:s text:c="16"/>can_resume = self.evaluate_resumption_triggers(deferral_id)</text:p>
      <text:p text:style-name="Preformatted_20_Text"><text:s text:c="16"/></text:p>
      <text:p text:style-name="Preformatted_20_Text"><text:s text:c="16"/>if can_resume:</text:p>
      <text:p text:style-name="Preformatted_20_Text"><text:s text:c="20"/>resumable_tasks.append(deferral_id)</text:p>
      <text:p text:style-name="Preformatted_20_Text"><text:s text:c="16"/></text:p>
      <text:p text:style-name="Preformatted_20_Text"><text:s text:c="16"/># Update next check time</text:p>
      <text:p text:style-name="Preformatted_20_Text"><text:s text:c="16"/>task_info['next_check'] = time.time() + self.calculate_next_check_interval(deferral_id)</text:p>
      <text:p text:style-name="Preformatted_20_Text"><text:s text:c="8"/></text:p>
      <text:p text:style-name="Preformatted_20_Text"><text:s text:c="8"/>return resumable_tasks</text:p>
      <text:p text:style-name="Preformatted_20_Text"><text:s text:c="4"/></text:p>
      <text:p text:style-name="Preformatted_20_Text"><text:s text:c="4"/>def evaluate_resumption_triggers(self, deferral_id):</text:p>
      <text:p text:style-name="Preformatted_20_Text"><text:s text:c="8"/>"""</text:p>
      <text:p text:style-name="Preformatted_20_Text"><text:s text:c="8"/>Evaluate all triggers for a deferred task</text:p>
      <text:p text:style-name="Preformatted_20_Text"><text:s text:c="8"/>"""</text:p>
      <text:p text:style-name="Preformatted_20_Text"><text:s text:c="8"/>triggers = self.resumption_triggers.get(deferral_id, [])</text:p>
      <text:p text:style-name="Preformatted_20_Text"><text:s text:c="8"/></text:p>
      <text:p text:style-name="Preformatted_20_Text"><text:s text:c="8"/>for trigger in triggers:</text:p>
      <text:p text:style-name="Preformatted_20_Text"><text:s text:c="12"/>if trigger['type'] == 'resource_available':</text:p>
      <text:p text:style-name="Preformatted_20_Text"><text:s text:c="16"/>if self.check_resource_availability(trigger['conditions']):</text:p>
      <text:p text:style-name="Preformatted_20_Text"><text:s text:c="20"/>return True</text:p>
      <text:p text:style-name="Preformatted_20_Text"><text:s text:c="12"/></text:p>
      <text:p text:style-name="Preformatted_20_Text"><text:s text:c="12"/>elif trigger['type'] == 'context_match':</text:p>
      <text:p text:style-name="Preformatted_20_Text"><text:s text:c="16"/>if self.check_context_match(trigger['conditions']):</text:p>
      <text:p text:style-name="Preformatted_20_Text"><text:s text:c="20"/>return True</text:p>
      <text:p text:style-name="Preformatted_20_Text"><text:s text:c="12"/></text:p>
      <text:p text:style-name="Preformatted_20_Text"><text:s text:c="12"/>elif trigger['type'] == 'timeout':</text:p>
      <text:p text:style-name="Preformatted_20_Text"><text:s text:c="16"/># Load deferral package to check timestamp</text:p>
      <text:p text:style-name="Preformatted_20_Text"><text:s text:c="16"/>package = self.load_from_storage(deferral_id)</text:p>
      <text:p text:style-name="Preformatted_20_Text"><text:s text:c="16"/>if time.time() - package['timestamp'] &gt; trigger['max_wait']:</text:p>
      <text:p text:style-name="Preformatted_20_Text"><text:s text:c="20"/>return True <text:s/># Timeout reached, execute anyway</text:p>
      <text:p text:style-name="Preformatted_20_Text"><text:s text:c="8"/></text:p>
      <text:p text:style-name="Preformatted_20_Text"><text:s text:c="8"/>return False</text:p>
      <text:p text:style-name="Preformatted_20_Text"><text:s text:c="4"/></text:p>
      <text:p text:style-name="Preformatted_20_Text"><text:s text:c="4"/>def resume_task(self, deferral_id):</text:p>
      <text:p text:style-name="Preformatted_20_Text"><text:s text:c="8"/>"""</text:p>
      <text:p text:style-name="Preformatted_20_Text"><text:s text:c="8"/>Resume a deferred task</text:p>
      <text:p text:style-name="Preformatted_20_Text"><text:s text:c="8"/>"""</text:p>
      <text:p text:style-name="Preformatted_20_Text"><text:s text:c="8"/># Load deferral package</text:p>
      <text:p text:style-name="Preformatted_20_Text"><text:s text:c="8"/>package = self.load_from_storage(deferral_id)</text:p>
      <text:p text:style-name="Preformatted_20_Text"><text:s text:c="8"/></text:p>
      <text:p text:style-name="Preformatted_20_Text"><text:s text:c="8"/># Update status</text:p>
      <text:p text:style-name="Preformatted_20_Text"><text:soft-page-break/><text:s text:c="8"/>self.deferred_tasks[deferral_id]['status'] = 'resuming'</text:p>
      <text:p text:style-name="Preformatted_20_Text"><text:s text:c="8"/></text:p>
      <text:p text:style-name="Preformatted_20_Text"><text:s text:c="8"/># Execute task with recorded context</text:p>
      <text:p text:style-name="Preformatted_20_Text"><text:s text:c="8"/>result = self.execute_with_context(package)</text:p>
      <text:p text:style-name="Preformatted_20_Text"><text:s text:c="8"/></text:p>
      <text:p text:style-name="Preformatted_20_Text"><text:s text:c="8"/># Clean up</text:p>
      <text:p text:style-name="Preformatted_20_Text"><text:s text:c="8"/>self.cleanup_deferral(deferral_id)</text:p>
      <text:p text:style-name="Preformatted_20_Text"><text:s text:c="8"/></text:p>
      <text:p text:style-name="P7"><text:s text:c="8"/>return result</text:p>
      <text:h text:style-name="Heading_20_2" text:outline-level="2"><text:span text:style-name="Strong_20_Emphasis">3. Reflection Engine for Deep Analysis</text:span></text:h>
      <text:h text:style-name="Heading_20_3" text:outline-level="3"><text:span text:style-name="Strong_20_Emphasis">A. Reflection Period Management</text:span></text:h>
      <text:p text:style-name="Text_20_body">python</text:p>
      <text:p text:style-name="Preformatted_20_Text">class ReflectionEngine:</text:p>
      <text:p text:style-name="Preformatted_20_Text"><text:s text:c="4"/>def __init__(self, storage_path, analysis_modules):</text:p>
      <text:p text:style-name="Preformatted_20_Text"><text:s text:c="8"/>self.storage_path = storage_path</text:p>
      <text:p text:style-name="Preformatted_20_Text"><text:s text:c="8"/>self.analysis_modules = analysis_modules</text:p>
      <text:p text:style-name="Preformatted_20_Text"><text:s text:c="8"/>self.reflection_queue = []</text:p>
      <text:p text:style-name="Preformatted_20_Text"><text:s text:c="8"/>self.analysis_results = {}</text:p>
      <text:p text:style-name="Preformatted_20_Text"><text:s text:c="8"/>self.learning_updates = {}</text:p>
      <text:p text:style-name="Preformatted_20_Text"><text:s text:c="8"/></text:p>
      <text:p text:style-name="Preformatted_20_Text"><text:s text:c="4"/>def schedule_reflection(self, data_type, data, priority, analysis_requirements):</text:p>
      <text:p text:style-name="Preformatted_20_Text"><text:s text:c="8"/>"""</text:p>
      <text:p text:style-name="Preformatted_20_Text"><text:s text:c="8"/>Schedule data for reflection analysis</text:p>
      <text:p text:style-name="Preformatted_20_Text"><text:s text:c="8"/>"""</text:p>
      <text:p text:style-name="Preformatted_20_Text"><text:s text:c="8"/>reflection_item = {</text:p>
      <text:p text:style-name="Preformatted_20_Text"><text:s text:c="12"/>'id': f"{data_type}_{int(time.time())}",</text:p>
      <text:p text:style-name="Preformatted_20_Text"><text:s text:c="12"/>'data_type': data_type,</text:p>
      <text:p text:style-name="Preformatted_20_Text"><text:s text:c="12"/>'data': data,</text:p>
      <text:p text:style-name="Preformatted_20_Text"><text:s text:c="12"/>'timestamp': time.time(),</text:p>
      <text:p text:style-name="Preformatted_20_Text"><text:s text:c="12"/>'priority': priority,</text:p>
      <text:p text:style-name="Preformatted_20_Text"><text:s text:c="12"/>'analysis_requirements': analysis_requirements,</text:p>
      <text:p text:style-name="Preformatted_20_Text"><text:s text:c="12"/>'status': 'pending',</text:p>
      <text:p text:style-name="Preformatted_20_Text"><text:s text:c="12"/>'scheduled_for': self.calculate_reflection_time(priority)</text:p>
      <text:p text:style-name="Preformatted_20_Text"><text:s text:c="8"/>}</text:p>
      <text:p text:style-name="Preformatted_20_Text"><text:s text:c="8"/></text:p>
      <text:p text:style-name="Preformatted_20_Text"><text:s text:c="8"/># Save to persistent storage</text:p>
      <text:p text:style-name="Preformatted_20_Text"><text:s text:c="8"/>self.save_reflection_item(reflection_item)</text:p>
      <text:p text:style-name="Preformatted_20_Text"><text:s text:c="8"/></text:p>
      <text:p text:style-name="Preformatted_20_Text"><text:s text:c="8"/># Add to queue</text:p>
      <text:p text:style-name="Preformatted_20_Text"><text:s text:c="8"/>self.reflection_queue.append(reflection_item['id'])</text:p>
      <text:p text:style-name="Preformatted_20_Text"><text:s text:c="8"/></text:p>
      <text:p text:style-name="Preformatted_20_Text"><text:s text:c="8"/># Sort queue by priority and scheduling time</text:p>
      <text:p text:style-name="Preformatted_20_Text"><text:s text:c="8"/>self.reflection_queue.sort(key=lambda x: self.get_reflection_priority(x))</text:p>
      <text:p text:style-name="Preformatted_20_Text"><text:s text:c="8"/></text:p>
      <text:p text:style-name="Preformatted_20_Text"><text:s text:c="8"/>return reflection_item['id']</text:p>
      <text:p text:style-name="Preformatted_20_Text"><text:s text:c="4"/></text:p>
      <text:p text:style-name="Preformatted_20_Text"><text:s text:c="4"/>def calculate_reflection_time(self, priority):</text:p>
      <text:p text:style-name="Preformatted_20_Text"><text:s text:c="8"/>"""</text:p>
      <text:p text:style-name="Preformatted_20_Text"><text:s text:c="8"/>Determine when reflection should occur based on priority</text:p>
      <text:p text:style-name="Preformatted_20_Text"><text:s text:c="8"/>"""</text:p>
      <text:p text:style-name="Preformatted_20_Text"><text:s text:c="8"/>base_times = {</text:p>
      <text:p text:style-name="Preformatted_20_Text"><text:s text:c="12"/>'high': 300, <text:s text:c="3"/># 5 minutes</text:p>
      <text:p text:style-name="Preformatted_20_Text"><text:s text:c="12"/>'medium': 1800, # 30 minutes</text:p>
      <text:p text:style-name="Preformatted_20_Text"><text:s text:c="12"/>'low': 3600 <text:s text:c="4"/># 1 hour</text:p>
      <text:p text:style-name="Preformatted_20_Text"><text:s text:c="8"/>}</text:p>
      <text:p text:style-name="Preformatted_20_Text"><text:soft-page-break/><text:s text:c="8"/></text:p>
      <text:p text:style-name="Preformatted_20_Text"><text:s text:c="8"/>base_time = base_times.get(priority, 1800)</text:p>
      <text:p text:style-name="Preformatted_20_Text"><text:s text:c="8"/></text:p>
      <text:p text:style-name="Preformatted_20_Text"><text:s text:c="8"/># Adjust based on system idle patterns</text:p>
      <text:p text:style-name="Preformatted_20_Text"><text:s text:c="8"/>idle_patterns = self.analyze_idle_patterns()</text:p>
      <text:p text:style-name="Preformatted_20_Text"><text:s text:c="8"/>optimal_time = self.find_optimal_reflection_window(base_time, idle_patterns)</text:p>
      <text:p text:style-name="Preformatted_20_Text"><text:s text:c="8"/></text:p>
      <text:p text:style-name="Preformatted_20_Text"><text:s text:c="8"/>return time.time() + optimal_time</text:p>
      <text:p text:style-name="Preformatted_20_Text"><text:s text:c="4"/></text:p>
      <text:p text:style-name="Preformatted_20_Text"><text:s text:c="4"/>def run_reflection_cycle(self):</text:p>
      <text:p text:style-name="Preformatted_20_Text"><text:s text:c="8"/>"""</text:p>
      <text:p text:style-name="Preformatted_20_Text"><text:s text:c="8"/>Execute reflection analysis when system is idle</text:p>
      <text:p text:style-name="Preformatted_20_Text"><text:s text:c="8"/>"""</text:p>
      <text:p text:style-name="Preformatted_20_Text"><text:s text:c="8"/># Check if system is suitable for reflection</text:p>
      <text:p text:style-name="Preformatted_20_Text"><text:s text:c="8"/>if not self.is_suitable_for_reflection():</text:p>
      <text:p text:style-name="Preformatted_20_Text"><text:s text:c="12"/>return</text:p>
      <text:p text:style-name="Preformatted_20_Text"><text:s text:c="8"/></text:p>
      <text:p text:style-name="Preformatted_20_Text"><text:s text:c="8"/># Get next reflection item</text:p>
      <text:p text:style-name="Preformatted_20_Text"><text:s text:c="8"/>if not self.reflection_queue:</text:p>
      <text:p text:style-name="Preformatted_20_Text"><text:s text:c="12"/>return</text:p>
      <text:p text:style-name="Preformatted_20_Text"><text:s text:c="8"/></text:p>
      <text:p text:style-name="Preformatted_20_Text"><text:s text:c="8"/>reflection_id = self.reflection_queue.pop(0)</text:p>
      <text:p text:style-name="Preformatted_20_Text"><text:s text:c="8"/>reflection_item = self.load_reflection_item(reflection_id)</text:p>
      <text:p text:style-name="Preformatted_20_Text"><text:s text:c="8"/></text:p>
      <text:p text:style-name="Preformatted_20_Text"><text:s text:c="8"/># Update status</text:p>
      <text:p text:style-name="Preformatted_20_Text"><text:s text:c="8"/>reflection_item['status'] = 'analyzing'</text:p>
      <text:p text:style-name="Preformatted_20_Text"><text:s text:c="8"/>self.save_reflection_item(reflection_item)</text:p>
      <text:p text:style-name="Preformatted_20_Text"><text:s text:c="8"/></text:p>
      <text:p text:style-name="Preformatted_20_Text"><text:s text:c="8"/># Perform analysis based on requirements</text:p>
      <text:p text:style-name="Preformatted_20_Text"><text:s text:c="8"/>analysis_results = {}</text:p>
      <text:p text:style-name="Preformatted_20_Text"><text:s text:c="8"/>for requirement in reflection_item['analysis_requirements']:</text:p>
      <text:p text:style-name="Preformatted_20_Text"><text:s text:c="12"/>if requirement in self.analysis_modules:</text:p>
      <text:p text:style-name="Preformatted_20_Text"><text:s text:c="16"/>result = self.analysis_modules[requirement].analyze(</text:p>
      <text:p text:style-name="Preformatted_20_Text"><text:s text:c="20"/>reflection_item['data']</text:p>
      <text:p text:style-name="Preformatted_20_Text"><text:s text:c="16"/>)</text:p>
      <text:p text:style-name="Preformatted_20_Text"><text:s text:c="16"/>analysis_results[requirement] = result</text:p>
      <text:p text:style-name="Preformatted_20_Text"><text:s text:c="8"/></text:p>
      <text:p text:style-name="Preformatted_20_Text"><text:s text:c="8"/># Generate insights</text:p>
      <text:p text:style-name="Preformatted_20_Text"><text:s text:c="8"/>insights = self.generate_insights(analysis_results)</text:p>
      <text:p text:style-name="Preformatted_20_Text"><text:s text:c="8"/></text:p>
      <text:p text:style-name="Preformatted_20_Text"><text:s text:c="8"/># Update learning</text:p>
      <text:p text:style-name="Preformatted_20_Text"><text:s text:c="8"/>learning_updates = self.update_learning_models(insights)</text:p>
      <text:p text:style-name="Preformatted_20_Text"><text:s text:c="8"/></text:p>
      <text:p text:style-name="Preformatted_20_Text"><text:s text:c="8"/># Store results</text:p>
      <text:p text:style-name="Preformatted_20_Text"><text:s text:c="8"/>reflection_item['status'] = 'completed'</text:p>
      <text:p text:style-name="Preformatted_20_Text"><text:s text:c="8"/>reflection_item['analysis_results'] = analysis_results</text:p>
      <text:p text:style-name="Preformatted_20_Text"><text:s text:c="8"/>reflection_item['insights'] = insights</text:p>
      <text:p text:style-name="Preformatted_20_Text"><text:s text:c="8"/>reflection_item['learning_updates'] = learning_updates</text:p>
      <text:p text:style-name="Preformatted_20_Text"><text:s text:c="8"/>reflection_item['completed_at'] = time.time()</text:p>
      <text:p text:style-name="Preformatted_20_Text"><text:s text:c="8"/></text:p>
      <text:p text:style-name="Preformatted_20_Text"><text:s text:c="8"/>self.save_reflection_item(reflection_item)</text:p>
      <text:p text:style-name="Preformatted_20_Text"><text:s text:c="8"/></text:p>
      <text:p text:style-name="Preformatted_20_Text"><text:s text:c="8"/># Cleanup old reflections</text:p>
      <text:p text:style-name="Preformatted_20_Text"><text:s text:c="8"/>self.cleanup_old_reflections()</text:p>
      <text:p text:style-name="Preformatted_20_Text"><text:s text:c="8"/></text:p>
      <text:p text:style-name="Preformatted_20_Text"><text:s text:c="8"/>return insights</text:p>
      <text:p text:style-name="Preformatted_20_Text"><text:s text:c="4"/></text:p>
      <text:p text:style-name="Preformatted_20_Text"><text:s text:c="4"/>def generate_insights(self, analysis_results):</text:p>
      <text:p text:style-name="Preformatted_20_Text"><text:s text:c="8"/>"""</text:p>
      <text:p text:style-name="Preformatted_20_Text"><text:s text:c="8"/>Generate actionable insights from analysis results</text:p>
      <text:p text:style-name="Preformatted_20_Text"><text:s text:c="8"/>"""</text:p>
      <text:p text:style-name="Preformatted_20_Text"><text:s text:c="8"/>insights = {</text:p>
      <text:p text:style-name="Preformatted_20_Text"><text:s text:c="12"/>'behavioral_patterns': [],</text:p>
      <text:p text:style-name="Preformatted_20_Text"><text:soft-page-break/><text:s text:c="12"/>'system_optimizations': [],</text:p>
      <text:p text:style-name="Preformatted_20_Text"><text:s text:c="12"/>'user_preferences': [],</text:p>
      <text:p text:style-name="Preformatted_20_Text"><text:s text:c="12"/>'context_understanding': [],</text:p>
      <text:p text:style-name="Preformatted_20_Text"><text:s text:c="12"/>'anomalies': []</text:p>
      <text:p text:style-name="Preformatted_20_Text"><text:s text:c="8"/>}</text:p>
      <text:p text:style-name="Preformatted_20_Text"><text:s text:c="8"/></text:p>
      <text:p text:style-name="Preformatted_20_Text"><text:s text:c="8"/># Behavioral analysis insights</text:p>
      <text:p text:style-name="Preformatted_20_Text"><text:s text:c="8"/>if 'behavioral_analysis' in analysis_results:</text:p>
      <text:p text:style-name="Preformatted_20_Text"><text:s text:c="12"/>behavior_data = analysis_results['behavioral_analysis']</text:p>
      <text:p text:style-name="Preformatted_20_Text"><text:s text:c="12"/></text:p>
      <text:p text:style-name="Preformatted_20_Text"><text:s text:c="12"/># Detect patterns</text:p>
      <text:p text:style-name="Preformatted_20_Text"><text:s text:c="12"/>patterns = self.detect_behavioral_patterns(behavior_data)</text:p>
      <text:p text:style-name="Preformatted_20_Text"><text:s text:c="12"/>insights['behavioral_patterns'].extend(patterns)</text:p>
      <text:p text:style-name="Preformatted_20_Text"><text:s text:c="12"/></text:p>
      <text:p text:style-name="Preformatted_20_Text"><text:s text:c="12"/># Detect anomalies</text:p>
      <text:p text:style-name="Preformatted_20_Text"><text:s text:c="12"/>anomalies = self.detect_behavioral_anomalies(behavior_data)</text:p>
      <text:p text:style-name="Preformatted_20_Text"><text:s text:c="12"/>insights['anomalies'].extend(anomalies)</text:p>
      <text:p text:style-name="Preformatted_20_Text"><text:s text:c="8"/></text:p>
      <text:p text:style-name="Preformatted_20_Text"><text:s text:c="8"/># System performance insights</text:p>
      <text:p text:style-name="Preformatted_20_Text"><text:s text:c="8"/>if 'performance_analysis' in analysis_results:</text:p>
      <text:p text:style-name="Preformatted_20_Text"><text:s text:c="12"/>perf_data = analysis_results['performance_analysis']</text:p>
      <text:p text:style-name="Preformatted_20_Text"><text:s text:c="12"/></text:p>
      <text:p text:style-name="Preformatted_20_Text"><text:s text:c="12"/># Optimization suggestions</text:p>
      <text:p text:style-name="Preformatted_20_Text"><text:s text:c="12"/>optimizations = self.generate_optimization_suggestions(perf_data)</text:p>
      <text:p text:style-name="Preformatted_20_Text"><text:s text:c="12"/>insights['system_optimizations'].extend(optimizations)</text:p>
      <text:p text:style-name="Preformatted_20_Text"><text:s text:c="8"/></text:p>
      <text:p text:style-name="Preformatted_20_Text"><text:s text:c="8"/># User interaction insights</text:p>
      <text:p text:style-name="Preformatted_20_Text"><text:s text:c="8"/>if 'interaction_analysis' in analysis_results:</text:p>
      <text:p text:style-name="Preformatted_20_Text"><text:s text:c="12"/>interaction_data = analysis_results['interaction_analysis']</text:p>
      <text:p text:style-name="Preformatted_20_Text"><text:s text:c="12"/></text:p>
      <text:p text:style-name="Preformatted_20_Text"><text:s text:c="12"/># Preference detection</text:p>
      <text:p text:style-name="Preformatted_20_Text"><text:s text:c="12"/>preferences = self.detect_user_preferences(interaction_data)</text:p>
      <text:p text:style-name="Preformatted_20_Text"><text:s text:c="12"/>insights['user_preferences'].extend(preferences)</text:p>
      <text:p text:style-name="Preformatted_20_Text"><text:s text:c="12"/></text:p>
      <text:p text:style-name="Preformatted_20_Text"><text:s text:c="12"/># Context understanding</text:p>
      <text:p text:style-name="Preformatted_20_Text"><text:s text:c="12"/>context_insights = self.understand_context_patterns(interaction_data)</text:p>
      <text:p text:style-name="Preformatted_20_Text"><text:s text:c="12"/>insights['context_understanding'].extend(context_insights)</text:p>
      <text:p text:style-name="Preformatted_20_Text"><text:s text:c="8"/></text:p>
      <text:p text:style-name="Preformatted_20_Text"><text:s text:c="8"/>return insights</text:p>
      <text:p text:style-name="Preformatted_20_Text"><text:s text:c="4"/></text:p>
      <text:p text:style-name="Preformatted_20_Text"><text:s text:c="4"/>def update_learning_models(self, insights):</text:p>
      <text:p text:style-name="Preformatted_20_Text"><text:s text:c="8"/>"""</text:p>
      <text:p text:style-name="Preformatted_20_Text"><text:s text:c="8"/>Update system learning models based on reflection insights</text:p>
      <text:p text:style-name="Preformatted_20_Text"><text:s text:c="8"/>"""</text:p>
      <text:p text:style-name="Preformatted_20_Text"><text:s text:c="8"/>updates = {}</text:p>
      <text:p text:style-name="Preformatted_20_Text"><text:s text:c="8"/></text:p>
      <text:p text:style-name="Preformatted_20_Text"><text:s text:c="8"/># Update behavioral models</text:p>
      <text:p text:style-name="Preformatted_20_Text"><text:s text:c="8"/>for pattern in insights.get('behavioral_patterns', []):</text:p>
      <text:p text:style-name="Preformatted_20_Text"><text:s text:c="12"/>if pattern['type'] == 'interaction_pattern':</text:p>
      <text:p text:style-name="Preformatted_20_Text"><text:s text:c="16"/>update = self.update_interaction_model(pattern)</text:p>
      <text:p text:style-name="Preformatted_20_Text"><text:s text:c="16"/>updates.setdefault('interaction_model', []).append(update)</text:p>
      <text:p text:style-name="Preformatted_20_Text"><text:s text:c="8"/></text:p>
      <text:p text:style-name="Preformatted_20_Text"><text:s text:c="8"/># Update resource management models</text:p>
      <text:p text:style-name="Preformatted_20_Text"><text:s text:c="8"/>for optimization in insights.get('system_optimizations', []):</text:p>
      <text:p text:style-name="Preformatted_20_Text"><text:s text:c="12"/>if optimization['type'] == 'resource_allocation':</text:p>
      <text:p text:style-name="Preformatted_20_Text"><text:s text:c="16"/>update = self.update_resource_model(optimization)</text:p>
      <text:p text:style-name="Preformatted_20_Text"><text:s text:c="16"/>updates.setdefault('resource_model', []).append(update)</text:p>
      <text:p text:style-name="Preformatted_20_Text"><text:s text:c="8"/></text:p>
      <text:p text:style-name="Preformatted_20_Text"><text:s text:c="8"/># Update context understanding</text:p>
      <text:p text:style-name="Preformatted_20_Text"><text:s text:c="8"/>for context_insight in insights.get('context_understanding', []):</text:p>
      <text:p text:style-name="Preformatted_20_Text"><text:s text:c="12"/>update = self.update_context_model(context_insight)</text:p>
      <text:p text:style-name="Preformatted_20_Text"><text:s text:c="12"/>updates.setdefault('context_model', []).append(update)</text:p>
      <text:p text:style-name="Preformatted_20_Text"><text:s text:c="8"/></text:p>
      <text:p text:style-name="P7"><text:soft-page-break/><text:s text:c="8"/>return updates</text:p>
      <text:h text:style-name="Heading_20_3" text:outline-level="3"><text:span text:style-name="Strong_20_Emphasis">B. Analysis Modules for Reflection</text:span></text:h>
      <text:p text:style-name="Text_20_body">python</text:p>
      <text:p text:style-name="Preformatted_20_Text">class BehavioralAnalysisModule:</text:p>
      <text:p text:style-name="Preformatted_20_Text"><text:s text:c="4"/>def __init__(self):</text:p>
      <text:p text:style-name="Preformatted_20_Text"><text:s text:c="8"/>self.pattern_detectors = {</text:p>
      <text:p text:style-name="Preformatted_20_Text"><text:s text:c="12"/>'engagement_patterns': EngagementPatternDetector(),</text:p>
      <text:p text:style-name="Preformatted_20_Text"><text:s text:c="12"/>'emotional_patterns': EmotionalPatternDetector(),</text:p>
      <text:p text:style-name="Preformatted_20_Text"><text:s text:c="12"/>'interaction_sequences': InteractionSequenceAnalyzer(),</text:p>
      <text:p text:style-name="Preformatted_20_Text"><text:s text:c="12"/>'preference_evolution': PreferenceEvolutionTracker()</text:p>
      <text:p text:style-name="Preformatted_20_Text"><text:s text:c="8"/>}</text:p>
      <text:p text:style-name="Preformatted_20_Text"><text:s text:c="8"/></text:p>
      <text:p text:style-name="Preformatted_20_Text"><text:s text:c="4"/>def analyze(self, behavioral_data):</text:p>
      <text:p text:style-name="Preformatted_20_Text"><text:s text:c="8"/>"""</text:p>
      <text:p text:style-name="Preformatted_20_Text"><text:s text:c="8"/>Analyze behavioral data for patterns and insights</text:p>
      <text:p text:style-name="Preformatted_20_Text"><text:s text:c="8"/>"""</text:p>
      <text:p text:style-name="Preformatted_20_Text"><text:s text:c="8"/>results = {}</text:p>
      <text:p text:style-name="Preformatted_20_Text"><text:s text:c="8"/></text:p>
      <text:p text:style-name="Preformatted_20_Text"><text:s text:c="8"/>for detector_name, detector in self.pattern_detectors.items():</text:p>
      <text:p text:style-name="Preformatted_20_Text"><text:s text:c="12"/>try:</text:p>
      <text:p text:style-name="Preformatted_20_Text"><text:s text:c="16"/>result = detector.analyze(behavioral_data)</text:p>
      <text:p text:style-name="Preformatted_20_Text"><text:s text:c="16"/>results[detector_name] = result</text:p>
      <text:p text:style-name="Preformatted_20_Text"><text:s text:c="12"/>except Exception as e:</text:p>
      <text:p text:style-name="Preformatted_20_Text"><text:s text:c="16"/>logger.error(f"Behavioral analysis error in {detector_name}: {e}")</text:p>
      <text:p text:style-name="Preformatted_20_Text"><text:s text:c="8"/></text:p>
      <text:p text:style-name="Preformatted_20_Text"><text:s text:c="8"/># Synthesize comprehensive insights</text:p>
      <text:p text:style-name="Preformatted_20_Text"><text:s text:c="8"/>synthesized = self.synthesize_insights(results)</text:p>
      <text:p text:style-name="Preformatted_20_Text"><text:s text:c="8"/>results['synthesized_insights'] = synthesized</text:p>
      <text:p text:style-name="Preformatted_20_Text"><text:s text:c="8"/></text:p>
      <text:p text:style-name="Preformatted_20_Text"><text:s text:c="8"/>return results</text:p>
      <text:p text:style-name="Preformatted_20_Text"><text:s text:c="4"/></text:p>
      <text:p text:style-name="Preformatted_20_Text"><text:s text:c="4"/>def synthesize_insights(self, detector_results):</text:p>
      <text:p text:style-name="Preformatted_20_Text"><text:s text:c="8"/>"""</text:p>
      <text:p text:style-name="Preformatted_20_Text"><text:s text:c="8"/>Synthesize insights from multiple detectors</text:p>
      <text:p text:style-name="Preformatted_20_Text"><text:s text:c="8"/>"""</text:p>
      <text:p text:style-name="Preformatted_20_Text"><text:s text:c="8"/>insights = []</text:p>
      <text:p text:style-name="Preformatted_20_Text"><text:s text:c="8"/></text:p>
      <text:p text:style-name="Preformatted_20_Text"><text:s text:c="8"/># Cross-reference engagement and emotional patterns</text:p>
      <text:p text:style-name="Preformatted_20_Text"><text:s text:c="8"/>engagement_patterns = detector_results.get('engagement_patterns', {}).get('patterns', [])</text:p>
      <text:p text:style-name="Preformatted_20_Text"><text:s text:c="8"/>emotional_patterns = detector_results.get('emotional_patterns', {}).get('patterns', [])</text:p>
      <text:p text:style-name="Preformatted_20_Text"><text:s text:c="8"/></text:p>
      <text:p text:style-name="Preformatted_20_Text"><text:s text:c="8"/>for eng_pattern in engagement_patterns:</text:p>
      <text:p text:style-name="Preformatted_20_Text"><text:s text:c="12"/>for emo_pattern in emotional_patterns:</text:p>
      <text:p text:style-name="Preformatted_20_Text"><text:s text:c="16"/># Check for correlation</text:p>
      <text:p text:style-name="Preformatted_20_Text"><text:s text:c="16"/>if self.patterns_correlate(eng_pattern, emo_pattern):</text:p>
      <text:p text:style-name="Preformatted_20_Text"><text:s text:c="20"/>insight = {</text:p>
      <text:p text:style-name="Preformatted_20_Text"><text:s text:c="24"/>'type': 'engagement_emotion_correlation',</text:p>
      <text:p text:style-name="Preformatted_20_Text"><text:s text:c="24"/>'description': f"When {eng_pattern['description']}, user tends to feel {emo_pattern['description']}",</text:p>
      <text:p text:style-name="Preformatted_20_Text"><text:s text:c="24"/>'confidence': min(eng_pattern['confidence'], emo_pattern['confidence']),</text:p>
      <text:p text:style-name="Preformatted_20_Text"><text:s text:c="24"/>'implications': self.derive_implications(eng_pattern, emo_pattern)</text:p>
      <text:p text:style-name="Preformatted_20_Text"><text:s text:c="20"/>}</text:p>
      <text:p text:style-name="Preformatted_20_Text"><text:s text:c="20"/>insights.append(insight)</text:p>
      <text:p text:style-name="Preformatted_20_Text"><text:s text:c="8"/></text:p>
      <text:p text:style-name="Preformatted_20_Text"><text:s text:c="8"/># Analyze preference evolution</text:p>
      <text:p text:style-name="Preformatted_20_Text"><text:soft-page-break/><text:s text:c="8"/>preference_data = detector_results.get('preference_evolution', {})</text:p>
      <text:p text:style-name="Preformatted_20_Text"><text:s text:c="8"/>if preference_data.get('significant_changes'):</text:p>
      <text:p text:style-name="Preformatted_20_Text"><text:s text:c="12"/>for change in preference_data['significant_changes']:</text:p>
      <text:p text:style-name="Preformatted_20_Text"><text:s text:c="16"/>insight = {</text:p>
      <text:p text:style-name="Preformatted_20_Text"><text:s text:c="20"/>'type': 'preference_evolution',</text:p>
      <text:p text:style-name="Preformatted_20_Text"><text:s text:c="20"/>'description': f"User's preference for {change['preference']} has {change['direction']}",</text:p>
      <text:p text:style-name="Preformatted_20_Text"><text:s text:c="20"/>'magnitude': change['magnitude'],</text:p>
      <text:p text:style-name="Preformatted_20_Text"><text:s text:c="20"/>'suggested_adjustments': self.suggest_preference_adjustments(change)</text:p>
      <text:p text:style-name="Preformatted_20_Text"><text:s text:c="16"/>}</text:p>
      <text:p text:style-name="Preformatted_20_Text"><text:s text:c="16"/>insights.append(insight)</text:p>
      <text:p text:style-name="Preformatted_20_Text"><text:s text:c="8"/></text:p>
      <text:p text:style-name="Preformatted_20_Text"><text:s text:c="8"/>return insights</text:p>
      <text:p text:style-name="Preformatted_20_Text"/>
      <text:p text:style-name="Preformatted_20_Text"/>
      <text:p text:style-name="Preformatted_20_Text">class SystemPerformanceAnalysisModule:</text:p>
      <text:p text:style-name="Preformatted_20_Text"><text:s text:c="4"/>def __init__(self):</text:p>
      <text:p text:style-name="Preformatted_20_Text"><text:s text:c="8"/>self.performance_metrics = {</text:p>
      <text:p text:style-name="Preformatted_20_Text"><text:s text:c="12"/>'response_times': [],</text:p>
      <text:p text:style-name="Preformatted_20_Text"><text:s text:c="12"/>'resource_usage': [],</text:p>
      <text:p text:style-name="Preformatted_20_Text"><text:s text:c="12"/>'task_completion': [],</text:p>
      <text:p text:style-name="Preformatted_20_Text"><text:s text:c="12"/>'thermal_performance': []</text:p>
      <text:p text:style-name="Preformatted_20_Text"><text:s text:c="8"/>}</text:p>
      <text:p text:style-name="Preformatted_20_Text"><text:s text:c="8"/></text:p>
      <text:p text:style-name="Preformatted_20_Text"><text:s text:c="4"/>def analyze(self, performance_data):</text:p>
      <text:p text:style-name="Preformatted_20_Text"><text:s text:c="8"/>"""</text:p>
      <text:p text:style-name="Preformatted_20_Text"><text:s text:c="8"/>Analyze system performance data</text:p>
      <text:p text:style-name="Preformatted_20_Text"><text:s text:c="8"/>"""</text:p>
      <text:p text:style-name="Preformatted_20_Text"><text:s text:c="8"/>analysis = {</text:p>
      <text:p text:style-name="Preformatted_20_Text"><text:s text:c="12"/>'bottlenecks': self.identify_bottlenecks(performance_data),</text:p>
      <text:p text:style-name="Preformatted_20_Text"><text:s text:c="12"/>'optimization_opportunities': self.find_optimization_opportunities(performance_data),</text:p>
      <text:p text:style-name="Preformatted_20_Text"><text:s text:c="12"/>'thermal_management': self.analyze_thermal_performance(performance_data),</text:p>
      <text:p text:style-name="Preformatted_20_Text"><text:s text:c="12"/>'resource_efficiency': self.calculate_resource_efficiency(performance_data)</text:p>
      <text:p text:style-name="Preformatted_20_Text"><text:s text:c="8"/>}</text:p>
      <text:p text:style-name="Preformatted_20_Text"><text:s text:c="8"/></text:p>
      <text:p text:style-name="Preformatted_20_Text"><text:s text:c="8"/># Generate recommendations</text:p>
      <text:p text:style-name="Preformatted_20_Text"><text:s text:c="8"/>recommendations = self.generate_recommendations(analysis)</text:p>
      <text:p text:style-name="Preformatted_20_Text"><text:s text:c="8"/>analysis['recommendations'] = recommendations</text:p>
      <text:p text:style-name="Preformatted_20_Text"><text:s text:c="8"/></text:p>
      <text:p text:style-name="Preformatted_20_Text"><text:s text:c="8"/>return analysis</text:p>
      <text:p text:style-name="Preformatted_20_Text"><text:s text:c="4"/></text:p>
      <text:p text:style-name="Preformatted_20_Text"><text:s text:c="4"/>def identify_bottlenecks(self, performance_data):</text:p>
      <text:p text:style-name="Preformatted_20_Text"><text:s text:c="8"/>"""</text:p>
      <text:p text:style-name="Preformatted_20_Text"><text:s text:c="8"/>Identify performance bottlenecks</text:p>
      <text:p text:style-name="Preformatted_20_Text"><text:s text:c="8"/>"""</text:p>
      <text:p text:style-name="Preformatted_20_Text"><text:s text:c="8"/>bottlenecks = []</text:p>
      <text:p text:style-name="Preformatted_20_Text"><text:s text:c="8"/></text:p>
      <text:p text:style-name="Preformatted_20_Text"><text:s text:c="8"/># Analyze response times</text:p>
      <text:p text:style-name="Preformatted_20_Text"><text:s text:c="8"/>response_times = performance_data.get('response_times', [])</text:p>
      <text:p text:style-name="Preformatted_20_Text"><text:s text:c="8"/>if response_times:</text:p>
      <text:p text:style-name="Preformatted_20_Text"><text:s text:c="12"/>avg_response = sum(response_times) / len(response_times)</text:p>
      <text:p text:style-name="Preformatted_20_Text"><text:s text:c="12"/>if avg_response &gt; 1000: <text:s/># 1 second threshold</text:p>
      <text:p text:style-name="Preformatted_20_Text"><text:s text:c="16"/>bottlenecks.append({</text:p>
      <text:p text:style-name="Preformatted_20_Text"><text:s text:c="20"/>'type': 'response_time',</text:p>
      <text:p text:style-name="Preformatted_20_Text"><text:s text:c="20"/>'metric': 'average_response_time',</text:p>
      <text:p text:style-name="Preformatted_20_Text"><text:s text:c="20"/>'value': avg_response,</text:p>
      <text:p text:style-name="Preformatted_20_Text"><text:s text:c="20"/>'threshold': 1000,</text:p>
      <text:p text:style-name="Preformatted_20_Text"><text:s text:c="20"/>'suggestion': 'Optimize task scheduling or reduce task complexity'</text:p>
      <text:p text:style-name="Preformatted_20_Text"><text:s text:c="16"/>})</text:p>
      <text:p text:style-name="Preformatted_20_Text"><text:soft-page-break/><text:s text:c="8"/></text:p>
      <text:p text:style-name="Preformatted_20_Text"><text:s text:c="8"/># Analyze CPU usage patterns</text:p>
      <text:p text:style-name="Preformatted_20_Text"><text:s text:c="8"/>cpu_data = performance_data.get('cpu_usage', [])</text:p>
      <text:p text:style-name="Preformatted_20_Text"><text:s text:c="8"/>if cpu_data:</text:p>
      <text:p text:style-name="Preformatted_20_Text"><text:s text:c="12"/>high_usage_periods = [usage for usage in cpu_data if usage &gt; 80]</text:p>
      <text:p text:style-name="Preformatted_20_Text"><text:s text:c="12"/>if len(high_usage_periods) &gt; len(cpu_data) * 0.3: <text:s/># 30% of time</text:p>
      <text:p text:style-name="Preformatted_20_Text"><text:s text:c="16"/>bottlenecks.append({</text:p>
      <text:p text:style-name="Preformatted_20_Text"><text:s text:c="20"/>'type': 'cpu_contention',</text:p>
      <text:p text:style-name="Preformatted_20_Text"><text:s text:c="20"/>'metric': 'high_usage_percentage',</text:p>
      <text:p text:style-name="Preformatted_20_Text"><text:s text:c="20"/>'value': len(high_usage_periods) / len(cpu_data),</text:p>
      <text:p text:style-name="Preformatted_20_Text"><text:s text:c="20"/>'suggestion': 'Implement better task deferral or increase background task delays'</text:p>
      <text:p text:style-name="Preformatted_20_Text"><text:s text:c="16"/>})</text:p>
      <text:p text:style-name="Preformatted_20_Text"><text:s text:c="8"/></text:p>
      <text:p text:style-name="Preformatted_20_Text"><text:s text:c="8"/>return bottlenecks</text:p>
      <text:p text:style-name="Preformatted_20_Text"><text:s text:c="4"/></text:p>
      <text:p text:style-name="Preformatted_20_Text"><text:s text:c="4"/>def generate_recommendations(self, analysis):</text:p>
      <text:p text:style-name="Preformatted_20_Text"><text:s text:c="8"/>"""</text:p>
      <text:p text:style-name="Preformatted_20_Text"><text:s text:c="8"/>Generate actionable recommendations</text:p>
      <text:p text:style-name="Preformatted_20_Text"><text:s text:c="8"/>"""</text:p>
      <text:p text:style-name="Preformatted_20_Text"><text:s text:c="8"/>recommendations = []</text:p>
      <text:p text:style-name="Preformatted_20_Text"><text:s text:c="8"/></text:p>
      <text:p text:style-name="Preformatted_20_Text"><text:s text:c="8"/>for bottleneck in analysis.get('bottlenecks', []):</text:p>
      <text:p text:style-name="Preformatted_20_Text"><text:s text:c="12"/>if bottleneck['type'] == 'response_time':</text:p>
      <text:p text:style-name="Preformatted_20_Text"><text:s text:c="16"/>recommendations.append({</text:p>
      <text:p text:style-name="Preformatted_20_Text"><text:s text:c="20"/>'action': 'adjust_task_priorities',</text:p>
      <text:p text:style-name="Preformatted_20_Text"><text:s text:c="20"/>'description': 'Increase priority for time-sensitive tasks',</text:p>
      <text:p text:style-name="Preformatted_20_Text"><text:s text:c="20"/>'expected_improvement': '20-30% reduction in average response time',</text:p>
      <text:p text:style-name="Preformatted_20_Text"><text:s text:c="20"/>'implementation_difficulty': 'low'</text:p>
      <text:p text:style-name="Preformatted_20_Text"><text:s text:c="16"/>})</text:p>
      <text:p text:style-name="Preformatted_20_Text"><text:s text:c="12"/></text:p>
      <text:p text:style-name="Preformatted_20_Text"><text:s text:c="12"/>elif bottleneck['type'] == 'cpu_contention':</text:p>
      <text:p text:style-name="Preformatted_20_Text"><text:s text:c="16"/>recommendations.append({</text:p>
      <text:p text:style-name="Preformatted_20_Text"><text:s text:c="20"/>'action': 'implement_adaptive_deferral',</text:p>
      <text:p text:style-name="Preformatted_20_Text"><text:s text:c="20"/>'description': 'Defer non-essential tasks during high CPU usage',</text:p>
      <text:p text:style-name="Preformatted_20_Text"><text:s text:c="20"/>'expected_improvement': 'Reduced thermal throttling, smoother performance',</text:p>
      <text:p text:style-name="Preformatted_20_Text"><text:s text:c="20"/>'implementation_difficulty': 'medium'</text:p>
      <text:p text:style-name="Preformatted_20_Text"><text:s text:c="16"/>})</text:p>
      <text:p text:style-name="Preformatted_20_Text"><text:s text:c="8"/></text:p>
      <text:p text:style-name="Preformatted_20_Text"><text:s text:c="8"/># Add recommendations from optimization opportunities</text:p>
      <text:p text:style-name="Preformatted_20_Text"><text:s text:c="8"/>for opportunity in analysis.get('optimization_opportunities', []):</text:p>
      <text:p text:style-name="Preformatted_20_Text"><text:s text:c="12"/>recommendations.append({</text:p>
      <text:p text:style-name="Preformatted_20_Text"><text:s text:c="16"/>'action': opportunity['optimization'],</text:p>
      <text:p text:style-name="Preformatted_20_Text"><text:s text:c="16"/>'description': opportunity['description'],</text:p>
      <text:p text:style-name="Preformatted_20_Text"><text:s text:c="16"/>'expected_improvement': opportunity['expected_benefit'],</text:p>
      <text:p text:style-name="Preformatted_20_Text"><text:s text:c="16"/>'implementation_difficulty': opportunity.get('difficulty', 'medium')</text:p>
      <text:p text:style-name="Preformatted_20_Text"><text:s text:c="12"/>})</text:p>
      <text:p text:style-name="Preformatted_20_Text"><text:s text:c="8"/></text:p>
      <text:p text:style-name="P7"><text:s text:c="8"/>return recommendations</text:p>
      <text:h text:style-name="Heading_20_2" text:outline-level="2"><text:span text:style-name="Strong_20_Emphasis">4. Context-Specific Resource Allocation</text:span></text:h>
      <text:h text:style-name="Heading_20_3" text:outline-level="3"><text:span text:style-name="Strong_20_Emphasis">A. Activity-Based Resource Profiles</text:span></text:h>
      <text:p text:style-name="Text_20_body">python</text:p>
      <text:p text:style-name="Preformatted_20_Text">class ActivityResourceProfiles:</text:p>
      <text:p text:style-name="Preformatted_20_Text"><text:soft-page-break/><text:s text:c="4"/>def __init__(self):</text:p>
      <text:p text:style-name="Preformatted_20_Text"><text:s text:c="8"/>self.profiles = {</text:p>
      <text:p text:style-name="Preformatted_20_Text"><text:s text:c="12"/>'tea_party_active': {</text:p>
      <text:p text:style-name="Preformatted_20_Text"><text:s text:c="16"/>'description': 'Interactive tea party with toys',</text:p>
      <text:p text:style-name="Preformatted_20_Text"><text:s text:c="16"/>'essential_tasks': [</text:p>
      <text:p text:style-name="Preformatted_20_Text"><text:s text:c="20"/>'toy_recognition',</text:p>
      <text:p text:style-name="Preformatted_20_Text"><text:s text:c="20"/>'child_emotion_detection',</text:p>
      <text:p text:style-name="Preformatted_20_Text"><text:s text:c="20"/>'marvin_expression_render',</text:p>
      <text:p text:style-name="Preformatted_20_Text"><text:s text:c="20"/>'ar_overlay_render',</text:p>
      <text:p text:style-name="Preformatted_20_Text"><text:s text:c="20"/>'voice_interaction'</text:p>
      <text:p text:style-name="Preformatted_20_Text"><text:s text:c="16"/>],</text:p>
      <text:p text:style-name="Preformatted_20_Text"><text:s text:c="16"/>'background_tasks': [</text:p>
      <text:p text:style-name="Preformatted_20_Text"><text:s text:c="20"/>'behavioral_analysis_full',</text:p>
      <text:p text:style-name="Preformatted_20_Text"><text:s text:c="20"/>'conversation_analysis',</text:p>
      <text:p text:style-name="Preformatted_20_Text"><text:s text:c="20"/>'system_performance_logging',</text:p>
      <text:p text:style-name="Preformatted_20_Text"><text:s text:c="20"/>'long_term_memory_update'</text:p>
      <text:p text:style-name="Preformatted_20_Text"><text:s text:c="16"/>],</text:p>
      <text:p text:style-name="Preformatted_20_Text"><text:s text:c="16"/>'resource_allocation': {</text:p>
      <text:p text:style-name="Preformatted_20_Text"><text:s text:c="20"/>'cpu': {'essential': 0.6, 'background': 0.2, 'reflection': 0.0},</text:p>
      <text:p text:style-name="Preformatted_20_Text"><text:s text:c="20"/>'memory': {'essential': 0.7, 'background': 0.2, 'reflection': 0.0},</text:p>
      <text:p text:style-name="Preformatted_20_Text"><text:s text:c="20"/>'npu': {'essential': 0.8, 'background': 0.1, 'reflection': 0.0}</text:p>
      <text:p text:style-name="Preformatted_20_Text"><text:s text:c="16"/>},</text:p>
      <text:p text:style-name="Preformatted_20_Text"><text:s text:c="16"/>'deferral_rules': {</text:p>
      <text:p text:style-name="Preformatted_20_Text"><text:s text:c="20"/>'allow_deferral': True,</text:p>
      <text:p text:style-name="Preformatted_20_Text"><text:s text:c="20"/>'max_deferral_time': 600, <text:s/># 10 minutes</text:p>
      <text:p text:style-name="Preformatted_20_Text"><text:s text:c="20"/>'resumption_triggers': ['user_idle', 'activity_end']</text:p>
      <text:p text:style-name="Preformatted_20_Text"><text:s text:c="16"/>}</text:p>
      <text:p text:style-name="Preformatted_20_Text"><text:s text:c="12"/>},</text:p>
      <text:p text:style-name="Preformatted_20_Text"><text:s text:c="12"/></text:p>
      <text:p text:style-name="Preformatted_20_Text"><text:s text:c="12"/>'creative_session': {</text:p>
      <text:p text:style-name="Preformatted_20_Text"><text:s text:c="16"/>'description': 'Drawing/coloring activity',</text:p>
      <text:p text:style-name="Preformatted_20_Text"><text:s text:c="16"/>'essential_tasks': [</text:p>
      <text:p text:style-name="Preformatted_20_Text"><text:s text:c="20"/>'drawing_canvas_render',</text:p>
      <text:p text:style-name="Preformatted_20_Text"><text:s text:c="20"/>'tool_interaction',</text:p>
      <text:p text:style-name="Preformatted_20_Text"><text:s text:c="20"/>'color_palette_management',</text:p>
      <text:p text:style-name="Preformatted_20_Text"><text:s text:c="20"/>'basic_ai_assistance'</text:p>
      <text:p text:style-name="Preformatted_20_Text"><text:s text:c="16"/>],</text:p>
      <text:p text:style-name="Preformatted_20_Text"><text:s text:c="16"/>'background_tasks': [</text:p>
      <text:p text:style-name="Preformatted_20_Text"><text:s text:c="20"/>'drawing_pattern_analysis',</text:p>
      <text:p text:style-name="Preformatted_20_Text"><text:s text:c="20"/>'creative_style_learning',</text:p>
      <text:p text:style-name="Preformatted_20_Text"><text:s text:c="20"/>'progress_tracking',</text:p>
      <text:p text:style-name="Preformatted_20_Text"><text:s text:c="20"/>'therapeutic_benefit_analysis'</text:p>
      <text:p text:style-name="Preformatted_20_Text"><text:s text:c="16"/>],</text:p>
      <text:p text:style-name="Preformatted_20_Text"><text:s text:c="16"/>'resource_allocation': {</text:p>
      <text:p text:style-name="Preformatted_20_Text"><text:s text:c="20"/>'cpu': {'essential': 0.5, 'background': 0.3, 'reflection': 0.1},</text:p>
      <text:p text:style-name="Preformatted_20_Text"><text:s text:c="20"/>'memory': {'essential': 0.6, 'background': 0.3, 'reflection': 0.0},</text:p>
      <text:p text:style-name="Preformatted_20_Text"><text:s text:c="20"/>'npu': {'essential': 0.4, 'background': 0.3, 'reflection': 0.1}</text:p>
      <text:p text:style-name="Preformatted_20_Text"><text:s text:c="16"/>}</text:p>
      <text:p text:style-name="Preformatted_20_Text"><text:s text:c="12"/>},</text:p>
      <text:p text:style-name="Preformatted_20_Text"><text:s text:c="12"/></text:p>
      <text:p text:style-name="Preformatted_20_Text"><text:s text:c="12"/>'crisis_emergency': {</text:p>
      <text:p text:style-name="Preformatted_20_Text"><text:s text:c="16"/>'description': 'Safety emergency detected',</text:p>
      <text:p text:style-name="Preformatted_20_Text"><text:s text:c="16"/>'essential_tasks': [</text:p>
      <text:p text:style-name="Preformatted_20_Text"><text:s text:c="20"/>'safety_monitoring',</text:p>
      <text:p text:style-name="Preformatted_20_Text"><text:s text:c="20"/>'emergency_response',</text:p>
      <text:p text:style-name="Preformatted_20_Text"><text:s text:c="20"/>'alert_generation',</text:p>
      <text:p text:style-name="Preformatted_20_Text"><text:s text:c="20"/>'user_state_assessment'</text:p>
      <text:p text:style-name="Preformatted_20_Text"><text:s text:c="16"/>],</text:p>
      <text:p text:style-name="Preformatted_20_Text"><text:soft-page-break/><text:s text:c="16"/>'background_tasks': [], <text:s/># No background tasks during crisis</text:p>
      <text:p text:style-name="Preformatted_20_Text"><text:s text:c="16"/>'resource_allocation': {</text:p>
      <text:p text:style-name="Preformatted_20_Text"><text:s text:c="20"/>'cpu': {'essential': 0.9, 'background': 0.0, 'reflection': 0.0},</text:p>
      <text:p text:style-name="Preformatted_20_Text"><text:s text:c="20"/>'memory': {'essential': 0.9, 'background': 0.0, 'reflection': 0.0},</text:p>
      <text:p text:style-name="Preformatted_20_Text"><text:s text:c="20"/>'npu': {'essential': 0.8, 'background': 0.0, 'reflection': 0.0}</text:p>
      <text:p text:style-name="Preformatted_20_Text"><text:s text:c="16"/>},</text:p>
      <text:p text:style-name="Preformatted_20_Text"><text:s text:c="16"/>'deferral_rules': {</text:p>
      <text:p text:style-name="Preformatted_20_Text"><text:s text:c="20"/>'allow_deferral': False,</text:p>
      <text:p text:style-name="Preformatted_20_Text"><text:s text:c="20"/>'max_deferral_time': 0,</text:p>
      <text:p text:style-name="Preformatted_20_Text"><text:s text:c="20"/>'resumption_triggers': []</text:p>
      <text:p text:style-name="Preformatted_20_Text"><text:s text:c="16"/>}</text:p>
      <text:p text:style-name="Preformatted_20_Text"><text:s text:c="12"/>},</text:p>
      <text:p text:style-name="Preformatted_20_Text"><text:s text:c="12"/></text:p>
      <text:p text:style-name="Preformatted_20_Text"><text:s text:c="12"/>'reflection_period': {</text:p>
      <text:p text:style-name="Preformatted_20_Text"><text:s text:c="16"/>'description': 'System idle, running reflection tasks',</text:p>
      <text:p text:style-name="Preformatted_20_Text"><text:s text:c="16"/>'essential_tasks': [</text:p>
      <text:p text:style-name="Preformatted_20_Text"><text:s text:c="20"/>'system_health_monitoring',</text:p>
      <text:p text:style-name="Preformatted_20_Text"><text:s text:c="20"/>'resource_cleanup'</text:p>
      <text:p text:style-name="Preformatted_20_Text"><text:s text:c="16"/>],</text:p>
      <text:p text:style-name="Preformatted_20_Text"><text:s text:c="16"/>'background_tasks': [</text:p>
      <text:p text:style-name="Preformatted_20_Text"><text:s text:c="20"/>'behavioral_analysis_full',</text:p>
      <text:p text:style-name="Preformatted_20_Text"><text:s text:c="20"/>'performance_analysis',</text:p>
      <text:p text:style-name="Preformatted_20_Text"><text:s text:c="20"/>'learning_model_updates',</text:p>
      <text:p text:style-name="Preformatted_20_Text"><text:s text:c="20"/>'data_compression',</text:p>
      <text:p text:style-name="Preformatted_20_Text"><text:s text:c="20"/>'storage_optimization'</text:p>
      <text:p text:style-name="Preformatted_20_Text"><text:s text:c="16"/>],</text:p>
      <text:p text:style-name="Preformatted_20_Text"><text:s text:c="16"/>'resource_allocation': {</text:p>
      <text:p text:style-name="Preformatted_20_Text"><text:s text:c="20"/>'cpu': {'essential': 0.2, 'background': 0.7, 'reflection': 0.1},</text:p>
      <text:p text:style-name="Preformatted_20_Text"><text:s text:c="20"/>'memory': {'essential': 0.3, 'background': 0.6, 'reflection': 0.1},</text:p>
      <text:p text:style-name="Preformatted_20_Text"><text:s text:c="20"/>'npu': {'essential': 0.1, 'background': 0.3, 'reflection': 0.4}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4"/>def get_profile(self, activity_type):</text:p>
      <text:p text:style-name="Preformatted_20_Text"><text:s text:c="8"/>"""</text:p>
      <text:p text:style-name="Preformatted_20_Text"><text:s text:c="8"/>Get resource profile for specific activity</text:p>
      <text:p text:style-name="Preformatted_20_Text"><text:s text:c="8"/>"""</text:p>
      <text:p text:style-name="Preformatted_20_Text"><text:s text:c="8"/>return self.profiles.get(activity_type, self.profiles['normal'])</text:p>
      <text:p text:style-name="Preformatted_20_Text"><text:s text:c="4"/></text:p>
      <text:p text:style-name="Preformatted_20_Text"><text:s text:c="4"/>def adjust_profile_for_conditions(self, profile, system_conditions):</text:p>
      <text:p text:style-name="Preformatted_20_Text"><text:s text:c="8"/>"""</text:p>
      <text:p text:style-name="Preformatted_20_Text"><text:s text:c="8"/>Adjust profile based on current system conditions</text:p>
      <text:p text:style-name="Preformatted_20_Text"><text:s text:c="8"/>"""</text:p>
      <text:p text:style-name="Preformatted_20_Text"><text:s text:c="8"/>adjusted_profile = profile.copy()</text:p>
      <text:p text:style-name="Preformatted_20_Text"><text:s text:c="8"/></text:p>
      <text:p text:style-name="Preformatted_20_Text"><text:s text:c="8"/># Reduce resource allocation if thermal throttling</text:p>
      <text:p text:style-name="Preformatted_20_Text"><text:s text:c="8"/>if system_conditions.get('thermal_throttling'):</text:p>
      <text:p text:style-name="Preformatted_20_Text"><text:s text:c="12"/>for resource in adjusted_profile['resource_allocation']:</text:p>
      <text:p text:style-name="Preformatted_20_Text"><text:s text:c="16"/>for category in adjusted_profile['resource_allocation'][resource]:</text:p>
      <text:p text:style-name="Preformatted_20_Text"><text:s text:c="20"/>adjusted_profile['resource_allocation'][resource][category] *= 0.7</text:p>
      <text:p text:style-name="Preformatted_20_Text"><text:s text:c="8"/></text:p>
      <text:p text:style-name="Preformatted_20_Text"><text:s text:c="8"/># Reduce background tasks if low memory</text:p>
      <text:p text:style-name="Preformatted_20_Text"><text:s text:c="8"/>if system_conditions.get('memory_pressure'):</text:p>
      <text:p text:style-name="Preformatted_20_Text"><text:s text:c="12"/># Move some background tasks to reflection-only</text:p>
      <text:p text:style-name="Preformatted_20_Text"><text:s text:c="12"/>if len(adjusted_profile['background_tasks']) &gt; 2:</text:p>
      <text:p text:style-name="Preformatted_20_Text"><text:soft-page-break/><text:s text:c="16"/>moved_tasks = adjusted_profile['background_tasks'][2:]</text:p>
      <text:p text:style-name="Preformatted_20_Text"><text:s text:c="16"/>adjusted_profile['background_tasks'] = adjusted_profile['background_tasks'][:2]</text:p>
      <text:p text:style-name="Preformatted_20_Text"><text:s text:c="16"/>adjusted_profile.setdefault('reflection_only_tasks', []).extend(moved_tasks)</text:p>
      <text:p text:style-name="Preformatted_20_Text"><text:s text:c="8"/></text:p>
      <text:p text:style-name="P7"><text:s text:c="8"/>return adjusted_profile</text:p>
      <text:h text:style-name="Heading_20_3" text:outline-level="3"><text:span text:style-name="Strong_20_Emphasis">B. Dynamic Resource Reallocation</text:span></text:h>
      <text:p text:style-name="Text_20_body">python</text:p>
      <text:p text:style-name="Preformatted_20_Text">class DynamicResourceReallocator:</text:p>
      <text:p text:style-name="Preformatted_20_Text"><text:s text:c="4"/>def __init__(self, resource_manager, activity_profiles):</text:p>
      <text:p text:style-name="Preformatted_20_Text"><text:s text:c="8"/>self.resource_manager = resource_manager</text:p>
      <text:p text:style-name="Preformatted_20_Text"><text:s text:c="8"/>self.activity_profiles = activity_profiles</text:p>
      <text:p text:style-name="Preformatted_20_Text"><text:s text:c="8"/>self.current_allocation = {}</text:p>
      <text:p text:style-name="Preformatted_20_Text"><text:s text:c="8"/>self.allocation_history = []</text:p>
      <text:p text:style-name="Preformatted_20_Text"><text:s text:c="8"/></text:p>
      <text:p text:style-name="Preformatted_20_Text"><text:s text:c="4"/>def reallocate_for_activity(self, activity_type, urgency=0.5):</text:p>
      <text:p text:style-name="Preformatted_20_Text"><text:s text:c="8"/>"""</text:p>
      <text:p text:style-name="Preformatted_20_Text"><text:s text:c="8"/>Reallocate resources for new activity</text:p>
      <text:p text:style-name="Preformatted_20_Text"><text:s text:c="8"/>"""</text:p>
      <text:p text:style-name="Preformatted_20_Text"><text:s text:c="8"/># Get profile for activity</text:p>
      <text:p text:style-name="Preformatted_20_Text"><text:s text:c="8"/>profile = self.activity_profiles.get_profile(activity_type)</text:p>
      <text:p text:style-name="Preformatted_20_Text"><text:s text:c="8"/></text:p>
      <text:p text:style-name="Preformatted_20_Text"><text:s text:c="8"/># Adjust based on urgency</text:p>
      <text:p text:style-name="Preformatted_20_Text"><text:s text:c="8"/>if urgency &gt; 0.8: <text:s/># High urgency</text:p>
      <text:p text:style-name="Preformatted_20_Text"><text:s text:c="12"/>profile = self.boost_essential_resources(profile, 1.2)</text:p>
      <text:p text:style-name="Preformatted_20_Text"><text:s text:c="8"/></text:p>
      <text:p text:style-name="Preformatted_20_Text"><text:s text:c="8"/># Apply allocation</text:p>
      <text:p text:style-name="Preformatted_20_Text"><text:s text:c="8"/>self.apply_allocation(profile['resource_allocation'])</text:p>
      <text:p text:style-name="Preformatted_20_Text"><text:s text:c="8"/></text:p>
      <text:p text:style-name="Preformatted_20_Text"><text:s text:c="8"/># Update task priorities</text:p>
      <text:p text:style-name="Preformatted_20_Text"><text:s text:c="8"/>self.update_task_priorities_for_profile(profile)</text:p>
      <text:p text:style-name="Preformatted_20_Text"><text:s text:c="8"/></text:p>
      <text:p text:style-name="Preformatted_20_Text"><text:s text:c="8"/># Log reallocation</text:p>
      <text:p text:style-name="Preformatted_20_Text"><text:s text:c="8"/>self.log_reallocation(activity_type, profile)</text:p>
      <text:p text:style-name="Preformatted_20_Text"><text:s text:c="8"/></text:p>
      <text:p text:style-name="Preformatted_20_Text"><text:s text:c="8"/>return profile</text:p>
      <text:p text:style-name="Preformatted_20_Text"><text:s text:c="4"/></text:p>
      <text:p text:style-name="Preformatted_20_Text"><text:s text:c="4"/>def apply_allocation(self, allocation):</text:p>
      <text:p text:style-name="Preformatted_20_Text"><text:s text:c="8"/>"""</text:p>
      <text:p text:style-name="Preformatted_20_Text"><text:s text:c="8"/>Apply resource allocation to system</text:p>
      <text:p text:style-name="Preformatted_20_Text"><text:s text:c="8"/>"""</text:p>
      <text:p text:style-name="Preformatted_20_Text"><text:s text:c="8"/>for resource_type, categories in allocation.items():</text:p>
      <text:p text:style-name="Preformatted_20_Text"><text:s text:c="12"/>for category, percentage in categories.items():</text:p>
      <text:p text:style-name="Preformatted_20_Text"><text:s text:c="16"/># Convert percentage to absolute based on system capacity</text:p>
      <text:p text:style-name="Preformatted_20_Text"><text:s text:c="16"/>absolute = self.percentage_to_absolute(resource_type, percentage)</text:p>
      <text:p text:style-name="Preformatted_20_Text"><text:s text:c="16"/></text:p>
      <text:p text:style-name="Preformatted_20_Text"><text:s text:c="16"/># Apply limits</text:p>
      <text:p text:style-name="Preformatted_20_Text"><text:s text:c="16"/>self.set_resource_limit(resource_type, category, absolute)</text:p>
      <text:p text:style-name="Preformatted_20_Text"><text:s text:c="16"/></text:p>
      <text:p text:style-name="Preformatted_20_Text"><text:s text:c="16"/># Update current allocation tracking</text:p>
      <text:p text:style-name="Preformatted_20_Text"><text:s text:c="16"/>self.current_allocation[f"{resource_type}_{category}"] = absolute</text:p>
      <text:p text:style-name="Preformatted_20_Text"><text:s text:c="8"/></text:p>
      <text:p text:style-name="Preformatted_20_Text"><text:s text:c="8"/># Save to history</text:p>
      <text:p text:style-name="Preformatted_20_Text"><text:s text:c="8"/>self.allocation_history.append({</text:p>
      <text:p text:style-name="Preformatted_20_Text"><text:s text:c="12"/>'timestamp': time.time(),</text:p>
      <text:p text:style-name="Preformatted_20_Text"><text:s text:c="12"/>'allocation': allocation,</text:p>
      <text:p text:style-name="Preformatted_20_Text"><text:s text:c="12"/>'system_state': self.get_system_state()</text:p>
      <text:p text:style-name="Preformatted_20_Text"><text:soft-page-break/><text:s text:c="8"/>})</text:p>
      <text:p text:style-name="Preformatted_20_Text"><text:s text:c="4"/></text:p>
      <text:p text:style-name="Preformatted_20_Text"><text:s text:c="4"/>def update_task_priorities_for_profile(self, profile):</text:p>
      <text:p text:style-name="Preformatted_20_Text"><text:s text:c="8"/>"""</text:p>
      <text:p text:style-name="Preformatted_20_Text"><text:s text:c="8"/>Update task priorities based on activity profile</text:p>
      <text:p text:style-name="Preformatted_20_Text"><text:s text:c="8"/>"""</text:p>
      <text:p text:style-name="Preformatted_20_Text"><text:s text:c="8"/># Boost essential tasks</text:p>
      <text:p text:style-name="Preformatted_20_Text"><text:s text:c="8"/>for task_id in profile['essential_tasks']:</text:p>
      <text:p text:style-name="Preformatted_20_Text"><text:s text:c="12"/>if task_id in self.resource_manager.task_registry:</text:p>
      <text:p text:style-name="Preformatted_20_Text"><text:s text:c="16"/>current_priority = self.resource_manager.task_registry[task_id].get('effective_priority', 50)</text:p>
      <text:p text:style-name="Preformatted_20_Text"><text:s text:c="16"/>new_priority = min(95, current_priority + 20) <text:s/># Boost but don't max out</text:p>
      <text:p text:style-name="Preformatted_20_Text"><text:s text:c="16"/>self.resource_manager.task_registry[task_id]['effective_priority'] = new_priority</text:p>
      <text:p text:style-name="Preformatted_20_Text"><text:s text:c="8"/></text:p>
      <text:p text:style-name="Preformatted_20_Text"><text:s text:c="8"/># Reduce background tasks</text:p>
      <text:p text:style-name="Preformatted_20_Text"><text:s text:c="8"/>for task_id in profile['background_tasks']:</text:p>
      <text:p text:style-name="Preformatted_20_Text"><text:s text:c="12"/>if task_id in self.resource_manager.task_registry:</text:p>
      <text:p text:style-name="Preformatted_20_Text"><text:s text:c="16"/>current_priority = self.resource_manager.task_registry[task_id].get('effective_priority', 50)</text:p>
      <text:p text:style-name="Preformatted_20_Text"><text:s text:c="16"/>new_priority = max(10, current_priority - 15) <text:s/># Reduce but keep minimal</text:p>
      <text:p text:style-name="Preformatted_20_Text"><text:s text:c="16"/>self.resource_manager.task_registry[task_id]['effective_priority'] = new_priority</text:p>
      <text:p text:style-name="Preformatted_20_Text"><text:s text:c="8"/></text:p>
      <text:p text:style-name="Preformatted_20_Text"><text:s text:c="8"/># Defer reflection-only tasks</text:p>
      <text:p text:style-name="Preformatted_20_Text"><text:s text:c="8"/>for task_id in profile.get('reflection_only_tasks', []):</text:p>
      <text:p text:style-name="Preformatted_20_Text"><text:s text:c="12"/>if task_id in self.resource_manager.task_registry:</text:p>
      <text:p text:style-name="Preformatted_20_Text"><text:s text:c="16"/># Mark for deferral</text:p>
      <text:p text:style-name="Preformatted_20_Text"><text:s text:c="16"/>self.resource_manager.task_registry[task_id]['defer_until_reflection'] = True</text:p>
      <text:p text:style-name="Preformatted_20_Text"><text:s text:c="4"/></text:p>
      <text:p text:style-name="Preformatted_20_Text"><text:s text:c="4"/>def monitor_and_adjust(self):</text:p>
      <text:p text:style-name="Preformatted_20_Text"><text:s text:c="8"/>"""</text:p>
      <text:p text:style-name="Preformatted_20_Text"><text:s text:c="8"/>Continuously monitor and adjust resource allocation</text:p>
      <text:p text:style-name="Preformatted_20_Text"><text:s text:c="8"/>"""</text:p>
      <text:p text:style-name="Preformatted_20_Text"><text:s text:c="8"/># Check system conditions</text:p>
      <text:p text:style-name="Preformatted_20_Text"><text:s text:c="8"/>system_state = self.get_system_state()</text:p>
      <text:p text:style-name="Preformatted_20_Text"><text:s text:c="8"/></text:p>
      <text:p text:style-name="Preformatted_20_Text"><text:s text:c="8"/># Adjust for thermal conditions</text:p>
      <text:p text:style-name="Preformatted_20_Text"><text:s text:c="8"/>if system_state['cpu_temp'] &gt; 75:</text:p>
      <text:p text:style-name="Preformatted_20_Text"><text:s text:c="12"/>self.reduce_allocation_for_thermal(0.7) <text:s/># Reduce to 70%</text:p>
      <text:p text:style-name="Preformatted_20_Text"><text:s text:c="8"/></text:p>
      <text:p text:style-name="Preformatted_20_Text"><text:s text:c="8"/># Adjust for memory pressure</text:p>
      <text:p text:style-name="Preformatted_20_Text"><text:s text:c="8"/>if system_state['memory_used'] &gt; 0.9: <text:s/># 90% memory used</text:p>
      <text:p text:style-name="Preformatted_20_Text"><text:s text:c="12"/>self.reduce_background_allocation(0.5) <text:s/># Cut background in half</text:p>
      <text:p text:style-name="Preformatted_20_Text"><text:s text:c="8"/></text:p>
      <text:p text:style-name="Preformatted_20_Text"><text:s text:c="8"/># Check for idle periods to run reflection</text:p>
      <text:p text:style-name="Preformatted_20_Text"><text:s text:c="8"/>if self.detect_idle_period():</text:p>
      <text:p text:style-name="Preformatted_20_Text"><text:s text:c="12"/>self.trigger_reflection_period()</text:p>
      <text:p text:style-name="Preformatted_20_Text"><text:s text:c="4"/></text:p>
      <text:p text:style-name="Preformatted_20_Text"><text:s text:c="4"/>def trigger_reflection_period(self):</text:p>
      <text:p text:style-name="Preformatted_20_Text"><text:s text:c="8"/>"""</text:p>
      <text:p text:style-name="Preformatted_20_Text"><text:s text:c="8"/>Trigger reflection period when system is idle</text:p>
      <text:p text:style-name="Preformatted_20_Text"><text:s text:c="8"/>"""</text:p>
      <text:p text:style-name="Preformatted_20_Text"><text:s text:c="8"/># Save current state</text:p>
      <text:p text:style-name="Preformatted_20_Text"><text:s text:c="8"/>previous_state = {</text:p>
      <text:p text:style-name="Preformatted_20_Text"><text:s text:c="12"/>'allocation': self.current_allocation.copy(),</text:p>
      <text:p text:style-name="Preformatted_20_Text"><text:s text:c="12"/>'active_tasks': list(self.resource_manager.running_tasks.keys())</text:p>
      <text:p text:style-name="Preformatted_20_Text"><text:s text:c="8"/>}</text:p>
      <text:p text:style-name="Preformatted_20_Text"><text:s text:c="8"/></text:p>
      <text:p text:style-name="Preformatted_20_Text"><text:s text:c="8"/># Switch to reflection profile</text:p>
      <text:p text:style-name="Preformatted_20_Text"><text:s text:c="8"/>reflection_profile = <text:soft-page-break/>self.activity_profiles.get_profile('reflection_period')</text:p>
      <text:p text:style-name="Preformatted_20_Text"><text:s text:c="8"/>self.reallocate_for_activity('reflection_period')</text:p>
      <text:p text:style-name="Preformatted_20_Text"><text:s text:c="8"/></text:p>
      <text:p text:style-name="Preformatted_20_Text"><text:s text:c="8"/># Run reflection for limited time</text:p>
      <text:p text:style-name="Preformatted_20_Text"><text:s text:c="8"/>reflection_duration = self.calculate_optimal_reflection_duration()</text:p>
      <text:p text:style-name="Preformatted_20_Text"><text:s text:c="8"/></text:p>
      <text:p text:style-name="Preformatted_20_Text"><text:s text:c="8"/># Start reflection timer</text:p>
      <text:p text:style-name="Preformatted_20_Text"><text:s text:c="8"/>self.start_reflection_timer(reflection_duration, previous_state)</text:p>
      <text:p text:style-name="Preformatted_20_Text"><text:s text:c="4"/></text:p>
      <text:p text:style-name="Preformatted_20_Text"><text:s text:c="4"/>def start_reflection_timer(self, duration, previous_state):</text:p>
      <text:p text:style-name="Preformatted_20_Text"><text:s text:c="8"/>"""</text:p>
      <text:p text:style-name="Preformatted_20_Text"><text:s text:c="8"/>Start timer to return to previous state after reflection</text:p>
      <text:p text:style-name="Preformatted_20_Text"><text:s text:c="8"/>"""</text:p>
      <text:p text:style-name="Preformatted_20_Text"><text:s text:c="8"/>def return_to_previous():</text:p>
      <text:p text:style-name="Preformatted_20_Text"><text:s text:c="12"/># Restore previous allocation</text:p>
      <text:p text:style-name="Preformatted_20_Text"><text:s text:c="12"/>self.apply_allocation(previous_state['allocation'])</text:p>
      <text:p text:style-name="Preformatted_20_Text"><text:s text:c="12"/></text:p>
      <text:p text:style-name="Preformatted_20_Text"><text:s text:c="12"/># Restore task priorities</text:p>
      <text:p text:style-name="Preformatted_20_Text"><text:s text:c="12"/>self.restore_task_priorities(previous_state['active_tasks'])</text:p>
      <text:p text:style-name="Preformatted_20_Text"><text:s text:c="12"/></text:p>
      <text:p text:style-name="Preformatted_20_Text"><text:s text:c="12"/># Process any reflection results</text:p>
      <text:p text:style-name="Preformatted_20_Text"><text:s text:c="12"/>self.process_reflection_results()</text:p>
      <text:p text:style-name="Preformatted_20_Text"><text:s text:c="8"/></text:p>
      <text:p text:style-name="Preformatted_20_Text"><text:s text:c="8"/># Schedule return</text:p>
      <text:p text:style-name="P7"><text:s text:c="8"/>threading.Timer(duration, return_to_previous).start()</text:p>
      <text:h text:style-name="Heading_20_2" text:outline-level="2"><text:span text:style-name="Strong_20_Emphasis">5. Implementation Strategy</text:span></text:h>
      <text:h text:style-name="Heading_20_3" text:outline-level="3"><text:span text:style-name="Strong_20_Emphasis">A. Integration with Existing System</text:span></text:h>
      <text:p text:style-name="Text_20_body">python</text:p>
      <text:p text:style-name="Preformatted_20_Text">class ARMEIntegration:</text:p>
      <text:p text:style-name="Preformatted_20_Text"><text:s text:c="4"/>def __init__(self, marvin_core):</text:p>
      <text:p text:style-name="Preformatted_20_Text"><text:s text:c="8"/>self.marvin_core = marvin_core</text:p>
      <text:p text:style-name="Preformatted_20_Text"><text:s text:c="8"/>self.resource_manager = AdaptiveResourceManager(</text:p>
      <text:p text:style-name="Preformatted_20_Text"><text:s text:c="12"/>marvin_core.hardware_monitor,</text:p>
      <text:p text:style-name="Preformatted_20_Text"><text:s text:c="12"/>marvin_core.context_engine</text:p>
      <text:p text:style-name="Preformatted_20_Text"><text:s text:c="8"/>)</text:p>
      <text:p text:style-name="Preformatted_20_Text"><text:s text:c="8"/>self.scheduler = ContextAwareScheduler(self.resource_manager)</text:p>
      <text:p text:style-name="Preformatted_20_Text"><text:s text:c="8"/>self.orchestrator = ThreeLayerTaskOrchestrator(self.resource_manager)</text:p>
      <text:p text:style-name="Preformatted_20_Text"><text:s text:c="8"/>self.deferral_system = IntelligentDeferralSystem('deferred_tasks')</text:p>
      <text:p text:style-name="Preformatted_20_Text"><text:s text:c="8"/>self.reflection_engine = ReflectionEngine('reflection_data', {</text:p>
      <text:p text:style-name="Preformatted_20_Text"><text:s text:c="12"/>'behavioral': BehavioralAnalysisModule(),</text:p>
      <text:p text:style-name="Preformatted_20_Text"><text:s text:c="12"/>'performance': SystemPerformanceAnalysisModule(),</text:p>
      <text:p text:style-name="Preformatted_20_Text"><text:s text:c="12"/>'interaction': InteractionAnalysisModule()</text:p>
      <text:p text:style-name="Preformatted_20_Text"><text:s text:c="8"/>})</text:p>
      <text:p text:style-name="Preformatted_20_Text"><text:s text:c="8"/></text:p>
      <text:p text:style-name="Preformatted_20_Text"><text:s text:c="8"/># Register all existing tasks</text:p>
      <text:p text:style-name="Preformatted_20_Text"><text:s text:c="8"/>self.register_all_tasks()</text:p>
      <text:p text:style-name="Preformatted_20_Text"><text:s text:c="8"/></text:p>
      <text:p text:style-name="Preformatted_20_Text"><text:s text:c="4"/>def register_all_tasks(self):</text:p>
      <text:p text:style-name="Preformatted_20_Text"><text:s text:c="8"/>"""</text:p>
      <text:p text:style-name="Preformatted_20_Text"><text:s text:c="8"/>Register all system tasks with resource profiles</text:p>
      <text:p text:style-name="Preformatted_20_Text"><text:s text:c="8"/>"""</text:p>
      <text:p text:style-name="Preformatted_20_Text"><text:s text:c="8"/>tasks = {</text:p>
      <text:p text:style-name="Preformatted_20_Text"><text:s text:c="12"/># Tea party tasks</text:p>
      <text:p text:style-name="Preformatted_20_Text"><text:s text:c="12"/>'toy_recognition': {</text:p>
      <text:p text:style-name="Preformatted_20_Text"><text:s text:c="16"/>'function': self.marvin_core.toy_recognition.recognize_toys,</text:p>
      <text:p text:style-name="Preformatted_20_Text"><text:s text:c="16"/>'base_priority': 85,</text:p>
      <text:p text:style-name="Preformatted_20_Text"><text:s text:c="16"/>'context_sensitivity': {</text:p>
      <text:p text:style-name="Preformatted_20_Text"><text:soft-page-break/><text:s text:c="20"/>'tea_party_active': 1.0,</text:p>
      <text:p text:style-name="Preformatted_20_Text"><text:s text:c="20"/>'normal': 0.3,</text:p>
      <text:p text:style-name="Preformatted_20_Text"><text:s text:c="20"/>'reflection_period': 0.1</text:p>
      <text:p text:style-name="Preformatted_20_Text"><text:s text:c="16"/>},</text:p>
      <text:p text:style-name="Preformatted_20_Text"><text:s text:c="16"/>'deferrable': True,</text:p>
      <text:p text:style-name="Preformatted_20_Text"><text:s text:c="16"/>'max_deferral_time': 300,</text:p>
      <text:p text:style-name="Preformatted_20_Text"><text:s text:c="16"/>'reflection_analysis': True,</text:p>
      <text:p text:style-name="Preformatted_20_Text"><text:s text:c="16"/>'essential_override': ['crisis_emergency']</text:p>
      <text:p text:style-name="Preformatted_20_Text"><text:s text:c="12"/>},</text:p>
      <text:p text:style-name="Preformatted_20_Text"><text:s text:c="12"/></text:p>
      <text:p text:style-name="Preformatted_20_Text"><text:s text:c="12"/>'child_emotion_detection': {</text:p>
      <text:p text:style-name="Preformatted_20_Text"><text:s text:c="16"/>'function': self.marvin_core.emotion_recognizer.analyze,</text:p>
      <text:p text:style-name="Preformatted_20_Text"><text:s text:c="16"/>'base_priority': 90,</text:p>
      <text:p text:style-name="Preformatted_20_Text"><text:s text:c="16"/>'context_sensitivity': {</text:p>
      <text:p text:style-name="Preformatted_20_Text"><text:s text:c="20"/>'tea_party_active': 1.0,</text:p>
      <text:p text:style-name="Preformatted_20_Text"><text:s text:c="20"/>'creative_session': 0.8,</text:p>
      <text:p text:style-name="Preformatted_20_Text"><text:s text:c="20"/>'crisis_emergency': 1.0,</text:p>
      <text:p text:style-name="Preformatted_20_Text"><text:s text:c="20"/>'normal': 0.5</text:p>
      <text:p text:style-name="Preformatted_20_Text"><text:s text:c="16"/>},</text:p>
      <text:p text:style-name="Preformatted_20_Text"><text:s text:c="16"/>'deferrable': False, <text:s/># Never defer emotion detection</text:p>
      <text:p text:style-name="Preformatted_20_Text"><text:s text:c="16"/>'reflection_analysis': True</text:p>
      <text:p text:style-name="Preformatted_20_Text"><text:s text:c="12"/>},</text:p>
      <text:p text:style-name="Preformatted_20_Text"><text:s text:c="12"/></text:p>
      <text:p text:style-name="Preformatted_20_Text"><text:s text:c="12"/># Drawing program tasks</text:p>
      <text:p text:style-name="Preformatted_20_Text"><text:s text:c="12"/>'drawing_canvas_render': {</text:p>
      <text:p text:style-name="Preformatted_20_Text"><text:s text:c="16"/>'function': self.marvin_core.drawing_engine.render,</text:p>
      <text:p text:style-name="Preformatted_20_Text"><text:s text:c="16"/>'base_priority': 80,</text:p>
      <text:p text:style-name="Preformatted_20_Text"><text:s text:c="16"/>'context_sensitivity': {</text:p>
      <text:p text:style-name="Preformatted_20_Text"><text:s text:c="20"/>'creative_session': 1.0,</text:p>
      <text:p text:style-name="Preformatted_20_Text"><text:s text:c="20"/>'normal': 0.2</text:p>
      <text:p text:style-name="Preformatted_20_Text"><text:s text:c="16"/>},</text:p>
      <text:p text:style-name="Preformatted_20_Text"><text:s text:c="16"/>'deferrable': True,</text:p>
      <text:p text:style-name="Preformatted_20_Text"><text:s text:c="16"/>'max_deferral_time': 600</text:p>
      <text:p text:style-name="Preformatted_20_Text"><text:s text:c="12"/>},</text:p>
      <text:p text:style-name="Preformatted_20_Text"><text:s text:c="12"/></text:p>
      <text:p text:style-name="Preformatted_20_Text"><text:s text:c="12"/># Safety tasks</text:p>
      <text:p text:style-name="Preformatted_20_Text"><text:s text:c="12"/>'safety_monitoring': {</text:p>
      <text:p text:style-name="Preformatted_20_Text"><text:s text:c="16"/>'function': self.marvin_core.safety_monitor.check,</text:p>
      <text:p text:style-name="Preformatted_20_Text"><text:s text:c="16"/>'base_priority': 95, <text:s/># Always high</text:p>
      <text:p text:style-name="Preformatted_20_Text"><text:s text:c="16"/>'context_sensitivity': {</text:p>
      <text:p text:style-name="Preformatted_20_Text"><text:s text:c="20"/>'crisis_emergency': 1.0,</text:p>
      <text:p text:style-name="Preformatted_20_Text"><text:s text:c="20"/>'tea_party_active': 0.9,</text:p>
      <text:p text:style-name="Preformatted_20_Text"><text:s text:c="20"/>'creative_session': 0.9,</text:p>
      <text:p text:style-name="Preformatted_20_Text"><text:s text:c="20"/>'normal': 0.8,</text:p>
      <text:p text:style-name="Preformatted_20_Text"><text:s text:c="20"/>'reflection_period': 0.8</text:p>
      <text:p text:style-name="Preformatted_20_Text"><text:s text:c="16"/>},</text:p>
      <text:p text:style-name="Preformatted_20_Text"><text:s text:c="16"/>'deferrable': False, <text:s/># Never defer safety</text:p>
      <text:p text:style-name="Preformatted_20_Text"><text:s text:c="16"/>'essential_override': ['all'] <text:s/># Essential in all contexts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for task_id, config in tasks.items():</text:p>
      <text:p text:style-name="Preformatted_20_Text"><text:s text:c="12"/>self.resource_manager.register_task(task_id, config)</text:p>
      <text:p text:style-name="Preformatted_20_Text"><text:s text:c="4"/></text:p>
      <text:p text:style-name="Preformatted_20_Text"><text:s text:c="4"/>def execute_with_priority(self, task_id, input_data=None):</text:p>
      <text:p text:style-name="Preformatted_20_Text"><text:s text:c="8"/>"""</text:p>
      <text:p text:style-name="Preformatted_20_Text"><text:s text:c="8"/>Execute task with priority management</text:p>
      <text:p text:style-name="Preformatted_20_Text"><text:s text:c="8"/>"""</text:p>
      <text:p text:style-name="Preformatted_20_Text"><text:s text:c="8"/># Check if task should be deferred</text:p>
      <text:p text:style-name="Preformatted_20_Text"><text:s text:c="8"/>current_context = self.scheduler.active_context</text:p>
      <text:p text:style-name="Preformatted_20_Text"><text:s text:c="8"/></text:p>
      <text:p text:style-name="Preformatted_20_Text"><text:s text:c="8"/>if self.should_defer_task(task_id, current_context):</text:p>
      <text:p text:style-name="Preformatted_20_Text"><text:s text:c="12"/># Defer with appropriate priority</text:p>
      <text:p text:style-name="Preformatted_20_Text"><text:s text:c="12"/>deferral_priority = self.calculate_deferral_priority(task_id, <text:soft-page-break/>current_context)</text:p>
      <text:p text:style-name="Preformatted_20_Text"><text:s text:c="12"/>deferral_id = self.deferral_system.defer_task(</text:p>
      <text:p text:style-name="Preformatted_20_Text"><text:s text:c="16"/>task_id, </text:p>
      <text:p text:style-name="Preformatted_20_Text"><text:s text:c="16"/>input_data,</text:p>
      <text:p text:style-name="Preformatted_20_Text"><text:s text:c="16"/>reason='context_not_optimal',</text:p>
      <text:p text:style-name="Preformatted_20_Text"><text:s text:c="16"/>estimated_importance=deferral_priority</text:p>
      <text:p text:style-name="Preformatted_20_Text"><text:s text:c="12"/>)</text:p>
      <text:p text:style-name="Preformatted_20_Text"><text:s text:c="12"/>return {'status': 'deferred', 'deferral_id': deferral_id}</text:p>
      <text:p text:style-name="Preformatted_20_Text"><text:s text:c="8"/></text:p>
      <text:p text:style-name="Preformatted_20_Text"><text:s text:c="8"/># Execute with appropriate resource allocation</text:p>
      <text:p text:style-name="Preformatted_20_Text"><text:s text:c="8"/>return self.orchestrator.execute_task(task_id, input_data)</text:p>
      <text:p text:style-name="Preformatted_20_Text"><text:s text:c="4"/></text:p>
      <text:p text:style-name="Preformatted_20_Text"><text:s text:c="4"/>def run_system_cycle(self):</text:p>
      <text:p text:style-name="Preformatted_20_Text"><text:s text:c="8"/>"""</text:p>
      <text:p text:style-name="Preformatted_20_Text"><text:s text:c="8"/>Main system cycle with adaptive resource management</text:p>
      <text:p text:style-name="Preformatted_20_Text"><text:s text:c="8"/>"""</text:p>
      <text:p text:style-name="Preformatted_20_Text"><text:s text:c="8"/># 1. Update context</text:p>
      <text:p text:style-name="Preformatted_20_Text"><text:s text:c="8"/>context = self.scheduler.update_context(</text:p>
      <text:p text:style-name="Preformatted_20_Text"><text:s text:c="12"/>self.marvin_core.get_sensor_data(),</text:p>
      <text:p text:style-name="Preformatted_20_Text"><text:s text:c="12"/>self.marvin_core.get_user_interaction(),</text:p>
      <text:p text:style-name="Preformatted_20_Text"><text:s text:c="12"/>self.marvin_core.get_system_state()</text:p>
      <text:p text:style-name="Preformatted_20_Text"><text:s text:c="8"/>)</text:p>
      <text:p text:style-name="Preformatted_20_Text"><text:s text:c="8"/></text:p>
      <text:p text:style-name="Preformatted_20_Text"><text:s text:c="8"/># 2. Check for deferred tasks that can resume</text:p>
      <text:p text:style-name="Preformatted_20_Text"><text:s text:c="8"/>resumable = self.deferral_system.check_resumption_conditions()</text:p>
      <text:p text:style-name="Preformatted_20_Text"><text:s text:c="8"/>for deferral_id in resumable:</text:p>
      <text:p text:style-name="Preformatted_20_Text"><text:s text:c="12"/>self.deferral_system.resume_task(deferral_id)</text:p>
      <text:p text:style-name="Preformatted_20_Text"><text:s text:c="8"/></text:p>
      <text:p text:style-name="Preformatted_20_Text"><text:s text:c="8"/># 3. Check if reflection should run</text:p>
      <text:p text:style-name="Preformatted_20_Text"><text:s text:c="8"/>if self.should_run_reflection():</text:p>
      <text:p text:style-name="Preformatted_20_Text"><text:s text:c="12"/>insights = self.reflection_engine.run_reflection_cycle()</text:p>
      <text:p text:style-name="Preformatted_20_Text"><text:s text:c="12"/>if insights:</text:p>
      <text:p text:style-name="Preformatted_20_Text"><text:s text:c="16"/>self.apply_reflection_insights(insights)</text:p>
      <text:p text:style-name="Preformatted_20_Text"><text:s text:c="8"/></text:p>
      <text:p text:style-name="Preformatted_20_Text"><text:s text:c="8"/># 4. Monitor and adjust resource allocation</text:p>
      <text:p text:style-name="Preformatted_20_Text"><text:s text:c="8"/>self.resource_manager.monitor_and_adjust()</text:p>
      <text:p text:style-name="Preformatted_20_Text"><text:s text:c="8"/></text:p>
      <text:p text:style-name="Preformatted_20_Text"><text:s text:c="8"/># 5. Log current state for future reflection</text:p>
      <text:p text:style-name="P7"><text:s text:c="8"/>self.log_system_state_for_reflection(context)</text:p>
      <text:h text:style-name="Heading_20_3" text:outline-level="3"><text:span text:style-name="Strong_20_Emphasis">B. Configuration Files</text:span></text:h>
      <text:p text:style-name="Text_20_body"><text:span text:style-name="Strong_20_Emphasis"><text:span text:style-name="Source_20_Text">resource_profiles.json</text:span></text:span></text:p>
      <text:p text:style-name="Text_20_body">json</text:p>
      <text:p text:style-name="Preformatted_20_Text">{</text:p>
      <text:p text:style-name="Preformatted_20_Text"><text:s text:c="2"/>"task_profiles": {</text:p>
      <text:p text:style-name="Preformatted_20_Text"><text:s text:c="4"/>"tea_party_active": {</text:p>
      <text:p text:style-name="Preformatted_20_Text"><text:s text:c="6"/>"essential_tasks": ["toy_recognition", "child_emotion_detection", "marvin_expression_render"],</text:p>
      <text:p text:style-name="Preformatted_20_Text"><text:s text:c="6"/>"background_tasks": ["behavioral_analysis", "conversation_logging"],</text:p>
      <text:p text:style-name="Preformatted_20_Text"><text:s text:c="6"/>"resource_limits": {</text:p>
      <text:p text:style-name="Preformatted_20_Text"><text:s text:c="8"/>"cpu": {"essential": 0.6, "background": 0.2},</text:p>
      <text:p text:style-name="Preformatted_20_Text"><text:s text:c="8"/>"memory": {"essential": 500, "background": 100},</text:p>
      <text:p text:style-name="Preformatted_20_Text"><text:s text:c="8"/>"thermal_limit": 75</text:p>
      <text:p text:style-name="Preformatted_20_Text"><text:s text:c="6"/>}</text:p>
      <text:p text:style-name="Preformatted_20_Text"><text:s text:c="4"/>},</text:p>
      <text:p text:style-name="Preformatted_20_Text"><text:s text:c="4"/>"reflection_period": {</text:p>
      <text:p text:style-name="Preformatted_20_Text"><text:s text:c="6"/>"essential_tasks": ["system_health"],</text:p>
      <text:p text:style-name="Preformatted_20_Text"><text:s text:c="6"/>"background_tasks": ["behavioral_analysis_full", "performance_optimization"],</text:p>
      <text:p text:style-name="Preformatted_20_Text"><text:s text:c="6"/>"resource_limits": {</text:p>
      <text:p text:style-name="Preformatted_20_Text"><text:soft-page-break/><text:s text:c="8"/>"cpu": {"essential": 0.2, "background": 0.5},</text:p>
      <text:p text:style-name="Preformatted_20_Text"><text:s text:c="8"/>"memory": {"essential": 200, "background": 300},</text:p>
      <text:p text:style-name="Preformatted_20_Text"><text:s text:c="8"/>"thermal_limit": 70</text:p>
      <text:p text:style-name="Preformatted_20_Text"><text:s text:c="6"/>}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deferral_rules": {</text:p>
      <text:p text:style-name="Preformatted_20_Text"><text:s text:c="4"/>"max_deferral_time_default": 300,</text:p>
      <text:p text:style-name="Preformatted_20_Text"><text:s text:c="4"/>"resumption_triggers": {</text:p>
      <text:p text:style-name="Preformatted_20_Text"><text:s text:c="6"/>"resource_available": {"cpu": 0.4, "memory": 0.5},</text:p>
      <text:p text:style-name="Preformatted_20_Text"><text:s text:c="6"/>"context_match": {"similarity_threshold": 0.7},</text:p>
      <text:p text:style-name="Preformatted_20_Text"><text:s text:c="6"/>"time_based": {"min_interval": 60}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reflection_schedule": {</text:p>
      <text:p text:style-name="Preformatted_20_Text"><text:s text:c="4"/>"idle_threshold": 60,</text:p>
      <text:p text:style-name="Preformatted_20_Text"><text:s text:c="4"/>"minimum_duration": 30,</text:p>
      <text:p text:style-name="Preformatted_20_Text"><text:s text:c="4"/>"maximum_duration": 300,</text:p>
      <text:p text:style-name="Preformatted_20_Text"><text:s text:c="4"/>"priority_mapping": {</text:p>
      <text:p text:style-name="Preformatted_20_Text"><text:s text:c="6"/>"high": 300,</text:p>
      <text:p text:style-name="Preformatted_20_Text"><text:s text:c="6"/>"medium": 1800,</text:p>
      <text:p text:style-name="Preformatted_20_Text"><text:s text:c="6"/>"low": 3600</text:p>
      <text:p text:style-name="Preformatted_20_Text"><text:s text:c="4"/>}</text:p>
      <text:p text:style-name="Preformatted_20_Text"><text:s text:c="2"/>}</text:p>
      <text:p text:style-name="P7">}</text:p>
      <text:p text:style-name="Text_20_body"><text:span text:style-name="Strong_20_Emphasis"><text:span text:style-name="Source_20_Text">task_priorities.json</text:span></text:span></text:p>
      <text:p text:style-name="Text_20_body">json</text:p>
      <text:p text:style-name="Preformatted_20_Text">{</text:p>
      <text:p text:style-name="Preformatted_20_Text"><text:s text:c="2"/>"priority_levels": {</text:p>
      <text:p text:style-name="Preformatted_20_Text"><text:s text:c="4"/>"critical": {</text:p>
      <text:p text:style-name="Preformatted_20_Text"><text:s text:c="6"/>"range": [90, 100],</text:p>
      <text:p text:style-name="Preformatted_20_Text"><text:s text:c="6"/>"description": "Safety and essential functions",</text:p>
      <text:p text:style-name="Preformatted_20_Text"><text:s text:c="6"/>"deferrable": false,</text:p>
      <text:p text:style-name="Preformatted_20_Text"><text:s text:c="6"/>"examples": ["safety_monitoring", "emergency_response"]</text:p>
      <text:p text:style-name="Preformatted_20_Text"><text:s text:c="4"/>},</text:p>
      <text:p text:style-name="Preformatted_20_Text"><text:s text:c="4"/>"high": {</text:p>
      <text:p text:style-name="Preformatted_20_Text"><text:s text:c="6"/>"range": [70, 89],</text:p>
      <text:p text:style-name="Preformatted_20_Text"><text:s text:c="6"/>"description": "Primary activity functions",</text:p>
      <text:p text:style-name="Preformatted_20_Text"><text:s text:c="6"/>"deferrable": true,</text:p>
      <text:p text:style-name="Preformatted_20_Text"><text:s text:c="6"/>"max_deferral": 60,</text:p>
      <text:p text:style-name="Preformatted_20_Text"><text:s text:c="6"/>"examples": ["toy_recognition", "emotion_detection"]</text:p>
      <text:p text:style-name="Preformatted_20_Text"><text:s text:c="4"/>},</text:p>
      <text:p text:style-name="Preformatted_20_Text"><text:s text:c="4"/>"medium": {</text:p>
      <text:p text:style-name="Preformatted_20_Text"><text:s text:c="6"/>"range": [40, 69],</text:p>
      <text:p text:style-name="Preformatted_20_Text"><text:s text:c="6"/>"description": "Supporting functions",</text:p>
      <text:p text:style-name="Preformatted_20_Text"><text:s text:c="6"/>"deferrable": true,</text:p>
      <text:p text:style-name="Preformatted_20_Text"><text:s text:c="6"/>"max_deferral": 300,</text:p>
      <text:p text:style-name="Preformatted_20_Text"><text:s text:c="6"/>"examples": ["conversation_analysis", "progress_tracking"]</text:p>
      <text:p text:style-name="Preformatted_20_Text"><text:s text:c="4"/>},</text:p>
      <text:p text:style-name="Preformatted_20_Text"><text:s text:c="4"/>"low": {</text:p>
      <text:p text:style-name="Preformatted_20_Text"><text:s text:c="6"/>"range": [10, 39],</text:p>
      <text:p text:style-name="Preformatted_20_Text"><text:s text:c="6"/>"description": "Background analysis",</text:p>
      <text:p text:style-name="Preformatted_20_Text"><text:s text:c="6"/>"deferrable": true,</text:p>
      <text:p text:style-name="Preformatted_20_Text"><text:s text:c="6"/>"max_deferral": 600,</text:p>
      <text:p text:style-name="Preformatted_20_Text"><text:s text:c="6"/>"examples": ["behavioral_pattern_analysis", "system_optimization"]</text:p>
      <text:p text:style-name="Preformatted_20_Text"><text:s text:c="4"/>},</text:p>
      <text:p text:style-name="Preformatted_20_Text"><text:s text:c="4"/>"reflection": {</text:p>
      <text:p text:style-name="Preformatted_20_Text"><text:s text:c="6"/>"range": [1, 9],</text:p>
      <text:p text:style-name="Preformatted_20_Text"><text:s text:c="6"/>"description": "Deep analysis tasks",</text:p>
      <text:p text:style-name="Preformatted_20_Text"><text:soft-page-break/><text:s text:c="6"/>"deferrable": true,</text:p>
      <text:p text:style-name="Preformatted_20_Text"><text:s text:c="6"/>"max_deferral": 1800,</text:p>
      <text:p text:style-name="Preformatted_20_Text"><text:s text:c="6"/>"examples": ["long_term_trend_analysis", "model_retraining"]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context_boosts": {</text:p>
      <text:p text:style-name="Preformatted_20_Text"><text:s text:c="4"/>"tea_party_active": {</text:p>
      <text:p text:style-name="Preformatted_20_Text"><text:s text:c="6"/>"toy_recognition": 20,</text:p>
      <text:p text:style-name="Preformatted_20_Text"><text:s text:c="6"/>"child_emotion_detection": 25,</text:p>
      <text:p text:style-name="Preformatted_20_Text"><text:s text:c="6"/>"ar_overlay_render": 15</text:p>
      <text:p text:style-name="Preformatted_20_Text"><text:s text:c="4"/>},</text:p>
      <text:p text:style-name="Preformatted_20_Text"><text:s text:c="4"/>"creative_session": {</text:p>
      <text:p text:style-name="Preformatted_20_Text"><text:s text:c="6"/>"drawing_canvas_render": 20,</text:p>
      <text:p text:style-name="Preformatted_20_Text"><text:s text:c="6"/>"color_palette_management": 15,</text:p>
      <text:p text:style-name="Preformatted_20_Text"><text:s text:c="6"/>"ai_assistance": 10</text:p>
      <text:p text:style-name="Preformatted_20_Text"><text:s text:c="4"/>},</text:p>
      <text:p text:style-name="Preformatted_20_Text"><text:s text:c="4"/>"crisis_emergency": {</text:p>
      <text:p text:style-name="Preformatted_20_Text"><text:s text:c="6"/>"safety_monitoring": 30,</text:p>
      <text:p text:style-name="Preformatted_20_Text"><text:s text:c="6"/>"emergency_response": 25,</text:p>
      <text:p text:style-name="Preformatted_20_Text"><text:s text:c="6"/>"alert_generation": 20</text:p>
      <text:p text:style-name="Preformatted_20_Text"><text:s text:c="4"/>}</text:p>
      <text:p text:style-name="Preformatted_20_Text"><text:s text:c="2"/>}</text:p>
      <text:p text:style-name="P7">}</text:p>
      <text:h text:style-name="Heading_20_2" text:outline-level="2"><text:span text:style-name="Strong_20_Emphasis">6. Benefits &amp; Implementation Phases</text:span></text:h>
      <text:h text:style-name="Heading_20_3" text:outline-level="3"><text:span text:style-name="Strong_20_Emphasis">A. Key Benefits:</text:span></text:h>
      <text:list xml:id="list4565591291429627285" text:style-name="L1">
        <text:list-item>
          <text:p text:style-name="P1"><text:span text:style-name="Strong_20_Emphasis">Adaptive Performance</text:span>: System maintains responsiveness during critical activities</text:p>
        </text:list-item>
        <text:list-item>
          <text:p text:style-name="P1"><text:span text:style-name="Strong_20_Emphasis">Resource Efficiency</text:span>: Non-essential tasks deferred to idle periods</text:p>
        </text:list-item>
        <text:list-item>
          <text:p text:style-name="P1"><text:span text:style-name="Strong_20_Emphasis">Deep Learning</text:span>: Reflection periods enable sophisticated analysis without impacting user experience</text:p>
        </text:list-item>
        <text:list-item>
          <text:p text:style-name="P1"><text:span text:style-name="Strong_20_Emphasis">Thermal Management</text:span>: Prevents overheating by reducing load during high-temperature periods</text:p>
        </text:list-item>
        <text:list-item>
          <text:p text:style-name="P1"><text:span text:style-name="Strong_20_Emphasis">Predictive Optimization</text:span>: Learns user patterns to pre-allocate resources</text:p>
        </text:list-item>
      </text:list>
      <text:h text:style-name="Heading_20_3" text:outline-level="3"><text:span text:style-name="Strong_20_Emphasis">B. Implementation Phases:</text:span></text:h>
      <text:p text:style-name="Text_20_body"><text:span text:style-name="Strong_20_Emphasis">Phase 1: Foundation (2 weeks)</text:span></text:p>
      <text:list xml:id="list6288152885688738690" text:style-name="L2">
        <text:list-item>
          <text:p text:style-name="P2">Basic task prioritization system</text:p>
        </text:list-item>
        <text:list-item>
          <text:p text:style-name="P2">Simple deferral mechanism</text:p>
        </text:list-item>
        <text:list-item>
          <text:p text:style-name="P2">Context detection foundation</text:p>
        </text:list-item>
      </text:list>
      <text:p text:style-name="Text_20_body"><text:span text:style-name="Strong_20_Emphasis">Phase 2: Advanced Scheduling (3 weeks)</text:span></text:p>
      <text:list xml:id="list7621172079146714509" text:style-name="L3">
        <text:list-item>
          <text:p text:style-name="P3">Three-layer execution system</text:p>
        </text:list-item>
        <text:list-item>
          <text:p text:style-name="P3">Intelligent deferral with triggers</text:p>
        </text:list-item>
        <text:list-item>
          <text:p text:style-name="P3">Resource monitoring integration</text:p>
        </text:list-item>
      </text:list>
      <text:p text:style-name="Text_20_body"><text:span text:style-name="Strong_20_Emphasis">Phase 3: Reflection Engine (2 weeks)</text:span></text:p>
      <text:list xml:id="list1527185525585692993" text:style-name="L4">
        <text:list-item>
          <text:p text:style-name="P4">Reflection period management</text:p>
        </text:list-item>
        <text:list-item>
          <text:p text:style-name="P4"><text:soft-page-break/>Analysis modules for deferred data</text:p>
        </text:list-item>
        <text:list-item>
          <text:p text:style-name="P4">Insight generation system</text:p>
        </text:list-item>
      </text:list>
      <text:p text:style-name="Text_20_body"><text:span text:style-name="Strong_20_Emphasis">Phase 4: Optimization &amp; Integration (3 weeks)</text:span></text:p>
      <text:list xml:id="list5190143342017715498" text:style-name="L5">
        <text:list-item>
          <text:p text:style-name="P5">Integration with all existing modules</text:p>
        </text:list-item>
        <text:list-item>
          <text:p text:style-name="P5">Performance optimization for RPi5</text:p>
        </text:list-item>
        <text:list-item>
          <text:p text:style-name="P5">Real-world testing and refinement</text:p>
        </text:list-item>
      </text:list>
      <text:h text:style-name="Heading_20_2" text:outline-level="2"><text:span text:style-name="Strong_20_Emphasis">Conclusion</text:span></text:h>
      <text:p text:style-name="Text_20_body">The <text:span text:style-name="Strong_20_Emphasis">Adaptive Resource Management Engine (ARME)</text:span> transforms resource constraints into <text:span text:style-name="Strong_20_Emphasis">strategic opportunities</text:span> by:</text:p>
      <text:list xml:id="list3055480471302128163" text:style-name="L6">
        <text:list-item>
          <text:p text:style-name="P6"><text:span text:style-name="Strong_20_Emphasis">Context-Aware Prioritization</text:span>: Essential functions get resources when needed</text:p>
        </text:list-item>
        <text:list-item>
          <text:p text:style-name="P6"><text:span text:style-name="Strong_20_Emphasis">Intelligent Deferral</text:span>: Non-essential analysis saved for idle periods</text:p>
        </text:list-item>
        <text:list-item>
          <text:p text:style-name="P6"><text:span text:style-name="Strong_20_Emphasis">Deep Reflection</text:span>: System learns and optimizes during downtime</text:p>
        </text:list-item>
        <text:list-item>
          <text:p text:style-name="P6"><text:span text:style-name="Strong_20_Emphasis">Predictive Allocation</text:span>: Anticipates needs based on patterns</text:p>
        </text:list-item>
      </text:list>
      <text:p text:style-name="Text_20_body">This creates a system that feels <text:span text:style-name="Strong_20_Emphasis">more responsive</text:span> to users while actually doing <text:span text:style-name="Strong_20_Emphasis">more sophisticated processing</text:span> in the background during reflection periods. The tea party can run smoothly with all interactive elements, while behavioral analysis and system optimization happen later when the child is resting.</text:p>
      <text:p text:style-name="Text_20_body"><text:span text:style-name="Strong_20_Emphasis">Key Innovation</text:span>: The system learns to <text:span text:style-name="Strong_20_Emphasis">predict its own idle periods</text:span> and schedules deep analysis accordingly, creating a virtuous cycle where better understanding leads to better resource prediction, which leads to more efficient analysis.</text:p>
      <text:p text:style-name="Text_20_body">This approach embodies the <text:span text:style-name="Strong_20_Emphasis">Peter Protocol's efficiency principle</text:span>: "Protect without burdening, understand without intruding, learn without demanding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23T10:09:24.59</meta:creation-date>
    <meta:document-statistic meta:table-count="0" meta:image-count="0" meta:object-count="0" meta:page-count="24" meta:paragraph-count="1331" meta:word-count="3620" meta:character-count="51224"/>
    <dc:date>2025-12-23T10:10:09.85</dc:date>
    <dc:creator>Peter Thompson</dc:creator>
    <meta:editing-duration>PT46S</meta:editing-duration>
    <meta:editing-cycles>1</meta:editing-cycles>
    <meta:generator>OpenOffice/4.1.15$Win32 OpenOffice.org_project/4115m2$Build-9813</meta:generator>
  </office:meta>
</office:document-meta>
</file>