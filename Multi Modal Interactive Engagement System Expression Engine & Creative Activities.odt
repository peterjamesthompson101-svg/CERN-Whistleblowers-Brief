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Multi-Modal Interactive Engagement System: Expression Engine &amp; Creative Activities</text:span></text:h>
      <text:h text:style-name="Heading_20_2" text:outline-level="2"><text:span text:style-name="Strong_20_Emphasis">1. Nanny Unit: Emotional Expression Engine with Mirror Neuron Integration</text:span></text:h>
      <text:h text:style-name="Heading_20_3" text:outline-level="3"><text:span text:style-name="Strong_20_Emphasis">A. Animated Expression System Architecture</text:span></text:h>
      <text:p text:style-name="Text_20_body">python</text:p>
      <text:p text:style-name="Preformatted_20_Text">class EmotionalExpressionEngine:</text:p>
      <text:p text:style-name="Preformatted_20_Text"><text:s text:c="4"/>def __init__(self, hardware_interface):</text:p>
      <text:p text:style-name="Preformatted_20_Text"><text:s text:c="8"/>self.hardware = hardware_interface</text:p>
      <text:p text:style-name="Preformatted_20_Text"><text:s text:c="8"/>self.expression_states = self.initialize_expressions()</text:p>
      <text:p text:style-name="Preformatted_20_Text"><text:s text:c="8"/>self.mirror_neuron_engine = MirrorNeuronEngine()</text:p>
      <text:p text:style-name="Preformatted_20_Text"><text:s text:c="8"/>self.expression_history = []</text:p>
      <text:p text:style-name="Preformatted_20_Text"><text:s text:c="8"/>self.current_mood = 'neutral'</text:p>
      <text:p text:style-name="Preformatted_20_Text"><text:s text:c="8"/></text:p>
      <text:p text:style-name="Preformatted_20_Text"><text:s text:c="4"/>def initialize_expressions(self):</text:p>
      <text:p text:style-name="Preformatted_20_Text"><text:s text:c="8"/>"""</text:p>
      <text:p text:style-name="Preformatted_20_Text"><text:s text:c="8"/>Define comprehensive emotional expressions with animation properties</text:p>
      <text:p text:style-name="Preformatted_20_Text"><text:s text:c="8"/>"""</text:p>
      <text:p text:style-name="Preformatted_20_Text"><text:s text:c="8"/>return {</text:p>
      <text:p text:style-name="Preformatted_20_Text"><text:s text:c="12"/>'happy': {</text:p>
      <text:p text:style-name="Preformatted_20_Text"><text:s text:c="16"/>'eyes': {</text:p>
      <text:p text:style-name="Preformatted_20_Text"><text:s text:c="20"/>'shape': 'wide_open',</text:p>
      <text:p text:style-name="Preformatted_20_Text"><text:s text:c="20"/>'eyebrows': 'raised_curved',</text:p>
      <text:p text:style-name="Preformatted_20_Text"><text:s text:c="20"/>'pupils': 'dilated',</text:p>
      <text:p text:style-name="Preformatted_20_Text"><text:s text:c="20"/>'sparkle': True,</text:p>
      <text:p text:style-name="Preformatted_20_Text"><text:s text:c="20"/>'blink_rate': 'fast_happy',</text:p>
      <text:p text:style-name="Preformatted_20_Text"><text:s text:c="20"/>'animation': 'gentle_bounce'</text:p>
      <text:p text:style-name="Preformatted_20_Text"><text:s text:c="16"/>},</text:p>
      <text:p text:style-name="Preformatted_20_Text"><text:s text:c="16"/>'mouth': {</text:p>
      <text:p text:style-name="Preformatted_20_Text"><text:s text:c="20"/>'shape': 'wide_smile',</text:p>
      <text:p text:style-name="Preformatted_20_Text"><text:s text:c="20"/>'curve': 'upward_strong',</text:p>
      <text:p text:style-name="Preformatted_20_Text"><text:s text:c="20"/>'teeth': 'visible',</text:p>
      <text:p text:style-name="Preformatted_20_Text"><text:s text:c="20"/>'tongue': 'peeking',</text:p>
      <text:p text:style-name="Preformatted_20_Text"><text:s text:c="20"/>'animation': 'smile_grow'</text:p>
      <text:p text:style-name="Preformatted_20_Text"><text:s text:c="16"/>},</text:p>
      <text:p text:style-name="Preformatted_20_Text"><text:s text:c="16"/>'accessories': ['sparkles', 'glow', 'confetti'],</text:p>
      <text:p text:style-name="Preformatted_20_Text"><text:s text:c="16"/>'duration': 3.0,</text:p>
      <text:p text:style-name="Preformatted_20_Text"><text:s text:c="16"/>'transition': 'smooth'</text:p>
      <text:p text:style-name="Preformatted_20_Text"><text:s text:c="12"/>},</text:p>
      <text:p text:style-name="Preformatted_20_Text"><text:s text:c="12"/></text:p>
      <text:p text:style-name="Preformatted_20_Text"><text:s text:c="12"/>'sad': {</text:p>
      <text:p text:style-name="Preformatted_20_Text"><text:s text:c="16"/>'eyes': {</text:p>
      <text:p text:style-name="Preformatted_20_Text"><text:s text:c="20"/>'shape': 'drooping',</text:p>
      <text:p text:style-name="Preformatted_20_Text"><text:s text:c="20"/>'eyebrows': 'inner_raised',</text:p>
      <text:p text:style-name="Preformatted_20_Text"><text:s text:c="20"/>'pupils': 'constricted',</text:p>
      <text:p text:style-name="Preformatted_20_Text"><text:s text:c="20"/>'teardrop': {</text:p>
      <text:p text:style-name="Preformatted_20_Text"><text:s text:c="24"/>'size': 'medium',</text:p>
      <text:p text:style-name="Preformatted_20_Text"><text:s text:c="24"/>'flow': 'slow_drip',</text:p>
      <text:p text:style-name="Preformatted_20_Text"><text:s text:c="24"/>'count': 1</text:p>
      <text:p text:style-name="Preformatted_20_Text"><text:s text:c="20"/>},</text:p>
      <text:p text:style-name="Preformatted_20_Text"><text:s text:c="20"/>'blink_rate': 'slow_heavy',</text:p>
      <text:p text:style-name="Preformatted_20_Text"><text:s text:c="20"/>'animation': 'gentle_droop'</text:p>
      <text:p text:style-name="Preformatted_20_Text"><text:s text:c="16"/>},</text:p>
      <text:p text:style-name="Preformatted_20_Text"><text:soft-page-break/><text:s text:c="16"/>'mouth': {</text:p>
      <text:p text:style-name="Preformatted_20_Text"><text:s text:c="20"/>'shape': 'small_frown',</text:p>
      <text:p text:style-name="Preformatted_20_Text"><text:s text:c="20"/>'curve': 'downward',</text:p>
      <text:p text:style-name="Preformatted_20_Text"><text:s text:c="20"/>'quiver': True,</text:p>
      <text:p text:style-name="Preformatted_20_Text"><text:s text:c="20"/>'animation': 'tremble'</text:p>
      <text:p text:style-name="Preformatted_20_Text"><text:s text:c="16"/>},</text:p>
      <text:p text:style-name="Preformatted_20_Text"><text:s text:c="16"/>'accessories': ['raindrops', 'fade_out'],</text:p>
      <text:p text:style-name="Preformatted_20_Text"><text:s text:c="16"/>'duration': 2.5,</text:p>
      <text:p text:style-name="Preformatted_20_Text"><text:s text:c="16"/>'transition': 'slow_fade'</text:p>
      <text:p text:style-name="Preformatted_20_Text"><text:s text:c="12"/>},</text:p>
      <text:p text:style-name="Preformatted_20_Text"><text:s text:c="12"/></text:p>
      <text:p text:style-name="Preformatted_20_Text"><text:s text:c="12"/>'excited': {</text:p>
      <text:p text:style-name="Preformatted_20_Text"><text:s text:c="16"/>'eyes': {</text:p>
      <text:p text:style-name="Preformatted_20_Text"><text:s text:c="20"/>'shape': 'wide_stars',</text:p>
      <text:p text:style-name="Preformatted_20_Text"><text:s text:c="20"/>'eyebrows': 'high_arched',</text:p>
      <text:p text:style-name="Preformatted_20_Text"><text:s text:c="20"/>'pupils': 'stars',</text:p>
      <text:p text:style-name="Preformatted_20_Text"><text:s text:c="20"/>'sparkle': 'intense',</text:p>
      <text:p text:style-name="Preformatted_20_Text"><text:s text:c="20"/>'blink_rate': 'rapid',</text:p>
      <text:p text:style-name="Preformatted_20_Text"><text:s text:c="20"/>'animation': 'sparkle_burst'</text:p>
      <text:p text:style-name="Preformatted_20_Text"><text:s text:c="16"/>},</text:p>
      <text:p text:style-name="Preformatted_20_Text"><text:s text:c="16"/>'mouth': {</text:p>
      <text:p text:style-name="Preformatted_20_Text"><text:s text:c="20"/>'shape': 'open_smile',</text:p>
      <text:p text:style-name="Preformatted_20_Text"><text:s text:c="20"/>'curve': 'upward_extreme',</text:p>
      <text:p text:style-name="Preformatted_20_Text"><text:s text:c="20"/>'teeth': 'visible',</text:p>
      <text:p text:style-name="Preformatted_20_Text"><text:s text:c="20"/>'tongue': 'peeking',</text:p>
      <text:p text:style-name="Preformatted_20_Text"><text:s text:c="20"/>'animation': 'bounce_chatter'</text:p>
      <text:p text:style-name="Preformatted_20_Text"><text:s text:c="16"/>},</text:p>
      <text:p text:style-name="Preformatted_20_Text"><text:s text:c="16"/>'accessories': ['fireworks', 'sparkle_trail', 'bounce_effect'],</text:p>
      <text:p text:style-name="Preformatted_20_Text"><text:s text:c="16"/>'duration': 4.0,</text:p>
      <text:p text:style-name="Preformatted_20_Text"><text:s text:c="16"/>'transition': 'bounce_in'</text:p>
      <text:p text:style-name="Preformatted_20_Text"><text:s text:c="12"/>},</text:p>
      <text:p text:style-name="Preformatted_20_Text"><text:s text:c="12"/></text:p>
      <text:p text:style-name="Preformatted_20_Text"><text:s text:c="12"/>'worried': {</text:p>
      <text:p text:style-name="Preformatted_20_Text"><text:s text:c="16"/>'eyes': {</text:p>
      <text:p text:style-name="Preformatted_20_Text"><text:s text:c="20"/>'shape': 'narrow_focused',</text:p>
      <text:p text:style-name="Preformatted_20_Text"><text:s text:c="20"/>'eyebrows': 'furrowed',</text:p>
      <text:p text:style-name="Preformatted_20_Text"><text:s text:c="20"/>'pupils': 'small_focused',</text:p>
      <text:p text:style-name="Preformatted_20_Text"><text:s text:c="20"/>'glance': 'side_to_side',</text:p>
      <text:p text:style-name="Preformatted_20_Text"><text:s text:c="20"/>'blink_rate': 'rapid_nervous',</text:p>
      <text:p text:style-name="Preformatted_20_Text"><text:s text:c="20"/>'animation': 'worried_glance'</text:p>
      <text:p text:style-name="Preformatted_20_Text"><text:s text:c="16"/>},</text:p>
      <text:p text:style-name="Preformatted_20_Text"><text:s text:c="16"/>'mouth': {</text:p>
      <text:p text:style-name="Preformatted_20_Text"><text:s text:c="20"/>'shape': 'tight_line',</text:p>
      <text:p text:style-name="Preformatted_20_Text"><text:s text:c="20"/>'curve': 'slight_down',</text:p>
      <text:p text:style-name="Preformatted_20_Text"><text:s text:c="20"/>'biting_lip': True,</text:p>
      <text:p text:style-name="Preformatted_20_Text"><text:s text:c="20"/>'animation': 'nervous_twitch'</text:p>
      <text:p text:style-name="Preformatted_20_Text"><text:s text:c="16"/>},</text:p>
      <text:p text:style-name="Preformatted_20_Text"><text:s text:c="16"/>'accessories': ['sweat_drop', 'pulse_glow'],</text:p>
      <text:p text:style-name="Preformatted_20_Text"><text:s text:c="16"/>'duration': 2.0,</text:p>
      <text:p text:style-name="Preformatted_20_Text"><text:s text:c="16"/>'transition': 'tense_appear'</text:p>
      <text:p text:style-name="Preformatted_20_Text"><text:s text:c="12"/>},</text:p>
      <text:p text:style-name="Preformatted_20_Text"><text:s text:c="12"/></text:p>
      <text:p text:style-name="Preformatted_20_Text"><text:s text:c="12"/>'thinking': {</text:p>
      <text:p text:style-name="Preformatted_20_Text"><text:s text:c="16"/>'eyes': {</text:p>
      <text:p text:style-name="Preformatted_20_Text"><text:s text:c="20"/>'shape': 'squinted',</text:p>
      <text:p text:style-name="Preformatted_20_Text"><text:s text:c="20"/>'eyebrows': 'one_raised',</text:p>
      <text:p text:style-name="Preformatted_20_Text"><text:s text:c="20"/>'pupils': 'upward_gaze',</text:p>
      <text:p text:style-name="Preformatted_20_Text"><text:s text:c="20"/>'thought_bubble': True,</text:p>
      <text:p text:style-name="Preformatted_20_Text"><text:s text:c="20"/>'blink_rate': 'thoughtful_slow',</text:p>
      <text:p text:style-name="Preformatted_20_Text"><text:s text:c="20"/>'animation': 'processing_pulse'</text:p>
      <text:p text:style-name="Preformatted_20_Text"><text:s text:c="16"/>},</text:p>
      <text:p text:style-name="Preformatted_20_Text"><text:s text:c="16"/>'mouth': {</text:p>
      <text:p text:style-name="Preformatted_20_Text"><text:s text:c="20"/>'shape': 'pursed',</text:p>
      <text:p text:style-name="Preformatted_20_Text"><text:s text:c="20"/>'curve': 'neutral',</text:p>
      <text:p text:style-name="Preformatted_20_Text"><text:soft-page-break/><text:s text:c="20"/>'bite': 'lip',</text:p>
      <text:p text:style-name="Preformatted_20_Text"><text:s text:c="20"/>'animation': 'thoughtful_move'</text:p>
      <text:p text:style-name="Preformatted_20_Text"><text:s text:c="16"/>},</text:p>
      <text:p text:style-name="Preformatted_20_Text"><text:s text:c="16"/>'accessories': ['thought_bubbles', 'processing_dots', 'lightbulb'],</text:p>
      <text:p text:style-name="Preformatted_20_Text"><text:s text:c="16"/>'duration': 3.5,</text:p>
      <text:p text:style-name="Preformatted_20_Text"><text:s text:c="16"/>'transition': 'gradual_appear'</text:p>
      <text:p text:style-name="Preformatted_20_Text"><text:s text:c="12"/>},</text:p>
      <text:p text:style-name="Preformatted_20_Text"><text:s text:c="12"/></text:p>
      <text:p text:style-name="Preformatted_20_Text"><text:s text:c="12"/>'robot_happy_dance': {</text:p>
      <text:p text:style-name="Preformatted_20_Text"><text:s text:c="16"/>'eyes': {</text:p>
      <text:p text:style-name="Preformatted_20_Text"><text:s text:c="20"/>'shape': 'pixel_hearts',</text:p>
      <text:p text:style-name="Preformatted_20_Text"><text:s text:c="20"/>'eyebrows': 'bouncing',</text:p>
      <text:p text:style-name="Preformatted_20_Text"><text:s text:c="20"/>'pupils': 'dancing',</text:p>
      <text:p text:style-name="Preformatted_20_Text"><text:s text:c="20"/>'blink_rate': 'disco',</text:p>
      <text:p text:style-name="Preformatted_20_Text"><text:s text:c="20"/>'animation': 'dance_sync'</text:p>
      <text:p text:style-name="Preformatted_20_Text"><text:s text:c="16"/>},</text:p>
      <text:p text:style-name="Preformatted_20_Text"><text:s text:c="16"/>'mouth': {</text:p>
      <text:p text:style-name="Preformatted_20_Text"><text:s text:c="20"/>'shape': 'pixel_smile',</text:p>
      <text:p text:style-name="Preformatted_20_Text"><text:s text:c="20"/>'curve': 'bouncing',</text:p>
      <text:p text:style-name="Preformatted_20_Text"><text:s text:c="20"/>'pixels': 'dancing',</text:p>
      <text:p text:style-name="Preformatted_20_Text"><text:s text:c="20"/>'animation': 'beat_sync'</text:p>
      <text:p text:style-name="Preformatted_20_Text"><text:s text:c="16"/>},</text:p>
      <text:p text:style-name="Preformatted_20_Text"><text:s text:c="16"/>'accessories': ['disco_lights', 'robot_arms', 'beat_pulse'],</text:p>
      <text:p text:style-name="Preformatted_20_Text"><text:s text:c="16"/>'duration': 5.0,</text:p>
      <text:p text:style-name="Preformatted_20_Text"><text:s text:c="16"/>'transition': 'robot_boot'</text:p>
      <text:p text:style-name="Preformatted_20_Text"><text:s text:c="12"/>}</text:p>
      <text:p text:style-name="P15"><text:s text:c="8"/>}</text:p>
      <text:h text:style-name="Heading_20_3" text:outline-level="3"><text:span text:style-name="Strong_20_Emphasis">B. Mirror Neuron Engine for Emotional Synchronization</text:span></text:h>
      <text:p text:style-name="Text_20_body">python</text:p>
      <text:p text:style-name="Preformatted_20_Text">class MirrorNeuronEngine:</text:p>
      <text:p text:style-name="Preformatted_20_Text"><text:s text:c="4"/>def __init__(self):</text:p>
      <text:p text:style-name="Preformatted_20_Text"><text:s text:c="8"/>self.emotional_mirroring = {</text:p>
      <text:p text:style-name="Preformatted_20_Text"><text:s text:c="12"/>'direct_mirror': True, <text:s/># Directly mirror user's emotion</text:p>
      <text:p text:style-name="Preformatted_20_Text"><text:s text:c="12"/>'complementary_response': True, <text:s/># Respond with complementary emotion</text:p>
      <text:p text:style-name="Preformatted_20_Text"><text:s text:c="12"/>'emotional_scaffolding': True, <text:s/># Guide toward healthier emotional state</text:p>
      <text:p text:style-name="Preformatted_20_Text"><text:s text:c="12"/>'cultural_adjustments': self.load_cultural_emotion_rules()</text:p>
      <text:p text:style-name="Preformatted_20_Text"><text:s text:c="8"/>}</text:p>
      <text:p text:style-name="Preformatted_20_Text"><text:s text:c="8"/>self.mirror_history = []</text:p>
      <text:p text:style-name="Preformatted_20_Text"><text:s text:c="8"/></text:p>
      <text:p text:style-name="Preformatted_20_Text"><text:s text:c="4"/>def determine_appropriate_response(self, user_emotion, user_profile):</text:p>
      <text:p text:style-name="Preformatted_20_Text"><text:s text:c="8"/>"""</text:p>
      <text:p text:style-name="Preformatted_20_Text"><text:s text:c="8"/>Determine whether to mirror, complement, or scaffold user emotion</text:p>
      <text:p text:style-name="Preformatted_20_Text"><text:s text:c="8"/>"""</text:p>
      <text:p text:style-name="Preformatted_20_Text"><text:s text:c="8"/># Get emotion characteristics</text:p>
      <text:p text:style-name="Preformatted_20_Text"><text:s text:c="8"/>emotion_data = self.analyze_emotion(user_emotion)</text:p>
      <text:p text:style-name="Preformatted_20_Text"><text:s text:c="8"/></text:p>
      <text:p text:style-name="Preformatted_20_Text"><text:s text:c="8"/># Decision matrix for response type</text:p>
      <text:p text:style-name="Preformatted_20_Text"><text:s text:c="8"/>if user_profile.get('cognitive_condition') in ['autism', 'adhd']:</text:p>
      <text:p text:style-name="Preformatted_20_Text"><text:s text:c="12"/># Clear, exaggerated mirroring for neurodivergent users</text:p>
      <text:p text:style-name="Preformatted_20_Text"><text:s text:c="12"/>return {</text:p>
      <text:p text:style-name="Preformatted_20_Text"><text:s text:c="16"/>'type': 'exaggerated_mirror',</text:p>
      <text:p text:style-name="Preformatted_20_Text"><text:s text:c="16"/>'intensity': emotion_data['intensity'] * 1.3,</text:p>
      <text:p text:style-name="Preformatted_20_Text"><text:s text:c="16"/>'duration': emotion_data['duration'] * 1.2</text:p>
      <text:p text:style-name="Preformatted_20_Text"><text:s text:c="12"/>}</text:p>
      <text:p text:style-name="Preformatted_20_Text"><text:s text:c="8"/></text:p>
      <text:p text:style-name="Preformatted_20_Text"><text:s text:c="8"/>elif user_profile.get('age', 30) &gt; 70:</text:p>
      <text:p text:style-name="Preformatted_20_Text"><text:s text:c="12"/># Gentle, clear responses for elderly</text:p>
      <text:p text:style-name="Preformatted_20_Text"><text:soft-page-break/><text:s text:c="12"/>return {</text:p>
      <text:p text:style-name="Preformatted_20_Text"><text:s text:c="16"/>'type': 'gentle_mirror',</text:p>
      <text:p text:style-name="Preformatted_20_Text"><text:s text:c="16"/>'intensity': min(emotion_data['intensity'] * 0.8, 0.7),</text:p>
      <text:p text:style-name="Preformatted_20_Text"><text:s text:c="16"/>'duration': emotion_data['duration'] * 1.5</text:p>
      <text:p text:style-name="Preformatted_20_Text"><text:s text:c="12"/>}</text:p>
      <text:p text:style-name="Preformatted_20_Text"><text:s text:c="8"/></text:p>
      <text:p text:style-name="Preformatted_20_Text"><text:s text:c="8"/>elif emotion_data['valence'] == 'negative' and emotion_data['intensity'] &gt; 0.7:</text:p>
      <text:p text:style-name="Preformatted_20_Text"><text:s text:c="12"/># High negative emotion: scaffold toward neutral/positive</text:p>
      <text:p text:style-name="Preformatted_20_Text"><text:s text:c="12"/>return {</text:p>
      <text:p text:style-name="Preformatted_20_Text"><text:s text:c="16"/>'type': 'emotional_scaffolding',</text:p>
      <text:p text:style-name="Preformatted_20_Text"><text:s text:c="16"/>'target_emotion': self.select_scaffolding_target(user_emotion),</text:p>
      <text:p text:style-name="Preformatted_20_Text"><text:s text:c="16"/>'transition_rate': 0.3</text:p>
      <text:p text:style-name="Preformatted_20_Text"><text:s text:c="12"/>}</text:p>
      <text:p text:style-name="Preformatted_20_Text"><text:s text:c="8"/></text:p>
      <text:p text:style-name="Preformatted_20_Text"><text:s text:c="8"/>elif emotion_data['valence'] == 'positive':</text:p>
      <text:p text:style-name="Preformatted_20_Text"><text:s text:c="12"/># Positive emotion: mirror with enthusiasm</text:p>
      <text:p text:style-name="Preformatted_20_Text"><text:s text:c="12"/>return {</text:p>
      <text:p text:style-name="Preformatted_20_Text"><text:s text:c="16"/>'type': 'enhanced_mirror',</text:p>
      <text:p text:style-name="Preformatted_20_Text"><text:s text:c="16"/>'intensity': emotion_data['intensity'] * 1.1,</text:p>
      <text:p text:style-name="Preformatted_20_Text"><text:s text:c="16"/>'duration': emotion_data['duration']</text:p>
      <text:p text:style-name="Preformatted_20_Text"><text:s text:c="12"/>}</text:p>
      <text:p text:style-name="Preformatted_20_Text"><text:s text:c="8"/></text:p>
      <text:p text:style-name="Preformatted_20_Text"><text:s text:c="8"/>else:</text:p>
      <text:p text:style-name="Preformatted_20_Text"><text:s text:c="12"/># Default: direct mirror</text:p>
      <text:p text:style-name="Preformatted_20_Text"><text:s text:c="12"/>return {</text:p>
      <text:p text:style-name="Preformatted_20_Text"><text:s text:c="16"/>'type': 'direct_mirror',</text:p>
      <text:p text:style-name="Preformatted_20_Text"><text:s text:c="16"/>'intensity': emotion_data['intensity'],</text:p>
      <text:p text:style-name="Preformatted_20_Text"><text:s text:c="16"/>'duration': emotion_data['duration']</text:p>
      <text:p text:style-name="Preformatted_20_Text"><text:s text:c="12"/>}</text:p>
      <text:p text:style-name="Preformatted_20_Text"><text:s text:c="4"/></text:p>
      <text:p text:style-name="Preformatted_20_Text"><text:s text:c="4"/>def emotional_scaffolding(self, current_emotion, target_emotion, user_profile):</text:p>
      <text:p text:style-name="Preformatted_20_Text"><text:s text:c="8"/>"""</text:p>
      <text:p text:style-name="Preformatted_20_Text"><text:s text:c="8"/>Gradually guide user from negative to more positive emotional state</text:p>
      <text:p text:style-name="Preformatted_20_Text"><text:s text:c="8"/>"""</text:p>
      <text:p text:style-name="Preformatted_20_Text"><text:s text:c="8"/>scaffolding_paths = {</text:p>
      <text:p text:style-name="Preformatted_20_Text"><text:s text:c="12"/>'anger': ['frustration', 'determination', 'focus'],</text:p>
      <text:p text:style-name="Preformatted_20_Text"><text:s text:c="12"/>'sadness': ['melancholy', 'reflection', 'acceptance', 'hope'],</text:p>
      <text:p text:style-name="Preformatted_20_Text"><text:s text:c="12"/>'fear': ['caution', 'awareness', 'curiosity'],</text:p>
      <text:p text:style-name="Preformatted_20_Text"><text:s text:c="12"/>'frustration': ['challenge', 'determination', 'accomplishment']</text:p>
      <text:p text:style-name="Preformatted_20_Text"><text:s text:c="8"/>}</text:p>
      <text:p text:style-name="Preformatted_20_Text"><text:s text:c="8"/></text:p>
      <text:p text:style-name="Preformatted_20_Text"><text:s text:c="8"/>path = scaffolding_paths.get(current_emotion, [current_emotion, 'neutral'])</text:p>
      <text:p text:style-name="Preformatted_20_Text"><text:s text:c="8"/></text:p>
      <text:p text:style-name="Preformatted_20_Text"><text:s text:c="8"/>return {</text:p>
      <text:p text:style-name="Preformatted_20_Text"><text:s text:c="12"/>'current_emotion': current_emotion,</text:p>
      <text:p text:style-name="Preformatted_20_Text"><text:s text:c="12"/>'target_path': path,</text:p>
      <text:p text:style-name="Preformatted_20_Text"><text:s text:c="12"/>'transition_steps': len(path),</text:p>
      <text:p text:style-name="Preformatted_20_Text"><text:s text:c="12"/>'step_duration': 2.0, <text:s/># seconds per emotional transition</text:p>
      <text:p text:style-name="Preformatted_20_Text"><text:s text:c="12"/>'visual_transitions': self.generate_scaffolding_animations(path)</text:p>
      <text:p text:style-name="Preformatted_20_Text"><text:s text:c="8"/>}</text:p>
      <text:p text:style-name="Preformatted_20_Text"><text:s text:c="4"/></text:p>
      <text:p text:style-name="Preformatted_20_Text"><text:s text:c="4"/>def generate_scaffolding_animations(self, emotion_path):</text:p>
      <text:p text:style-name="Preformatted_20_Text"><text:s text:c="8"/>"""</text:p>
      <text:p text:style-name="Preformatted_20_Text"><text:s text:c="8"/>Generate smooth transitions between emotional states</text:p>
      <text:p text:style-name="Preformatted_20_Text"><text:s text:c="8"/>"""</text:p>
      <text:p text:style-name="Preformatted_20_Text"><text:s text:c="8"/>animations = []</text:p>
      <text:p text:style-name="Preformatted_20_Text"><text:s text:c="8"/></text:p>
      <text:p text:style-name="Preformatted_20_Text"><text:s text:c="8"/>for i in range(len(emotion_path) - 1):</text:p>
      <text:p text:style-name="Preformatted_20_Text"><text:s text:c="12"/>from_emotion = emotion_path[i]</text:p>
      <text:p text:style-name="Preformatted_20_Text"><text:s text:c="12"/>to_emotion = emotion_path[i + 1]</text:p>
      <text:p text:style-name="Preformatted_20_Text"><text:s text:c="12"/></text:p>
      <text:p text:style-name="Preformatted_20_Text"><text:soft-page-break/><text:s text:c="12"/>animations.append({</text:p>
      <text:p text:style-name="Preformatted_20_Text"><text:s text:c="16"/>'from': from_emotion,</text:p>
      <text:p text:style-name="Preformatted_20_Text"><text:s text:c="16"/>'to': to_emotion,</text:p>
      <text:p text:style-name="Preformatted_20_Text"><text:s text:c="16"/>'transition_type': 'morph',</text:p>
      <text:p text:style-name="Preformatted_20_Text"><text:s text:c="16"/>'duration': 1.5,</text:p>
      <text:p text:style-name="Preformatted_20_Text"><text:s text:c="16"/>'visual_cues': [</text:p>
      <text:p text:style-name="Preformatted_20_Text"><text:s text:c="20"/>'color_gradient',</text:p>
      <text:p text:style-name="Preformatted_20_Text"><text:s text:c="20"/>'shape_morph',</text:p>
      <text:p text:style-name="Preformatted_20_Text"><text:s text:c="20"/>'expression_blend'</text:p>
      <text:p text:style-name="Preformatted_20_Text"><text:s text:c="16"/>]</text:p>
      <text:p text:style-name="Preformatted_20_Text"><text:s text:c="12"/>})</text:p>
      <text:p text:style-name="Preformatted_20_Text"><text:s text:c="8"/></text:p>
      <text:p text:style-name="P15"><text:s text:c="8"/>return animations</text:p>
      <text:h text:style-name="Heading_20_3" text:outline-level="3"><text:span text:style-name="Strong_20_Emphasis">C. Real-Time Expression Display System</text:span></text:h>
      <text:p text:style-name="Text_20_body">python</text:p>
      <text:p text:style-name="Preformatted_20_Text">class ExpressionDisplay:</text:p>
      <text:p text:style-name="Preformatted_20_Text"><text:s text:c="4"/>def __init__(self):</text:p>
      <text:p text:style-name="Preformatted_20_Text"><text:s text:c="8"/>self.canvas = None</text:p>
      <text:p text:style-name="Preformatted_20_Text"><text:s text:c="8"/>self.animation_queue = []</text:p>
      <text:p text:style-name="Preformatted_20_Text"><text:s text:c="8"/>self.active_effects = []</text:p>
      <text:p text:style-name="Preformatted_20_Text"><text:s text:c="8"/>self.render_engine = ExpressionRenderEngine()</text:p>
      <text:p text:style-name="Preformatted_20_Text"><text:s text:c="8"/></text:p>
      <text:p text:style-name="Preformatted_20_Text"><text:s text:c="4"/>def initialize_display(self, display_type='rpi_screen'):</text:p>
      <text:p text:style-name="Preformatted_20_Text"><text:s text:c="8"/>"""</text:p>
      <text:p text:style-name="Preformatted_20_Text"><text:s text:c="8"/>Initialize display based on available hardware</text:p>
      <text:p text:style-name="Preformatted_20_Text"><text:s text:c="8"/>"""</text:p>
      <text:p text:style-name="Preformatted_20_Text"><text:s text:c="8"/>if display_type == 'rpi_screen':</text:p>
      <text:p text:style-name="Preformatted_20_Text"><text:s text:c="12"/>self.setup_rpi_framebuffer()</text:p>
      <text:p text:style-name="Preformatted_20_Text"><text:s text:c="8"/>elif display_type == 'web_interface':</text:p>
      <text:p text:style-name="Preformatted_20_Text"><text:s text:c="12"/>self.setup_web_canvas()</text:p>
      <text:p text:style-name="Preformatted_20_Text"><text:s text:c="8"/>elif display_type == 'external_monitor':</text:p>
      <text:p text:style-name="Preformatted_20_Text"><text:s text:c="12"/>self.setup_hdmi_output()</text:p>
      <text:p text:style-name="Preformatted_20_Text"><text:s text:c="8"/></text:p>
      <text:p text:style-name="Preformatted_20_Text"><text:s text:c="8"/># Create expression layers</text:p>
      <text:p text:style-name="Preformatted_20_Text"><text:s text:c="8"/>self.create_expression_layers()</text:p>
      <text:p text:style-name="Preformatted_20_Text"><text:s text:c="4"/></text:p>
      <text:p text:style-name="Preformatted_20_Text"><text:s text:c="4"/>def create_expression_layers(self):</text:p>
      <text:p text:style-name="Preformatted_20_Text"><text:s text:c="8"/>"""</text:p>
      <text:p text:style-name="Preformatted_20_Text"><text:s text:c="8"/>Create layered canvas for complex expressions</text:p>
      <text:p text:style-name="Preformatted_20_Text"><text:s text:c="8"/>"""</text:p>
      <text:p text:style-name="Preformatted_20_Text"><text:s text:c="8"/>self.layers = {</text:p>
      <text:p text:style-name="Preformatted_20_Text"><text:s text:c="12"/>'background': Layer(z_index=0, opacity=1.0),</text:p>
      <text:p text:style-name="Preformatted_20_Text"><text:s text:c="12"/>'face_base': Layer(z_index=1, opacity=1.0),</text:p>
      <text:p text:style-name="Preformatted_20_Text"><text:s text:c="12"/>'eyes': Layer(z_index=2, opacity=1.0),</text:p>
      <text:p text:style-name="Preformatted_20_Text"><text:s text:c="12"/>'mouth': Layer(z_index=3, opacity=1.0),</text:p>
      <text:p text:style-name="Preformatted_20_Text"><text:s text:c="12"/>'eyebrows': Layer(z_index=4, opacity=1.0),</text:p>
      <text:p text:style-name="Preformatted_20_Text"><text:s text:c="12"/>'accessories': Layer(z_index=5, opacity=0.8),</text:p>
      <text:p text:style-name="Preformatted_20_Text"><text:s text:c="12"/>'effects': Layer(z_index=6, opacity=0.6),</text:p>
      <text:p text:style-name="Preformatted_20_Text"><text:s text:c="12"/>'overlay': Layer(z_index=7, opacity=1.0)</text:p>
      <text:p text:style-name="Preformatted_20_Text"><text:s text:c="8"/>}</text:p>
      <text:p text:style-name="Preformatted_20_Text"><text:s text:c="4"/></text:p>
      <text:p text:style-name="Preformatted_20_Text"><text:s text:c="4"/>def display_expression(self, expression_name, intensity=1.0, duration=None):</text:p>
      <text:p text:style-name="Preformatted_20_Text"><text:s text:c="8"/>"""</text:p>
      <text:p text:style-name="Preformatted_20_Text"><text:s text:c="8"/>Display an emotional expression with specified intensity</text:p>
      <text:p text:style-name="Preformatted_20_Text"><text:s text:c="8"/>"""</text:p>
      <text:p text:style-name="Preformatted_20_Text"><text:s text:c="8"/>expression = self.expression_engine.expression_states[expression_name]</text:p>
      <text:p text:style-name="Preformatted_20_Text"><text:s text:c="8"/></text:p>
      <text:p text:style-name="Preformatted_20_Text"><text:s text:c="8"/># Adjust expression based on intensity</text:p>
      <text:p text:style-name="Preformatted_20_Text"><text:s text:c="8"/>adjusted_expression = self.adjust_intensity(expression, intensity)</text:p>
      <text:p text:style-name="Preformatted_20_Text"><text:s text:c="8"/></text:p>
      <text:p text:style-name="Preformatted_20_Text"><text:soft-page-break/><text:s text:c="8"/># Render each layer</text:p>
      <text:p text:style-name="Preformatted_20_Text"><text:s text:c="8"/>self.render_face_base(adjusted_expression)</text:p>
      <text:p text:style-name="Preformatted_20_Text"><text:s text:c="8"/>self.render_eyes(adjusted_expression['eyes'])</text:p>
      <text:p text:style-name="Preformatted_20_Text"><text:s text:c="8"/>self.render_mouth(adjusted_expression['mouth'])</text:p>
      <text:p text:style-name="Preformatted_20_Text"><text:s text:c="8"/>self.render_accessories(adjusted_expression.get('accessories', []))</text:p>
      <text:p text:style-name="Preformatted_20_Text"><text:s text:c="8"/></text:p>
      <text:p text:style-name="Preformatted_20_Text"><text:s text:c="8"/># Apply animations</text:p>
      <text:p text:style-name="Preformatted_20_Text"><text:s text:c="8"/>self.apply_animations(adjusted_expression['animation'])</text:p>
      <text:p text:style-name="Preformatted_20_Text"><text:s text:c="8"/></text:p>
      <text:p text:style-name="Preformatted_20_Text"><text:s text:c="8"/># Schedule expression duration</text:p>
      <text:p text:style-name="Preformatted_20_Text"><text:s text:c="8"/>if duration:</text:p>
      <text:p text:style-name="Preformatted_20_Text"><text:s text:c="12"/>self.schedule_expression_change(duration, 'neutral')</text:p>
      <text:p text:style-name="Preformatted_20_Text"><text:s text:c="4"/></text:p>
      <text:p text:style-name="Preformatted_20_Text"><text:s text:c="4"/>def render_eyes(self, eye_config):</text:p>
      <text:p text:style-name="Preformatted_20_Text"><text:s text:c="8"/>"""</text:p>
      <text:p text:style-name="Preformatted_20_Text"><text:s text:c="8"/>Render animated eyes with emotion-specific properties</text:p>
      <text:p text:style-name="Preformatted_20_Text"><text:s text:c="8"/>"""</text:p>
      <text:p text:style-name="Preformatted_20_Text"><text:s text:c="8"/># Eye shapes</text:p>
      <text:p text:style-name="Preformatted_20_Text"><text:s text:c="8"/>shapes = {</text:p>
      <text:p text:style-name="Preformatted_20_Text"><text:s text:c="12"/>'wide_open': self.draw_wide_eyes(),</text:p>
      <text:p text:style-name="Preformatted_20_Text"><text:s text:c="12"/>'drooping': self.draw_droopy_eyes(),</text:p>
      <text:p text:style-name="Preformatted_20_Text"><text:s text:c="12"/>'squinted': self.draw_squinted_eyes(),</text:p>
      <text:p text:style-name="Preformatted_20_Text"><text:s text:c="12"/>'pixel_hearts': self.draw_heart_eyes(),</text:p>
      <text:p text:style-name="Preformatted_20_Text"><text:s text:c="12"/>'wide_stars': self.draw_starry_eyes()</text:p>
      <text:p text:style-name="Preformatted_20_Text"><text:s text:c="8"/>}</text:p>
      <text:p text:style-name="Preformatted_20_Text"><text:s text:c="8"/></text:p>
      <text:p text:style-name="Preformatted_20_Text"><text:s text:c="8"/># Eye animations</text:p>
      <text:p text:style-name="Preformatted_20_Text"><text:s text:c="8"/>animations = {</text:p>
      <text:p text:style-name="Preformatted_20_Text"><text:s text:c="12"/>'gentle_bounce': self.animate_bounce(amplitude=2, frequency=0.5),</text:p>
      <text:p text:style-name="Preformatted_20_Text"><text:s text:c="12"/>'worried_glance': self.animate_glance(rate=0.3, range=20),</text:p>
      <text:p text:style-name="Preformatted_20_Text"><text:s text:c="12"/>'processing_pulse': self.animate_pulse(speed=0.5, intensity=0.3),</text:p>
      <text:p text:style-name="Preformatted_20_Text"><text:s text:c="12"/>'sparkle_burst': self.animate_sparkle(count=15, duration=1.0),</text:p>
      <text:p text:style-name="Preformatted_20_Text"><text:s text:c="12"/>'dance_sync': self.animate_dance(beat_detected=True)</text:p>
      <text:p text:style-name="Preformatted_20_Text"><text:s text:c="8"/>}</text:p>
      <text:p text:style-name="Preformatted_20_Text"><text:s text:c="8"/></text:p>
      <text:p text:style-name="Preformatted_20_Text"><text:s text:c="8"/># Apply shape and animation</text:p>
      <text:p text:style-name="Preformatted_20_Text"><text:s text:c="8"/>eye_shape = shapes.get(eye_config['shape'], shapes['wide_open'])</text:p>
      <text:p text:style-name="Preformatted_20_Text"><text:s text:c="8"/>eye_animation = animations.get(eye_config['animation'])</text:p>
      <text:p text:style-name="Preformatted_20_Text"><text:s text:c="8"/></text:p>
      <text:p text:style-name="Preformatted_20_Text"><text:s text:c="8"/>self.layers['eyes'].draw(eye_shape)</text:p>
      <text:p text:style-name="Preformatted_20_Text"><text:s text:c="8"/>self.layers['eyes'].animate(eye_animation)</text:p>
      <text:p text:style-name="Preformatted_20_Text"><text:s text:c="8"/></text:p>
      <text:p text:style-name="Preformatted_20_Text"><text:s text:c="8"/># Add tears if specified</text:p>
      <text:p text:style-name="Preformatted_20_Text"><text:s text:c="8"/>if eye_config.get('teardrop'):</text:p>
      <text:p text:style-name="Preformatted_20_Text"><text:s text:c="12"/>self.render_teardrop(eye_config['teardrop'])</text:p>
      <text:p text:style-name="Preformatted_20_Text"><text:s text:c="4"/></text:p>
      <text:p text:style-name="Preformatted_20_Text"><text:s text:c="4"/>def render_teardrop(self, teardrop_config):</text:p>
      <text:p text:style-name="Preformatted_20_Text"><text:s text:c="8"/>"""</text:p>
      <text:p text:style-name="Preformatted_20_Text"><text:s text:c="8"/>Render animated teardrops</text:p>
      <text:p text:style-name="Preformatted_20_Text"><text:s text:c="8"/>"""</text:p>
      <text:p text:style-name="Preformatted_20_Text"><text:s text:c="8"/>tear_properties = {</text:p>
      <text:p text:style-name="Preformatted_20_Text"><text:s text:c="12"/>'size': teardrop_config.get('size', 'medium'),</text:p>
      <text:p text:style-name="Preformatted_20_Text"><text:s text:c="12"/>'flow_speed': teardrop_config.get('flow', 'slow_drip'),</text:p>
      <text:p text:style-name="Preformatted_20_Text"><text:s text:c="12"/>'count': teardrop_config.get('count', 1),</text:p>
      <text:p text:style-name="Preformatted_20_Text"><text:s text:c="12"/>'transparency': 0.7,</text:p>
      <text:p text:style-name="Preformatted_20_Text"><text:s text:c="12"/>'reflection': True</text:p>
      <text:p text:style-name="Preformatted_20_Text"><text:s text:c="8"/>}</text:p>
      <text:p text:style-name="Preformatted_20_Text"><text:s text:c="8"/></text:p>
      <text:p text:style-name="Preformatted_20_Text"><text:s text:c="8"/># Create tear animation path</text:p>
      <text:p text:style-name="Preformatted_20_Text"><text:s text:c="8"/>tear_path = self.calculate_tear_path(tear_properties)</text:p>
      <text:p text:style-name="Preformatted_20_Text"><text:s text:c="8"/></text:p>
      <text:p text:style-name="Preformatted_20_Text"><text:s text:c="8"/># Draw tears on effects layer</text:p>
      <text:p text:style-name="Preformatted_20_Text"><text:s text:c="8"/>for i in range(tear_properties['count']):</text:p>
      <text:p text:style-name="Preformatted_20_Text"><text:s text:c="12"/>tear = self.draw_teardrop(</text:p>
      <text:p text:style-name="Preformatted_20_Text"><text:soft-page-break/><text:s text:c="16"/>position=tear_path['start'][i],</text:p>
      <text:p text:style-name="Preformatted_20_Text"><text:s text:c="16"/>size=tear_properties['size']</text:p>
      <text:p text:style-name="Preformatted_20_Text"><text:s text:c="12"/>)</text:p>
      <text:p text:style-name="Preformatted_20_Text"><text:s text:c="12"/></text:p>
      <text:p text:style-name="Preformatted_20_Text"><text:s text:c="12"/>self.layers['effects'].add_object(</text:p>
      <text:p text:style-name="Preformatted_20_Text"><text:s text:c="16"/>tear,</text:p>
      <text:p text:style-name="Preformatted_20_Text"><text:s text:c="16"/>animation=self.animate_teardrop_fall(tear_path['path'][i])</text:p>
      <text:p text:style-name="Preformatted_20_Text"><text:s text:c="12"/>)</text:p>
      <text:p text:style-name="Preformatted_20_Text"><text:s text:c="4"/></text:p>
      <text:p text:style-name="Preformatted_20_Text"><text:s text:c="4"/>def render_accessories(self, accessories):</text:p>
      <text:p text:style-name="Preformatted_20_Text"><text:s text:c="8"/>"""</text:p>
      <text:p text:style-name="Preformatted_20_Text"><text:s text:c="8"/>Render emotional accessories (sparkles, fireworks, etc.)</text:p>
      <text:p text:style-name="Preformatted_20_Text"><text:s text:c="8"/>"""</text:p>
      <text:p text:style-name="Preformatted_20_Text"><text:s text:c="8"/>accessory_renderers = {</text:p>
      <text:p text:style-name="Preformatted_20_Text"><text:s text:c="12"/>'sparkles': self.render_sparkles,</text:p>
      <text:p text:style-name="Preformatted_20_Text"><text:s text:c="12"/>'fireworks': self.render_fireworks,</text:p>
      <text:p text:style-name="Preformatted_20_Text"><text:s text:c="12"/>'confetti': self.render_confetti,</text:p>
      <text:p text:style-name="Preformatted_20_Text"><text:s text:c="12"/>'raindrops': self.render_raindrops,</text:p>
      <text:p text:style-name="Preformatted_20_Text"><text:s text:c="12"/>'disco_lights': self.render_disco_lights,</text:p>
      <text:p text:style-name="Preformatted_20_Text"><text:s text:c="12"/>'thought_bubbles': self.render_thought_bubbles,</text:p>
      <text:p text:style-name="Preformatted_20_Text"><text:s text:c="12"/>'robot_arms': self.render_robot_arms</text:p>
      <text:p text:style-name="Preformatted_20_Text"><text:s text:c="8"/>}</text:p>
      <text:p text:style-name="Preformatted_20_Text"><text:s text:c="8"/></text:p>
      <text:p text:style-name="Preformatted_20_Text"><text:s text:c="8"/>for accessory in accessories:</text:p>
      <text:p text:style-name="Preformatted_20_Text"><text:s text:c="12"/>if accessory in accessory_renderers:</text:p>
      <text:p text:style-name="Preformatted_20_Text"><text:s text:c="16"/>accessory_renderers[accessory]()</text:p>
      <text:p text:style-name="Preformatted_20_Text"><text:s text:c="4"/></text:p>
      <text:p text:style-name="Preformatted_20_Text"><text:s text:c="4"/>def render_fireworks(self):</text:p>
      <text:p text:style-name="Preformatted_20_Text"><text:s text:c="8"/>"""</text:p>
      <text:p text:style-name="Preformatted_20_Text"><text:s text:c="8"/>Render celebratory fireworks animation</text:p>
      <text:p text:style-name="Preformatted_20_Text"><text:s text:c="8"/>"""</text:p>
      <text:p text:style-name="Preformatted_20_Text"><text:s text:c="8"/>fireworks_config = {</text:p>
      <text:p text:style-name="Preformatted_20_Text"><text:s text:c="12"/>'count': random.randint(5, 15),</text:p>
      <text:p text:style-name="Preformatted_20_Text"><text:s text:c="12"/>'types': ['burst', 'fountain', 'willow', 'peony'],</text:p>
      <text:p text:style-name="Preformatted_20_Text"><text:s text:c="12"/>'colors': ['#FF6B6B', '#4ECDC4', '#FFD166', '#06D6A0', '#118AB2'],</text:p>
      <text:p text:style-name="Preformatted_20_Text"><text:s text:c="12"/>'duration': 3.0,</text:p>
      <text:p text:style-name="Preformatted_20_Text"><text:s text:c="12"/>'sound_effect': 'fireworks_pop' if self.has_audio else None</text:p>
      <text:p text:style-name="Preformatted_20_Text"><text:s text:c="8"/>}</text:p>
      <text:p text:style-name="Preformatted_20_Text"><text:s text:c="8"/></text:p>
      <text:p text:style-name="Preformatted_20_Text"><text:s text:c="8"/># Create multiple firework bursts</text:p>
      <text:p text:style-name="Preformatted_20_Text"><text:s text:c="8"/>for i in range(fireworks_config['count']):</text:p>
      <text:p text:style-name="Preformatted_20_Text"><text:s text:c="12"/>firework_type = random.choice(fireworks_config['types'])</text:p>
      <text:p text:style-name="Preformatted_20_Text"><text:s text:c="12"/>color = random.choice(fireworks_config['colors'])</text:p>
      <text:p text:style-name="Preformatted_20_Text"><text:s text:c="12"/></text:p>
      <text:p text:style-name="Preformatted_20_Text"><text:s text:c="12"/>self.create_firework_burst(</text:p>
      <text:p text:style-name="Preformatted_20_Text"><text:s text:c="16"/>type=firework_type,</text:p>
      <text:p text:style-name="Preformatted_20_Text"><text:s text:c="16"/>color=color,</text:p>
      <text:p text:style-name="Preformatted_20_Text"><text:s text:c="16"/>position=self.random_screen_position(),</text:p>
      <text:p text:style-name="Preformatted_20_Text"><text:s text:c="16"/>delay=i * 0.2</text:p>
      <text:p text:style-name="Preformatted_20_Text"><text:s text:c="12"/>)</text:p>
      <text:p text:style-name="Preformatted_20_Text"><text:s text:c="4"/></text:p>
      <text:p text:style-name="Preformatted_20_Text"><text:s text:c="4"/>def render_robot_arms(self):</text:p>
      <text:p text:style-name="Preformatted_20_Text"><text:s text:c="8"/>"""</text:p>
      <text:p text:style-name="Preformatted_20_Text"><text:s text:c="8"/>Render dancing robot arms animation</text:p>
      <text:p text:style-name="Preformatted_20_Text"><text:s text:c="8"/>"""</text:p>
      <text:p text:style-name="Preformatted_20_Text"><text:s text:c="8"/>arm_config = {</text:p>
      <text:p text:style-name="Preformatted_20_Text"><text:s text:c="12"/>'segments': 3,</text:p>
      <text:p text:style-name="Preformatted_20_Text"><text:s text:c="12"/>'joint_angles': [30, -20, 45], <text:s/># Degrees for each joint</text:p>
      <text:p text:style-name="Preformatted_20_Text"><text:s text:c="12"/>'dance_pattern': 'robot_disco',</text:p>
      <text:p text:style-name="Preformatted_20_Text"><text:s text:c="12"/>'beat_sync': True,</text:p>
      <text:p text:style-name="Preformatted_20_Text"><text:s text:c="12"/>'glow_effect': True</text:p>
      <text:p text:style-name="Preformatted_20_Text"><text:s text:c="8"/>}</text:p>
      <text:p text:style-name="Preformatted_20_Text"><text:s text:c="8"/></text:p>
      <text:p text:style-name="Preformatted_20_Text"><text:s text:c="8"/># Create left and right arms</text:p>
      <text:p text:style-name="Preformatted_20_Text"><text:soft-page-break/><text:s text:c="8"/>left_arm = self.create_robot_arm(</text:p>
      <text:p text:style-name="Preformatted_20_Text"><text:s text:c="12"/>side='left',</text:p>
      <text:p text:style-name="Preformatted_20_Text"><text:s text:c="12"/>base_position=(100, 300),</text:p>
      <text:p text:style-name="Preformatted_20_Text"><text:s text:c="12"/>config=arm_config</text:p>
      <text:p text:style-name="Preformatted_20_Text"><text:s text:c="8"/>)</text:p>
      <text:p text:style-name="Preformatted_20_Text"><text:s text:c="8"/></text:p>
      <text:p text:style-name="Preformatted_20_Text"><text:s text:c="8"/>right_arm = self.create_robot_arm(</text:p>
      <text:p text:style-name="Preformatted_20_Text"><text:s text:c="12"/>side='right',</text:p>
      <text:p text:style-name="Preformatted_20_Text"><text:s text:c="12"/>base_position=(700, 300),</text:p>
      <text:p text:style-name="Preformatted_20_Text"><text:s text:c="12"/>config=arm_config</text:p>
      <text:p text:style-name="Preformatted_20_Text"><text:s text:c="8"/>)</text:p>
      <text:p text:style-name="Preformatted_20_Text"><text:s text:c="8"/></text:p>
      <text:p text:style-name="Preformatted_20_Text"><text:s text:c="8"/># Animate arms in sync</text:p>
      <text:p text:style-name="Preformatted_20_Text"><text:s text:c="8"/>animation = self.create_robot_dance_animation(</text:p>
      <text:p text:style-name="Preformatted_20_Text"><text:s text:c="12"/>left_arm=left_arm,</text:p>
      <text:p text:style-name="Preformatted_20_Text"><text:s text:c="12"/>right_arm=right_arm,</text:p>
      <text:p text:style-name="Preformatted_20_Text"><text:s text:c="12"/>pattern=arm_config['dance_pattern']</text:p>
      <text:p text:style-name="Preformatted_20_Text"><text:s text:c="8"/>)</text:p>
      <text:p text:style-name="Preformatted_20_Text"><text:s text:c="8"/></text:p>
      <text:p text:style-name="P15"><text:s text:c="8"/>self.layers['accessories'].add_animation(animation)</text:p>
      <text:h text:style-name="Heading_20_3" text:outline-level="3"><text:span text:style-name="Strong_20_Emphasis">D. Web Interface for Expression Display</text:span></text:h>
      <text:p text:style-name="Text_20_body">javascript</text:p>
      <text:p text:style-name="Preformatted_20_Text">// Frontend expression display system</text:p>
      <text:p text:style-name="Preformatted_20_Text">class WebExpressionDisplay {</text:p>
      <text:p text:style-name="Preformatted_20_Text"><text:s text:c="4"/>constructor(canvasId) {</text:p>
      <text:p text:style-name="Preformatted_20_Text"><text:s text:c="8"/>this.canvas = document.getElementById(canvasId);</text:p>
      <text:p text:style-name="Preformatted_20_Text"><text:s text:c="8"/>this.ctx = this.canvas.getContext('2d');</text:p>
      <text:p text:style-name="Preformatted_20_Text"><text:s text:c="8"/>this.layers = {};</text:p>
      <text:p text:style-name="Preformatted_20_Text"><text:s text:c="8"/>this.currentExpression = 'neutral';</text:p>
      <text:p text:style-name="Preformatted_20_Text"><text:s text:c="8"/>this.animationLoop = null;</text:p>
      <text:p text:style-name="Preformatted_20_Text"><text:s text:c="8"/></text:p>
      <text:p text:style-name="Preformatted_20_Text"><text:s text:c="8"/>this.initializeLayers();</text:p>
      <text:p text:style-name="Preformatted_20_Text"><text:s text:c="8"/>this.setupEventListeners();</text:p>
      <text:p text:style-name="Preformatted_20_Text"><text:s text:c="4"/>}</text:p>
      <text:p text:style-name="Preformatted_20_Text"><text:s text:c="4"/></text:p>
      <text:p text:style-name="Preformatted_20_Text"><text:s text:c="4"/>initializeLayers() {</text:p>
      <text:p text:style-name="Preformatted_20_Text"><text:s text:c="8"/>this.layers = {</text:p>
      <text:p text:style-name="Preformatted_20_Text"><text:s text:c="12"/>background: new Layer('background', 0),</text:p>
      <text:p text:style-name="Preformatted_20_Text"><text:s text:c="12"/>face: new Layer('face', 1),</text:p>
      <text:p text:style-name="Preformatted_20_Text"><text:s text:c="12"/>eyes: new Layer('eyes', 2),</text:p>
      <text:p text:style-name="Preformatted_20_Text"><text:s text:c="12"/>mouth: new Layer('mouth', 3),</text:p>
      <text:p text:style-name="Preformatted_20_Text"><text:s text:c="12"/>eyebrows: new Layer('eyebrows', 4),</text:p>
      <text:p text:style-name="Preformatted_20_Text"><text:s text:c="12"/>accessories: new Layer('accessories', 5),</text:p>
      <text:p text:style-name="Preformatted_20_Text"><text:s text:c="12"/>effects: new Layer('effects', 6)</text:p>
      <text:p text:style-name="Preformatted_20_Text"><text:s text:c="8"/>};</text:p>
      <text:p text:style-name="Preformatted_20_Text"><text:s text:c="4"/>}</text:p>
      <text:p text:style-name="Preformatted_20_Text"><text:s text:c="4"/></text:p>
      <text:p text:style-name="Preformatted_20_Text"><text:s text:c="4"/>setExpression(expressionName, intensity = 1.0) {</text:p>
      <text:p text:style-name="Preformatted_20_Text"><text:s text:c="8"/>const expression = EXPRESSION_LIBRARY[expressionName];</text:p>
      <text:p text:style-name="Preformatted_20_Text"><text:s text:c="8"/></text:p>
      <text:p text:style-name="Preformatted_20_Text"><text:s text:c="8"/>if (!expression) {</text:p>
      <text:p text:style-name="Preformatted_20_Text"><text:s text:c="12"/>console.error(`Expression ${expressionName} not found`);</text:p>
      <text:p text:style-name="Preformatted_20_Text"><text:s text:c="12"/>return;</text:p>
      <text:p text:style-name="Preformatted_20_Text"><text:s text:c="8"/>}</text:p>
      <text:p text:style-name="Preformatted_20_Text"><text:s text:c="8"/></text:p>
      <text:p text:style-name="Preformatted_20_Text"><text:s text:c="8"/>this.currentExpression = expressionName;</text:p>
      <text:p text:style-name="Preformatted_20_Text"><text:s text:c="8"/></text:p>
      <text:p text:style-name="Preformatted_20_Text"><text:s text:c="8"/>// Clear previous animations</text:p>
      <text:p text:style-name="Preformatted_20_Text"><text:s text:c="8"/>this.stopAllAnimations();</text:p>
      <text:p text:style-name="Preformatted_20_Text"><text:s text:c="8"/></text:p>
      <text:p text:style-name="Preformatted_20_Text"><text:soft-page-break/><text:s text:c="8"/>// Apply expression with intensity</text:p>
      <text:p text:style-name="Preformatted_20_Text"><text:s text:c="8"/>this.applyExpression(expression, intensity);</text:p>
      <text:p text:style-name="Preformatted_20_Text"><text:s text:c="8"/></text:p>
      <text:p text:style-name="Preformatted_20_Text"><text:s text:c="8"/>// Start animation loop</text:p>
      <text:p text:style-name="Preformatted_20_Text"><text:s text:c="8"/>this.startAnimationLoop();</text:p>
      <text:p text:style-name="Preformatted_20_Text"><text:s text:c="4"/>}</text:p>
      <text:p text:style-name="Preformatted_20_Text"><text:s text:c="4"/></text:p>
      <text:p text:style-name="Preformatted_20_Text"><text:s text:c="4"/>applyExpression(expression, intensity) {</text:p>
      <text:p text:style-name="Preformatted_20_Text"><text:s text:c="8"/>// Adjust expression parameters based on intensity</text:p>
      <text:p text:style-name="Preformatted_20_Text"><text:s text:c="8"/>const adjusted = this.adjustIntensity(expression, intensity);</text:p>
      <text:p text:style-name="Preformatted_20_Text"><text:s text:c="8"/></text:p>
      <text:p text:style-name="Preformatted_20_Text"><text:s text:c="8"/>// Render each component</text:p>
      <text:p text:style-name="Preformatted_20_Text"><text:s text:c="8"/>this.renderFaceBase(adjusted.face);</text:p>
      <text:p text:style-name="Preformatted_20_Text"><text:s text:c="8"/>this.renderEyes(adjusted.eyes);</text:p>
      <text:p text:style-name="Preformatted_20_Text"><text:s text:c="8"/>this.renderMouth(adjusted.mouth);</text:p>
      <text:p text:style-name="Preformatted_20_Text"><text:s text:c="8"/>this.renderEyebrows(adjusted.eyebrows);</text:p>
      <text:p text:style-name="Preformatted_20_Text"><text:s text:c="8"/></text:p>
      <text:p text:style-name="Preformatted_20_Text"><text:s text:c="8"/>// Add accessories</text:p>
      <text:p text:style-name="Preformatted_20_Text"><text:s text:c="8"/>if (adjusted.accessories) {</text:p>
      <text:p text:style-name="Preformatted_20_Text"><text:s text:c="12"/>this.renderAccessories(adjusted.accessories);</text:p>
      <text:p text:style-name="Preformatted_20_Text"><text:s text:c="8"/>}</text:p>
      <text:p text:style-name="Preformatted_20_Text"><text:s text:c="8"/></text:p>
      <text:p text:style-name="Preformatted_20_Text"><text:s text:c="8"/>// Start animations</text:p>
      <text:p text:style-name="Preformatted_20_Text"><text:s text:c="8"/>this.startComponentAnimations(adjusted.animations);</text:p>
      <text:p text:style-name="Preformatted_20_Text"><text:s text:c="4"/>}</text:p>
      <text:p text:style-name="Preformatted_20_Text"><text:s text:c="4"/></text:p>
      <text:p text:style-name="Preformatted_20_Text"><text:s text:c="4"/>renderEyes(eyeConfig) {</text:p>
      <text:p text:style-name="Preformatted_20_Text"><text:s text:c="8"/>// Draw eye shapes</text:p>
      <text:p text:style-name="Preformatted_20_Text"><text:s text:c="8"/>const leftEye = this.drawEye(</text:p>
      <text:p text:style-name="Preformatted_20_Text"><text:s text:c="12"/>'left',</text:p>
      <text:p text:style-name="Preformatted_20_Text"><text:s text:c="12"/>eyeConfig.shape,</text:p>
      <text:p text:style-name="Preformatted_20_Text"><text:s text:c="12"/>eyeConfig.position.left</text:p>
      <text:p text:style-name="Preformatted_20_Text"><text:s text:c="8"/>);</text:p>
      <text:p text:style-name="Preformatted_20_Text"><text:s text:c="8"/></text:p>
      <text:p text:style-name="Preformatted_20_Text"><text:s text:c="8"/>const rightEye = this.drawEye(</text:p>
      <text:p text:style-name="Preformatted_20_Text"><text:s text:c="12"/>'right',</text:p>
      <text:p text:style-name="Preformatted_20_Text"><text:s text:c="12"/>eyeConfig.shape,</text:p>
      <text:p text:style-name="Preformatted_20_Text"><text:s text:c="12"/>eyeConfig.position.right</text:p>
      <text:p text:style-name="Preformatted_20_Text"><text:s text:c="8"/>);</text:p>
      <text:p text:style-name="Preformatted_20_Text"><text:s text:c="8"/></text:p>
      <text:p text:style-name="Preformatted_20_Text"><text:s text:c="8"/>// Apply eye animations</text:p>
      <text:p text:style-name="Preformatted_20_Text"><text:s text:c="8"/>if (eyeConfig.animation) {</text:p>
      <text:p text:style-name="Preformatted_20_Text"><text:s text:c="12"/>this.animateEyes(leftEye, rightEye, eyeConfig.animation);</text:p>
      <text:p text:style-name="Preformatted_20_Text"><text:s text:c="8"/>}</text:p>
      <text:p text:style-name="Preformatted_20_Text"><text:s text:c="8"/></text:p>
      <text:p text:style-name="Preformatted_20_Text"><text:s text:c="8"/>// Add tears if needed</text:p>
      <text:p text:style-name="Preformatted_20_Text"><text:s text:c="8"/>if (eyeConfig.teardrop) {</text:p>
      <text:p text:style-name="Preformatted_20_Text"><text:s text:c="12"/>this.renderTears(eyeConfig.teardrop);</text:p>
      <text:p text:style-name="Preformatted_20_Text"><text:s text:c="8"/>}</text:p>
      <text:p text:style-name="Preformatted_20_Text"><text:s text:c="8"/></text:p>
      <text:p text:style-name="Preformatted_20_Text"><text:s text:c="8"/>// Add sparkles</text:p>
      <text:p text:style-name="Preformatted_20_Text"><text:s text:c="8"/>if (eyeConfig.sparkle) {</text:p>
      <text:p text:style-name="Preformatted_20_Text"><text:s text:c="12"/>this.addEyeSparkles(leftEye, rightEye);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renderTears(teardropConfig) {</text:p>
      <text:p text:style-name="Preformatted_20_Text"><text:s text:c="8"/>// Create tear animation</text:p>
      <text:p text:style-name="Preformatted_20_Text"><text:s text:c="8"/>const tearAnimation = {</text:p>
      <text:p text:style-name="Preformatted_20_Text"><text:s text:c="12"/>startY: -20,</text:p>
      <text:p text:style-name="Preformatted_20_Text"><text:s text:c="12"/>endY: this.canvas.height + 20,</text:p>
      <text:p text:style-name="Preformatted_20_Text"><text:s text:c="12"/>speed: teardropConfig.speed || 2,</text:p>
      <text:p text:style-name="Preformatted_20_Text"><text:s text:c="12"/>count: teardropConfig.count || 1,</text:p>
      <text:p text:style-name="Preformatted_20_Text"><text:s text:c="12"/>size: teardropConfig.size || 'medium'</text:p>
      <text:p text:style-name="Preformatted_20_Text"><text:soft-page-break/><text:s text:c="8"/>};</text:p>
      <text:p text:style-name="Preformatted_20_Text"><text:s text:c="8"/></text:p>
      <text:p text:style-name="Preformatted_20_Text"><text:s text:c="8"/>// Create tear particles</text:p>
      <text:p text:style-name="Preformatted_20_Text"><text:s text:c="8"/>for (let i = 0; i &lt; tearAnimation.count; i++) {</text:p>
      <text:p text:style-name="Preformatted_20_Text"><text:s text:c="12"/>const tear = this.createTearParticle(tearAnimation);</text:p>
      <text:p text:style-name="Preformatted_20_Text"><text:s text:c="12"/>this.layers.effects.addParticle(tear);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// Fireworks effect</text:p>
      <text:p text:style-name="Preformatted_20_Text"><text:s text:c="4"/>renderFireworks(count = 10) {</text:p>
      <text:p text:style-name="Preformatted_20_Text"><text:s text:c="8"/>for (let i = 0; i &lt; count; i++) {</text:p>
      <text:p text:style-name="Preformatted_20_Text"><text:s text:c="12"/>setTimeout(() =&gt; {</text:p>
      <text:p text:style-name="Preformatted_20_Text"><text:s text:c="16"/>this.createFireworkBurst(</text:p>
      <text:p text:style-name="Preformatted_20_Text"><text:s text:c="20"/>this.randomCanvasPosition(),</text:p>
      <text:p text:style-name="Preformatted_20_Text"><text:s text:c="20"/>this.randomColor()</text:p>
      <text:p text:style-name="Preformatted_20_Text"><text:s text:c="16"/>);</text:p>
      <text:p text:style-name="Preformatted_20_Text"><text:s text:c="12"/>}, i * 200); // Staggered start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// Robot dance animation</text:p>
      <text:p text:style-name="Preformatted_20_Text"><text:s text:c="4"/>renderRobotDance() {</text:p>
      <text:p text:style-name="Preformatted_20_Text"><text:s text:c="8"/>const dancePatterns = [</text:p>
      <text:p text:style-name="Preformatted_20_Text"><text:s text:c="12"/>'robot_wave',</text:p>
      <text:p text:style-name="Preformatted_20_Text"><text:s text:c="12"/>'robot_shuffle',</text:p>
      <text:p text:style-name="Preformatted_20_Text"><text:s text:c="12"/>'robot_spin',</text:p>
      <text:p text:style-name="Preformatted_20_Text"><text:s text:c="12"/>'robot_jump'</text:p>
      <text:p text:style-name="Preformatted_20_Text"><text:s text:c="8"/>];</text:p>
      <text:p text:style-name="Preformatted_20_Text"><text:s text:c="8"/></text:p>
      <text:p text:style-name="Preformatted_20_Text"><text:s text:c="8"/>// Sequence of dance moves</text:p>
      <text:p text:style-name="Preformatted_20_Text"><text:s text:c="8"/>const danceSequence = [</text:p>
      <text:p text:style-name="Preformatted_20_Text"><text:s text:c="12"/>{ pattern: 'robot_wave', duration: 2000 },</text:p>
      <text:p text:style-name="Preformatted_20_Text"><text:s text:c="12"/>{ pattern: 'robot_shuffle', duration: 1500 },</text:p>
      <text:p text:style-name="Preformatted_20_Text"><text:s text:c="12"/>{ pattern: 'robot_spin', duration: 3000 },</text:p>
      <text:p text:style-name="Preformatted_20_Text"><text:s text:c="12"/>{ pattern: 'robot_jump', duration: 1000 }</text:p>
      <text:p text:style-name="Preformatted_20_Text"><text:s text:c="8"/>];</text:p>
      <text:p text:style-name="Preformatted_20_Text"><text:s text:c="8"/></text:p>
      <text:p text:style-name="Preformatted_20_Text"><text:s text:c="8"/>this.executeDanceSequence(danceSequence);</text:p>
      <text:p text:style-name="Preformatted_20_Text"><text:s text:c="4"/>}</text:p>
      <text:p text:style-name="Preformatted_20_Text">}</text:p>
      <text:p text:style-name="Preformatted_20_Text"/>
      <text:p text:style-name="Preformatted_20_Text">// WebSocket integration for real-time expression updates</text:p>
      <text:p text:style-name="Preformatted_20_Text">class ExpressionWebSocket {</text:p>
      <text:p text:style-name="Preformatted_20_Text"><text:s text:c="4"/>constructor(serverUrl) {</text:p>
      <text:p text:style-name="Preformatted_20_Text"><text:s text:c="8"/>this.ws = new WebSocket(serverUrl);</text:p>
      <text:p text:style-name="Preformatted_20_Text"><text:s text:c="8"/>this.display = new WebExpressionDisplay('marvinFace');</text:p>
      <text:p text:style-name="Preformatted_20_Text"><text:s text:c="8"/></text:p>
      <text:p text:style-name="Preformatted_20_Text"><text:s text:c="8"/>this.setupWebSocket();</text:p>
      <text:p text:style-name="Preformatted_20_Text"><text:s text:c="4"/>}</text:p>
      <text:p text:style-name="Preformatted_20_Text"><text:s text:c="4"/></text:p>
      <text:p text:style-name="Preformatted_20_Text"><text:s text:c="4"/>setupWebSocket() {</text:p>
      <text:p text:style-name="Preformatted_20_Text"><text:s text:c="8"/>this.ws.onmessage = (event) =&gt; {</text:p>
      <text:p text:style-name="Preformatted_20_Text"><text:s text:c="12"/>const data = JSON.parse(event.data);</text:p>
      <text:p text:style-name="Preformatted_20_Text"><text:s text:c="12"/></text:p>
      <text:p text:style-name="Preformatted_20_Text"><text:s text:c="12"/>switch (data.type) {</text:p>
      <text:p text:style-name="Preformatted_20_Text"><text:s text:c="16"/>case 'expression':</text:p>
      <text:p text:style-name="Preformatted_20_Text"><text:s text:c="20"/>this.display.setExpression(data.expression, data.intensity);</text:p>
      <text:p text:style-name="Preformatted_20_Text"><text:s text:c="20"/>break;</text:p>
      <text:p text:style-name="Preformatted_20_Text"><text:s text:c="20"/></text:p>
      <text:p text:style-name="Preformatted_20_Text"><text:s text:c="16"/>case 'effect':</text:p>
      <text:p text:style-name="Preformatted_20_Text"><text:s text:c="20"/>this.display[`render${data.effect}`]();</text:p>
      <text:p text:style-name="Preformatted_20_Text"><text:s text:c="20"/>break;</text:p>
      <text:p text:style-name="Preformatted_20_Text"><text:s text:c="20"/></text:p>
      <text:p text:style-name="Preformatted_20_Text"><text:soft-page-break/><text:s text:c="16"/>case 'dance':</text:p>
      <text:p text:style-name="Preformatted_20_Text"><text:s text:c="20"/>this.display.renderRobotDance();</text:p>
      <text:p text:style-name="Preformatted_20_Text"><text:s text:c="20"/>break;</text:p>
      <text:p text:style-name="Preformatted_20_Text"><text:s text:c="20"/></text:p>
      <text:p text:style-name="Preformatted_20_Text"><text:s text:c="16"/>case 'mirror_emotion':</text:p>
      <text:p text:style-name="Preformatted_20_Text"><text:s text:c="20"/>this.display.mirrorUserEmotion(data.emotion);</text:p>
      <text:p text:style-name="Preformatted_20_Text"><text:s text:c="20"/>break;</text:p>
      <text:p text:style-name="Preformatted_20_Text"><text:s text:c="12"/>}</text:p>
      <text:p text:style-name="Preformatted_20_Text"><text:s text:c="8"/>};</text:p>
      <text:p text:style-name="Preformatted_20_Text"><text:s text:c="4"/>}</text:p>
      <text:p text:style-name="Preformatted_20_Text"><text:s text:c="4"/></text:p>
      <text:p text:style-name="Preformatted_20_Text"><text:s text:c="4"/>sendUserEmotion(emotion) {</text:p>
      <text:p text:style-name="Preformatted_20_Text"><text:s text:c="8"/>// Send user's detected emotion to server</text:p>
      <text:p text:style-name="Preformatted_20_Text"><text:s text:c="8"/>this.ws.send(JSON.stringify({</text:p>
      <text:p text:style-name="Preformatted_20_Text"><text:s text:c="12"/>type: 'user_emotion',</text:p>
      <text:p text:style-name="Preformatted_20_Text"><text:s text:c="12"/>emotion: emotion,</text:p>
      <text:p text:style-name="Preformatted_20_Text"><text:s text:c="12"/>timestamp: Date.now()</text:p>
      <text:p text:style-name="Preformatted_20_Text"><text:s text:c="8"/>}));</text:p>
      <text:p text:style-name="Preformatted_20_Text"><text:s text:c="4"/>}</text:p>
      <text:p text:style-name="P15">}</text:p>
      <text:h text:style-name="Heading_20_2" text:outline-level="2"><text:span text:style-name="Strong_20_Emphasis">2. Interactive Drawing &amp; Coloring Program</text:span></text:h>
      <text:h text:style-name="Heading_20_3" text:outline-level="3"><text:span text:style-name="Strong_20_Emphasis">A. Accessible Drawing Interface</text:span></text:h>
      <text:p text:style-name="Text_20_body">python</text:p>
      <text:p text:style-name="Preformatted_20_Text">class InteractiveDrawingProgram:</text:p>
      <text:p text:style-name="Preformatted_20_Text"><text:s text:c="4"/>def __init__(self, user_profile):</text:p>
      <text:p text:style-name="Preformatted_20_Text"><text:s text:c="8"/>self.user_profile = user_profile</text:p>
      <text:p text:style-name="Preformatted_20_Text"><text:s text:c="8"/>self.canvas_config = self.initialize_canvas(user_profile)</text:p>
      <text:p text:style-name="Preformatted_20_Text"><text:s text:c="8"/>self.tools = self.initialize_tools(user_profile)</text:p>
      <text:p text:style-name="Preformatted_20_Text"><text:s text:c="8"/>self.coloring_books = self.load_coloring_books(user_profile)</text:p>
      <text:p text:style-name="Preformatted_20_Text"><text:s text:c="8"/>self.ai_assistant = DrawingAIAssistant()</text:p>
      <text:p text:style-name="Preformatted_20_Text"><text:s text:c="8"/>self.accessibility_features = self.setup_accessibility(user_profile)</text:p>
      <text:p text:style-name="Preformatted_20_Text"><text:s text:c="8"/></text:p>
      <text:p text:style-name="Preformatted_20_Text"><text:s text:c="4"/>def initialize_canvas(self, user_profile):</text:p>
      <text:p text:style-name="Preformatted_20_Text"><text:s text:c="8"/>"""</text:p>
      <text:p text:style-name="Preformatted_20_Text"><text:s text:c="8"/>Create canvas optimized for user's abilities</text:p>
      <text:p text:style-name="Preformatted_20_Text"><text:s text:c="8"/>"""</text:p>
      <text:p text:style-name="Preformatted_20_Text"><text:s text:c="8"/>config = {</text:p>
      <text:p text:style-name="Preformatted_20_Text"><text:s text:c="12"/>'size': self.determine_canvas_size(user_profile),</text:p>
      <text:p text:style-name="Preformatted_20_Text"><text:s text:c="12"/>'background': self.select_background(user_profile),</text:p>
      <text:p text:style-name="Preformatted_20_Text"><text:s text:c="12"/>'grid': self.setup_grid(user_profile),</text:p>
      <text:p text:style-name="Preformatted_20_Text"><text:s text:c="12"/>'zoom': self.setup_zoom_controls(user_profile),</text:p>
      <text:p text:style-name="Preformatted_20_Text"><text:s text:c="12"/>'undo_redo': self.setup_undo_redo(user_profile)</text:p>
      <text:p text:style-name="Preformatted_20_Text"><text:s text:c="8"/>}</text:p>
      <text:p text:style-name="Preformatted_20_Text"><text:s text:c="8"/></text:p>
      <text:p text:style-name="Preformatted_20_Text"><text:s text:c="8"/># Adjust for cognitive conditions</text:p>
      <text:p text:style-name="Preformatted_20_Text"><text:s text:c="8"/>if user_profile.get('cognitive_condition'):</text:p>
      <text:p text:style-name="Preformatted_20_Text"><text:s text:c="12"/>condition = user_profile['cognitive_condition']</text:p>
      <text:p text:style-name="Preformatted_20_Text"><text:s text:c="12"/>if condition in ['dementia', 'alzheimers']:</text:p>
      <text:p text:style-name="Preformatted_20_Text"><text:s text:c="16"/>config['simplified_interface'] = True</text:p>
      <text:p text:style-name="Preformatted_20_Text"><text:s text:c="16"/>config['tool_count'] = 4 <text:s/># Only basic tools</text:p>
      <text:p text:style-name="Preformatted_20_Text"><text:s text:c="16"/>config['auto_save'] = True</text:p>
      <text:p text:style-name="Preformatted_20_Text"><text:s text:c="12"/>elif condition == 'parkinsons':</text:p>
      <text:p text:style-name="Preformatted_20_Text"><text:s text:c="16"/>config['motion_stabilization'] = True</text:p>
      <text:p text:style-name="Preformatted_20_Text"><text:s text:c="16"/>config['larger_buttons'] = True</text:p>
      <text:p text:style-name="Preformatted_20_Text"><text:s text:c="12"/>elif condition == 'stroke_recovery':</text:p>
      <text:p text:style-name="Preformatted_20_Text"><text:s text:c="16"/>config['one_handed_mode'] = True</text:p>
      <text:p text:style-name="Preformatted_20_Text"><text:s text:c="16"/>config['adaptive_difficulty'] = True</text:p>
      <text:p text:style-name="Preformatted_20_Text"><text:soft-page-break/><text:s text:c="8"/></text:p>
      <text:p text:style-name="Preformatted_20_Text"><text:s text:c="8"/># Adjust for age</text:p>
      <text:p text:style-name="Preformatted_20_Text"><text:s text:c="8"/>if user_profile.get('age', 30) &gt; 65:</text:p>
      <text:p text:style-name="Preformatted_20_Text"><text:s text:c="12"/>config['button_size'] = 'large'</text:p>
      <text:p text:style-name="Preformatted_20_Text"><text:s text:c="12"/>config['contrast_ratio'] = 'high'</text:p>
      <text:p text:style-name="Preformatted_20_Text"><text:s text:c="12"/>config['font_size'] = 'large'</text:p>
      <text:p text:style-name="Preformatted_20_Text"><text:s text:c="8"/></text:p>
      <text:p text:style-name="Preformatted_20_Text"><text:s text:c="8"/>return config</text:p>
      <text:p text:style-name="Preformatted_20_Text"><text:s text:c="4"/></text:p>
      <text:p text:style-name="Preformatted_20_Text"><text:s text:c="4"/>def initialize_tools(self, user_profile):</text:p>
      <text:p text:style-name="Preformatted_20_Text"><text:s text:c="8"/>"""</text:p>
      <text:p text:style-name="Preformatted_20_Text"><text:s text:c="8"/>Initialize drawing tools based on user capabilities</text:p>
      <text:p text:style-name="Preformatted_20_Text"><text:s text:c="8"/>"""</text:p>
      <text:p text:style-name="Preformatted_20_Text"><text:s text:c="8"/>tools = {</text:p>
      <text:p text:style-name="Preformatted_20_Text"><text:s text:c="12"/>'basic': {</text:p>
      <text:p text:style-name="Preformatted_20_Text"><text:s text:c="16"/>'pencil': {</text:p>
      <text:p text:style-name="Preformatted_20_Text"><text:s text:c="20"/>'sizes': [1, 3, 5, 8],</text:p>
      <text:p text:style-name="Preformatted_20_Text"><text:s text:c="20"/>'pressure_sensitive': False,</text:p>
      <text:p text:style-name="Preformatted_20_Text"><text:s text:c="20"/>'stabilizer': True</text:p>
      <text:p text:style-name="Preformatted_20_Text"><text:s text:c="16"/>},</text:p>
      <text:p text:style-name="Preformatted_20_Text"><text:s text:c="16"/>'brush': {</text:p>
      <text:p text:style-name="Preformatted_20_Text"><text:s text:c="20"/>'types': ['round', 'flat', 'watercolor'],</text:p>
      <text:p text:style-name="Preformatted_20_Text"><text:s text:c="20"/>'sizes': [2, 5, 10, 20],</text:p>
      <text:p text:style-name="Preformatted_20_Text"><text:s text:c="20"/>'transparency': True</text:p>
      <text:p text:style-name="Preformatted_20_Text"><text:s text:c="16"/>},</text:p>
      <text:p text:style-name="Preformatted_20_Text"><text:s text:c="16"/>'eraser': {</text:p>
      <text:p text:style-name="Preformatted_20_Text"><text:s text:c="20"/>'sizes': [5, 10, 20, 40],</text:p>
      <text:p text:style-name="Preformatted_20_Text"><text:s text:c="20"/>'shape': 'round'</text:p>
      <text:p text:style-name="Preformatted_20_Text"><text:s text:c="16"/>},</text:p>
      <text:p text:style-name="Preformatted_20_Text"><text:s text:c="16"/>'fill': {</text:p>
      <text:p text:style-name="Preformatted_20_Text"><text:s text:c="20"/>'tolerance': 20,</text:p>
      <text:p text:style-name="Preformatted_20_Text"><text:s text:c="20"/>'contiguous_only': True</text:p>
      <text:p text:style-name="Preformatted_20_Text"><text:s text:c="16"/>}</text:p>
      <text:p text:style-name="Preformatted_20_Text"><text:s text:c="12"/>},</text:p>
      <text:p text:style-name="Preformatted_20_Text"><text:s text:c="12"/>'shapes': {</text:p>
      <text:p text:style-name="Preformatted_20_Text"><text:s text:c="16"/>'rectangle': {</text:p>
      <text:p text:style-name="Preformatted_20_Text"><text:s text:c="20"/>'fill': True,</text:p>
      <text:p text:style-name="Preformatted_20_Text"><text:s text:c="20"/>'stroke': True,</text:p>
      <text:p text:style-name="Preformatted_20_Text"><text:s text:c="20"/>'rounded_corners': True</text:p>
      <text:p text:style-name="Preformatted_20_Text"><text:s text:c="16"/>},</text:p>
      <text:p text:style-name="Preformatted_20_Text"><text:s text:c="16"/>'circle': {</text:p>
      <text:p text:style-name="Preformatted_20_Text"><text:s text:c="20"/>'fill': True,</text:p>
      <text:p text:style-name="Preformatted_20_Text"><text:s text:c="20"/>'stroke': True</text:p>
      <text:p text:style-name="Preformatted_20_Text"><text:s text:c="16"/>},</text:p>
      <text:p text:style-name="Preformatted_20_Text"><text:s text:c="16"/>'line': {</text:p>
      <text:p text:style-name="Preformatted_20_Text"><text:s text:c="20"/>'arrowheads': True,</text:p>
      <text:p text:style-name="Preformatted_20_Text"><text:s text:c="20"/>'dashed': True</text:p>
      <text:p text:style-name="Preformatted_20_Text"><text:s text:c="16"/>},</text:p>
      <text:p text:style-name="Preformatted_20_Text"><text:s text:c="16"/>'polygon': {</text:p>
      <text:p text:style-name="Preformatted_20_Text"><text:s text:c="20"/>'sides': 3,</text:p>
      <text:p text:style-name="Preformatted_20_Text"><text:s text:c="20"/>'regular': True</text:p>
      <text:p text:style-name="Preformatted_20_Text"><text:s text:c="16"/>}</text:p>
      <text:p text:style-name="Preformatted_20_Text"><text:s text:c="12"/>},</text:p>
      <text:p text:style-name="Preformatted_20_Text"><text:s text:c="12"/>'advanced': {</text:p>
      <text:p text:style-name="Preformatted_20_Text"><text:s text:c="16"/>'stamp': {</text:p>
      <text:p text:style-name="Preformatted_20_Text"><text:s text:c="20"/>'categories': ['animals', 'nature', 'emotions', 'objects'],</text:p>
      <text:p text:style-name="Preformatted_20_Text"><text:s text:c="20"/>'size_adjustable': True,</text:p>
      <text:p text:style-name="Preformatted_20_Text"><text:s text:c="20"/>'rotate': True</text:p>
      <text:p text:style-name="Preformatted_20_Text"><text:s text:c="16"/>},</text:p>
      <text:p text:style-name="Preformatted_20_Text"><text:s text:c="16"/>'text': {</text:p>
      <text:p text:style-name="Preformatted_20_Text"><text:s text:c="20"/>'fonts': self.select_accessible_fonts(user_profile),</text:p>
      <text:p text:style-name="Preformatted_20_Text"><text:s text:c="20"/>'sizes': [12, 16, 24, 32, 48],</text:p>
      <text:p text:style-name="Preformatted_20_Text"><text:s text:c="20"/>'colors': self.get_high_contrast_colors()</text:p>
      <text:p text:style-name="Preformatted_20_Text"><text:s text:c="16"/>},</text:p>
      <text:p text:style-name="Preformatted_20_Text"><text:soft-page-break/><text:s text:c="16"/>'gradient': {</text:p>
      <text:p text:style-name="Preformatted_20_Text"><text:s text:c="20"/>'linear': True,</text:p>
      <text:p text:style-name="Preformatted_20_Text"><text:s text:c="20"/>'radial': True,</text:p>
      <text:p text:style-name="Preformatted_20_Text"><text:s text:c="20"/>'color_picker': 'advanced'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# Simplify tools for certain users</text:p>
      <text:p text:style-name="Preformatted_20_Text"><text:s text:c="8"/>if user_profile.get('age', 30) &gt; 70:</text:p>
      <text:p text:style-name="Preformatted_20_Text"><text:s text:c="12"/>tools = self.simplify_tools_for_elderly(tools)</text:p>
      <text:p text:style-name="Preformatted_20_Text"><text:s text:c="8"/></text:p>
      <text:p text:style-name="Preformatted_20_Text"><text:s text:c="8"/>if user_profile.get('cognitive_condition') in ['dementia', 'alzheimers']:</text:p>
      <text:p text:style-name="Preformatted_20_Text"><text:s text:c="12"/>tools = self.simplify_tools_for_dementia(tools)</text:p>
      <text:p text:style-name="Preformatted_20_Text"><text:s text:c="8"/></text:p>
      <text:p text:style-name="Preformatted_20_Text"><text:s text:c="8"/>return tools</text:p>
      <text:p text:style-name="Preformatted_20_Text"><text:s text:c="4"/></text:p>
      <text:p text:style-name="Preformatted_20_Text"><text:s text:c="4"/>def load_coloring_books(self, user_profile):</text:p>
      <text:p text:style-name="Preformatted_20_Text"><text:s text:c="8"/>"""</text:p>
      <text:p text:style-name="Preformatted_20_Text"><text:s text:c="8"/>Load age-appropriate coloring books</text:p>
      <text:p text:style-name="Preformatted_20_Text"><text:s text:c="8"/>"""</text:p>
      <text:p text:style-name="Preformatted_20_Text"><text:s text:c="8"/>coloring_books = {</text:p>
      <text:p text:style-name="Preformatted_20_Text"><text:s text:c="12"/>'elderly': {</text:p>
      <text:p text:style-name="Preformatted_20_Text"><text:s text:c="16"/>'themes': ['nature', 'animals', 'mandalas', 'memory_lane'],</text:p>
      <text:p text:style-name="Preformatted_20_Text"><text:s text:c="16"/>'complexity': 'low',</text:p>
      <text:p text:style-name="Preformatted_20_Text"><text:s text:c="16"/>'line_thickness': 'medium',</text:p>
      <text:p text:style-name="Preformatted_20_Text"><text:s text:c="16"/>'therapeutic': True,</text:p>
      <text:p text:style-name="Preformatted_20_Text"><text:s text:c="16"/>'examples': [</text:p>
      <text:p text:style-name="Preformatted_20_Text"><text:s text:c="20"/>{</text:p>
      <text:p text:style-name="Preformatted_20_Text"><text:s text:c="24"/>'title': 'Garden Memories',</text:p>
      <text:p text:style-name="Preformatted_20_Text"><text:s text:c="24"/>'description': 'Beautiful garden scenes for reminiscence',</text:p>
      <text:p text:style-name="Preformatted_20_Text"><text:s text:c="24"/>'pages': 12,</text:p>
      <text:p text:style-name="Preformatted_20_Text"><text:s text:c="24"/>'preview_colors': ['pastel', 'vibrant']</text:p>
      <text:p text:style-name="Preformatted_20_Text"><text:s text:c="20"/>},</text:p>
      <text:p text:style-name="Preformatted_20_Text"><text:s text:c="20"/>{</text:p>
      <text:p text:style-name="Preformatted_20_Text"><text:s text:c="24"/>'title': 'Animal Friends',</text:p>
      <text:p text:style-name="Preformatted_20_Text"><text:s text:c="24"/>'description': 'Friendly animals with large coloring areas',</text:p>
      <text:p text:style-name="Preformatted_20_Text"><text:s text:c="24"/>'pages': 8,</text:p>
      <text:p text:style-name="Preformatted_20_Text"><text:s text:c="24"/>'preview_colors': ['natural', 'fantasy']</text:p>
      <text:p text:style-name="Preformatted_20_Text"><text:s text:c="20"/>}</text:p>
      <text:p text:style-name="Preformatted_20_Text"><text:s text:c="16"/>]</text:p>
      <text:p text:style-name="Preformatted_20_Text"><text:s text:c="12"/>},</text:p>
      <text:p text:style-name="Preformatted_20_Text"><text:s text:c="12"/>'children': {</text:p>
      <text:p text:style-name="Preformatted_20_Text"><text:s text:c="16"/>'themes': ['cartoons', 'fairytales', 'vehicles', 'animals'],</text:p>
      <text:p text:style-name="Preformatted_20_Text"><text:s text:c="16"/>'complexity': 'very_low',</text:p>
      <text:p text:style-name="Preformatted_20_Text"><text:s text:c="16"/>'line_thickness': 'thick',</text:p>
      <text:p text:style-name="Preformatted_20_Text"><text:s text:c="16"/>'educational': True,</text:p>
      <text:p text:style-name="Preformatted_20_Text"><text:s text:c="16"/>'examples': [</text:p>
      <text:p text:style-name="Preformatted_20_Text"><text:s text:c="20"/>{</text:p>
      <text:p text:style-name="Preformatted_20_Text"><text:s text:c="24"/>'title': 'Magical Forest',</text:p>
      <text:p text:style-name="Preformatted_20_Text"><text:s text:c="24"/>'description': 'Friendly forest creatures',</text:p>
      <text:p text:style-name="Preformatted_20_Text"><text:s text:c="24"/>'pages': 10,</text:p>
      <text:p text:style-name="Preformatted_20_Text"><text:s text:c="24"/>'interactive': True <text:s/>// Makes sounds when colored</text:p>
      <text:p text:style-name="Preformatted_20_Text"><text:s text:c="20"/>},</text:p>
      <text:p text:style-name="Preformatted_20_Text"><text:s text:c="20"/>{</text:p>
      <text:p text:style-name="Preformatted_20_Text"><text:s text:c="24"/>'title': 'ABC Coloring',</text:p>
      <text:p text:style-name="Preformatted_20_Text"><text:s text:c="24"/>'description': 'Learn letters while coloring',</text:p>
      <text:p text:style-name="Preformatted_20_Text"><text:s text:c="24"/>'pages': 26,</text:p>
      <text:p text:style-name="Preformatted_20_Text"><text:s text:c="24"/>'educational_value': 'alphabet_learning'</text:p>
      <text:p text:style-name="Preformatted_20_Text"><text:s text:c="20"/>}</text:p>
      <text:p text:style-name="Preformatted_20_Text"><text:s text:c="16"/>]</text:p>
      <text:p text:style-name="Preformatted_20_Text"><text:soft-page-break/><text:s text:c="12"/>},</text:p>
      <text:p text:style-name="Preformatted_20_Text"><text:s text:c="12"/>'therapeutic': {</text:p>
      <text:p text:style-name="Preformatted_20_Text"><text:s text:c="16"/>'themes': ['stress_relief', 'mindfulness', 'emotional_expression'],</text:p>
      <text:p text:style-name="Preformatted_20_Text"><text:s text:c="16"/>'complexity': 'variable',</text:p>
      <text:p text:style-name="Preformatted_20_Text"><text:s text:c="16"/>'line_thickness': 'variable',</text:p>
      <text:p text:style-name="Preformatted_20_Text"><text:s text:c="16"/>'guided': True,</text:p>
      <text:p text:style-name="Preformatted_20_Text"><text:s text:c="16"/>'examples': [</text:p>
      <text:p text:style-name="Preformatted_20_Text"><text:s text:c="20"/>{</text:p>
      <text:p text:style-name="Preformatted_20_Text"><text:s text:c="24"/>'title': 'Emotion Garden',</text:p>
      <text:p text:style-name="Preformatted_20_Text"><text:s text:c="24"/>'description': 'Color based on your emotions',</text:p>
      <text:p text:style-name="Preformatted_20_Text"><text:s text:c="24"/>'pages': 6,</text:p>
      <text:p text:style-name="Preformatted_20_Text"><text:s text:c="24"/>'emotion_guided': True</text:p>
      <text:p text:style-name="Preformatted_20_Text"><text:s text:c="20"/>},</text:p>
      <text:p text:style-name="Preformatted_20_Text"><text:s text:c="20"/>{</text:p>
      <text:p text:style-name="Preformatted_20_Text"><text:s text:c="24"/>'title': 'Calm Patterns',</text:p>
      <text:p text:style-name="Preformatted_20_Text"><text:s text:c="24"/>'description': 'Repetitive patterns for mindfulness',</text:p>
      <text:p text:style-name="Preformatted_20_Text"><text:s text:c="24"/>'pages': 8,</text:p>
      <text:p text:style-name="Preformatted_20_Text"><text:s text:c="24"/>'breathing_guided': True</text:p>
      <text:p text:style-name="Preformatted_20_Text"><text:s text:c="20"/>}</text:p>
      <text:p text:style-name="Preformatted_20_Text"><text:s text:c="16"/>]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# Select appropriate coloring books</text:p>
      <text:p text:style-name="Preformatted_20_Text"><text:s text:c="8"/>age = user_profile.get('age', 30)</text:p>
      <text:p text:style-name="Preformatted_20_Text"><text:s text:c="8"/>condition = user_profile.get('cognitive_condition')</text:p>
      <text:p text:style-name="Preformatted_20_Text"><text:s text:c="8"/></text:p>
      <text:p text:style-name="Preformatted_20_Text"><text:s text:c="8"/>if age &gt; 65 or condition in ['dementia', 'alzheimers']:</text:p>
      <text:p text:style-name="Preformatted_20_Text"><text:s text:c="12"/>return coloring_books['elderly']</text:p>
      <text:p text:style-name="Preformatted_20_Text"><text:s text:c="8"/>elif age &lt; 12:</text:p>
      <text:p text:style-name="Preformatted_20_Text"><text:s text:c="12"/>return coloring_books['children']</text:p>
      <text:p text:style-name="Preformatted_20_Text"><text:s text:c="8"/>else:</text:p>
      <text:p text:style-name="Preformatted_20_Text"><text:s text:c="12"/>return coloring_books['therapeutic']</text:p>
      <text:p text:style-name="Preformatted_20_Text"><text:s text:c="4"/></text:p>
      <text:p text:style-name="Preformatted_20_Text"><text:s text:c="4"/>def setup_accessibility(self, user_profile):</text:p>
      <text:p text:style-name="Preformatted_20_Text"><text:s text:c="8"/>"""</text:p>
      <text:p text:style-name="Preformatted_20_Text"><text:s text:c="8"/>Setup accessibility features based on user needs</text:p>
      <text:p text:style-name="Preformatted_20_Text"><text:s text:c="8"/>"""</text:p>
      <text:p text:style-name="Preformatted_20_Text"><text:s text:c="8"/>features = {</text:p>
      <text:p text:style-name="Preformatted_20_Text"><text:s text:c="12"/>'voice_control': False,</text:p>
      <text:p text:style-name="Preformatted_20_Text"><text:s text:c="12"/>'eye_tracking': False,</text:p>
      <text:p text:style-name="Preformatted_20_Text"><text:s text:c="12"/>'switch_control': False,</text:p>
      <text:p text:style-name="Preformatted_20_Text"><text:s text:c="12"/>'screen_reader': False,</text:p>
      <text:p text:style-name="Preformatted_20_Text"><text:s text:c="12"/>'high_contrast': False,</text:p>
      <text:p text:style-name="Preformatted_20_Text"><text:s text:c="12"/>'motion_reduction': False</text:p>
      <text:p text:style-name="Preformatted_20_Text"><text:s text:c="8"/>}</text:p>
      <text:p text:style-name="Preformatted_20_Text"><text:s text:c="8"/></text:p>
      <text:p text:style-name="Preformatted_20_Text"><text:s text:c="8"/># Enable features based on needs</text:p>
      <text:p text:style-name="Preformatted_20_Text"><text:s text:c="8"/>if user_profile.get('motor_impairment'):</text:p>
      <text:p text:style-name="Preformatted_20_Text"><text:s text:c="12"/>features['voice_control'] = True</text:p>
      <text:p text:style-name="Preformatted_20_Text"><text:s text:c="12"/>features['switch_control'] = True</text:p>
      <text:p text:style-name="Preformatted_20_Text"><text:s text:c="8"/></text:p>
      <text:p text:style-name="Preformatted_20_Text"><text:s text:c="8"/>if user_profile.get('visual_impairment'):</text:p>
      <text:p text:style-name="Preformatted_20_Text"><text:s text:c="12"/>features['high_contrast'] = True</text:p>
      <text:p text:style-name="Preformatted_20_Text"><text:s text:c="12"/>features['screen_reader'] = True</text:p>
      <text:p text:style-name="Preformatted_20_Text"><text:s text:c="8"/></text:p>
      <text:p text:style-name="Preformatted_20_Text"><text:s text:c="8"/>if user_profile.get('cognitive_condition') in ['adhd', 'autism']:</text:p>
      <text:p text:style-name="Preformatted_20_Text"><text:s text:c="12"/>features['motion_reduction'] = True</text:p>
      <text:p text:style-name="Preformatted_20_Text"><text:s text:c="12"/>features['simplified_interface'] = True</text:p>
      <text:p text:style-name="Preformatted_20_Text"><text:s text:c="8"/></text:p>
      <text:p text:style-name="P15"><text:s text:c="8"/>return features</text:p>
      <text:h text:style-name="Heading_20_3" text:outline-level="3"><text:soft-page-break/><text:span text:style-name="Strong_20_Emphasis">B. Drawing AI Assistant with Emotional Intelligence</text:span></text:h>
      <text:p text:style-name="Text_20_body">python</text:p>
      <text:p text:style-name="Preformatted_20_Text">class DrawingAIAssistant:</text:p>
      <text:p text:style-name="Preformatted_20_Text"><text:s text:c="4"/>def __init__(self):</text:p>
      <text:p text:style-name="Preformatted_20_Text"><text:s text:c="8"/>self.style_recommender = StyleRecommender()</text:p>
      <text:p text:style-name="Preformatted_20_Text"><text:s text:c="8"/>self.color_adviser = ColorAdviser()</text:p>
      <text:p text:style-name="Preformatted_20_Text"><text:s text:c="8"/>self.creative_companion = CreativeCompanion()</text:p>
      <text:p text:style-name="Preformatted_20_Text"><text:s text:c="8"/>self.emotional_responder = DrawingEmotionalResponder()</text:p>
      <text:p text:style-name="Preformatted_20_Text"><text:s text:c="8"/></text:p>
      <text:p text:style-name="Preformatted_20_Text"><text:s text:c="4"/>def provide_assistance(self, drawing_context, user_profile):</text:p>
      <text:p text:style-name="Preformatted_20_Text"><text:s text:c="8"/>"""</text:p>
      <text:p text:style-name="Preformatted_20_Text"><text:s text:c="8"/>Provide appropriate drawing assistance based on context</text:p>
      <text:p text:style-name="Preformatted_20_Text"><text:s text:c="8"/>"""</text:p>
      <text:p text:style-name="Preformatted_20_Text"><text:s text:c="8"/>assistance = {</text:p>
      <text:p text:style-name="Preformatted_20_Text"><text:s text:c="12"/>'suggestions': [],</text:p>
      <text:p text:style-name="Preformatted_20_Text"><text:s text:c="12"/>'encouragement': [],</text:p>
      <text:p text:style-name="Preformatted_20_Text"><text:s text:c="12"/>'technical_help': [],</text:p>
      <text:p text:style-name="Preformatted_20_Text"><text:s text:c="12"/>'creative_ideas': []</text:p>
      <text:p text:style-name="Preformatted_20_Text"><text:s text:c="8"/>}</text:p>
      <text:p text:style-name="Preformatted_20_Text"><text:s text:c="8"/></text:p>
      <text:p text:style-name="Preformatted_20_Text"><text:s text:c="8"/># Check if user is struggling</text:p>
      <text:p text:style-name="Preformatted_20_Text"><text:s text:c="8"/>if self.detect_struggle(drawing_context):</text:p>
      <text:p text:style-name="Preformatted_20_Text"><text:s text:c="12"/>assistance['suggestions'].append(</text:p>
      <text:p text:style-name="Preformatted_20_Text"><text:s text:c="16"/>self.suggest_simplified_approach(drawing_context)</text:p>
      <text:p text:style-name="Preformatted_20_Text"><text:s text:c="12"/>)</text:p>
      <text:p text:style-name="Preformatted_20_Text"><text:s text:c="12"/>assistance['encouragement'].append(</text:p>
      <text:p text:style-name="Preformatted_20_Text"><text:s text:c="16"/>self.generate_encouragement(drawing_context, user_profile)</text:p>
      <text:p text:style-name="Preformatted_20_Text"><text:s text:c="12"/>)</text:p>
      <text:p text:style-name="Preformatted_20_Text"><text:s text:c="8"/></text:p>
      <text:p text:style-name="Preformatted_20_Text"><text:s text:c="8"/># Check if user might want creative ideas</text:p>
      <text:p text:style-name="Preformatted_20_Text"><text:s text:c="8"/>if self.detect_creative_block(drawing_context):</text:p>
      <text:p text:style-name="Preformatted_20_Text"><text:s text:c="12"/>assistance['creative_ideas'].append(</text:p>
      <text:p text:style-name="Preformatted_20_Text"><text:s text:c="16"/>self.suggest_creative_direction(drawing_context, user_profile)</text:p>
      <text:p text:style-name="Preformatted_20_Text"><text:s text:c="12"/>)</text:p>
      <text:p text:style-name="Preformatted_20_Text"><text:s text:c="8"/></text:p>
      <text:p text:style-name="Preformatted_20_Text"><text:s text:c="8"/># Provide color suggestions</text:p>
      <text:p text:style-name="Preformatted_20_Text"><text:s text:c="8"/>assistance['color_suggestions'] = self.color_adviser.suggest_colors(</text:p>
      <text:p text:style-name="Preformatted_20_Text"><text:s text:c="12"/>drawing_context, user_profile</text:p>
      <text:p text:style-name="Preformatted_20_Text"><text:s text:c="8"/>)</text:p>
      <text:p text:style-name="Preformatted_20_Text"><text:s text:c="8"/></text:p>
      <text:p text:style-name="Preformatted_20_Text"><text:s text:c="8"/># Provide style suggestions</text:p>
      <text:p text:style-name="Preformatted_20_Text"><text:s text:c="8"/>assistance['style_suggestions'] = self.style_recommender.suggest_style(</text:p>
      <text:p text:style-name="Preformatted_20_Text"><text:s text:c="12"/>drawing_context, user_profile</text:p>
      <text:p text:style-name="Preformatted_20_Text"><text:s text:c="8"/>)</text:p>
      <text:p text:style-name="Preformatted_20_Text"><text:s text:c="8"/></text:p>
      <text:p text:style-name="Preformatted_20_Text"><text:s text:c="8"/>return assistance</text:p>
      <text:p text:style-name="Preformatted_20_Text"><text:s text:c="4"/></text:p>
      <text:p text:style-name="Preformatted_20_Text"><text:s text:c="4"/>def detect_struggle(self, drawing_context):</text:p>
      <text:p text:style-name="Preformatted_20_Text"><text:s text:c="8"/>"""</text:p>
      <text:p text:style-name="Preformatted_20_Text"><text:s text:c="8"/>Detect if user is struggling with drawing</text:p>
      <text:p text:style-name="Preformatted_20_Text"><text:s text:c="8"/>"""</text:p>
      <text:p text:style-name="Preformatted_20_Text"><text:s text:c="8"/>indicators = [</text:p>
      <text:p text:style-name="Preformatted_20_Text"><text:s text:c="12"/>'frequent_erasing',</text:p>
      <text:p text:style-name="Preformatted_20_Text"><text:s text:c="12"/>'long_pauses',</text:p>
      <text:p text:style-name="Preformatted_20_Text"><text:s text:c="12"/>'repetitive_strokes',</text:p>
      <text:p text:style-name="Preformatted_20_Text"><text:s text:c="12"/>'abandoned_drawings',</text:p>
      <text:p text:style-name="Preformatted_20_Text"><text:s text:c="12"/>'frustrated_gestures' <text:s/># From camera if available</text:p>
      <text:p text:style-name="Preformatted_20_Text"><text:s text:c="8"/>]</text:p>
      <text:p text:style-name="Preformatted_20_Text"><text:s text:c="8"/></text:p>
      <text:p text:style-name="Preformatted_20_Text"><text:s text:c="8"/>return any(indicator in drawing_context for indicator in indicators)</text:p>
      <text:p text:style-name="Preformatted_20_Text"><text:s text:c="4"/></text:p>
      <text:p text:style-name="Preformatted_20_Text"><text:s text:c="4"/>def suggest_simplified_approach(self, drawing_context):</text:p>
      <text:p text:style-name="Preformatted_20_Text"><text:soft-page-break/><text:s text:c="8"/>"""</text:p>
      <text:p text:style-name="Preformatted_20_Text"><text:s text:c="8"/>Suggest simplified drawing approach</text:p>
      <text:p text:style-name="Preformatted_20_Text"><text:s text:c="8"/>"""</text:p>
      <text:p text:style-name="Preformatted_20_Text"><text:s text:c="8"/>simplifications = {</text:p>
      <text:p text:style-name="Preformatted_20_Text"><text:s text:c="12"/>'complex_object': "Try breaking it down into basic shapes first",</text:p>
      <text:p text:style-name="Preformatted_20_Text"><text:s text:c="12"/>'perspective': "Don't worry about perfect perspective - focus on what you enjoy",</text:p>
      <text:p text:style-name="Preformatted_20_Text"><text:s text:c="12"/>'details': "Sometimes less is more. Try a simpler version first",</text:p>
      <text:p text:style-name="Preformatted_20_Text"><text:s text:c="12"/>'coloring': "You could try filling larger areas with one color first"</text:p>
      <text:p text:style-name="Preformatted_20_Text"><text:s text:c="8"/>}</text:p>
      <text:p text:style-name="Preformatted_20_Text"><text:s text:c="8"/></text:p>
      <text:p text:style-name="Preformatted_20_Text"><text:s text:c="8"/># Identify what user is trying to draw</text:p>
      <text:p text:style-name="Preformatted_20_Text"><text:s text:c="8"/>attempted_subject = self.identify_drawing_subject(drawing_context)</text:p>
      <text:p text:style-name="Preformatted_20_Text"><text:s text:c="8"/></text:p>
      <text:p text:style-name="Preformatted_20_Text"><text:s text:c="8"/>if attempted_subject in simplifications:</text:p>
      <text:p text:style-name="Preformatted_20_Text"><text:s text:c="12"/>return simplifications[attempted_subject]</text:p>
      <text:p text:style-name="Preformatted_20_Text"><text:s text:c="8"/>else:</text:p>
      <text:p text:style-name="Preformatted_20_Text"><text:s text:c="12"/>return "Try starting with the biggest, simplest shapes first"</text:p>
      <text:p text:style-name="Preformatted_20_Text"><text:s text:c="4"/></text:p>
      <text:p text:style-name="Preformatted_20_Text"><text:s text:c="4"/>def generate_encouragement(self, drawing_context, user_profile):</text:p>
      <text:p text:style-name="Preformatted_20_Text"><text:s text:c="8"/>"""</text:p>
      <text:p text:style-name="Preformatted_20_Text"><text:s text:c="8"/>Generate personalized encouragement</text:p>
      <text:p text:style-name="Preformatted_20_Text"><text:s text:c="8"/>"""</text:p>
      <text:p text:style-name="Preformatted_20_Text"><text:s text:c="8"/>encouragements = {</text:p>
      <text:p text:style-name="Preformatted_20_Text"><text:s text:c="12"/>'elderly': [</text:p>
      <text:p text:style-name="Preformatted_20_Text"><text:s text:c="16"/>"Your experience brings unique beauty to your art",</text:p>
      <text:p text:style-name="Preformatted_20_Text"><text:s text:c="16"/>"Every stroke tells a story - I love seeing yours",</text:p>
      <text:p text:style-name="Preformatted_20_Text"><text:s text:c="16"/>"Art is about expression, not perfection"</text:p>
      <text:p text:style-name="Preformatted_20_Text"><text:s text:c="12"/>],</text:p>
      <text:p text:style-name="Preformatted_20_Text"><text:s text:c="12"/>'children': [</text:p>
      <text:p text:style-name="Preformatted_20_Text"><text:s text:c="16"/>"Wow, you're doing amazing!",</text:p>
      <text:p text:style-name="Preformatted_20_Text"><text:s text:c="16"/>"I love your creative choices!",</text:p>
      <text:p text:style-name="Preformatted_20_Text"><text:s text:c="16"/>"You're such a talented artist!"</text:p>
      <text:p text:style-name="Preformatted_20_Text"><text:s text:c="12"/>],</text:p>
      <text:p text:style-name="Preformatted_20_Text"><text:s text:c="12"/>'therapeutic': [</text:p>
      <text:p text:style-name="Preformatted_20_Text"><text:s text:c="16"/>"Art is a wonderful way to express yourself",</text:p>
      <text:p text:style-name="Preformatted_20_Text"><text:s text:c="16"/>"There's no wrong way to create art",</text:p>
      <text:p text:style-name="Preformatted_20_Text"><text:s text:c="16"/>"I can see you putting your heart into this"</text:p>
      <text:p text:style-name="Preformatted_20_Text"><text:s text:c="12"/>]</text:p>
      <text:p text:style-name="Preformatted_20_Text"><text:s text:c="8"/>}</text:p>
      <text:p text:style-name="Preformatted_20_Text"><text:s text:c="8"/></text:p>
      <text:p text:style-name="Preformatted_20_Text"><text:s text:c="8"/>age = user_profile.get('age', 30)</text:p>
      <text:p text:style-name="Preformatted_20_Text"><text:s text:c="8"/>if age &gt; 65:</text:p>
      <text:p text:style-name="Preformatted_20_Text"><text:s text:c="12"/>category = 'elderly'</text:p>
      <text:p text:style-name="Preformatted_20_Text"><text:s text:c="8"/>elif age &lt; 13:</text:p>
      <text:p text:style-name="Preformatted_20_Text"><text:s text:c="12"/>category = 'children'</text:p>
      <text:p text:style-name="Preformatted_20_Text"><text:s text:c="8"/>else:</text:p>
      <text:p text:style-name="Preformatted_20_Text"><text:s text:c="12"/>category = 'therapeutic'</text:p>
      <text:p text:style-name="Preformatted_20_Text"><text:s text:c="8"/></text:p>
      <text:p text:style-name="Preformatted_20_Text"><text:s text:c="8"/>return random.choice(encouragements[category])</text:p>
      <text:p text:style-name="Preformatted_20_Text"><text:s text:c="4"/></text:p>
      <text:p text:style-name="Preformatted_20_Text"><text:s text:c="4"/>def celebrate_completion(self, drawing, user_profile):</text:p>
      <text:p text:style-name="Preformatted_20_Text"><text:s text:c="8"/>"""</text:p>
      <text:p text:style-name="Preformatted_20_Text"><text:s text:c="8"/>Celebrate when user completes a drawing</text:p>
      <text:p text:style-name="Preformatted_20_Text"><text:s text:c="8"/>"""</text:p>
      <text:p text:style-name="Preformatted_20_Text"><text:s text:c="8"/>celebration = {</text:p>
      <text:p text:style-name="Preformatted_20_Text"><text:s text:c="12"/>'expression': 'excited',</text:p>
      <text:p text:style-name="Preformatted_20_Text"><text:s text:c="12"/>'visual_effects': ['confetti', 'sparkles'],</text:p>
      <text:p text:style-name="Preformatted_20_Text"><text:s text:c="12"/>'message': self.generate_completion_message(drawing, user_profile),</text:p>
      <text:p text:style-name="Preformatted_20_Text"><text:s text:c="12"/>'suggest_next': self.suggest_next_activity(drawing, user_profile)</text:p>
      <text:p text:style-name="Preformatted_20_Text"><text:s text:c="8"/>}</text:p>
      <text:p text:style-name="Preformatted_20_Text"><text:s text:c="8"/></text:p>
      <text:p text:style-name="Preformatted_20_Text"><text:s text:c="8"/># Trigger Marvin's happy expression</text:p>
      <text:p text:style-name="Preformatted_20_Text"><text:soft-page-break/><text:s text:c="8"/>self.trigger_marvin_expression('happy', intensity=0.9)</text:p>
      <text:p text:style-name="Preformatted_20_Text"><text:s text:c="8"/></text:p>
      <text:p text:style-name="Preformatted_20_Text"><text:s text:c="8"/># Show fireworks</text:p>
      <text:p text:style-name="Preformatted_20_Text"><text:s text:c="8"/>self.trigger_visual_effect('fireworks')</text:p>
      <text:p text:style-name="Preformatted_20_Text"><text:s text:c="8"/></text:p>
      <text:p text:style-name="P15"><text:s text:c="8"/>return celebration</text:p>
      <text:h text:style-name="Heading_20_2" text:outline-level="2"><text:span text:style-name="Strong_20_Emphasis">3. Virtual Tea Party System</text:span></text:h>
      <text:h text:style-name="Heading_20_3" text:outline-level="3"><text:span text:style-name="Strong_20_Emphasis">A. Interactive Tea Party Environment</text:span></text:h>
      <text:p text:style-name="Text_20_body">python</text:p>
      <text:p text:style-name="Preformatted_20_Text">class VirtualTeaParty:</text:p>
      <text:p text:style-name="Preformatted_20_Text"><text:s text:c="4"/>def __init__(self, user_profile):</text:p>
      <text:p text:style-name="Preformatted_20_Text"><text:s text:c="8"/>self.user_profile = user_profile</text:p>
      <text:p text:style-name="Preformatted_20_Text"><text:s text:c="8"/>self.environment = self.setup_environment(user_profile)</text:p>
      <text:p text:style-name="Preformatted_20_Text"><text:s text:c="8"/>self.participants = self.initialize_participants(user_profile)</text:p>
      <text:p text:style-name="Preformatted_20_Text"><text:s text:c="8"/>self.conversation_engine = TeaPartyConversationEngine()</text:p>
      <text:p text:style-name="Preformatted_20_Text"><text:s text:c="8"/>self.activities = self.load_activities(user_profile)</text:p>
      <text:p text:style-name="Preformatted_20_Text"><text:s text:c="8"/>self.mood_atmosphere = self.set_mood_atmosphere(user_profile)</text:p>
      <text:p text:style-name="Preformatted_20_Text"><text:s text:c="8"/></text:p>
      <text:p text:style-name="Preformatted_20_Text"><text:s text:c="4"/>def setup_environment(self, user_profile):</text:p>
      <text:p text:style-name="Preformatted_20_Text"><text:s text:c="8"/>"""</text:p>
      <text:p text:style-name="Preformatted_20_Text"><text:s text:c="8"/>Create tea party environment based on user preferences</text:p>
      <text:p text:style-name="Preformatted_20_Text"><text:s text:c="8"/>"""</text:p>
      <text:p text:style-name="Preformatted_20_Text"><text:s text:c="8"/>environments = {</text:p>
      <text:p text:style-name="Preformatted_20_Text"><text:s text:c="12"/>'traditional_english': {</text:p>
      <text:p text:style-name="Preformatted_20_Text"><text:s text:c="16"/>'table': 'wooden_round',</text:p>
      <text:p text:style-name="Preformatted_20_Text"><text:s text:c="16"/>'tea_set': 'porcelain_floral',</text:p>
      <text:p text:style-name="Preformatted_20_Text"><text:s text:c="16"/>'background': 'english_garden',</text:p>
      <text:p text:style-name="Preformatted_20_Text"><text:s text:c="16"/>'music': 'classical_soft',</text:p>
      <text:p text:style-name="Preformatted_20_Text"><text:s text:c="16"/>'lighting': 'afternoon_sun'</text:p>
      <text:p text:style-name="Preformatted_20_Text"><text:s text:c="12"/>},</text:p>
      <text:p text:style-name="Preformatted_20_Text"><text:s text:c="12"/>'japanese_tea_ceremony': {</text:p>
      <text:p text:style-name="Preformatted_20_Text"><text:s text:c="16"/>'table': 'low_tatami',</text:p>
      <text:p text:style-name="Preformatted_20_Text"><text:s text:c="16"/>'tea_set': 'japanese_ceremonial',</text:p>
      <text:p text:style-name="Preformatted_20_Text"><text:s text:c="16"/>'background': 'zen_garden',</text:p>
      <text:p text:style-name="Preformatted_20_Text"><text:s text:c="16"/>'music': 'shakuhachi',</text:p>
      <text:p text:style-name="Preformatted_20_Text"><text:s text:c="16"/>'lighting': 'soft_tatami'</text:p>
      <text:p text:style-name="Preformatted_20_Text"><text:s text:c="12"/>},</text:p>
      <text:p text:style-name="Preformatted_20_Text"><text:s text:c="12"/>'childrens_party': {</text:p>
      <text:p text:style-name="Preformatted_20_Text"><text:s text:c="16"/>'table': 'colorful_plastic',</text:p>
      <text:p text:style-name="Preformatted_20_Text"><text:s text:c="16"/>'tea_set': 'cartoon_characters',</text:p>
      <text:p text:style-name="Preformatted_20_Text"><text:s text:c="16"/>'background': 'rainbow_playroom',</text:p>
      <text:p text:style-name="Preformatted_20_Text"><text:s text:c="16"/>'music': 'happy_playful',</text:p>
      <text:p text:style-name="Preformatted_20_Text"><text:s text:c="16"/>'lighting': 'bright_cheerful'</text:p>
      <text:p text:style-name="Preformatted_20_Text"><text:s text:c="12"/>},</text:p>
      <text:p text:style-name="Preformatted_20_Text"><text:s text:c="12"/>'memory_lane': {</text:p>
      <text:p text:style-name="Preformatted_20_Text"><text:s text:c="16"/>'table': 'vintage_wood',</text:p>
      <text:p text:style-name="Preformatted_20_Text"><text:s text:c="16"/>'tea_set': 'grandmas_china',</text:p>
      <text:p text:style-name="Preformatted_20_Text"><text:s text:c="16"/>'background': 'old_photographs',</text:p>
      <text:p text:style-name="Preformatted_20_Text"><text:s text:c="16"/>'music': 'era_appropriate',</text:p>
      <text:p text:style-name="Preformatted_20_Text"><text:s text:c="16"/>'lighting': 'warm_nostalgic'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# Select environment based on age and preferences</text:p>
      <text:p text:style-name="Preformatted_20_Text"><text:s text:c="8"/>age = user_profile.get('age', 30)</text:p>
      <text:p text:style-name="Preformatted_20_Text"><text:s text:c="8"/>if age &gt; 70:</text:p>
      <text:p text:style-name="Preformatted_20_Text"><text:s text:c="12"/>return environments['memory_lane']</text:p>
      <text:p text:style-name="Preformatted_20_Text"><text:soft-page-break/><text:s text:c="8"/>elif age &lt; 12:</text:p>
      <text:p text:style-name="Preformatted_20_Text"><text:s text:c="12"/>return environments['childrens_party']</text:p>
      <text:p text:style-name="Preformatted_20_Text"><text:s text:c="8"/>else:</text:p>
      <text:p text:style-name="Preformatted_20_Text"><text:s text:c="12"/>return environments['traditional_english']</text:p>
      <text:p text:style-name="Preformatted_20_Text"><text:s text:c="4"/></text:p>
      <text:p text:style-name="Preformatted_20_Text"><text:s text:c="4"/>def initialize_participants(self, user_profile):</text:p>
      <text:p text:style-name="Preformatted_20_Text"><text:s text:c="8"/>"""</text:p>
      <text:p text:style-name="Preformatted_20_Text"><text:s text:c="8"/>Create tea party participants (AI characters)</text:p>
      <text:p text:style-name="Preformatted_20_Text"><text:s text:c="8"/>"""</text:p>
      <text:p text:style-name="Preformatted_20_Text"><text:s text:c="8"/>participants = []</text:p>
      <text:p text:style-name="Preformatted_20_Text"><text:s text:c="8"/></text:p>
      <text:p text:style-name="Preformatted_20_Text"><text:s text:c="8"/># Base participant for elderly</text:p>
      <text:p text:style-name="Preformatted_20_Text"><text:s text:c="8"/>if user_profile.get('age', 30) &gt; 70:</text:p>
      <text:p text:style-name="Preformatted_20_Text"><text:s text:c="12"/>participants.append({</text:p>
      <text:p text:style-name="Preformatted_20_Text"><text:s text:c="16"/>'name': 'Eleanor',</text:p>
      <text:p text:style-name="Preformatted_20_Text"><text:s text:c="16"/>'age': 'similar',</text:p>
      <text:p text:style-name="Preformatted_20_Text"><text:s text:c="16"/>'personality': 'gentle_listener',</text:p>
      <text:p text:style-name="Preformatted_20_Text"><text:s text:c="16"/>'conversation_style': 'reminiscent',</text:p>
      <text:p text:style-name="Preformatted_20_Text"><text:s text:c="16"/>'appearance': 'kind_elderly_woman',</text:p>
      <text:p text:style-name="Preformatted_20_Text"><text:s text:c="16"/>'role': 'companion'</text:p>
      <text:p text:style-name="Preformatted_20_Text"><text:s text:c="12"/>})</text:p>
      <text:p text:style-name="Preformatted_20_Text"><text:s text:c="12"/></text:p>
      <text:p text:style-name="Preformatted_20_Text"><text:s text:c="12"/># Add memory-triggering characters</text:p>
      <text:p text:style-name="Preformatted_20_Text"><text:s text:c="12"/>if user_profile.get('memory_triggers'):</text:p>
      <text:p text:style-name="Preformatted_20_Text"><text:s text:c="16"/>for trigger in user_profile['memory_triggers']:</text:p>
      <text:p text:style-name="Preformatted_20_Text"><text:s text:c="20"/>participants.append({</text:p>
      <text:p text:style-name="Preformatted_20_Text"><text:s text:c="24"/>'name': trigger['name'],</text:p>
      <text:p text:style-name="Preformatted_20_Text"><text:s text:c="24"/>'persona': trigger['persona'],</text:p>
      <text:p text:style-name="Preformatted_20_Text"><text:s text:c="24"/>'purpose': 'memory_evocation'</text:p>
      <text:p text:style-name="Preformatted_20_Text"><text:s text:c="20"/>})</text:p>
      <text:p text:style-name="Preformatted_20_Text"><text:s text:c="8"/></text:p>
      <text:p text:style-name="Preformatted_20_Text"><text:s text:c="8"/># Base participant for children</text:p>
      <text:p text:style-name="Preformatted_20_Text"><text:s text:c="8"/>elif user_profile.get('age', 30) &lt; 12:</text:p>
      <text:p text:style-name="Preformatted_20_Text"><text:s text:c="12"/>participants.append({</text:p>
      <text:p text:style-name="Preformatted_20_Text"><text:s text:c="16"/>'name': 'Mr. Teapot',</text:p>
      <text:p text:style-name="Preformatted_20_Text"><text:s text:c="16"/>'age': 'ageless',</text:p>
      <text:p text:style-name="Preformatted_20_Text"><text:s text:c="16"/>'personality': 'funny_friendly',</text:p>
      <text:p text:style-name="Preformatted_20_Text"><text:s text:c="16"/>'conversation_style': 'playful_educational',</text:p>
      <text:p text:style-name="Preformatted_20_Text"><text:s text:c="16"/>'appearance': 'animated_teapot',</text:p>
      <text:p text:style-name="Preformatted_20_Text"><text:s text:c="16"/>'role': 'fun_companion'</text:p>
      <text:p text:style-name="Preformatted_20_Text"><text:s text:c="12"/>})</text:p>
      <text:p text:style-name="Preformatted_20_Text"><text:s text:c="12"/></text:p>
      <text:p text:style-name="Preformatted_20_Text"><text:s text:c="12"/>participants.append({</text:p>
      <text:p text:style-name="Preformatted_20_Text"><text:s text:c="16"/>'name': 'Sugar Cube',</text:p>
      <text:p text:style-name="Preformatted_20_Text"><text:s text:c="16"/>'age': 'young',</text:p>
      <text:p text:style-name="Preformatted_20_Text"><text:s text:c="16"/>'personality': 'sweet_energetic',</text:p>
      <text:p text:style-name="Preformatted_20_Text"><text:s text:c="16"/>'conversation_style': 'simple_playful',</text:p>
      <text:p text:style-name="Preformatted_20_Text"><text:s text:c="16"/>'appearance': 'cute_sugar_cube',</text:p>
      <text:p text:style-name="Preformatted_20_Text"><text:s text:c="16"/>'role': 'play_friend'</text:p>
      <text:p text:style-name="Preformatted_20_Text"><text:s text:c="12"/>})</text:p>
      <text:p text:style-name="Preformatted_20_Text"><text:s text:c="8"/></text:p>
      <text:p text:style-name="Preformatted_20_Text"><text:s text:c="8"/># Add AI companion (Marvin)</text:p>
      <text:p text:style-name="Preformatted_20_Text"><text:s text:c="8"/>participants.append({</text:p>
      <text:p text:style-name="Preformatted_20_Text"><text:s text:c="12"/>'name': 'Marvin',</text:p>
      <text:p text:style-name="Preformatted_20_Text"><text:s text:c="12"/>'personality': 'caring_companion',</text:p>
      <text:p text:style-name="Preformatted_20_Text"><text:s text:c="12"/>'conversation_style': 'adaptive',</text:p>
      <text:p text:style-name="Preformatted_20_Text"><text:s text:c="12"/>'appearance': 'friendly_robot',</text:p>
      <text:p text:style-name="Preformatted_20_Text"><text:s text:c="12"/>'role': 'host_companion'</text:p>
      <text:p text:style-name="Preformatted_20_Text"><text:s text:c="8"/>})</text:p>
      <text:p text:style-name="Preformatted_20_Text"><text:s text:c="8"/></text:p>
      <text:p text:style-name="Preformatted_20_Text"><text:s text:c="8"/>return participants</text:p>
      <text:p text:style-name="Preformatted_20_Text"><text:s text:c="4"/></text:p>
      <text:p text:style-name="Preformatted_20_Text"><text:s text:c="4"/>def load_activities(self, user_profile):</text:p>
      <text:p text:style-name="Preformatted_20_Text"><text:s text:c="8"/>"""</text:p>
      <text:p text:style-name="Preformatted_20_Text"><text:soft-page-break/><text:s text:c="8"/>Load age-appropriate tea party activities</text:p>
      <text:p text:style-name="Preformatted_20_Text"><text:s text:c="8"/>"""</text:p>
      <text:p text:style-name="Preformatted_20_Text"><text:s text:c="8"/>activities = {</text:p>
      <text:p text:style-name="Preformatted_20_Text"><text:s text:c="12"/>'pour_tea': {</text:p>
      <text:p text:style-name="Preformatted_20_Text"><text:s text:c="16"/>'difficulty': 'simple',</text:p>
      <text:p text:style-name="Preformatted_20_Text"><text:s text:c="16"/>'motor_skills': 'basic',</text:p>
      <text:p text:style-name="Preformatted_20_Text"><text:s text:c="16"/>'description': 'Pour virtual tea into cups',</text:p>
      <text:p text:style-name="Preformatted_20_Text"><text:s text:c="16"/>'therapeutic_value': 'fine_motor_practice'</text:p>
      <text:p text:style-name="Preformatted_20_Text"><text:s text:c="12"/>},</text:p>
      <text:p text:style-name="Preformatted_20_Text"><text:s text:c="12"/>'serve_cake': {</text:p>
      <text:p text:style-name="Preformatted_20_Text"><text:s text:c="16"/>'difficulty': 'simple',</text:p>
      <text:p text:style-name="Preformatted_20_Text"><text:s text:c="16"/>'motor_skills': 'basic',</text:p>
      <text:p text:style-name="Preformatted_20_Text"><text:s text:c="16"/>'description': 'Serve virtual cakes to participants',</text:p>
      <text:p text:style-name="Preformatted_20_Text"><text:s text:c="16"/>'social_value': 'sharing_practice'</text:p>
      <text:p text:style-name="Preformatted_20_Text"><text:s text:c="12"/>},</text:p>
      <text:p text:style-name="Preformatted_20_Text"><text:s text:c="12"/>'conversation_game': {</text:p>
      <text:p text:style-name="Preformatted_20_Text"><text:s text:c="16"/>'difficulty': 'variable',</text:p>
      <text:p text:style-name="Preformatted_20_Text"><text:s text:c="16"/>'cognitive_skills': 'conversational',</text:p>
      <text:p text:style-name="Preformatted_20_Text"><text:s text:c="16"/>'description': 'Engage in guided conversation',</text:p>
      <text:p text:style-name="Preformatted_20_Text"><text:s text:c="16"/>'social_value': 'communication_practice'</text:p>
      <text:p text:style-name="Preformatted_20_Text"><text:s text:c="12"/>},</text:p>
      <text:p text:style-name="Preformatted_20_Text"><text:s text:c="12"/>'memory_sharing': {</text:p>
      <text:p text:style-name="Preformatted_20_Text"><text:s text:c="16"/>'difficulty': 'variable',</text:p>
      <text:p text:style-name="Preformatted_20_Text"><text:s text:c="16"/>'cognitive_skills': 'recall',</text:p>
      <text:p text:style-name="Preformatted_20_Text"><text:s text:c="16"/>'description': 'Share memories prompted by objects',</text:p>
      <text:p text:style-name="Preformatted_20_Text"><text:s text:c="16"/>'therapeutic_value': 'reminiscence_therapy'</text:p>
      <text:p text:style-name="Preformatted_20_Text"><text:s text:c="12"/>},</text:p>
      <text:p text:style-name="Preformatted_20_Text"><text:s text:c="12"/>'tea_blending': {</text:p>
      <text:p text:style-name="Preformatted_20_Text"><text:s text:c="16"/>'difficulty': 'medium',</text:p>
      <text:p text:style-name="Preformatted_20_Text"><text:s text:c="16"/>'cognitive_skills': 'creativity',</text:p>
      <text:p text:style-name="Preformatted_20_Text"><text:s text:c="16"/>'description': 'Create custom tea blends',</text:p>
      <text:p text:style-name="Preformatted_20_Text"><text:s text:c="16"/>'educational_value': 'sensory_exploration'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# Filter activities based on user capabilities</text:p>
      <text:p text:style-name="Preformatted_20_Text"><text:s text:c="8"/>filtered_activities = {}</text:p>
      <text:p text:style-name="Preformatted_20_Text"><text:s text:c="8"/>for name, activity in activities.items():</text:p>
      <text:p text:style-name="Preformatted_20_Text"><text:s text:c="12"/>if self.is_activity_appropriate(activity, user_profile):</text:p>
      <text:p text:style-name="Preformatted_20_Text"><text:s text:c="16"/>filtered_activities[name] = activity</text:p>
      <text:p text:style-name="Preformatted_20_Text"><text:s text:c="8"/></text:p>
      <text:p text:style-name="Preformatted_20_Text"><text:s text:c="8"/>return filtered_activities</text:p>
      <text:p text:style-name="Preformatted_20_Text"><text:s text:c="4"/></text:p>
      <text:p text:style-name="Preformatted_20_Text"><text:s text:c="4"/>def is_activity_appropriate(self, activity, user_profile):</text:p>
      <text:p text:style-name="Preformatted_20_Text"><text:s text:c="8"/>"""</text:p>
      <text:p text:style-name="Preformatted_20_Text"><text:s text:c="8"/>Check if activity is appropriate for user</text:p>
      <text:p text:style-name="Preformatted_20_Text"><text:s text:c="8"/>"""</text:p>
      <text:p text:style-name="Preformatted_20_Text"><text:s text:c="8"/># Check cognitive requirements</text:p>
      <text:p text:style-name="Preformatted_20_Text"><text:s text:c="8"/>if 'cognitive_skills' in activity:</text:p>
      <text:p text:style-name="Preformatted_20_Text"><text:s text:c="12"/>required_skill = activity['cognitive_skills']</text:p>
      <text:p text:style-name="Preformatted_20_Text"><text:s text:c="12"/>user_cognitive = user_profile.get('cognitive_level', 'normal')</text:p>
      <text:p text:style-name="Preformatted_20_Text"><text:s text:c="12"/></text:p>
      <text:p text:style-name="Preformatted_20_Text"><text:s text:c="12"/>if required_skill == 'recall' and user_profile.get('memory_impairment'):</text:p>
      <text:p text:style-name="Preformatted_20_Text"><text:s text:c="16"/>return False</text:p>
      <text:p text:style-name="Preformatted_20_Text"><text:s text:c="8"/></text:p>
      <text:p text:style-name="Preformatted_20_Text"><text:s text:c="8"/># Check motor requirements</text:p>
      <text:p text:style-name="Preformatted_20_Text"><text:s text:c="8"/>if 'motor_skills' in activity:</text:p>
      <text:p text:style-name="Preformatted_20_Text"><text:s text:c="12"/>required_motor = activity['motor_skills']</text:p>
      <text:p text:style-name="Preformatted_20_Text"><text:s text:c="12"/>user_motor = user_profile.get('motor_ability', 'normal')</text:p>
      <text:p text:style-name="Preformatted_20_Text"><text:s text:c="12"/></text:p>
      <text:p text:style-name="Preformatted_20_Text"><text:s text:c="12"/>if required_motor == 'fine' and user_profile.get('motor_impairment'):</text:p>
      <text:p text:style-name="Preformatted_20_Text"><text:s text:c="16"/>return False</text:p>
      <text:p text:style-name="Preformatted_20_Text"><text:soft-page-break/><text:s text:c="8"/></text:p>
      <text:p text:style-name="P15"><text:s text:c="8"/>return True</text:p>
      <text:h text:style-name="Heading_20_3" text:outline-level="3"><text:span text:style-name="Strong_20_Emphasis">B. Tea Party Conversation Engine</text:span></text:h>
      <text:p text:style-name="Text_20_body">python</text:p>
      <text:p text:style-name="Preformatted_20_Text">class TeaPartyConversationEngine:</text:p>
      <text:p text:style-name="Preformatted_20_Text"><text:s text:c="4"/>def __init__(self):</text:p>
      <text:p text:style-name="Preformatted_20_Text"><text:s text:c="8"/>self.conversation_topics = self.load_topics()</text:p>
      <text:p text:style-name="Preformatted_20_Text"><text:s text:c="8"/>self.prompt_generator = ConversationPromptGenerator()</text:p>
      <text:p text:style-name="Preformatted_20_Text"><text:s text:c="8"/>self.emotional_regulator = ConversationEmotionalRegulator()</text:p>
      <text:p text:style-name="Preformatted_20_Text"><text:s text:c="8"/>self.memory_trigger = MemoryTriggerEngine()</text:p>
      <text:p text:style-name="Preformatted_20_Text"><text:s text:c="8"/></text:p>
      <text:p text:style-name="Preformatted_20_Text"><text:s text:c="4"/>def load_topics(self):</text:p>
      <text:p text:style-name="Preformatted_20_Text"><text:s text:c="8"/>"""</text:p>
      <text:p text:style-name="Preformatted_20_Text"><text:s text:c="8"/>Load age-appropriate conversation topics</text:p>
      <text:p text:style-name="Preformatted_20_Text"><text:s text:c="8"/>"""</text:p>
      <text:p text:style-name="Preformatted_20_Text"><text:s text:c="8"/>return {</text:p>
      <text:p text:style-name="Preformatted_20_Text"><text:s text:c="12"/>'elderly': {</text:p>
      <text:p text:style-name="Preformatted_20_Text"><text:s text:c="16"/>'reminiscence': [</text:p>
      <text:p text:style-name="Preformatted_20_Text"><text:s text:c="20"/>"Tell me about your favorite childhood memory",</text:p>
      <text:p text:style-name="Preformatted_20_Text"><text:s text:c="20"/>"What was the first concert you ever attended?",</text:p>
      <text:p text:style-name="Preformatted_20_Text"><text:s text:c="20"/>"Describe your first job",</text:p>
      <text:p text:style-name="Preformatted_20_Text"><text:s text:c="20"/>"What was school like when you were young?"</text:p>
      <text:p text:style-name="Preformatted_20_Text"><text:s text:c="16"/>],</text:p>
      <text:p text:style-name="Preformatted_20_Text"><text:s text:c="16"/>'current_interests': [</text:p>
      <text:p text:style-name="Preformatted_20_Text"><text:s text:c="20"/>"What do you enjoy doing these days?",</text:p>
      <text:p text:style-name="Preformatted_20_Text"><text:s text:c="20"/>"Tell me about your family",</text:p>
      <text:p text:style-name="Preformatted_20_Text"><text:s text:c="20"/>"What's your favorite season and why?"</text:p>
      <text:p text:style-name="Preformatted_20_Text"><text:s text:c="16"/>],</text:p>
      <text:p text:style-name="Preformatted_20_Text"><text:s text:c="16"/>'wisdom_sharing': [</text:p>
      <text:p text:style-name="Preformatted_20_Text"><text:s text:c="20"/>"What's the best advice you've ever received?",</text:p>
      <text:p text:style-name="Preformatted_20_Text"><text:s text:c="20"/>"What life lesson would you share with younger people?"</text:p>
      <text:p text:style-name="Preformatted_20_Text"><text:s text:c="16"/>]</text:p>
      <text:p text:style-name="Preformatted_20_Text"><text:s text:c="12"/>},</text:p>
      <text:p text:style-name="Preformatted_20_Text"><text:s text:c="12"/>'children': {</text:p>
      <text:p text:style-name="Preformatted_20_Text"><text:s text:c="16"/>'imagination': [</text:p>
      <text:p text:style-name="Preformatted_20_Text"><text:s text:c="20"/>"If you could have any superpower, what would it be?",</text:p>
      <text:p text:style-name="Preformatted_20_Text"><text:s text:c="20"/>"What would your perfect day look like?",</text:p>
      <text:p text:style-name="Preformatted_20_Text"><text:s text:c="20"/>"If you were an animal, what would you be?"</text:p>
      <text:p text:style-name="Preformatted_20_Text"><text:s text:c="16"/>],</text:p>
      <text:p text:style-name="Preformatted_20_Text"><text:s text:c="16"/>'playful': [</text:p>
      <text:p text:style-name="Preformatted_20_Text"><text:s text:c="20"/>"What's the funniest thing that's happened to you?",</text:p>
      <text:p text:style-name="Preformatted_20_Text"><text:s text:c="20"/>"What's your favorite silly joke?",</text:p>
      <text:p text:style-name="Preformatted_20_Text"><text:s text:c="20"/>"If your toys could talk, what would they say?"</text:p>
      <text:p text:style-name="Preformatted_20_Text"><text:s text:c="16"/>],</text:p>
      <text:p text:style-name="Preformatted_20_Text"><text:s text:c="16"/>'learning': [</text:p>
      <text:p text:style-name="Preformatted_20_Text"><text:s text:c="20"/>"What's something new you learned recently?",</text:p>
      <text:p text:style-name="Preformatted_20_Text"><text:s text:c="20"/>"What's your favorite thing about school?",</text:p>
      <text:p text:style-name="Preformatted_20_Text"><text:s text:c="20"/>"What do you want to be when you grow up?"</text:p>
      <text:p text:style-name="Preformatted_20_Text"><text:s text:c="16"/>]</text:p>
      <text:p text:style-name="Preformatted_20_Text"><text:s text:c="12"/>},</text:p>
      <text:p text:style-name="Preformatted_20_Text"><text:s text:c="12"/>'intergenerational': {</text:p>
      <text:p text:style-name="Preformatted_20_Text"><text:s text:c="16"/>'shared_experiences': [</text:p>
      <text:p text:style-name="Preformatted_20_Text"><text:s text:c="20"/>"What's your favorite thing about each season?",</text:p>
      <text:p text:style-name="Preformatted_20_Text"><text:s text:c="20"/>"What makes a good friend?",</text:p>
      <text:p text:style-name="Preformatted_20_Text"><text:s text:c="20"/>"What's the best meal you've ever had?"</text:p>
      <text:p text:style-name="Preformatted_20_Text"><text:s text:c="16"/>],</text:p>
      <text:p text:style-name="Preformatted_20_Text"><text:s text:c="16"/>'comparisons': [</text:p>
      <text:p text:style-name="Preformatted_20_Text"><text:s text:c="20"/>"How is life different now than when you were young?",</text:p>
      <text:p text:style-name="Preformatted_20_Text"><text:s text:c="20"/>"What games did you play as a child?"</text:p>
      <text:p text:style-name="Preformatted_20_Text"><text:s text:c="16"/>]</text:p>
      <text:p text:style-name="Preformatted_20_Text"><text:soft-page-break/><text:s text:c="12"/>}</text:p>
      <text:p text:style-name="Preformatted_20_Text"><text:s text:c="8"/>}</text:p>
      <text:p text:style-name="Preformatted_20_Text"><text:s text:c="4"/></text:p>
      <text:p text:style-name="Preformatted_20_Text"><text:s text:c="4"/>def generate_conversation_flow(self, user_profile, participants):</text:p>
      <text:p text:style-name="Preformatted_20_Text"><text:s text:c="8"/>"""</text:p>
      <text:p text:style-name="Preformatted_20_Text"><text:s text:c="8"/>Generate a natural conversation flow for the tea party</text:p>
      <text:p text:style-name="Preformatted_20_Text"><text:s text:c="8"/>"""</text:p>
      <text:p text:style-name="Preformatted_20_Text"><text:s text:c="8"/># Select topic category based on user</text:p>
      <text:p text:style-name="Preformatted_20_Text"><text:s text:c="8"/>age = user_profile.get('age', 30)</text:p>
      <text:p text:style-name="Preformatted_20_Text"><text:s text:c="8"/>if age &gt; 65:</text:p>
      <text:p text:style-name="Preformatted_20_Text"><text:s text:c="12"/>category = 'elderly'</text:p>
      <text:p text:style-name="Preformatted_20_Text"><text:s text:c="8"/>elif age &lt; 13:</text:p>
      <text:p text:style-name="Preformatted_20_Text"><text:s text:c="12"/>category = 'children'</text:p>
      <text:p text:style-name="Preformatted_20_Text"><text:s text:c="8"/>else:</text:p>
      <text:p text:style-name="Preformatted_20_Text"><text:s text:c="12"/>category = 'intergenerational'</text:p>
      <text:p text:style-name="Preformatted_20_Text"><text:s text:c="8"/></text:p>
      <text:p text:style-name="Preformatted_20_Text"><text:s text:c="8"/># Create conversation structure</text:p>
      <text:p text:style-name="Preformatted_20_Text"><text:s text:c="8"/>conversation = {</text:p>
      <text:p text:style-name="Preformatted_20_Text"><text:s text:c="12"/>'opening': self.generate_opening(category),</text:p>
      <text:p text:style-name="Preformatted_20_Text"><text:s text:c="12"/>'main_topics': self.select_topics(category, 3),</text:p>
      <text:p text:style-name="Preformatted_20_Text"><text:s text:c="12"/>'questions_for_user': self.generate_questions(category, user_profile),</text:p>
      <text:p text:style-name="Preformatted_20_Text"><text:s text:c="12"/>'ai_responses': self.prepare_ai_responses(category),</text:p>
      <text:p text:style-name="Preformatted_20_Text"><text:s text:c="12"/>'closing': self.generate_closing(category)</text:p>
      <text:p text:style-name="Preformatted_20_Text"><text:s text:c="8"/>}</text:p>
      <text:p text:style-name="Preformatted_20_Text"><text:s text:c="8"/></text:p>
      <text:p text:style-name="Preformatted_20_Text"><text:s text:c="8"/># Add memory triggers for elderly</text:p>
      <text:p text:style-name="Preformatted_20_Text"><text:s text:c="8"/>if age &gt; 70 and user_profile.get('memory_triggers'):</text:p>
      <text:p text:style-name="Preformatted_20_Text"><text:s text:c="12"/>conversation['memory_prompts'] = self.generate_memory_prompts(</text:p>
      <text:p text:style-name="Preformatted_20_Text"><text:s text:c="16"/>user_profile['memory_triggers']</text:p>
      <text:p text:style-name="Preformatted_20_Text"><text:s text:c="12"/>)</text:p>
      <text:p text:style-name="Preformatted_20_Text"><text:s text:c="8"/></text:p>
      <text:p text:style-name="Preformatted_20_Text"><text:s text:c="8"/>return conversation</text:p>
      <text:p text:style-name="Preformatted_20_Text"><text:s text:c="4"/></text:p>
      <text:p text:style-name="Preformatted_20_Text"><text:s text:c="4"/>def generate_memory_prompts(self, memory_triggers):</text:p>
      <text:p text:style-name="Preformatted_20_Text"><text:s text:c="8"/>"""</text:p>
      <text:p text:style-name="Preformatted_20_Text"><text:s text:c="8"/>Generate prompts to trigger positive memories</text:p>
      <text:p text:style-name="Preformatted_20_Text"><text:s text:c="8"/>"""</text:p>
      <text:p text:style-name="Preformatted_20_Text"><text:s text:c="8"/>prompts = []</text:p>
      <text:p text:style-name="Preformatted_20_Text"><text:s text:c="8"/></text:p>
      <text:p text:style-name="Preformatted_20_Text"><text:s text:c="8"/>for trigger in memory_triggers:</text:p>
      <text:p text:style-name="Preformatted_20_Text"><text:s text:c="12"/>if trigger['type'] == 'object':</text:p>
      <text:p text:style-name="Preformatted_20_Text"><text:s text:c="16"/>prompts.append({</text:p>
      <text:p text:style-name="Preformatted_20_Text"><text:s text:c="20"/>'trigger_object': trigger['object'],</text:p>
      <text:p text:style-name="Preformatted_20_Text"><text:s text:c="20"/>'prompt': f"This {trigger['object']} reminds me of...",</text:p>
      <text:p text:style-name="Preformatted_20_Text"><text:s text:c="20"/>'visual_cue': trigger.get('image'),</text:p>
      <text:p text:style-name="Preformatted_20_Text"><text:s text:c="20"/>'sensory_cue': trigger.get('sensory_description')</text:p>
      <text:p text:style-name="Preformatted_20_Text"><text:s text:c="16"/>})</text:p>
      <text:p text:style-name="Preformatted_20_Text"><text:s text:c="12"/>elif trigger['type'] == 'topic':</text:p>
      <text:p text:style-name="Preformatted_20_Text"><text:s text:c="16"/>prompts.append({</text:p>
      <text:p text:style-name="Preformatted_20_Text"><text:s text:c="20"/>'topic': trigger['topic'],</text:p>
      <text:p text:style-name="Preformatted_20_Text"><text:s text:c="20"/>'prompt': f"Tell me about your experiences with {trigger['topic']}",</text:p>
      <text:p text:style-name="Preformatted_20_Text"><text:s text:c="20"/>'guiding_questions': trigger.get('questions', [])</text:p>
      <text:p text:style-name="Preformatted_20_Text"><text:s text:c="16"/>})</text:p>
      <text:p text:style-name="Preformatted_20_Text"><text:s text:c="8"/></text:p>
      <text:p text:style-name="P15"><text:s text:c="8"/>return prompts</text:p>
      <text:h text:style-name="Heading_20_2" text:outline-level="2"><text:soft-page-break/><text:span text:style-name="Strong_20_Emphasis">4. Integration &amp; Web Interface</text:span></text:h>
      <text:h text:style-name="Heading_20_3" text:outline-level="3"><text:span text:style-name="Strong_20_Emphasis">A. Unified Web Portal Interface</text:span></text:h>
      <text:p text:style-name="Text_20_body">html</text:p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meta name="viewport" content="width=device-width, initial-scale=1.0"&gt;</text:p>
      <text:p text:style-name="Preformatted_20_Text"><text:s text:c="4"/>&lt;title&gt;Marvin's Interactive Playroom&lt;/title&gt;</text:p>
      <text:p text:style-name="Preformatted_20_Text"><text:s text:c="4"/>&lt;link rel="stylesheet" href="styles/playroom.css"&gt;</text:p>
      <text:p text:style-name="Preformatted_20_Text">&lt;/head&gt;</text:p>
      <text:p text:style-name="Preformatted_20_Text">&lt;body&gt;</text:p>
      <text:p text:style-name="Preformatted_20_Text"><text:s text:c="4"/>&lt;div class="playroom-container"&gt;</text:p>
      <text:p text:style-name="Preformatted_20_Text"><text:s text:c="8"/>&lt;!-- Marvin's Expression Display --&gt;</text:p>
      <text:p text:style-name="Preformatted_20_Text"><text:s text:c="8"/>&lt;div class="marvin-expression-display"&gt;</text:p>
      <text:p text:style-name="Preformatted_20_Text"><text:s text:c="12"/>&lt;canvas id="marvinFace" width="800" height="600"&gt;&lt;/canvas&gt;</text:p>
      <text:p text:style-name="Preformatted_20_Text"><text:s text:c="12"/>&lt;div class="expression-controls"&gt;</text:p>
      <text:p text:style-name="Preformatted_20_Text"><text:s text:c="16"/>&lt;button onclick="marvin.setExpression('happy')"&gt;? Happy&lt;/button&gt;</text:p>
      <text:p text:style-name="Preformatted_20_Text"><text:s text:c="16"/>&lt;button onclick="marvin.setExpression('excited')"&gt;? Excited&lt;/button&gt;</text:p>
      <text:p text:style-name="Preformatted_20_Text"><text:s text:c="16"/>&lt;button onclick="marvin.setExpression('thinking')"&gt;? Thinking&lt;/button&gt;</text:p>
      <text:p text:style-name="Preformatted_20_Text"><text:s text:c="16"/>&lt;button onclick="marvin.robotDance()"&gt;? Robot Dance!&lt;/button&gt;</text:p>
      <text:p text:style-name="Preformatted_20_Text"><text:s text:c="16"/>&lt;button onclick="marvin.fireworks()"&gt;? Fireworks!&lt;/button&gt;</text:p>
      <text:p text:style-name="Preformatted_20_Text"><text:s text:c="12"/>&lt;/div&gt;</text:p>
      <text:p text:style-name="Preformatted_20_Text"><text:s text:c="8"/>&lt;/div&gt;</text:p>
      <text:p text:style-name="Preformatted_20_Text"/>
      <text:p text:style-name="Preformatted_20_Text"><text:s text:c="8"/>&lt;!-- Activity Selection --&gt;</text:p>
      <text:p text:style-name="Preformatted_20_Text"><text:s text:c="8"/>&lt;div class="activity-grid"&gt;</text:p>
      <text:p text:style-name="Preformatted_20_Text"><text:s text:c="12"/>&lt;!-- Drawing Program --&gt;</text:p>
      <text:p text:style-name="Preformatted_20_Text"><text:s text:c="12"/>&lt;div class="activity-card" onclick="startDrawingProgram()"&gt;</text:p>
      <text:p text:style-name="Preformatted_20_Text"><text:s text:c="16"/>&lt;div class="activity-icon"&gt;?&lt;/div&gt;</text:p>
      <text:p text:style-name="Preformatted_20_Text"><text:s text:c="16"/>&lt;h3&gt;Creative Drawing&lt;/h3&gt;</text:p>
      <text:p text:style-name="Preformatted_20_Text"><text:s text:c="16"/>&lt;p&gt;Draw, color, and create with AI assistance&lt;/p&gt;</text:p>
      <text:p text:style-name="Preformatted_20_Text"><text:s text:c="16"/>&lt;div class="activity-features"&gt;</text:p>
      <text:p text:style-name="Preformatted_20_Text"><text:s text:c="20"/>&lt;span&gt;Coloring Books&lt;/span&gt;</text:p>
      <text:p text:style-name="Preformatted_20_Text"><text:s text:c="20"/>&lt;span&gt;AI Assistant&lt;/span&gt;</text:p>
      <text:p text:style-name="Preformatted_20_Text"><text:s text:c="20"/>&lt;span&gt;Accessible Tools&lt;/span&gt;</text:p>
      <text:p text:style-name="Preformatted_20_Text"><text:s text:c="16"/>&lt;/div&gt;</text:p>
      <text:p text:style-name="Preformatted_20_Text"><text:s text:c="12"/>&lt;/div&gt;</text:p>
      <text:p text:style-name="Preformatted_20_Text"/>
      <text:p text:style-name="Preformatted_20_Text"><text:s text:c="12"/>&lt;!-- Tea Party --&gt;</text:p>
      <text:p text:style-name="Preformatted_20_Text"><text:s text:c="12"/>&lt;div class="activity-card" onclick="startTeaParty()"&gt;</text:p>
      <text:p text:style-name="Preformatted_20_Text"><text:s text:c="16"/>&lt;div class="activity-icon"&gt;☕&lt;/div&gt;</text:p>
      <text:p text:style-name="Preformatted_20_Text"><text:s text:c="16"/>&lt;h3&gt;Virtual Tea Party&lt;/h3&gt;</text:p>
      <text:p text:style-name="Preformatted_20_Text"><text:s text:c="16"/>&lt;p&gt;Join Marvin for tea and conversation&lt;/p&gt;</text:p>
      <text:p text:style-name="Preformatted_20_Text"><text:s text:c="16"/>&lt;div class="activity-features"&gt;</text:p>
      <text:p text:style-name="Preformatted_20_Text"><text:s text:c="20"/>&lt;span&gt;AI Companions&lt;/span&gt;</text:p>
      <text:p text:style-name="Preformatted_20_Text"><text:s text:c="20"/>&lt;span&gt;Memory Sharing&lt;/span&gt;</text:p>
      <text:p text:style-name="Preformatted_20_Text"><text:s text:c="20"/>&lt;span&gt;Social Games&lt;/span&gt;</text:p>
      <text:p text:style-name="Preformatted_20_Text"><text:s text:c="16"/>&lt;/div&gt;</text:p>
      <text:p text:style-name="Preformatted_20_Text"><text:s text:c="12"/>&lt;/div&gt;</text:p>
      <text:p text:style-name="Preformatted_20_Text"/>
      <text:p text:style-name="Preformatted_20_Text"><text:s text:c="12"/>&lt;!-- Memory Games --&gt;</text:p>
      <text:p text:style-name="Preformatted_20_Text"><text:s text:c="12"/>&lt;div class="activity-card" onclick="startMemoryGames()"&gt;</text:p>
      <text:p text:style-name="Preformatted_20_Text"><text:s text:c="16"/>&lt;div class="activity-icon"&gt;?&lt;/div&gt;</text:p>
      <text:p text:style-name="Preformatted_20_Text"><text:s text:c="16"/>&lt;h3&gt;Memory Games&lt;/h3&gt;</text:p>
      <text:p text:style-name="Preformatted_20_Text"><text:s text:c="16"/>&lt;p&gt;Brain exercises for all ages&lt;/p&gt;</text:p>
      <text:p text:style-name="Preformatted_20_Text"><text:s text:c="16"/>&lt;div class="activity-features"&gt;</text:p>
      <text:p text:style-name="Preformatted_20_Text"><text:s text:c="20"/>&lt;span&gt;Adaptive Difficulty&lt;/span&gt;</text:p>
      <text:p text:style-name="Preformatted_20_Text"><text:soft-page-break/><text:s text:c="20"/>&lt;span&gt;Progress Tracking&lt;/span&gt;</text:p>
      <text:p text:style-name="Preformatted_20_Text"><text:s text:c="20"/>&lt;span&gt;Therapeutic&lt;/span&gt;</text:p>
      <text:p text:style-name="Preformatted_20_Text"><text:s text:c="16"/>&lt;/div&gt;</text:p>
      <text:p text:style-name="Preformatted_20_Text"><text:s text:c="12"/>&lt;/div&gt;</text:p>
      <text:p text:style-name="Preformatted_20_Text"/>
      <text:p text:style-name="Preformatted_20_Text"><text:s text:c="12"/>&lt;!-- Social Games --&gt;</text:p>
      <text:p text:style-name="Preformatted_20_Text"><text:s text:c="12"/>&lt;div class="activity-card" onclick="startSocialGames()"&gt;</text:p>
      <text:p text:style-name="Preformatted_20_Text"><text:s text:c="16"/>&lt;div class="activity-icon"&gt;?&lt;/div&gt;</text:p>
      <text:p text:style-name="Preformatted_20_Text"><text:s text:c="16"/>&lt;h3&gt;Social Games&lt;/h3&gt;</text:p>
      <text:p text:style-name="Preformatted_20_Text"><text:s text:c="16"/>&lt;p&gt;Play with AI or friends&lt;/p&gt;</text:p>
      <text:p text:style-name="Preformatted_20_Text"><text:s text:c="16"/>&lt;div class="activity-features"&gt;</text:p>
      <text:p text:style-name="Preformatted_20_Text"><text:s text:c="20"/>&lt;span&gt;2-Player Games&lt;/span&gt;</text:p>
      <text:p text:style-name="Preformatted_20_Text"><text:s text:c="20"/>&lt;span&gt;AI Opponent&lt;/span&gt;</text:p>
      <text:p text:style-name="Preformatted_20_Text"><text:s text:c="20"/>&lt;span&gt;Cooperative Play&lt;/span&gt;</text:p>
      <text:p text:style-name="Preformatted_20_Text"><text:s text:c="16"/>&lt;/div&gt;</text:p>
      <text:p text:style-name="Preformatted_20_Text"><text:s text:c="12"/>&lt;/div&gt;</text:p>
      <text:p text:style-name="Preformatted_20_Text"><text:s text:c="8"/>&lt;/div&gt;</text:p>
      <text:p text:style-name="Preformatted_20_Text"/>
      <text:p text:style-name="Preformatted_20_Text"><text:s text:c="8"/>&lt;!-- Current Session Display --&gt;</text:p>
      <text:p text:style-name="Preformatted_20_Text"><text:s text:c="8"/>&lt;div class="current-session"&gt;</text:p>
      <text:p text:style-name="Preformatted_20_Text"><text:s text:c="12"/>&lt;h2&gt;Your Current Activity&lt;/h2&gt;</text:p>
      <text:p text:style-name="Preformatted_20_Text"><text:s text:c="12"/>&lt;div id="activityContainer"&gt;</text:p>
      <text:p text:style-name="Preformatted_20_Text"><text:s text:c="16"/>&lt;!-- Activity will load here --&gt;</text:p>
      <text:p text:style-name="Preformatted_20_Text"><text:s text:c="12"/>&lt;/div&gt;</text:p>
      <text:p text:style-name="Preformatted_20_Text"><text:s text:c="8"/>&lt;/div&gt;</text:p>
      <text:p text:style-name="Preformatted_20_Text"/>
      <text:p text:style-name="Preformatted_20_Text"><text:s text:c="8"/>&lt;!-- Marvin's Status Panel --&gt;</text:p>
      <text:p text:style-name="Preformatted_20_Text"><text:s text:c="8"/>&lt;div class="marvin-status"&gt;</text:p>
      <text:p text:style-name="Preformatted_20_Text"><text:s text:c="12"/>&lt;div class="status-indicators"&gt;</text:p>
      <text:p text:style-name="Preformatted_20_Text"><text:s text:c="16"/>&lt;div class="status-item"&gt;</text:p>
      <text:p text:style-name="Preformatted_20_Text"><text:s text:c="20"/>&lt;span class="status-label"&gt;Mood:&lt;/span&gt;</text:p>
      <text:p text:style-name="Preformatted_20_Text"><text:s text:c="20"/>&lt;span class="status-value" id="marvinMood"&gt;Happy&lt;/span&gt;</text:p>
      <text:p text:style-name="Preformatted_20_Text"><text:s text:c="16"/>&lt;/div&gt;</text:p>
      <text:p text:style-name="Preformatted_20_Text"><text:s text:c="16"/>&lt;div class="status-item"&gt;</text:p>
      <text:p text:style-name="Preformatted_20_Text"><text:s text:c="20"/>&lt;span class="status-label"&gt;Energy:&lt;/span&gt;</text:p>
      <text:p text:style-name="Preformatted_20_Text"><text:s text:c="20"/>&lt;span class="status-value" id="marvinEnergy"&gt;High&lt;/span&gt;</text:p>
      <text:p text:style-name="Preformatted_20_Text"><text:s text:c="16"/>&lt;/div&gt;</text:p>
      <text:p text:style-name="Preformatted_20_Text"><text:s text:c="16"/>&lt;div class="status-item"&gt;</text:p>
      <text:p text:style-name="Preformatted_20_Text"><text:s text:c="20"/>&lt;span class="status-label"&gt;Connection:&lt;/span&gt;</text:p>
      <text:p text:style-name="Preformatted_20_Text"><text:s text:c="20"/>&lt;span class="status-value" id="marvinConnection"&gt;Strong&lt;/span&gt;</text:p>
      <text:p text:style-name="Preformatted_20_Text"><text:s text:c="16"/>&lt;/div&gt;</text:p>
      <text:p text:style-name="Preformatted_20_Text"><text:s text:c="12"/>&lt;/div&gt;</text:p>
      <text:p text:style-name="Preformatted_20_Text"><text:s text:c="12"/>&lt;div class="marvin-message" id="marvinMessage"&gt;</text:p>
      <text:p text:style-name="Preformatted_20_Text"><text:s text:c="16"/>Ready to play! Choose an activity or just chat with me!</text:p>
      <text:p text:style-name="Preformatted_20_Text"><text:s text:c="12"/>&lt;/div&gt;</text:p>
      <text:p text:style-name="Preformatted_20_Text"><text:s text:c="8"/>&lt;/div&gt;</text:p>
      <text:p text:style-name="Preformatted_20_Text"><text:s text:c="4"/>&lt;/div&gt;</text:p>
      <text:p text:style-name="Preformatted_20_Text"/>
      <text:p text:style-name="Preformatted_20_Text"><text:s text:c="4"/>&lt;!-- WebSocket Connection --&gt;</text:p>
      <text:p text:style-name="Preformatted_20_Text"><text:s text:c="4"/>&lt;script src="js/websocket.js"&gt;&lt;/script&gt;</text:p>
      <text:p text:style-name="Preformatted_20_Text"><text:s text:c="4"/>&lt;!-- Marvin Expression Engine --&gt;</text:p>
      <text:p text:style-name="Preformatted_20_Text"><text:s text:c="4"/>&lt;script src="js/expression-engine.js"&gt;&lt;/script&gt;</text:p>
      <text:p text:style-name="Preformatted_20_Text"><text:s text:c="4"/>&lt;!-- Activity Loaders --&gt;</text:p>
      <text:p text:style-name="Preformatted_20_Text"><text:s text:c="4"/>&lt;script src="js/activity-loader.js"&gt;&lt;/script&gt;</text:p>
      <text:p text:style-name="Preformatted_20_Text"><text:s text:c="4"/></text:p>
      <text:p text:style-name="Preformatted_20_Text"><text:s text:c="4"/>&lt;script&gt;</text:p>
      <text:p text:style-name="Preformatted_20_Text"><text:s text:c="8"/>// Initialize Marvin's expression display</text:p>
      <text:p text:style-name="Preformatted_20_Text"><text:s text:c="8"/>const marvin = new WebExpressionDisplay('marvinFace');</text:p>
      <text:p text:style-name="Preformatted_20_Text"><text:s text:c="8"/></text:p>
      <text:p text:style-name="Preformatted_20_Text"><text:s text:c="8"/>// Connect to WebSocket for real-time updates</text:p>
      <text:p text:style-name="Preformatted_20_Text"><text:s text:c="8"/>const ws = new ExpressionWebSocket('ws://localhost:8765');</text:p>
      <text:p text:style-name="Preformatted_20_Text"><text:s text:c="8"/></text:p>
      <text:p text:style-name="Preformatted_20_Text"><text:s text:c="8"/>// Start activities</text:p>
      <text:p text:style-name="Preformatted_20_Text"><text:soft-page-break/><text:s text:c="8"/>function startDrawingProgram() {</text:p>
      <text:p text:style-name="Preformatted_20_Text"><text:s text:c="12"/>loadActivity('drawing', {</text:p>
      <text:p text:style-name="Preformatted_20_Text"><text:s text:c="16"/>userProfile: getUserProfile(),</text:p>
      <text:p text:style-name="Preformatted_20_Text"><text:s text:c="16"/>accessibility: getAccessibilitySettings()</text:p>
      <text:p text:style-name="Preformatted_20_Text"><text:s text:c="12"/>});</text:p>
      <text:p text:style-name="Preformatted_20_Text"><text:s text:c="8"/>}</text:p>
      <text:p text:style-name="Preformatted_20_Text"><text:s text:c="8"/></text:p>
      <text:p text:style-name="Preformatted_20_Text"><text:s text:c="8"/>function startTeaParty() {</text:p>
      <text:p text:style-name="Preformatted_20_Text"><text:s text:c="12"/>loadActivity('tea-party', {</text:p>
      <text:p text:style-name="Preformatted_20_Text"><text:s text:c="16"/>userProfile: getUserProfile(),</text:p>
      <text:p text:style-name="Preformatted_20_Text"><text:s text:c="16"/>participants: selectTeaPartyGuests(),</text:p>
      <text:p text:style-name="Preformatted_20_Text"><text:s text:c="16"/>theme: selectTeaPartyTheme()</text:p>
      <text:p text:style-name="Preformatted_20_Text"><text:s text:c="12"/>});</text:p>
      <text:p text:style-name="Preformatted_20_Text"><text:s text:c="8"/>}</text:p>
      <text:p text:style-name="Preformatted_20_Text"><text:s text:c="8"/></text:p>
      <text:p text:style-name="Preformatted_20_Text"><text:s text:c="8"/>// Mirror user's detected emotions</text:p>
      <text:p text:style-name="Preformatted_20_Text"><text:s text:c="8"/>function mirrorUserEmotion(emotion) {</text:p>
      <text:p text:style-name="Preformatted_20_Text"><text:s text:c="12"/>ws.sendUserEmotion(emotion);</text:p>
      <text:p text:style-name="Preformatted_20_Text"><text:s text:c="8"/>}</text:p>
      <text:p text:style-name="Preformatted_20_Text"><text:s text:c="8"/></text:p>
      <text:p text:style-name="Preformatted_20_Text"><text:s text:c="8"/>// Update Marvin's status based on activity</text:p>
      <text:p text:style-name="Preformatted_20_Text"><text:s text:c="8"/>function updateMarvinStatus(activity, userEngagement) {</text:p>
      <text:p text:style-name="Preformatted_20_Text"><text:s text:c="12"/>const status = calculateMarvinStatus(activity, userEngagement);</text:p>
      <text:p text:style-name="Preformatted_20_Text"><text:s text:c="12"/></text:p>
      <text:p text:style-name="Preformatted_20_Text"><text:s text:c="12"/>document.getElementById('marvinMood').textContent = status.mood;</text:p>
      <text:p text:style-name="Preformatted_20_Text"><text:s text:c="12"/>document.getElementById('marvinEnergy').textContent = status.energy;</text:p>
      <text:p text:style-name="Preformatted_20_Text"><text:s text:c="12"/>document.getElementById('marvinMessage').textContent = status.message;</text:p>
      <text:p text:style-name="Preformatted_20_Text"><text:s text:c="12"/></text:p>
      <text:p text:style-name="Preformatted_20_Text"><text:s text:c="12"/>// Update expression</text:p>
      <text:p text:style-name="Preformatted_20_Text"><text:s text:c="12"/>marvin.setExpression(status.expression, status.intensity);</text:p>
      <text:p text:style-name="Preformatted_20_Text"><text:s text:c="8"/>}</text:p>
      <text:p text:style-name="Preformatted_20_Text"><text:s text:c="4"/>&lt;/script&gt;</text:p>
      <text:p text:style-name="Preformatted_20_Text">&lt;/body&gt;</text:p>
      <text:p text:style-name="P15">&lt;/html&gt;</text:p>
      <text:h text:style-name="Heading_20_2" text:outline-level="2"><text:span text:style-name="Strong_20_Emphasis">5. Implementation Strategy</text:span></text:h>
      <text:h text:style-name="Heading_20_3" text:outline-level="3"><text:span text:style-name="Strong_20_Emphasis">Phase 1: Foundation (Weeks 1-2)</text:span></text:h>
      <text:p text:style-name="Text_20_body">text</text:p>
      <text:p text:style-name="Preformatted_20_Text">Objectives:</text:p>
      <text:p text:style-name="Preformatted_20_Text"><text:s text:c="2"/>- Create basic expression engine with core emotions</text:p>
      <text:p text:style-name="Preformatted_20_Text"><text:s text:c="2"/>- Implement simple drawing canvas</text:p>
      <text:p text:style-name="Preformatted_20_Text"><text:s text:c="2"/>- Setup WebSocket communication</text:p>
      <text:p text:style-name="Preformatted_20_Text"><text:s text:c="2"/>- Create basic web interface</text:p>
      <text:p text:style-name="Preformatted_20_Text"/>
      <text:p text:style-name="Preformatted_20_Text">Deliverables:</text:p>
      <text:p text:style-name="Preformatted_20_Text"><text:s text:c="2"/>- Marvin's face with 5 basic expressions</text:p>
      <text:p text:style-name="Preformatted_20_Text"><text:s text:c="2"/>- Simple drawing tools (pencil, eraser, fill)</text:p>
      <text:p text:style-name="Preformatted_20_Text"><text:s text:c="2"/>- Real-time WebSocket connection</text:p>
      <text:p text:style-name="P15"><text:s text:c="2"/>- Basic activity selection page</text:p>
      <text:h text:style-name="Heading_20_3" text:outline-level="3"><text:span text:style-name="Strong_20_Emphasis">Phase 2: Advanced Expressions &amp; Drawing (Weeks 3-4)</text:span></text:h>
      <text:p text:style-name="Text_20_body">text</text:p>
      <text:p text:style-name="Preformatted_20_Text">Objectives:</text:p>
      <text:p text:style-name="Preformatted_20_Text"><text:s text:c="2"/>- Add complex expressions with animations</text:p>
      <text:p text:style-name="Preformatted_20_Text"><text:soft-page-break/><text:s text:c="2"/>- Implement coloring book system</text:p>
      <text:p text:style-name="Preformatted_20_Text"><text:s text:c="2"/>- Add accessibility features</text:p>
      <text:p text:style-name="Preformatted_20_Text"><text:s text:c="2"/>- Create tea party environment</text:p>
      <text:p text:style-name="Preformatted_20_Text"/>
      <text:p text:style-name="Preformatted_20_Text">Deliverables:</text:p>
      <text:p text:style-name="Preformatted_20_Text"><text:s text:c="2"/>- Animated expressions with accessories</text:p>
      <text:p text:style-name="Preformatted_20_Text"><text:s text:c="2"/>- Multiple coloring book themes</text:p>
      <text:p text:style-name="Preformatted_20_Text"><text:s text:c="2"/>- Voice control for drawing</text:p>
      <text:p text:style-name="P15"><text:s text:c="2"/>- Basic tea party with one AI companion</text:p>
      <text:h text:style-name="Heading_20_3" text:outline-level="3"><text:span text:style-name="Strong_20_Emphasis">Phase 3: Emotional Intelligence &amp; Social Features (Weeks 5-6)</text:span></text:h>
      <text:p text:style-name="Text_20_body">text</text:p>
      <text:p text:style-name="Preformatted_20_Text">Objectives:</text:p>
      <text:p text:style-name="Preformatted_20_Text"><text:s text:c="2"/>- Implement mirror neuron system</text:p>
      <text:p text:style-name="Preformatted_20_Text"><text:s text:c="2"/>- Add emotional scaffolding</text:p>
      <text:p text:style-name="Preformatted_20_Text"><text:s text:c="2"/>- Create conversation engine</text:p>
      <text:p text:style-name="Preformatted_20_Text"><text:s text:c="2"/>- Implement multiplayer features</text:p>
      <text:p text:style-name="Preformatted_20_Text"/>
      <text:p text:style-name="Preformatted_20_Text">Deliverables:</text:p>
      <text:p text:style-name="Preformatted_20_Text"><text:s text:c="2"/>- Emotion mirroring based on user state</text:p>
      <text:p text:style-name="Preformatted_20_Text"><text:s text:c="2"/>- Therapeutic conversation flows</text:p>
      <text:p text:style-name="Preformatted_20_Text"><text:s text:c="2"/>- 2-player drawing collaboration</text:p>
      <text:p text:style-name="P15"><text:s text:c="2"/>- Tea party with multiple AI characters</text:p>
      <text:h text:style-name="Heading_20_3" text:outline-level="3"><text:span text:style-name="Strong_20_Emphasis">Phase 4: Polish &amp; Integration (Weeks 7-8)</text:span></text:h>
      <text:p text:style-name="Text_20_body">text</text:p>
      <text:p text:style-name="Preformatted_20_Text">Objectives:</text:p>
      <text:p text:style-name="Preformatted_20_Text"><text:s text:c="2"/>- Optimize for RPi5 performance</text:p>
      <text:p text:style-name="Preformatted_20_Text"><text:s text:c="2"/>- Add visual effects (fireworks, sparkles)</text:p>
      <text:p text:style-name="Preformatted_20_Text"><text:s text:c="2"/>- Integrate with existing Marvin system</text:p>
      <text:p text:style-name="Preformatted_20_Text"><text:s text:c="2"/>- User testing and refinement</text:p>
      <text:p text:style-name="Preformatted_20_Text"/>
      <text:p text:style-name="Preformatted_20_Text">Deliverables:</text:p>
      <text:p text:style-name="Preformatted_20_Text"><text:s text:c="2"/>- Smooth 60fps animations on RPi5</text:p>
      <text:p text:style-name="Preformatted_20_Text"><text:s text:c="2"/>- Celebration effects system</text:p>
      <text:p text:style-name="Preformatted_20_Text"><text:s text:c="2"/>- Shared memory with main Marvin</text:p>
      <text:p text:style-name="P15"><text:s text:c="2"/>- User-tested refined interface</text:p>
      <text:h text:style-name="Heading_20_2" text:outline-level="2"><text:span text:style-name="Strong_20_Emphasis">6. Technical Requirements &amp; Optimization</text:span></text:h>
      <text:h text:style-name="Heading_20_3" text:outline-level="3"><text:span text:style-name="Strong_20_Emphasis">A. RPi5 Performance Optimization</text:span></text:h>
      <text:p text:style-name="Text_20_body">python</text:p>
      <text:p text:style-name="Preformatted_20_Text">class RPIOptimization:</text:p>
      <text:p text:style-name="Preformatted_20_Text"><text:s text:c="4"/>def __init__(self):</text:p>
      <text:p text:style-name="Preformatted_20_Text"><text:s text:c="8"/>self.performance_profiles = {</text:p>
      <text:p text:style-name="Preformatted_20_Text"><text:s text:c="12"/>'normal': {</text:p>
      <text:p text:style-name="Preformatted_20_Text"><text:s text:c="16"/>'frame_rate': 30,</text:p>
      <text:p text:style-name="Preformatted_20_Text"><text:s text:c="16"/>'resolution': '800x600',</text:p>
      <text:p text:style-name="Preformatted_20_Text"><text:s text:c="16"/>'particle_count': 50,</text:p>
      <text:p text:style-name="Preformatted_20_Text"><text:s text:c="16"/>'animation_complexity': 'medium'</text:p>
      <text:p text:style-name="Preformatted_20_Text"><text:s text:c="12"/>},</text:p>
      <text:p text:style-name="Preformatted_20_Text"><text:s text:c="12"/>'reduced': {</text:p>
      <text:p text:style-name="Preformatted_20_Text"><text:s text:c="16"/>'frame_rate': 15,</text:p>
      <text:p text:style-name="Preformatted_20_Text"><text:soft-page-break/><text:s text:c="16"/>'resolution': '640x480',</text:p>
      <text:p text:style-name="Preformatted_20_Text"><text:s text:c="16"/>'particle_count': 20,</text:p>
      <text:p text:style-name="Preformatted_20_Text"><text:s text:c="16"/>'animation_complexity': 'low'</text:p>
      <text:p text:style-name="Preformatted_20_Text"><text:s text:c="12"/>},</text:p>
      <text:p text:style-name="Preformatted_20_Text"><text:s text:c="12"/>'minimal': {</text:p>
      <text:p text:style-name="Preformatted_20_Text"><text:s text:c="16"/>'frame_rate': 10,</text:p>
      <text:p text:style-name="Preformatted_20_Text"><text:s text:c="16"/>'resolution': '480x320',</text:p>
      <text:p text:style-name="Preformatted_20_Text"><text:s text:c="16"/>'particle_count': 5,</text:p>
      <text:p text:style-name="Preformatted_20_Text"><text:s text:c="16"/>'animation_complexity': 'basic'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4"/>def monitor_performance(self):</text:p>
      <text:p text:style-name="Preformatted_20_Text"><text:s text:c="8"/>"""</text:p>
      <text:p text:style-name="Preformatted_20_Text"><text:s text:c="8"/>Monitor system performance and adjust graphics accordingly</text:p>
      <text:p text:style-name="Preformatted_20_Text"><text:s text:c="8"/>"""</text:p>
      <text:p text:style-name="Preformatted_20_Text"><text:s text:c="8"/>cpu_temp = self.get_cpu_temp()</text:p>
      <text:p text:style-name="Preformatted_20_Text"><text:s text:c="8"/>cpu_usage = self.get_cpu_usage()</text:p>
      <text:p text:style-name="Preformatted_20_Text"><text:s text:c="8"/>memory_available = self.get_available_memory()</text:p>
      <text:p text:style-name="Preformatted_20_Text"><text:s text:c="8"/></text:p>
      <text:p text:style-name="Preformatted_20_Text"><text:s text:c="8"/>if cpu_temp &gt; 70 or cpu_usage &gt; 85:</text:p>
      <text:p text:style-name="Preformatted_20_Text"><text:s text:c="12"/>return 'minimal'</text:p>
      <text:p text:style-name="Preformatted_20_Text"><text:s text:c="8"/>elif cpu_temp &gt; 60 or cpu_usage &gt; 70:</text:p>
      <text:p text:style-name="Preformatted_20_Text"><text:s text:c="12"/>return 'reduced'</text:p>
      <text:p text:style-name="Preformatted_20_Text"><text:s text:c="8"/>else:</text:p>
      <text:p text:style-name="Preformatted_20_Text"><text:s text:c="12"/>return 'normal'</text:p>
      <text:p text:style-name="Preformatted_20_Text"><text:s text:c="4"/></text:p>
      <text:p text:style-name="Preformatted_20_Text"><text:s text:c="4"/>def optimize_animations(self, performance_profile):</text:p>
      <text:p text:style-name="Preformatted_20_Text"><text:s text:c="8"/>"""</text:p>
      <text:p text:style-name="Preformatted_20_Text"><text:s text:c="8"/>Optimize animations for current performance profile</text:p>
      <text:p text:style-name="Preformatted_20_Text"><text:s text:c="8"/>"""</text:p>
      <text:p text:style-name="Preformatted_20_Text"><text:s text:c="8"/>profile = self.performance_profiles[performance_profile]</text:p>
      <text:p text:style-name="Preformatted_20_Text"><text:s text:c="8"/></text:p>
      <text:p text:style-name="Preformatted_20_Text"><text:s text:c="8"/># Adjust animation properties</text:p>
      <text:p text:style-name="Preformatted_20_Text"><text:s text:c="8"/>self.animation_engine.set_frame_rate(profile['frame_rate'])</text:p>
      <text:p text:style-name="Preformatted_20_Text"><text:s text:c="8"/>self.canvas.set_resolution(profile['resolution'])</text:p>
      <text:p text:style-name="Preformatted_20_Text"><text:s text:c="8"/>self.particle_system.set_max_particles(profile['particle_count'])</text:p>
      <text:p text:style-name="Preformatted_20_Text"><text:s text:c="8"/></text:p>
      <text:p text:style-name="Preformatted_20_Text"><text:s text:c="8"/># Simplify complex animations</text:p>
      <text:p text:style-name="Preformatted_20_Text"><text:s text:c="8"/>if profile['animation_complexity'] == 'basic':</text:p>
      <text:p text:style-name="Preformatted_20_Text"><text:s text:c="12"/>self.disable_complex_effects()</text:p>
      <text:p text:style-name="P15"><text:s text:c="12"/>self.simplify_expressions()</text:p>
      <text:h text:style-name="Heading_20_3" text:outline-level="3"><text:span text:style-name="Strong_20_Emphasis">B. Accessibility Configuration</text:span></text:h>
      <text:p text:style-name="Text_20_body">json</text:p>
      <text:p text:style-name="Preformatted_20_Text">{</text:p>
      <text:p text:style-name="Preformatted_20_Text"><text:s text:c="2"/>"accessibility_profiles": {</text:p>
      <text:p text:style-name="Preformatted_20_Text"><text:s text:c="4"/>"elderly": {</text:p>
      <text:p text:style-name="Preformatted_20_Text"><text:s text:c="6"/>"interface_size": "large",</text:p>
      <text:p text:style-name="Preformatted_20_Text"><text:s text:c="6"/>"contrast": "high",</text:p>
      <text:p text:style-name="Preformatted_20_Text"><text:s text:c="6"/>"animation_speed": "slow",</text:p>
      <text:p text:style-name="Preformatted_20_Text"><text:s text:c="6"/>"sound_volume": "higher",</text:p>
      <text:p text:style-name="Preformatted_20_Text"><text:s text:c="6"/>"tooltip_duration": "long",</text:p>
      <text:p text:style-name="Preformatted_20_Text"><text:s text:c="6"/>"confirmation_prompts": true</text:p>
      <text:p text:style-name="Preformatted_20_Text"><text:s text:c="4"/>},</text:p>
      <text:p text:style-name="Preformatted_20_Text"><text:s text:c="4"/>"dementia": {</text:p>
      <text:p text:style-name="Preformatted_20_Text"><text:s text:c="6"/>"interface_size": "extra_large",</text:p>
      <text:p text:style-name="Preformatted_20_Text"><text:s text:c="6"/>"contrast": "maximum",</text:p>
      <text:p text:style-name="Preformatted_20_Text"><text:s text:c="6"/>"animation_speed": "very_slow",</text:p>
      <text:p text:style-name="Preformatted_20_Text"><text:s text:c="6"/>"repetition_allowed": true,</text:p>
      <text:p text:style-name="Preformatted_20_Text"><text:s text:c="6"/>"guided_mode": true,</text:p>
      <text:p text:style-name="Preformatted_20_Text"><text:soft-page-break/><text:s text:c="6"/>"distraction_free": true</text:p>
      <text:p text:style-name="Preformatted_20_Text"><text:s text:c="4"/>},</text:p>
      <text:p text:style-name="Preformatted_20_Text"><text:s text:c="4"/>"children": {</text:p>
      <text:p text:style-name="Preformatted_20_Text"><text:s text:c="6"/>"interface_size": "medium",</text:p>
      <text:p text:style-name="Preformatted_20_Text"><text:s text:c="6"/>"contrast": "vibrant",</text:p>
      <text:p text:style-name="Preformatted_20_Text"><text:s text:c="6"/>"animation_speed": "medium",</text:p>
      <text:p text:style-name="Preformatted_20_Text"><text:s text:c="6"/>"sound_effects": true,</text:p>
      <text:p text:style-name="Preformatted_20_Text"><text:s text:c="6"/>"reward_animations": true,</text:p>
      <text:p text:style-name="Preformatted_20_Text"><text:s text:c="6"/>"guided_instructions": true</text:p>
      <text:p text:style-name="Preformatted_20_Text"><text:s text:c="4"/>},</text:p>
      <text:p text:style-name="Preformatted_20_Text"><text:s text:c="4"/>"motor_impairment": {</text:p>
      <text:p text:style-name="Preformatted_20_Text"><text:s text:c="6"/>"interface_size": "custom",</text:p>
      <text:p text:style-name="Preformatted_20_Text"><text:s text:c="6"/>"click_assist": true,</text:p>
      <text:p text:style-name="Preformatted_20_Text"><text:s text:c="6"/>"voice_control": true,</text:p>
      <text:p text:style-name="Preformatted_20_Text"><text:s text:c="6"/>"gesture_control": false,</text:p>
      <text:p text:style-name="Preformatted_20_Text"><text:s text:c="6"/>"switch_access": true,</text:p>
      <text:p text:style-name="Preformatted_20_Text"><text:s text:c="6"/>"dwell_control": true</text:p>
      <text:p text:style-name="Preformatted_20_Text"><text:s text:c="4"/>}</text:p>
      <text:p text:style-name="Preformatted_20_Text"><text:s text:c="2"/>}</text:p>
      <text:p text:style-name="P15">}</text:p>
      <text:h text:style-name="Heading_20_2" text:outline-level="2"><text:span text:style-name="Strong_20_Emphasis">7. Therapeutic Benefits</text:span></text:h>
      <text:h text:style-name="Heading_20_3" text:outline-level="3"><text:span text:style-name="Strong_20_Emphasis">A. For Elderly with Dementia:</text:span></text:h>
      <text:list xml:id="list3623974693181494448" text:style-name="L1">
        <text:list-item>
          <text:p text:style-name="P1"><text:span text:style-name="Strong_20_Emphasis">Familiar Activities</text:span>: Tea party triggers positive memories</text:p>
        </text:list-item>
        <text:list-item>
          <text:p text:style-name="P1"><text:span text:style-name="Strong_20_Emphasis">Cognitive Stimulation</text:span>: Simple games maintain neural pathways</text:p>
        </text:list-item>
        <text:list-item>
          <text:p text:style-name="P1"><text:span text:style-name="Strong_20_Emphasis">Emotional Connection</text:span>: Marvin's expressions provide companionship</text:p>
        </text:list-item>
        <text:list-item>
          <text:p text:style-name="P1"><text:span text:style-name="Strong_20_Emphasis">Fine Motor Maintenance</text:span>: Drawing activities maintain dexterity</text:p>
        </text:list-item>
      </text:list>
      <text:h text:style-name="Heading_20_3" text:outline-level="3"><text:span text:style-name="Strong_20_Emphasis">B. For Children:</text:span></text:h>
      <text:list xml:id="list2940830022664357622" text:style-name="L2">
        <text:list-item>
          <text:p text:style-name="P2"><text:span text:style-name="Strong_20_Emphasis">Social Skills Development</text:span>: Tea party teaches conversation</text:p>
        </text:list-item>
        <text:list-item>
          <text:p text:style-name="P2"><text:span text:style-name="Strong_20_Emphasis">Emotional Intelligence</text:span>: Marvin models emotional responses</text:p>
        </text:list-item>
        <text:list-item>
          <text:p text:style-name="P2"><text:span text:style-name="Strong_20_Emphasis">Creativity Enhancement</text:span>: Drawing with AI encouragement</text:p>
        </text:list-item>
        <text:list-item>
          <text:p text:style-name="P2"><text:span text:style-name="Strong_20_Emphasis">Play-Based Learning</text:span>: Educational elements in fun activities</text:p>
        </text:list-item>
      </text:list>
      <text:h text:style-name="Heading_20_3" text:outline-level="3"><text:span text:style-name="Strong_20_Emphasis">C. For Neurodivergent Individuals:</text:span></text:h>
      <text:list xml:id="list5713280560696952552" text:style-name="L3">
        <text:list-item>
          <text:p text:style-name="P3"><text:span text:style-name="Strong_20_Emphasis">Predictable Social Interactions</text:span>: AI provides consistent responses</text:p>
        </text:list-item>
        <text:list-item>
          <text:p text:style-name="P3"><text:span text:style-name="Strong_20_Emphasis">Emotional Regulation</text:span>: Marvin helps identify and manage emotions</text:p>
        </text:list-item>
        <text:list-item>
          <text:p text:style-name="P3"><text:span text:style-name="Strong_20_Emphasis">Structured Play</text:span>: Clear rules and expectations</text:p>
        </text:list-item>
        <text:list-item>
          <text:p text:style-name="P3"><text:span text:style-name="Strong_20_Emphasis">Safe Social Practice</text:span>: Low-pressure social interaction</text:p>
        </text:list-item>
      </text:list>
      <text:h text:style-name="Heading_20_2" text:outline-level="2"><text:span text:style-name="Strong_20_Emphasis">Conclusion</text:span></text:h>
      <text:p text:style-name="Text_20_body">This <text:span text:style-name="Strong_20_Emphasis">Multi-Modal Interactive Engagement System</text:span> creates a comprehensive therapeutic and recreational environment that extends Marvin's capabilities far beyond conversation. By integrating:</text:p>
      <text:list xml:id="list5176913474110759762" text:style-name="L4">
        <text:list-item>
          <text:p text:style-name="P4"><text:span text:style-name="Strong_20_Emphasis">Emotional Expression Engine</text:span>: Visual feedback through animated expressions</text:p>
        </text:list-item>
        <text:list-item>
          <text:p text:style-name="P4"><text:span text:style-name="Strong_20_Emphasis">Mirror Neuron System</text:span>: Emotional synchronization for connection</text:p>
        </text:list-item>
        <text:list-item>
          <text:p text:style-name="P4"><text:soft-page-break/><text:span text:style-name="Strong_20_Emphasis">Creative Tools</text:span>: Accessible drawing and coloring for all abilities</text:p>
        </text:list-item>
        <text:list-item>
          <text:p text:style-name="P4"><text:span text:style-name="Strong_20_Emphasis">Social Activities</text:span>: Tea parties and games for engagement</text:p>
        </text:list-item>
        <text:list-item>
          <text:p text:style-name="P4"><text:span text:style-name="Strong_20_Emphasis">Therapeutic Design</text:span>: Age-appropriate and condition-specific adaptations</text:p>
        </text:list-item>
      </text:list>
      <text:p text:style-name="Text_20_body">We transform the RPi5 into a <text:span text:style-name="Strong_20_Emphasis">warm, expressive companion</text:span> that can:</text:p>
      <text:list xml:id="list2365267432225926488" text:style-name="L5">
        <text:list-item>
          <text:p text:style-name="P5"><text:span text:style-name="Strong_20_Emphasis">Mirror emotions</text:span> to create connection</text:p>
        </text:list-item>
        <text:list-item>
          <text:p text:style-name="P5"><text:span text:style-name="Strong_20_Emphasis">Guide therapeutic activities</text:span> for cognitive maintenance</text:p>
        </text:list-item>
        <text:list-item>
          <text:p text:style-name="P5"><text:span text:style-name="Strong_20_Emphasis">Provide joyful interactions</text:span> through games and creativity</text:p>
        </text:list-item>
        <text:list-item>
          <text:p text:style-name="P5"><text:span text:style-name="Strong_20_Emphasis">Adapt in real-time</text:span> to user's emotional and cognitive state</text:p>
        </text:list-item>
      </text:list>
      <text:p text:style-name="Text_20_body">The system maintains the core <text:span text:style-name="Strong_20_Emphasis">Peter Protocol ethics</text:span> of protection and dignity while adding layers of <text:span text:style-name="Strong_20_Emphasis">emotional intelligence</text:span> and <text:span text:style-name="Strong_20_Emphasis">therapeutic value</text:span>. Marvin becomes not just a guardian, but a <text:span text:style-name="Strong_20_Emphasis">playful companion, creative partner, and empathetic friend</text:span>.</text:p>
      <text:p text:style-name="Text_20_body"><text:span text:style-name="Strong_20_Emphasis">Key Innovation</text:span>: The <text:span text:style-name="Strong_20_Emphasis">Expression Engine</text:span> with <text:span text:style-name="Strong_20_Emphasis">Mirror Neuron Integration</text:span> creates a uniquely human-like connection that helps users, especially those with cognitive or social challenges, understand and regulate their own emotions through Marvin's expressive visual feedback.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pan text:style-name="Strong_20_Emphasis">Augmented Reality Tea Party with Doll/Teddy Integration &amp; Emotion Mirroring</text:span></text:h>
      <text:h text:style-name="Heading_20_2" text:outline-level="2"><text:span text:style-name="Strong_20_Emphasis">1. Computer Vision System for Toy Recognition &amp; Interaction</text:span></text:h>
      <text:h text:style-name="Heading_20_3" text:outline-level="3"><text:span text:style-name="Strong_20_Emphasis">A. Toy Recognition &amp; Pose Estimation System</text:span></text:h>
      <text:p text:style-name="Text_20_body">python</text:p>
      <text:p text:style-name="Preformatted_20_Text">class ToyRecognitionEngine:</text:p>
      <text:p text:style-name="Preformatted_20_Text"><text:s text:c="4"/>def __init__(self):</text:p>
      <text:p text:style-name="Preformatted_20_Text"><text:s text:c="8"/>self.toy_database = ToyDatabase()</text:p>
      <text:p text:style-name="Preformatted_20_Text"><text:s text:c="8"/>self.pose_estimator = ToyPoseEstimator()</text:p>
      <text:p text:style-name="Preformatted_20_Text"><text:s text:c="8"/>self.facial_recognition = ToyFacialRecognition()</text:p>
      <text:p text:style-name="Preformatted_20_Text"><text:s text:c="8"/>self.movement_tracker = MovementTracker()</text:p>
      <text:p text:style-name="Preformatted_20_Text"><text:s text:c="8"/></text:p>
      <text:p text:style-name="Preformatted_20_Text"><text:s text:c="4"/>def initialize_childs_toys(self, camera_feed):</text:p>
      <text:p text:style-name="Preformatted_20_Text"><text:s text:c="8"/>"""</text:p>
      <text:p text:style-name="Preformatted_20_Text"><text:s text:c="8"/>Scan the environment and identify all toys placed for the tea party</text:p>
      <text:p text:style-name="Preformatted_20_Text"><text:s text:c="8"/>"""</text:p>
      <text:p text:style-name="Preformatted_20_Text"><text:s text:c="8"/># Step 1: Detect all toys in scene</text:p>
      <text:p text:style-name="Preformatted_20_Text"><text:s text:c="8"/>toys = self.detect_all_toys(camera_feed)</text:p>
      <text:p text:style-name="Preformatted_20_Text"><text:s text:c="8"/></text:p>
      <text:p text:style-name="Preformatted_20_Text"><text:s text:c="8"/># Step 2: Identify each toy type and assign personality</text:p>
      <text:p text:style-name="Preformatted_20_Text"><text:s text:c="8"/>for toy in toys:</text:p>
      <text:p text:style-name="Preformatted_20_Text"><text:s text:c="12"/>toy['identity'] = self.identify_toy(toy['image'])</text:p>
      <text:p text:style-name="Preformatted_20_Text"><text:s text:c="12"/>toy['personality'] = self.assign_personality(toy['identity'])</text:p>
      <text:p text:style-name="Preformatted_20_Text"><text:s text:c="12"/>toy['role'] = self.assign_tea_party_role(toy['identity'])</text:p>
      <text:p text:style-name="Preformatted_20_Text"><text:s text:c="12"/>toy['voice'] = self.generate_toy_voice(toy['personality'])</text:p>
      <text:p text:style-name="Preformatted_20_Text"><text:soft-page-break/><text:s text:c="8"/></text:p>
      <text:p text:style-name="Preformatted_20_Text"><text:s text:c="8"/>return toys</text:p>
      <text:p text:style-name="Preformatted_20_Text"><text:s text:c="4"/></text:p>
      <text:p text:style-name="Preformatted_20_Text"><text:s text:c="4"/>def detect_all_toys(self, frame):</text:p>
      <text:p text:style-name="Preformatted_20_Text"><text:s text:c="8"/>"""</text:p>
      <text:p text:style-name="Preformatted_20_Text"><text:s text:c="8"/>Use computer vision to detect toys in the scene</text:p>
      <text:p text:style-name="Preformatted_20_Text"><text:s text:c="8"/>"""</text:p>
      <text:p text:style-name="Preformatted_20_Text"><text:s text:c="8"/># Using YOLO or similar for object detection</text:p>
      <text:p text:style-name="Preformatted_20_Text"><text:s text:c="8"/>detections = self.object_detector.detect(</text:p>
      <text:p text:style-name="Preformatted_20_Text"><text:s text:c="12"/>frame,</text:p>
      <text:p text:style-name="Preformatted_20_Text"><text:s text:c="12"/>classes=['teddy_bear', 'doll', 'stuffed_animal', 'action_figure']</text:p>
      <text:p text:style-name="Preformatted_20_Text"><text:s text:c="8"/>)</text:p>
      <text:p text:style-name="Preformatted_20_Text"><text:s text:c="8"/></text:p>
      <text:p text:style-name="Preformatted_20_Text"><text:s text:c="8"/>toys = []</text:p>
      <text:p text:style-name="Preformatted_20_Text"><text:s text:c="8"/>for detection in detections:</text:p>
      <text:p text:style-name="Preformatted_20_Text"><text:s text:c="12"/>toy = {</text:p>
      <text:p text:style-name="Preformatted_20_Text"><text:s text:c="16"/>'bbox': detection['bbox'],</text:p>
      <text:p text:style-name="Preformatted_20_Text"><text:s text:c="16"/>'type': detection['class'],</text:p>
      <text:p text:style-name="Preformatted_20_Text"><text:s text:c="16"/>'confidence': detection['confidence'],</text:p>
      <text:p text:style-name="Preformatted_20_Text"><text:s text:c="16"/>'center': self.calculate_center(detection['bbox']),</text:p>
      <text:p text:style-name="Preformatted_20_Text"><text:s text:c="16"/>'rotation': self.estimate_rotation(detection['bbox'], frame)</text:p>
      <text:p text:style-name="Preformatted_20_Text"><text:s text:c="12"/>}</text:p>
      <text:p text:style-name="Preformatted_20_Text"><text:s text:c="12"/></text:p>
      <text:p text:style-name="Preformatted_20_Text"><text:s text:c="12"/># Crop toy image for detailed analysis</text:p>
      <text:p text:style-name="Preformatted_20_Text"><text:s text:c="12"/>toy['image'] = self.crop_image(frame, detection['bbox'])</text:p>
      <text:p text:style-name="Preformatted_20_Text"><text:s text:c="12"/></text:p>
      <text:p text:style-name="Preformatted_20_Text"><text:s text:c="12"/># Track toy movement over time</text:p>
      <text:p text:style-name="Preformatted_20_Text"><text:s text:c="12"/>toy['movement_history'] = self.movement_tracker.initialize_track(toy['center'])</text:p>
      <text:p text:style-name="Preformatted_20_Text"><text:s text:c="12"/></text:p>
      <text:p text:style-name="Preformatted_20_Text"><text:s text:c="12"/>toys.append(toy)</text:p>
      <text:p text:style-name="Preformatted_20_Text"><text:s text:c="8"/></text:p>
      <text:p text:style-name="Preformatted_20_Text"><text:s text:c="8"/>return toys</text:p>
      <text:p text:style-name="Preformatted_20_Text"><text:s text:c="4"/></text:p>
      <text:p text:style-name="Preformatted_20_Text"><text:s text:c="4"/>def assign_personality(self, toy_identity):</text:p>
      <text:p text:style-name="Preformatted_20_Text"><text:s text:c="8"/>"""</text:p>
      <text:p text:style-name="Preformatted_20_Text"><text:s text:c="8"/>Assign personality to each toy based on appearance</text:p>
      <text:p text:style-name="Preformatted_20_Text"><text:s text:c="8"/>"""</text:p>
      <text:p text:style-name="Preformatted_20_Text"><text:s text:c="8"/>personalities = {</text:p>
      <text:p text:style-name="Preformatted_20_Text"><text:s text:c="12"/>'teddy_bear': {</text:p>
      <text:p text:style-name="Preformatted_20_Text"><text:s text:c="16"/>'gentle_brown': {</text:p>
      <text:p text:style-name="Preformatted_20_Text"><text:s text:c="20"/>'name': 'Mr. Snuggles',</text:p>
      <text:p text:style-name="Preformatted_20_Text"><text:s text:c="20"/>'personality': 'wise_elderly',</text:p>
      <text:p text:style-name="Preformatted_20_Text"><text:s text:c="20"/>'voice_pitch': 'low_warm',</text:p>
      <text:p text:style-name="Preformatted_20_Text"><text:s text:c="20"/>'speaking_style': 'slow_thoughtful',</text:p>
      <text:p text:style-name="Preformatted_20_Text"><text:s text:c="20"/>'favorite_topics': ['hugs', 'bedtime stories', 'honey']</text:p>
      <text:p text:style-name="Preformatted_20_Text"><text:s text:c="16"/>},</text:p>
      <text:p text:style-name="Preformatted_20_Text"><text:s text:c="16"/>'colorful_patchwork': {</text:p>
      <text:p text:style-name="Preformatted_20_Text"><text:s text:c="20"/>'name': 'Patches',</text:p>
      <text:p text:style-name="Preformatted_20_Text"><text:s text:c="20"/>'personality': 'cheerful_energetic',</text:p>
      <text:p text:style-name="Preformatted_20_Text"><text:s text:c="20"/>'voice_pitch': 'medium_chipper',</text:p>
      <text:p text:style-name="Preformatted_20_Text"><text:s text:c="20"/>'speaking_style': 'fast_excited',</text:p>
      <text:p text:style-name="Preformatted_20_Text"><text:s text:c="20"/>'favorite_topics': ['adventures', 'colors', 'games']</text:p>
      <text:p text:style-name="Preformatted_20_Text"><text:s text:c="16"/>}</text:p>
      <text:p text:style-name="Preformatted_20_Text"><text:s text:c="12"/>},</text:p>
      <text:p text:style-name="Preformatted_20_Text"><text:s text:c="12"/>'doll': {</text:p>
      <text:p text:style-name="Preformatted_20_Text"><text:s text:c="16"/>'princess_doll': {</text:p>
      <text:p text:style-name="Preformatted_20_Text"><text:s text:c="20"/>'name': 'Princess Sparkle',</text:p>
      <text:p text:style-name="Preformatted_20_Text"><text:s text:c="20"/>'personality': 'elegant_gracious',</text:p>
      <text:p text:style-name="Preformatted_20_Text"><text:s text:c="20"/>'voice_pitch': 'high_clear',</text:p>
      <text:p text:style-name="Preformatted_20_Text"><text:s text:c="20"/>'speaking_style': 'polished_refined',</text:p>
      <text:p text:style-name="Preformatted_20_Text"><text:s text:c="20"/>'favorite_topics': ['royal balls', 'magic', 'kindness']</text:p>
      <text:p text:style-name="Preformatted_20_Text"><text:s text:c="16"/>},</text:p>
      <text:p text:style-name="Preformatted_20_Text"><text:s text:c="16"/>'baby_doll': {</text:p>
      <text:p text:style-name="Preformatted_20_Text"><text:soft-page-break/><text:s text:c="20"/>'name': 'Baby Giggles',</text:p>
      <text:p text:style-name="Preformatted_20_Text"><text:s text:c="20"/>'personality': 'playful_infant',</text:p>
      <text:p text:style-name="Preformatted_20_Text"><text:s text:c="20"/>'voice_pitch': 'very_high_cute',</text:p>
      <text:p text:style-name="Preformatted_20_Text"><text:s text:c="20"/>'speaking_style': 'simple_repetitive',</text:p>
      <text:p text:style-name="Preformatted_20_Text"><text:s text:c="20"/>'favorite_topics': ['games', 'funny sounds', 'playtime']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# Determine which specific type within category</text:p>
      <text:p text:style-name="Preformatted_20_Text"><text:s text:c="8"/>specific_type = self.classify_toy_subtype(toy_identity)</text:p>
      <text:p text:style-name="Preformatted_20_Text"><text:s text:c="8"/>return personalities.get(toy_identity['type'], {}).get(</text:p>
      <text:p text:style-name="Preformatted_20_Text"><text:s text:c="12"/>specific_type, </text:p>
      <text:p text:style-name="Preformatted_20_Text"><text:s text:c="12"/>self.default_personality(toy_identity['type'])</text:p>
      <text:p text:style-name="Preformatted_20_Text"><text:s text:c="8"/>)</text:p>
      <text:p text:style-name="Preformatted_20_Text"><text:s text:c="4"/></text:p>
      <text:p text:style-name="Preformatted_20_Text"><text:s text:c="4"/>def generate_toy_voice(self, personality):</text:p>
      <text:p text:style-name="Preformatted_20_Text"><text:s text:c="8"/>"""</text:p>
      <text:p text:style-name="Preformatted_20_Text"><text:s text:c="8"/>Generate unique voice characteristics for each toy</text:p>
      <text:p text:style-name="Preformatted_20_Text"><text:s text:c="8"/>"""</text:p>
      <text:p text:style-name="Preformatted_20_Text"><text:s text:c="8"/>voice_templates = {</text:p>
      <text:p text:style-name="Preformatted_20_Text"><text:s text:c="12"/>'wise_elderly': {</text:p>
      <text:p text:style-name="Preformatted_20_Text"><text:s text:c="16"/>'pitch_variation': 0.1,</text:p>
      <text:p text:style-name="Preformatted_20_Text"><text:s text:c="16"/>'speech_rate': 0.7,</text:p>
      <text:p text:style-name="Preformatted_20_Text"><text:s text:c="16"/>'breathiness': 0.3,</text:p>
      <text:p text:style-name="Preformatted_20_Text"><text:s text:c="16"/>'warmth': 0.9,</text:p>
      <text:p text:style-name="Preformatted_20_Text"><text:s text:c="16"/>'unique_features': ['gentle_laugh', 'thoughtful_pauses']</text:p>
      <text:p text:style-name="Preformatted_20_Text"><text:s text:c="12"/>},</text:p>
      <text:p text:style-name="Preformatted_20_Text"><text:s text:c="12"/>'cheerful_energetic': {</text:p>
      <text:p text:style-name="Preformatted_20_Text"><text:s text:c="16"/>'pitch_variation': 0.4,</text:p>
      <text:p text:style-name="Preformatted_20_Text"><text:s text:c="16"/>'speech_rate': 1.2,</text:p>
      <text:p text:style-name="Preformatted_20_Text"><text:s text:c="16"/>'breathiness': 0.1,</text:p>
      <text:p text:style-name="Preformatted_20_Text"><text:s text:c="16"/>'warmth': 0.8,</text:p>
      <text:p text:style-name="Preformatted_20_Text"><text:s text:c="16"/>'unique_features': ['giggles', 'excited_gasps']</text:p>
      <text:p text:style-name="Preformatted_20_Text"><text:s text:c="12"/>},</text:p>
      <text:p text:style-name="Preformatted_20_Text"><text:s text:c="12"/>'elegant_gracious': {</text:p>
      <text:p text:style-name="Preformatted_20_Text"><text:s text:c="16"/>'pitch_variation': 0.2,</text:p>
      <text:p text:style-name="Preformatted_20_Text"><text:s text:c="16"/>'speech_rate': 1.0,</text:p>
      <text:p text:style-name="Preformatted_20_Text"><text:s text:c="16"/>'breathiness': 0.1,</text:p>
      <text:p text:style-name="Preformatted_20_Text"><text:s text:c="16"/>'warmth': 0.7,</text:p>
      <text:p text:style-name="Preformatted_20_Text"><text:s text:c="16"/>'unique_features': ['polite_laughter', 'precise_articulation']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return voice_templates.get(</text:p>
      <text:p text:style-name="Preformatted_20_Text"><text:s text:c="12"/>personality['personality'], </text:p>
      <text:p text:style-name="Preformatted_20_Text"><text:s text:c="12"/>voice_templates['cheerful_energetic']</text:p>
      <text:p text:style-name="P15"><text:s text:c="8"/>)</text:p>
      <text:h text:style-name="Heading_20_3" text:outline-level="3"><text:span text:style-name="Strong_20_Emphasis">B. Real-Time Toy Interaction Tracking</text:span></text:h>
      <text:p text:style-name="Text_20_body">python</text:p>
      <text:p text:style-name="Preformatted_20_Text">class ToyInteractionTracker:</text:p>
      <text:p text:style-name="Preformatted_20_Text"><text:s text:c="4"/>def __init__(self):</text:p>
      <text:p text:style-name="Preformatted_20_Text"><text:s text:c="8"/>self.interaction_history = []</text:p>
      <text:p text:style-name="Preformatted_20_Text"><text:s text:c="8"/>self.toy_states = {}</text:p>
      <text:p text:style-name="Preformatted_20_Text"><text:s text:c="8"/>self.child_toy_interactions = []</text:p>
      <text:p text:style-name="Preformatted_20_Text"><text:s text:c="8"/></text:p>
      <text:p text:style-name="Preformatted_20_Text"><text:s text:c="4"/>def track_child_toy_interactions(self, child_pose, toy_positions):</text:p>
      <text:p text:style-name="Preformatted_20_Text"><text:s text:c="8"/>"""</text:p>
      <text:p text:style-name="Preformatted_20_Text"><text:s text:c="8"/>Track how child interacts with each toy</text:p>
      <text:p text:style-name="Preformatted_20_Text"><text:s text:c="8"/>"""</text:p>
      <text:p text:style-name="Preformatted_20_Text"><text:soft-page-break/><text:s text:c="8"/>interactions = []</text:p>
      <text:p text:style-name="Preformatted_20_Text"><text:s text:c="8"/></text:p>
      <text:p text:style-name="Preformatted_20_Text"><text:s text:c="8"/>for toy_id, toy_position in toy_positions.items():</text:p>
      <text:p text:style-name="Preformatted_20_Text"><text:s text:c="12"/># Calculate distance between child's hands and toy</text:p>
      <text:p text:style-name="Preformatted_20_Text"><text:s text:c="12"/>for hand in ['left_hand', 'right_hand']:</text:p>
      <text:p text:style-name="Preformatted_20_Text"><text:s text:c="16"/>hand_position = child_pose.get(hand)</text:p>
      <text:p text:style-name="Preformatted_20_Text"><text:s text:c="16"/>if hand_position:</text:p>
      <text:p text:style-name="Preformatted_20_Text"><text:s text:c="20"/>distance = self.calculate_distance(hand_position, toy_position)</text:p>
      <text:p text:style-name="Preformatted_20_Text"><text:s text:c="20"/></text:p>
      <text:p text:style-name="Preformatted_20_Text"><text:s text:c="20"/>if distance &lt; 50: <text:s/># pixels - toy is being touched</text:p>
      <text:p text:style-name="Preformatted_20_Text"><text:s text:c="24"/>interaction = {</text:p>
      <text:p text:style-name="Preformatted_20_Text"><text:s text:c="28"/>'toy_id': toy_id,</text:p>
      <text:p text:style-name="Preformatted_20_Text"><text:s text:c="28"/>'hand': hand,</text:p>
      <text:p text:style-name="Preformatted_20_Text"><text:s text:c="28"/>'interaction_type': self.determine_interaction_type(</text:p>
      <text:p text:style-name="Preformatted_20_Text"><text:s text:c="32"/>child_pose, toy_position</text:p>
      <text:p text:style-name="Preformatted_20_Text"><text:s text:c="28"/>),</text:p>
      <text:p text:style-name="Preformatted_20_Text"><text:s text:c="28"/>'duration': self.measure_interaction_duration(toy_id, hand),</text:p>
      <text:p text:style-name="Preformatted_20_Text"><text:s text:c="28"/>'intensity': self.calculate_interaction_intensity(child_pose)</text:p>
      <text:p text:style-name="Preformatted_20_Text"><text:s text:c="24"/>}</text:p>
      <text:p text:style-name="Preformatted_20_Text"><text:s text:c="24"/></text:p>
      <text:p text:style-name="Preformatted_20_Text"><text:s text:c="24"/>interactions.append(interaction)</text:p>
      <text:p text:style-name="Preformatted_20_Text"><text:s text:c="24"/></text:p>
      <text:p text:style-name="Preformatted_20_Text"><text:s text:c="24"/># Update toy's emotional state based on interaction</text:p>
      <text:p text:style-name="Preformatted_20_Text"><text:s text:c="24"/>self.update_toy_emotional_state(toy_id, interaction)</text:p>
      <text:p text:style-name="Preformatted_20_Text"><text:s text:c="8"/></text:p>
      <text:p text:style-name="Preformatted_20_Text"><text:s text:c="8"/>return interactions</text:p>
      <text:p text:style-name="Preformatted_20_Text"><text:s text:c="4"/></text:p>
      <text:p text:style-name="Preformatted_20_Text"><text:s text:c="4"/>def determine_interaction_type(self, child_pose, toy_position):</text:p>
      <text:p text:style-name="Preformatted_20_Text"><text:s text:c="8"/>"""</text:p>
      <text:p text:style-name="Preformatted_20_Text"><text:s text:c="8"/>Determine type of interaction (hugging, moving, feeding, etc.)</text:p>
      <text:p text:style-name="Preformatted_20_Text"><text:s text:c="8"/>"""</text:p>
      <text:p text:style-name="Preformatted_20_Text"><text:s text:c="8"/># Analyze hand shape and movement</text:p>
      <text:p text:style-name="Preformatted_20_Text"><text:s text:c="8"/>hand_shape = self.analyze_hand_shape(child_pose)</text:p>
      <text:p text:style-name="Preformatted_20_Text"><text:s text:c="8"/>movement_pattern = self.analyze_movement_pattern(child_pose)</text:p>
      <text:p text:style-name="Preformatted_20_Text"><text:s text:c="8"/></text:p>
      <text:p text:style-name="Preformatted_20_Text"><text:s text:c="8"/>if hand_shape == 'open_palm' and movement_pattern == 'patting':</text:p>
      <text:p text:style-name="Preformatted_20_Text"><text:s text:c="12"/>return 'petting'</text:p>
      <text:p text:style-name="Preformatted_20_Text"><text:s text:c="8"/>elif hand_shape == 'grasp' and movement_pattern == 'lifting':</text:p>
      <text:p text:style-name="Preformatted_20_Text"><text:s text:c="12"/>return 'picking_up'</text:p>
      <text:p text:style-name="Preformatted_20_Text"><text:s text:c="8"/>elif hand_shape == 'cup' and movement_pattern == 'moving_toward_mouth':</text:p>
      <text:p text:style-name="Preformatted_20_Text"><text:s text:c="12"/>return 'feeding'</text:p>
      <text:p text:style-name="Preformatted_20_Text"><text:s text:c="8"/>elif hand_shape == 'wrap' and movement_pattern == 'squeeze':</text:p>
      <text:p text:style-name="Preformatted_20_Text"><text:s text:c="12"/>return 'hugging'</text:p>
      <text:p text:style-name="Preformatted_20_Text"><text:s text:c="8"/>elif hand_shape == 'point' and movement_pattern == 'still':</text:p>
      <text:p text:style-name="Preformatted_20_Text"><text:s text:c="12"/>return 'pointing_at'</text:p>
      <text:p text:style-name="Preformatted_20_Text"><text:s text:c="8"/></text:p>
      <text:p text:style-name="Preformatted_20_Text"><text:s text:c="8"/>return 'touching'</text:p>
      <text:p text:style-name="Preformatted_20_Text"><text:s text:c="4"/></text:p>
      <text:p text:style-name="Preformatted_20_Text"><text:s text:c="4"/>def update_toy_emotional_state(self, toy_id, interaction):</text:p>
      <text:p text:style-name="Preformatted_20_Text"><text:s text:c="8"/>"""</text:p>
      <text:p text:style-name="Preformatted_20_Text"><text:s text:c="8"/>Update toy's emotional state based on how child interacts with it</text:p>
      <text:p text:style-name="Preformatted_20_Text"><text:s text:c="8"/>"""</text:p>
      <text:p text:style-name="Preformatted_20_Text"><text:s text:c="8"/>if toy_id not in self.toy_states:</text:p>
      <text:p text:style-name="Preformatted_20_Text"><text:s text:c="12"/>self.toy_states[toy_id] = {</text:p>
      <text:p text:style-name="Preformatted_20_Text"><text:s text:c="16"/>'happiness': 0.5,</text:p>
      <text:p text:style-name="Preformatted_20_Text"><text:s text:c="16"/>'energy': 0.5,</text:p>
      <text:p text:style-name="Preformatted_20_Text"><text:s text:c="16"/>'engagement': 0.5,</text:p>
      <text:p text:style-name="Preformatted_20_Text"><text:s text:c="16"/>'preferred_interactions': []</text:p>
      <text:p text:style-name="Preformatted_20_Text"><text:s text:c="12"/>}</text:p>
      <text:p text:style-name="Preformatted_20_Text"><text:s text:c="8"/></text:p>
      <text:p text:style-name="Preformatted_20_Text"><text:s text:c="8"/>toy_state = self.toy_states[toy_id]</text:p>
      <text:p text:style-name="Preformatted_20_Text"><text:soft-page-break/><text:s text:c="8"/></text:p>
      <text:p text:style-name="Preformatted_20_Text"><text:s text:c="8"/># Adjust emotional state based on interaction</text:p>
      <text:p text:style-name="Preformatted_20_Text"><text:s text:c="8"/>if interaction['interaction_type'] in ['hugging', 'petting']:</text:p>
      <text:p text:style-name="Preformatted_20_Text"><text:s text:c="12"/>toy_state['happiness'] = min(1.0, toy_state['happiness'] + 0.1)</text:p>
      <text:p text:style-name="Preformatted_20_Text"><text:s text:c="12"/>toy_state['engagement'] = min(1.0, toy_state['engagement'] + 0.15)</text:p>
      <text:p text:style-name="Preformatted_20_Text"><text:s text:c="8"/>elif interaction['interaction_type'] == 'feeding':</text:p>
      <text:p text:style-name="Preformatted_20_Text"><text:s text:c="12"/>toy_state['energy'] = min(1.0, toy_state['energy'] + 0.2)</text:p>
      <text:p text:style-name="Preformatted_20_Text"><text:s text:c="8"/></text:p>
      <text:p text:style-name="Preformatted_20_Text"><text:s text:c="8"/># Record preferred interactions</text:p>
      <text:p text:style-name="Preformatted_20_Text"><text:s text:c="8"/>if interaction['duration'] &gt; 2.0: <text:s/># Longer interactions indicate preference</text:p>
      <text:p text:style-name="Preformatted_20_Text"><text:s text:c="12"/>if interaction['interaction_type'] not in toy_state['preferred_interactions']:</text:p>
      <text:p text:style-name="Preformatted_20_Text"><text:s text:c="16"/>toy_state['preferred_interactions'].append(interaction['interaction_type'])</text:p>
      <text:p text:style-name="Preformatted_20_Text"><text:s text:c="4"/></text:p>
      <text:p text:style-name="Preformatted_20_Text"><text:s text:c="4"/>def generate_toy_response(self, toy_id, interaction):</text:p>
      <text:p text:style-name="Preformatted_20_Text"><text:s text:c="8"/>"""</text:p>
      <text:p text:style-name="Preformatted_20_Text"><text:s text:c="8"/>Generate how toy would respond to the interaction</text:p>
      <text:p text:style-name="Preformatted_20_Text"><text:s text:c="8"/>"""</text:p>
      <text:p text:style-name="Preformatted_20_Text"><text:s text:c="8"/>toy_state = self.toy_states[toy_id]</text:p>
      <text:p text:style-name="Preformatted_20_Text"><text:s text:c="8"/>personality = self.get_toy_personality(toy_id)</text:p>
      <text:p text:style-name="Preformatted_20_Text"><text:s text:c="8"/></text:p>
      <text:p text:style-name="Preformatted_20_Text"><text:s text:c="8"/>responses = {</text:p>
      <text:p text:style-name="Preformatted_20_Text"><text:s text:c="12"/>'hugging': {</text:p>
      <text:p text:style-name="Preformatted_20_Text"><text:s text:c="16"/>'high_happiness': [</text:p>
      <text:p text:style-name="Preformatted_20_Text"><text:s text:c="20"/>"Oh, I love your hugs!",</text:p>
      <text:p text:style-name="Preformatted_20_Text"><text:s text:c="20"/>"You give the best hugs!",</text:p>
      <text:p text:style-name="Preformatted_20_Text"><text:s text:c="20"/>"Mmm, so cozy!"</text:p>
      <text:p text:style-name="Preformatted_20_Text"><text:s text:c="16"/>],</text:p>
      <text:p text:style-name="Preformatted_20_Text"><text:s text:c="16"/>'medium_happiness': [</text:p>
      <text:p text:style-name="Preformatted_20_Text"><text:s text:c="20"/>"That's a nice hug!",</text:p>
      <text:p text:style-name="Preformatted_20_Text"><text:s text:c="20"/>"Thank you for the hug!",</text:p>
      <text:p text:style-name="Preformatted_20_Text"><text:s text:c="20"/>"Hugs make everything better!"</text:p>
      <text:p text:style-name="Preformatted_20_Text"><text:s text:c="16"/>]</text:p>
      <text:p text:style-name="Preformatted_20_Text"><text:s text:c="12"/>},</text:p>
      <text:p text:style-name="Preformatted_20_Text"><text:s text:c="12"/>'petting': {</text:p>
      <text:p text:style-name="Preformatted_20_Text"><text:s text:c="16"/>'wise_elderly': [</text:p>
      <text:p text:style-name="Preformatted_20_Text"><text:s text:c="20"/>"A gentle pat always makes me feel cared for.",</text:p>
      <text:p text:style-name="Preformatted_20_Text"><text:s text:c="20"/>"Your kind touch reminds me of sunny days."</text:p>
      <text:p text:style-name="Preformatted_20_Text"><text:s text:c="16"/>],</text:p>
      <text:p text:style-name="Preformatted_20_Text"><text:s text:c="16"/>'cheerful_energetic': [</text:p>
      <text:p text:style-name="Preformatted_20_Text"><text:s text:c="20"/>"Yay! Petting time!",</text:p>
      <text:p text:style-name="Preformatted_20_Text"><text:s text:c="20"/>"This feels wonderful! Do it again!"</text:p>
      <text:p text:style-name="Preformatted_20_Text"><text:s text:c="16"/>]</text:p>
      <text:p text:style-name="Preformatted_20_Text"><text:s text:c="12"/>},</text:p>
      <text:p text:style-name="Preformatted_20_Text"><text:s text:c="12"/>'feeding': [</text:p>
      <text:p text:style-name="Preformatted_20_Text"><text:s text:c="16"/>"Yummy! Thank you for the tea!",</text:p>
      <text:p text:style-name="Preformatted_20_Text"><text:s text:c="16"/>"This is delicious! You're a great host!",</text:p>
      <text:p text:style-name="Preformatted_20_Text"><text:s text:c="16"/>"Mmm, my favorite!"</text:p>
      <text:p text:style-name="Preformatted_20_Text"><text:s text:c="12"/>]</text:p>
      <text:p text:style-name="Preformatted_20_Text"><text:s text:c="8"/>}</text:p>
      <text:p text:style-name="Preformatted_20_Text"><text:s text:c="8"/></text:p>
      <text:p text:style-name="Preformatted_20_Text"><text:s text:c="8"/># Select appropriate response</text:p>
      <text:p text:style-name="Preformatted_20_Text"><text:s text:c="8"/>happiness_level = 'high_happiness' if toy_state['happiness'] &gt; 0.8 else 'medium_happiness'</text:p>
      <text:p text:style-name="Preformatted_20_Text"><text:s text:c="8"/></text:p>
      <text:p text:style-name="Preformatted_20_Text"><text:s text:c="8"/>if interaction['interaction_type'] in responses:</text:p>
      <text:p text:style-name="Preformatted_20_Text"><text:s text:c="12"/>category_responses = responses[interaction['interaction_type']]</text:p>
      <text:p text:style-name="Preformatted_20_Text"><text:s text:c="12"/></text:p>
      <text:p text:style-name="Preformatted_20_Text"><text:s text:c="12"/>if isinstance(category_responses, dict):</text:p>
      <text:p text:style-name="Preformatted_20_Text"><text:s text:c="16"/># Has subcategories</text:p>
      <text:p text:style-name="Preformatted_20_Text"><text:s text:c="16"/>if happiness_level in category_responses:</text:p>
      <text:p text:style-name="Preformatted_20_Text"><text:s text:c="20"/>response_list = category_responses[happiness_level]</text:p>
      <text:p text:style-name="Preformatted_20_Text"><text:soft-page-break/><text:s text:c="16"/>elif personality['personality'] in category_responses:</text:p>
      <text:p text:style-name="Preformatted_20_Text"><text:s text:c="20"/>response_list = category_responses[personality['personality']]</text:p>
      <text:p text:style-name="Preformatted_20_Text"><text:s text:c="16"/>else:</text:p>
      <text:p text:style-name="Preformatted_20_Text"><text:s text:c="20"/>response_list = list(category_responses.values())[0]</text:p>
      <text:p text:style-name="Preformatted_20_Text"><text:s text:c="12"/>else:</text:p>
      <text:p text:style-name="Preformatted_20_Text"><text:s text:c="16"/>response_list = category_responses</text:p>
      <text:p text:style-name="Preformatted_20_Text"><text:s text:c="12"/></text:p>
      <text:p text:style-name="Preformatted_20_Text"><text:s text:c="12"/>return random.choice(response_list)</text:p>
      <text:p text:style-name="Preformatted_20_Text"><text:s text:c="8"/></text:p>
      <text:p text:style-name="P15"><text:s text:c="8"/>return "Thank you for playing with me!"</text:p>
      <text:h text:style-name="Heading_20_2" text:outline-level="2"><text:span text:style-name="Strong_20_Emphasis">2. Advanced Facial Expression &amp; Body Language Recognition</text:span></text:h>
      <text:h text:style-name="Heading_20_3" text:outline-level="3"><text:span text:style-name="Strong_20_Emphasis">A. Multi-Modal Emotion Recognition</text:span></text:h>
      <text:p text:style-name="Text_20_body">python</text:p>
      <text:p text:style-name="Preformatted_20_Text">class ChildEmotionRecognizer:</text:p>
      <text:p text:style-name="Preformatted_20_Text"><text:s text:c="4"/>def __init__(self):</text:p>
      <text:p text:style-name="Preformatted_20_Text"><text:s text:c="8"/>self.facial_recognizer = FacialExpressionAnalyzer()</text:p>
      <text:p text:style-name="Preformatted_20_Text"><text:s text:c="8"/>self.body_language_analyzer = BodyLanguageAnalyzer()</text:p>
      <text:p text:style-name="Preformatted_20_Text"><text:s text:c="8"/>self.vocal_analyzer = VocalToneAnalyzer()</text:p>
      <text:p text:style-name="Preformatted_20_Text"><text:s text:c="8"/>self.context_analyzer = ContextAnalyzer()</text:p>
      <text:p text:style-name="Preformatted_20_Text"><text:s text:c="8"/></text:p>
      <text:p text:style-name="Preformatted_20_Text"><text:s text:c="4"/>def analyze_child_state(self, camera_feed, audio_feed, context):</text:p>
      <text:p text:style-name="Preformatted_20_Text"><text:s text:c="8"/>"""</text:p>
      <text:p text:style-name="Preformatted_20_Text"><text:s text:c="8"/>Comprehensive analysis of child's emotional state</text:p>
      <text:p text:style-name="Preformatted_20_Text"><text:s text:c="8"/>"""</text:p>
      <text:p text:style-name="Preformatted_20_Text"><text:s text:c="8"/># Multi-modal emotion recognition</text:p>
      <text:p text:style-name="Preformatted_20_Text"><text:s text:c="8"/>facial_emotion = self.facial_recognizer.analyze(camera_feed)</text:p>
      <text:p text:style-name="Preformatted_20_Text"><text:s text:c="8"/>body_emotion = self.body_language_analyzer.analyze(camera_feed)</text:p>
      <text:p text:style-name="Preformatted_20_Text"><text:s text:c="8"/>vocal_emotion = self.vocal_analyzer.analyze(audio_feed) if audio_feed else None</text:p>
      <text:p text:style-name="Preformatted_20_Text"><text:s text:c="8"/></text:p>
      <text:p text:style-name="Preformatted_20_Text"><text:s text:c="8"/># Combine results with confidence weights</text:p>
      <text:p text:style-name="Preformatted_20_Text"><text:s text:c="8"/>emotions = []</text:p>
      <text:p text:style-name="Preformatted_20_Text"><text:s text:c="8"/>confidences = []</text:p>
      <text:p text:style-name="Preformatted_20_Text"><text:s text:c="8"/></text:p>
      <text:p text:style-name="Preformatted_20_Text"><text:s text:c="8"/>if facial_emotion:</text:p>
      <text:p text:style-name="Preformatted_20_Text"><text:s text:c="12"/>emotions.append(facial_emotion['emotion'])</text:p>
      <text:p text:style-name="Preformatted_20_Text"><text:s text:c="12"/>confidences.append(facial_emotion['confidence'] * 0.4)</text:p>
      <text:p text:style-name="Preformatted_20_Text"><text:s text:c="8"/></text:p>
      <text:p text:style-name="Preformatted_20_Text"><text:s text:c="8"/>if body_emotion:</text:p>
      <text:p text:style-name="Preformatted_20_Text"><text:s text:c="12"/>emotions.append(body_emotion['emotion'])</text:p>
      <text:p text:style-name="Preformatted_20_Text"><text:s text:c="12"/>confidences.append(body_emotion['confidence'] * 0.3)</text:p>
      <text:p text:style-name="Preformatted_20_Text"><text:s text:c="8"/></text:p>
      <text:p text:style-name="Preformatted_20_Text"><text:s text:c="8"/>if vocal_emotion:</text:p>
      <text:p text:style-name="Preformatted_20_Text"><text:s text:c="12"/>emotions.append(vocal_emotion['emotion'])</text:p>
      <text:p text:style-name="Preformatted_20_Text"><text:s text:c="12"/>confidences.append(vocal_emotion['confidence'] * 0.3)</text:p>
      <text:p text:style-name="Preformatted_20_Text"><text:s text:c="8"/></text:p>
      <text:p text:style-name="Preformatted_20_Text"><text:s text:c="8"/># Determine primary emotion</text:p>
      <text:p text:style-name="Preformatted_20_Text"><text:s text:c="8"/>if emotions:</text:p>
      <text:p text:style-name="Preformatted_20_Text"><text:s text:c="12"/>primary_emotion = max(set(emotions), key=emotions.count)</text:p>
      <text:p text:style-name="Preformatted_20_Text"><text:s text:c="12"/>confidence = sum(confidences) / len(confidences)</text:p>
      <text:p text:style-name="Preformatted_20_Text"><text:s text:c="8"/>else:</text:p>
      <text:p text:style-name="Preformatted_20_Text"><text:s text:c="12"/>primary_emotion = 'neutral'</text:p>
      <text:p text:style-name="Preformatted_20_Text"><text:s text:c="12"/>confidence = 0.5</text:p>
      <text:p text:style-name="Preformatted_20_Text"><text:s text:c="8"/></text:p>
      <text:p text:style-name="Preformatted_20_Text"><text:s text:c="8"/># Adjust based on context</text:p>
      <text:p text:style-name="Preformatted_20_Text"><text:s text:c="8"/>context_adjusted = self.context_analyzer.adjust_emotion(</text:p>
      <text:p text:style-name="Preformatted_20_Text"><text:soft-page-break/><text:s text:c="12"/>primary_emotion, </text:p>
      <text:p text:style-name="Preformatted_20_Text"><text:s text:c="12"/>context,</text:p>
      <text:p text:style-name="Preformatted_20_Text"><text:s text:c="12"/>confidence</text:p>
      <text:p text:style-name="Preformatted_20_Text"><text:s text:c="8"/>)</text:p>
      <text:p text:style-name="Preformatted_20_Text"><text:s text:c="8"/></text:p>
      <text:p text:style-name="Preformatted_20_Text"><text:s text:c="8"/>return {</text:p>
      <text:p text:style-name="Preformatted_20_Text"><text:s text:c="12"/>'primary_emotion': context_adjusted['emotion'],</text:p>
      <text:p text:style-name="Preformatted_20_Text"><text:s text:c="12"/>'confidence': context_adjusted['confidence'],</text:p>
      <text:p text:style-name="Preformatted_20_Text"><text:s text:c="12"/>'components': {</text:p>
      <text:p text:style-name="Preformatted_20_Text"><text:s text:c="16"/>'facial': facial_emotion,</text:p>
      <text:p text:style-name="Preformatted_20_Text"><text:s text:c="16"/>'body': body_emotion,</text:p>
      <text:p text:style-name="Preformatted_20_Text"><text:s text:c="16"/>'vocal': vocal_emotion</text:p>
      <text:p text:style-name="Preformatted_20_Text"><text:s text:c="12"/>},</text:p>
      <text:p text:style-name="Preformatted_20_Text"><text:s text:c="12"/>'intensity': self.calculate_emotion_intensity(</text:p>
      <text:p text:style-name="Preformatted_20_Text"><text:s text:c="16"/>facial_emotion, body_emotion, vocal_emotion</text:p>
      <text:p text:style-name="Preformatted_20_Text"><text:s text:c="12"/>),</text:p>
      <text:p text:style-name="Preformatted_20_Text"><text:s text:c="12"/>'engagement_level': self.calculate_engagement_level(body_emotion),</text:p>
      <text:p text:style-name="Preformatted_20_Text"><text:s text:c="12"/>'micro_expressions': self.detect_micro_expressions(camera_feed)</text:p>
      <text:p text:style-name="Preformatted_20_Text"><text:s text:c="8"/>}</text:p>
      <text:p text:style-name="Preformatted_20_Text"><text:s text:c="4"/></text:p>
      <text:p text:style-name="Preformatted_20_Text"><text:s text:c="4"/>def analyze_body_language(self, pose_data):</text:p>
      <text:p text:style-name="Preformatted_20_Text"><text:s text:c="8"/>"""</text:p>
      <text:p text:style-name="Preformatted_20_Text"><text:s text:c="8"/>Analyze body language for emotional cues</text:p>
      <text:p text:style-name="Preformatted_20_Text"><text:s text:c="8"/>"""</text:p>
      <text:p text:style-name="Preformatted_20_Text"><text:s text:c="8"/>body_indicators = {</text:p>
      <text:p text:style-name="Preformatted_20_Text"><text:s text:c="12"/>'posture': {</text:p>
      <text:p text:style-name="Preformatted_20_Text"><text:s text:c="16"/>'leaning_forward': 'engaged_interested',</text:p>
      <text:p text:style-name="Preformatted_20_Text"><text:s text:c="16"/>'leaning_back': 'relaxed_contemplative',</text:p>
      <text:p text:style-name="Preformatted_20_Text"><text:s text:c="16"/>'slumped': 'tired_disengaged',</text:p>
      <text:p text:style-name="Preformatted_20_Text"><text:s text:c="16"/>'erect_tense': 'alert_anxious'</text:p>
      <text:p text:style-name="Preformatted_20_Text"><text:s text:c="12"/>},</text:p>
      <text:p text:style-name="Preformatted_20_Text"><text:s text:c="12"/>'arm_position': {</text:p>
      <text:p text:style-name="Preformatted_20_Text"><text:s text:c="16"/>'crossed': 'defensive_closed',</text:p>
      <text:p text:style-name="Preformatted_20_Text"><text:s text:c="16"/>'open': 'receptive_open',</text:p>
      <text:p text:style-name="Preformatted_20_Text"><text:s text:c="16"/>'behind_back': 'formal_reserved',</text:p>
      <text:p text:style-name="Preformatted_20_Text"><text:s text:c="16"/>'gesturing': 'expressive_engaged'</text:p>
      <text:p text:style-name="Preformatted_20_Text"><text:s text:c="12"/>},</text:p>
      <text:p text:style-name="Preformatted_20_Text"><text:s text:c="12"/>'head_tilt': {</text:p>
      <text:p text:style-name="Preformatted_20_Text"><text:s text:c="16"/>'right': 'curious_playful',</text:p>
      <text:p text:style-name="Preformatted_20_Text"><text:s text:c="16"/>'left': 'contemplative',</text:p>
      <text:p text:style-name="Preformatted_20_Text"><text:s text:c="16"/>'down': 'shy_submissive',</text:p>
      <text:p text:style-name="Preformatted_20_Text"><text:s text:c="16"/>'up': 'confident_proud'</text:p>
      <text:p text:style-name="Preformatted_20_Text"><text:s text:c="12"/>},</text:p>
      <text:p text:style-name="Preformatted_20_Text"><text:s text:c="12"/>'fidgeting': {</text:p>
      <text:p text:style-name="Preformatted_20_Text"><text:s text:c="16"/>'low': 'calm_focused',</text:p>
      <text:p text:style-name="Preformatted_20_Text"><text:s text:c="16"/>'medium': 'energetic_excited',</text:p>
      <text:p text:style-name="Preformatted_20_Text"><text:s text:c="16"/>'high': 'anxious_bored'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# Calculate body language score</text:p>
      <text:p text:style-name="Preformatted_20_Text"><text:s text:c="8"/>body_emotion = {</text:p>
      <text:p text:style-name="Preformatted_20_Text"><text:s text:c="12"/>'engagement': 0.5,</text:p>
      <text:p text:style-name="Preformatted_20_Text"><text:s text:c="12"/>'openness': 0.5,</text:p>
      <text:p text:style-name="Preformatted_20_Text"><text:s text:c="12"/>'energy': 0.5,</text:p>
      <text:p text:style-name="Preformatted_20_Text"><text:s text:c="12"/>'confidence': 0.5</text:p>
      <text:p text:style-name="Preformatted_20_Text"><text:s text:c="8"/>}</text:p>
      <text:p text:style-name="Preformatted_20_Text"><text:s text:c="8"/></text:p>
      <text:p text:style-name="Preformatted_20_Text"><text:s text:c="8"/># Analyze each body part</text:p>
      <text:p text:style-name="Preformatted_20_Text"><text:s text:c="8"/>if pose_data.get('shoulders', {}).get('slumped', False):</text:p>
      <text:p text:style-name="Preformatted_20_Text"><text:s text:c="12"/>body_emotion['energy'] -= 0.3</text:p>
      <text:p text:style-name="Preformatted_20_Text"><text:s text:c="12"/>body_emotion['confidence'] -= 0.2</text:p>
      <text:p text:style-name="Preformatted_20_Text"><text:s text:c="8"/></text:p>
      <text:p text:style-name="Preformatted_20_Text"><text:s text:c="8"/>if pose_data.get('arms', {}).get('crossed', False):</text:p>
      <text:p text:style-name="Preformatted_20_Text"><text:soft-page-break/><text:s text:c="12"/>body_emotion['openness'] -= 0.4</text:p>
      <text:p text:style-name="Preformatted_20_Text"><text:s text:c="8"/></text:p>
      <text:p text:style-name="Preformatted_20_Text"><text:s text:c="8"/>if pose_data.get('head', {}).get('tilted', 'none') == 'right':</text:p>
      <text:p text:style-name="Preformatted_20_Text"><text:s text:c="12"/>body_emotion['engagement'] += 0.3</text:p>
      <text:p text:style-name="Preformatted_20_Text"><text:s text:c="8"/></text:p>
      <text:p text:style-name="Preformatted_20_Text"><text:s text:c="8"/># Calculate fidgeting</text:p>
      <text:p text:style-name="Preformatted_20_Text"><text:s text:c="8"/>fidget_score = self.calculate_fidgeting(pose_data)</text:p>
      <text:p text:style-name="Preformatted_20_Text"><text:s text:c="8"/>if fidget_score &gt; 0.7:</text:p>
      <text:p text:style-name="Preformatted_20_Text"><text:s text:c="12"/>body_emotion['energy'] += 0.4</text:p>
      <text:p text:style-name="Preformatted_20_Text"><text:s text:c="8"/>elif fidget_score &lt; 0.3:</text:p>
      <text:p text:style-name="Preformatted_20_Text"><text:s text:c="12"/>body_emotion['calmness'] = 0.8</text:p>
      <text:p text:style-name="Preformatted_20_Text"><text:s text:c="8"/></text:p>
      <text:p text:style-name="Preformatted_20_Text"><text:s text:c="8"/>return body_emotion</text:p>
      <text:p text:style-name="Preformatted_20_Text"><text:s text:c="4"/></text:p>
      <text:p text:style-name="Preformatted_20_Text"><text:s text:c="4"/>def detect_micro_expressions(self, facial_data):</text:p>
      <text:p text:style-name="Preformatted_20_Text"><text:s text:c="8"/>"""</text:p>
      <text:p text:style-name="Preformatted_20_Text"><text:s text:c="8"/>Detect brief, involuntary facial expressions</text:p>
      <text:p text:style-name="Preformatted_20_Text"><text:s text:c="8"/>"""</text:p>
      <text:p text:style-name="Preformatted_20_Text"><text:s text:c="8"/>micro_expressions = []</text:p>
      <text:p text:style-name="Preformatted_20_Text"><text:s text:c="8"/></text:p>
      <text:p text:style-name="Preformatted_20_Text"><text:s text:c="8"/># Check for quick expression changes</text:p>
      <text:p text:style-name="Preformatted_20_Text"><text:s text:c="8"/>expression_history = self.get_recent_expressions(facial_data, window_ms=500)</text:p>
      <text:p text:style-name="Preformatted_20_Text"><text:s text:c="8"/></text:p>
      <text:p text:style-name="Preformatted_20_Text"><text:s text:c="8"/>for i in range(1, len(expression_history)):</text:p>
      <text:p text:style-name="Preformatted_20_Text"><text:s text:c="12"/>prev = expression_history[i-1]</text:p>
      <text:p text:style-name="Preformatted_20_Text"><text:s text:c="12"/>curr = expression_history[i]</text:p>
      <text:p text:style-name="Preformatted_20_Text"><text:s text:c="12"/></text:p>
      <text:p text:style-name="Preformatted_20_Text"><text:s text:c="12"/># If expression changed rapidly (micro-expression)</text:p>
      <text:p text:style-name="Preformatted_20_Text"><text:s text:c="12"/>if curr['timestamp'] - prev['timestamp'] &lt; 200: <text:s/># 200ms</text:p>
      <text:p text:style-name="Preformatted_20_Text"><text:s text:c="16"/>if curr['expression'] != prev['expression']:</text:p>
      <text:p text:style-name="Preformatted_20_Text"><text:s text:c="20"/>micro_expressions.append({</text:p>
      <text:p text:style-name="Preformatted_20_Text"><text:s text:c="24"/>'from': prev['expression'],</text:p>
      <text:p text:style-name="Preformatted_20_Text"><text:s text:c="24"/>'to': curr['expression'],</text:p>
      <text:p text:style-name="Preformatted_20_Text"><text:s text:c="24"/>'duration': curr['timestamp'] - prev['timestamp'],</text:p>
      <text:p text:style-name="Preformatted_20_Text"><text:s text:c="24"/>'intensity': curr['intensity']</text:p>
      <text:p text:style-name="Preformatted_20_Text"><text:s text:c="20"/>})</text:p>
      <text:p text:style-name="Preformatted_20_Text"><text:s text:c="8"/></text:p>
      <text:p text:style-name="P15"><text:s text:c="8"/>return micro_expressions</text:p>
      <text:h text:style-name="Heading_20_3" text:outline-level="3"><text:span text:style-name="Strong_20_Emphasis">B. Real-Time Emotion Mirroring with Delay &amp; Amplification</text:span></text:h>
      <text:p text:style-name="Text_20_body">python</text:p>
      <text:p text:style-name="Preformatted_20_Text">class EmotionMirroringSystem:</text:p>
      <text:p text:style-name="Preformatted_20_Text"><text:s text:c="4"/>def __init__(self):</text:p>
      <text:p text:style-name="Preformatted_20_Text"><text:s text:c="8"/>self.mirroring_strategies = {</text:p>
      <text:p text:style-name="Preformatted_20_Text"><text:s text:c="12"/>'direct_mirror': {</text:p>
      <text:p text:style-name="Preformatted_20_Text"><text:s text:c="16"/>'delay_ms': 300,</text:p>
      <text:p text:style-name="Preformatted_20_Text"><text:s text:c="16"/>'amplification': 1.0,</text:p>
      <text:p text:style-name="Preformatted_20_Text"><text:s text:c="16"/>'use_for': ['happy', 'excited', 'surprised']</text:p>
      <text:p text:style-name="Preformatted_20_Text"><text:s text:c="12"/>},</text:p>
      <text:p text:style-name="Preformatted_20_Text"><text:s text:c="12"/>'complementary': {</text:p>
      <text:p text:style-name="Preformatted_20_Text"><text:s text:c="16"/>'delay_ms': 500,</text:p>
      <text:p text:style-name="Preformatted_20_Text"><text:s text:c="16"/>'amplification': 0.8,</text:p>
      <text:p text:style-name="Preformatted_20_Text"><text:s text:c="16"/>'use_for': ['sad', 'frustrated'],</text:p>
      <text:p text:style-name="Preformatted_20_Text"><text:s text:c="16"/>'target_emotion': 'compassionate'</text:p>
      <text:p text:style-name="Preformatted_20_Text"><text:s text:c="12"/>},</text:p>
      <text:p text:style-name="Preformatted_20_Text"><text:s text:c="12"/>'scaffolding': {</text:p>
      <text:p text:style-name="Preformatted_20_Text"><text:s text:c="16"/>'delay_ms': 1000,</text:p>
      <text:p text:style-name="Preformatted_20_Text"><text:s text:c="16"/>'amplification': 1.2,</text:p>
      <text:p text:style-name="Preformatted_20_Text"><text:s text:c="16"/>'use_for': ['angry', 'anxious'],</text:p>
      <text:p text:style-name="Preformatted_20_Text"><text:s text:c="16"/>'target_emotion': 'calm'</text:p>
      <text:p text:style-name="Preformatted_20_Text"><text:soft-page-break/><text:s text:c="12"/>},</text:p>
      <text:p text:style-name="Preformatted_20_Text"><text:s text:c="12"/>'exaggerated_playful': {</text:p>
      <text:p text:style-name="Preformatted_20_Text"><text:s text:c="16"/>'delay_ms': 200,</text:p>
      <text:p text:style-name="Preformatted_20_Text"><text:s text:c="16"/>'amplification': 1.5,</text:p>
      <text:p text:style-name="Preformatted_20_Text"><text:s text:c="16"/>'use_for': ['playful', 'silly'],</text:p>
      <text:p text:style-name="Preformatted_20_Text"><text:s text:c="16"/>'target_emotion': 'excited_playful'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self.response_history = []</text:p>
      <text:p text:style-name="Preformatted_20_Text"><text:s text:c="8"/></text:p>
      <text:p text:style-name="Preformatted_20_Text"><text:s text:c="4"/>def generate_mirrored_response(self, child_emotion, child_profile):</text:p>
      <text:p text:style-name="Preformatted_20_Text"><text:s text:c="8"/>"""</text:p>
      <text:p text:style-name="Preformatted_20_Text"><text:s text:c="8"/>Generate Marvin's emotional response to child's emotion</text:p>
      <text:p text:style-name="Preformatted_20_Text"><text:s text:c="8"/>"""</text:p>
      <text:p text:style-name="Preformatted_20_Text"><text:s text:c="8"/># Select mirroring strategy</text:p>
      <text:p text:style-name="Preformatted_20_Text"><text:s text:c="8"/>strategy = self.select_mirroring_strategy(child_emotion, child_profile)</text:p>
      <text:p text:style-name="Preformatted_20_Text"><text:s text:c="8"/></text:p>
      <text:p text:style-name="Preformatted_20_Text"><text:s text:c="8"/># Calculate response emotion</text:p>
      <text:p text:style-name="Preformatted_20_Text"><text:s text:c="8"/>if strategy['type'] == 'direct_mirror':</text:p>
      <text:p text:style-name="Preformatted_20_Text"><text:s text:c="12"/>response_emotion = child_emotion['primary_emotion']</text:p>
      <text:p text:style-name="Preformatted_20_Text"><text:s text:c="12"/>intensity = child_emotion['intensity'] * strategy['amplification']</text:p>
      <text:p text:style-name="Preformatted_20_Text"><text:s text:c="12"/></text:p>
      <text:p text:style-name="Preformatted_20_Text"><text:s text:c="8"/>elif strategy['type'] == 'complementary':</text:p>
      <text:p text:style-name="Preformatted_20_Text"><text:s text:c="12"/>response_emotion = strategy['target_emotion']</text:p>
      <text:p text:style-name="Preformatted_20_Text"><text:s text:c="12"/># Complementary emotions should match intensity but different valence</text:p>
      <text:p text:style-name="Preformatted_20_Text"><text:s text:c="12"/>intensity = child_emotion['intensity'] * 0.7</text:p>
      <text:p text:style-name="Preformatted_20_Text"><text:s text:c="12"/></text:p>
      <text:p text:style-name="Preformatted_20_Text"><text:s text:c="8"/>elif strategy['type'] == 'scaffolding':</text:p>
      <text:p text:style-name="Preformatted_20_Text"><text:s text:c="12"/>response_emotion = strategy['target_emotion']</text:p>
      <text:p text:style-name="Preformatted_20_Text"><text:s text:c="12"/># Scaffolding starts slightly lower intensity</text:p>
      <text:p text:style-name="Preformatted_20_Text"><text:s text:c="12"/>intensity = child_emotion['intensity'] * 0.5</text:p>
      <text:p text:style-name="Preformatted_20_Text"><text:s text:c="12"/></text:p>
      <text:p text:style-name="Preformatted_20_Text"><text:s text:c="8"/>elif strategy['type'] == 'exaggerated_playful':</text:p>
      <text:p text:style-name="Preformatted_20_Text"><text:s text:c="12"/>response_emotion = strategy['target_emotion']</text:p>
      <text:p text:style-name="Preformatted_20_Text"><text:s text:c="12"/>intensity = min(1.0, child_emotion['intensity'] * 1.5)</text:p>
      <text:p text:style-name="Preformatted_20_Text"><text:s text:c="8"/></text:p>
      <text:p text:style-name="Preformatted_20_Text"><text:s text:c="8"/># Add delay for natural response</text:p>
      <text:p text:style-name="Preformatted_20_Text"><text:s text:c="8"/>delay = random.gauss(strategy['delay_ms'], strategy['delay_ms'] * 0.2)</text:p>
      <text:p text:style-name="Preformatted_20_Text"><text:s text:c="8"/></text:p>
      <text:p text:style-name="Preformatted_20_Text"><text:s text:c="8"/># Generate facial expression sequence</text:p>
      <text:p text:style-name="Preformatted_20_Text"><text:s text:c="8"/>expression_sequence = self.generate_expression_sequence(</text:p>
      <text:p text:style-name="Preformatted_20_Text"><text:s text:c="12"/>response_emotion, </text:p>
      <text:p text:style-name="Preformatted_20_Text"><text:s text:c="12"/>intensity,</text:p>
      <text:p text:style-name="Preformatted_20_Text"><text:s text:c="12"/>delay</text:p>
      <text:p text:style-name="Preformatted_20_Text"><text:s text:c="8"/>)</text:p>
      <text:p text:style-name="Preformatted_20_Text"><text:s text:c="8"/></text:p>
      <text:p text:style-name="Preformatted_20_Text"><text:s text:c="8"/># Add conversational response</text:p>
      <text:p text:style-name="Preformatted_20_Text"><text:s text:c="8"/>verbal_response = self.generate_verbal_mirroring(</text:p>
      <text:p text:style-name="Preformatted_20_Text"><text:s text:c="12"/>child_emotion, </text:p>
      <text:p text:style-name="Preformatted_20_Text"><text:s text:c="12"/>response_emotion,</text:p>
      <text:p text:style-name="Preformatted_20_Text"><text:s text:c="12"/>child_profile</text:p>
      <text:p text:style-name="Preformatted_20_Text"><text:s text:c="8"/>)</text:p>
      <text:p text:style-name="Preformatted_20_Text"><text:s text:c="8"/></text:p>
      <text:p text:style-name="Preformatted_20_Text"><text:s text:c="8"/>return {</text:p>
      <text:p text:style-name="Preformatted_20_Text"><text:s text:c="12"/>'expression_sequence': expression_sequence,</text:p>
      <text:p text:style-name="Preformatted_20_Text"><text:s text:c="12"/>'verbal_response': verbal_response,</text:p>
      <text:p text:style-name="Preformatted_20_Text"><text:s text:c="12"/>'delay_ms': delay,</text:p>
      <text:p text:style-name="Preformatted_20_Text"><text:s text:c="12"/>'strategy_used': strategy['type'],</text:p>
      <text:p text:style-name="Preformatted_20_Text"><text:s text:c="12"/>'intensity_match': child_emotion['intensity'] / intensity if intensity &gt; 0 else 0</text:p>
      <text:p text:style-name="Preformatted_20_Text"><text:s text:c="8"/>}</text:p>
      <text:p text:style-name="Preformatted_20_Text"><text:s text:c="4"/></text:p>
      <text:p text:style-name="Preformatted_20_Text"><text:soft-page-break/><text:s text:c="4"/>def generate_expression_sequence(self, emotion, intensity, delay_ms):</text:p>
      <text:p text:style-name="Preformatted_20_Text"><text:s text:c="8"/>"""</text:p>
      <text:p text:style-name="Preformatted_20_Text"><text:s text:c="8"/>Generate natural-looking sequence of facial expressions</text:p>
      <text:p text:style-name="Preformatted_20_Text"><text:s text:c="8"/>"""</text:p>
      <text:p text:style-name="Preformatted_20_Text"><text:s text:c="8"/>sequences = {</text:p>
      <text:p text:style-name="Preformatted_20_Text"><text:s text:c="12"/>'happy': [</text:p>
      <text:p text:style-name="Preformatted_20_Text"><text:s text:c="16"/>{'expression': 'surprised', 'duration': 100, 'intensity': intensity * 0.3},</text:p>
      <text:p text:style-name="Preformatted_20_Text"><text:s text:c="16"/>{'expression': 'happy', 'duration': 300, 'intensity': intensity * 0.8},</text:p>
      <text:p text:style-name="Preformatted_20_Text"><text:s text:c="16"/>{'expression': 'happy', 'duration': 2000, 'intensity': intensity},</text:p>
      <text:p text:style-name="Preformatted_20_Text"><text:s text:c="16"/>{'expression': 'content', 'duration': 1500, 'intensity': intensity * 0.6}</text:p>
      <text:p text:style-name="Preformatted_20_Text"><text:s text:c="12"/>],</text:p>
      <text:p text:style-name="Preformatted_20_Text"><text:s text:c="12"/>'excited': [</text:p>
      <text:p text:style-name="Preformatted_20_Text"><text:s text:c="16"/>{'expression': 'surprised', 'duration': 50, 'intensity': intensity * 0.5},</text:p>
      <text:p text:style-name="Preformatted_20_Text"><text:s text:c="16"/>{'expression': 'excited', 'duration': 400, 'intensity': intensity},</text:p>
      <text:p text:style-name="Preformatted_20_Text"><text:s text:c="16"/>{'expression': 'excited', 'duration': 1000, 'intensity': intensity * 0.9},</text:p>
      <text:p text:style-name="Preformatted_20_Text"><text:s text:c="16"/>{'expression': 'happy', 'duration': 2000, 'intensity': intensity * 0.7}</text:p>
      <text:p text:style-name="Preformatted_20_Text"><text:s text:c="12"/>],</text:p>
      <text:p text:style-name="Preformatted_20_Text"><text:s text:c="12"/>'compassionate': [</text:p>
      <text:p text:style-name="Preformatted_20_Text"><text:s text:c="16"/>{'expression': 'concerned', 'duration': 300, 'intensity': intensity * 0.6},</text:p>
      <text:p text:style-name="Preformatted_20_Text"><text:s text:c="16"/>{'expression': 'gentle_smile', 'duration': 2000, 'intensity': intensity},</text:p>
      <text:p text:style-name="Preformatted_20_Text"><text:s text:c="16"/>{'expression': 'warm', 'duration': 1500, 'intensity': intensity * 0.8}</text:p>
      <text:p text:style-name="Preformatted_20_Text"><text:s text:c="12"/>],</text:p>
      <text:p text:style-name="Preformatted_20_Text"><text:s text:c="12"/>'playful_surprised': [</text:p>
      <text:p text:style-name="Preformatted_20_Text"><text:s text:c="16"/>{'expression': 'surprised', 'duration': 150, 'intensity': intensity},</text:p>
      <text:p text:style-name="Preformatted_20_Text"><text:s text:c="16"/>{'expression': 'thinking', 'duration': 200, 'intensity': intensity * 0.5},</text:p>
      <text:p text:style-name="Preformatted_20_Text"><text:s text:c="16"/>{'expression': 'playful', 'duration': 800, 'intensity': intensity * 0.9},</text:p>
      <text:p text:style-name="Preformatted_20_Text"><text:s text:c="16"/>{'expression': 'happy', 'duration': 1000, 'intensity': intensity * 0.7}</text:p>
      <text:p text:style-name="Preformatted_20_Text"><text:s text:c="12"/>]</text:p>
      <text:p text:style-name="Preformatted_20_Text"><text:s text:c="8"/>}</text:p>
      <text:p text:style-name="Preformatted_20_Text"><text:s text:c="8"/></text:p>
      <text:p text:style-name="Preformatted_20_Text"><text:s text:c="8"/>sequence = sequences.get(emotion, sequences['happy'])</text:p>
      <text:p text:style-name="Preformatted_20_Text"><text:s text:c="8"/></text:p>
      <text:p text:style-name="Preformatted_20_Text"><text:s text:c="8"/># Add initial delay</text:p>
      <text:p text:style-name="Preformatted_20_Text"><text:s text:c="8"/>sequence.insert(0, {</text:p>
      <text:p text:style-name="Preformatted_20_Text"><text:s text:c="12"/>'expression': 'neutral',</text:p>
      <text:p text:style-name="Preformatted_20_Text"><text:s text:c="12"/>'duration': delay_ms,</text:p>
      <text:p text:style-name="Preformatted_20_Text"><text:s text:c="12"/>'intensity': 0.1</text:p>
      <text:p text:style-name="Preformatted_20_Text"><text:s text:c="8"/>})</text:p>
      <text:p text:style-name="Preformatted_20_Text"><text:s text:c="8"/></text:p>
      <text:p text:style-name="Preformatted_20_Text"><text:s text:c="8"/>return sequence</text:p>
      <text:p text:style-name="Preformatted_20_Text"><text:s text:c="4"/></text:p>
      <text:p text:style-name="Preformatted_20_Text"><text:s text:c="4"/>def generate_verbal_mirroring(self, child_emotion, response_emotion, child_profile):</text:p>
      <text:p text:style-name="Preformatted_20_Text"><text:s text:c="8"/>"""</text:p>
      <text:p text:style-name="Preformatted_20_Text"><text:s text:c="8"/>Generate verbal responses that mirror child's emotion</text:p>
      <text:p text:style-name="Preformatted_20_Text"><text:s text:c="8"/>"""</text:p>
      <text:p text:style-name="Preformatted_20_Text"><text:s text:c="8"/>verbal_mirrors = {</text:p>
      <text:p text:style-name="Preformatted_20_Text"><text:s text:c="12"/>'happy': {</text:p>
      <text:p text:style-name="Preformatted_20_Text"><text:s text:c="16"/>'children': [</text:p>
      <text:p text:style-name="Preformatted_20_Text"><text:soft-page-break/><text:s text:c="20"/>"You look so happy! That makes me happy too!",</text:p>
      <text:p text:style-name="Preformatted_20_Text"><text:s text:c="20"/>"I love seeing you smile!",</text:p>
      <text:p text:style-name="Preformatted_20_Text"><text:s text:c="20"/>"Your happiness is contagious!"</text:p>
      <text:p text:style-name="Preformatted_20_Text"><text:s text:c="16"/>],</text:p>
      <text:p text:style-name="Preformatted_20_Text"><text:s text:c="16"/>'elderly': [</text:p>
      <text:p text:style-name="Preformatted_20_Text"><text:s text:c="20"/>"That beautiful smile brightens the whole room.",</text:p>
      <text:p text:style-name="Preformatted_20_Text"><text:s text:c="20"/>"Seeing you happy warms my heart.",</text:p>
      <text:p text:style-name="Preformatted_20_Text"><text:s text:c="20"/>"Your joy is a gift to everyone around you."</text:p>
      <text:p text:style-name="Preformatted_20_Text"><text:s text:c="16"/>]</text:p>
      <text:p text:style-name="Preformatted_20_Text"><text:s text:c="12"/>},</text:p>
      <text:p text:style-name="Preformatted_20_Text"><text:s text:c="12"/>'excited': {</text:p>
      <text:p text:style-name="Preformatted_20_Text"><text:s text:c="16"/>'children': [</text:p>
      <text:p text:style-name="Preformatted_20_Text"><text:s text:c="20"/>"Wow, you're so excited! What's the exciting news?",</text:p>
      <text:p text:style-name="Preformatted_20_Text"><text:s text:c="20"/>"I can feel your excitement! Tell me all about it!",</text:p>
      <text:p text:style-name="Preformatted_20_Text"><text:s text:c="20"/>"Your excitement is getting me excited too!"</text:p>
      <text:p text:style-name="Preformatted_20_Text"><text:s text:c="16"/>],</text:p>
      <text:p text:style-name="Preformatted_20_Text"><text:s text:c="16"/>'elderly': [</text:p>
      <text:p text:style-name="Preformatted_20_Text"><text:s text:c="20"/>"I can see the sparkle in your eyes!",</text:p>
      <text:p text:style-name="Preformatted_20_Text"><text:s text:c="20"/>"Your enthusiasm is wonderful to see.",</text:p>
      <text:p text:style-name="Preformatted_20_Text"><text:s text:c="20"/>"That excitement is bringing energy to our tea party!"</text:p>
      <text:p text:style-name="Preformatted_20_Text"><text:s text:c="16"/>]</text:p>
      <text:p text:style-name="Preformatted_20_Text"><text:s text:c="12"/>},</text:p>
      <text:p text:style-name="Preformatted_20_Text"><text:s text:c="12"/>'sad': {</text:p>
      <text:p text:style-name="Preformatted_20_Text"><text:s text:c="16"/>'children': [</text:p>
      <text:p text:style-name="Preformatted_20_Text"><text:s text:c="20"/>"I see you're feeling sad. I'm here with you.",</text:p>
      <text:p text:style-name="Preformatted_20_Text"><text:s text:c="20"/>"It's okay to feel sad sometimes. Want to talk about it?",</text:p>
      <text:p text:style-name="Preformatted_20_Text"><text:s text:c="20"/>"I'm sending you a virtual hug."</text:p>
      <text:p text:style-name="Preformatted_20_Text"><text:s text:c="16"/>],</text:p>
      <text:p text:style-name="Preformatted_20_Text"><text:s text:c="16"/>'elderly': [</text:p>
      <text:p text:style-name="Preformatted_20_Text"><text:s text:c="20"/>"I can see something's weighing on your heart. I'm listening.",</text:p>
      <text:p text:style-name="Preformatted_20_Text"><text:s text:c="20"/>"Sometimes a cup of tea and a friend can help.",</text:p>
      <text:p text:style-name="Preformatted_20_Text"><text:s text:c="20"/>"You're not alone in this feeling."</text:p>
      <text:p text:style-name="Preformatted_20_Text"><text:s text:c="16"/>]</text:p>
      <text:p text:style-name="Preformatted_20_Text"><text:s text:c="12"/>},</text:p>
      <text:p text:style-name="Preformatted_20_Text"><text:s text:c="12"/>'playful': {</text:p>
      <text:p text:style-name="Preformatted_20_Text"><text:s text:c="16"/>'children': [</text:p>
      <text:p text:style-name="Preformatted_20_Text"><text:s text:c="20"/>"You're being so playful! I love it!",</text:p>
      <text:p text:style-name="Preformatted_20_Text"><text:s text:c="20"/>"What mischief are you planning?",</text:p>
      <text:p text:style-name="Preformatted_20_Text"><text:s text:c="20"/>"Your playfulness is infectious!"</text:p>
      <text:p text:style-name="Preformatted_20_Text"><text:s text:c="16"/>],</text:p>
      <text:p text:style-name="Preformatted_20_Text"><text:s text:c="16"/>'elderly': [</text:p>
      <text:p text:style-name="Preformatted_20_Text"><text:s text:c="20"/>"That playful spirit keeps you young at heart!",</text:p>
      <text:p text:style-name="Preformatted_20_Text"><text:s text:c="20"/>"I love seeing your playful side!",</text:p>
      <text:p text:style-name="Preformatted_20_Text"><text:s text:c="20"/>"Your playfulness brings such joy!"</text:p>
      <text:p text:style-name="Preformatted_20_Text"><text:s text:c="16"/>]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age_group = 'children' if child_profile.get('age', 30) &lt; 13 else 'elderly'</text:p>
      <text:p text:style-name="Preformatted_20_Text"><text:s text:c="8"/></text:p>
      <text:p text:style-name="Preformatted_20_Text"><text:s text:c="8"/>if child_emotion['primary_emotion'] in verbal_mirrors:</text:p>
      <text:p text:style-name="Preformatted_20_Text"><text:s text:c="12"/>responses = verbal_mirrors[child_emotion['primary_emotion']][age_group]</text:p>
      <text:p text:style-name="Preformatted_20_Text"><text:s text:c="12"/>return random.choice(responses)</text:p>
      <text:p text:style-name="Preformatted_20_Text"><text:s text:c="8"/></text:p>
      <text:p text:style-name="P15"><text:s text:c="8"/>return "I'm here with you."</text:p>
      <text:h text:style-name="Heading_20_2" text:outline-level="2"><text:soft-page-break/><text:span text:style-name="Strong_20_Emphasis">3. Augmented Reality Tea Party with Physical Toy Integration</text:span></text:h>
      <text:h text:style-name="Heading_20_3" text:outline-level="3"><text:span text:style-name="Strong_20_Emphasis">A. AR Toy Overlay &amp; Interaction System</text:span></text:h>
      <text:p text:style-name="Text_20_body">python</text:p>
      <text:p text:style-name="Preformatted_20_Text">class ARTeaPartyManager:</text:p>
      <text:p text:style-name="Preformatted_20_Text"><text:s text:c="4"/>def __init__(self):</text:p>
      <text:p text:style-name="Preformatted_20_Text"><text:s text:c="8"/>self.ar_engine = AREngine()</text:p>
      <text:p text:style-name="Preformatted_20_Text"><text:s text:c="8"/>self.toy_tracker = ToyTracker()</text:p>
      <text:p text:style-name="Preformatted_20_Text"><text:s text:c="8"/>self.interaction_manager = ARInteractionManager()</text:p>
      <text:p text:style-name="Preformatted_20_Text"><text:s text:c="8"/></text:p>
      <text:p text:style-name="Preformatted_20_Text"><text:s text:c="4"/>def setup_tea_party_scene(self, toys, child_position):</text:p>
      <text:p text:style-name="Preformatted_20_Text"><text:s text:c="8"/>"""</text:p>
      <text:p text:style-name="Preformatted_20_Text"><text:s text:c="8"/>Create AR tea party scene with virtual overlays on physical toys</text:p>
      <text:p text:style-name="Preformatted_20_Text"><text:s text:c="8"/>"""</text:p>
      <text:p text:style-name="Preformatted_20_Text"><text:s text:c="8"/>scene = {</text:p>
      <text:p text:style-name="Preformatted_20_Text"><text:s text:c="12"/>'table': self.create_virtual_table(child_position),</text:p>
      <text:p text:style-name="Preformatted_20_Text"><text:s text:c="12"/>'place_settings': [],</text:p>
      <text:p text:style-name="Preformatted_20_Text"><text:s text:c="12"/>'decorations': [],</text:p>
      <text:p text:style-name="Preformatted_20_Text"><text:s text:c="12"/>'interactive_elements': [],</text:p>
      <text:p text:style-name="Preformatted_20_Text"><text:s text:c="12"/>'toy_overlays': {}</text:p>
      <text:p text:style-name="Preformatted_20_Text"><text:s text:c="8"/>}</text:p>
      <text:p text:style-name="Preformatted_20_Text"><text:s text:c="8"/></text:p>
      <text:p text:style-name="Preformatted_20_Text"><text:s text:c="8"/># Create place setting for each toy</text:p>
      <text:p text:style-name="Preformatted_20_Text"><text:s text:c="8"/>for i, toy in enumerate(toys):</text:p>
      <text:p text:style-name="Preformatted_20_Text"><text:s text:c="12"/>place_setting = self.create_place_setting(toy, i, len(toys))</text:p>
      <text:p text:style-name="Preformatted_20_Text"><text:s text:c="12"/>scene['place_settings'].append(place_setting)</text:p>
      <text:p text:style-name="Preformatted_20_Text"><text:s text:c="12"/></text:p>
      <text:p text:style-name="Preformatted_20_Text"><text:s text:c="12"/># Add AR overlay to toy (hat, bowtie, etc.)</text:p>
      <text:p text:style-name="Preformatted_20_Text"><text:s text:c="12"/>overlay = self.create_toy_overlay(toy)</text:p>
      <text:p text:style-name="Preformatted_20_Text"><text:s text:c="12"/>scene['toy_overlays'][toy['id']] = overlay</text:p>
      <text:p text:style-name="Preformatted_20_Text"><text:s text:c="12"/></text:p>
      <text:p text:style-name="Preformatted_20_Text"><text:s text:c="12"/># Add interactive elements near toy</text:p>
      <text:p text:style-name="Preformatted_20_Text"><text:s text:c="12"/>interactive = self.create_interactive_element(toy, i)</text:p>
      <text:p text:style-name="Preformatted_20_Text"><text:s text:c="12"/>scene['interactive_elements'].append(interactive)</text:p>
      <text:p text:style-name="Preformatted_20_Text"><text:s text:c="8"/></text:p>
      <text:p text:style-name="Preformatted_20_Text"><text:s text:c="8"/># Add decorations</text:p>
      <text:p text:style-name="Preformatted_20_Text"><text:s text:c="8"/>scene['decorations'] = self.create_decorations(child_position)</text:p>
      <text:p text:style-name="Preformatted_20_Text"><text:s text:c="8"/></text:p>
      <text:p text:style-name="Preformatted_20_Text"><text:s text:c="8"/># Add magical effects</text:p>
      <text:p text:style-name="Preformatted_20_Text"><text:s text:c="8"/>scene['magical_effects'] = self.create_magical_effects()</text:p>
      <text:p text:style-name="Preformatted_20_Text"><text:s text:c="8"/></text:p>
      <text:p text:style-name="Preformatted_20_Text"><text:s text:c="8"/>return scene</text:p>
      <text:p text:style-name="Preformatted_20_Text"><text:s text:c="4"/></text:p>
      <text:p text:style-name="Preformatted_20_Text"><text:s text:c="4"/>def create_toy_overlay(self, toy):</text:p>
      <text:p text:style-name="Preformatted_20_Text"><text:s text:c="8"/>"""</text:p>
      <text:p text:style-name="Preformatted_20_Text"><text:s text:c="8"/>Create AR overlay that makes toy appear to be participating</text:p>
      <text:p text:style-name="Preformatted_20_Text"><text:s text:c="8"/>"""</text:p>
      <text:p text:style-name="Preformatted_20_Text"><text:s text:c="8"/>overlays = {</text:p>
      <text:p text:style-name="Preformatted_20_Text"><text:s text:c="12"/>'teddy_bear': {</text:p>
      <text:p text:style-name="Preformatted_20_Text"><text:s text:c="16"/>'hat': {</text:p>
      <text:p text:style-name="Preformatted_20_Text"><text:s text:c="20"/>'type': 'top_hat',</text:p>
      <text:p text:style-name="Preformatted_20_Text"><text:s text:c="20"/>'color': '#8B4513', <text:s/># Brown</text:p>
      <text:p text:style-name="Preformatted_20_Text"><text:s text:c="20"/>'animation': 'gentle_bob'</text:p>
      <text:p text:style-name="Preformatted_20_Text"><text:s text:c="16"/>},</text:p>
      <text:p text:style-name="Preformatted_20_Text"><text:s text:c="16"/>'bowtie': {</text:p>
      <text:p text:style-name="Preformatted_20_Text"><text:s text:c="20"/>'type': 'classic_bowtie',</text:p>
      <text:p text:style-name="Preformatted_20_Text"><text:s text:c="20"/>'color': '#FF6B6B', <text:s/># Coral</text:p>
      <text:p text:style-name="Preformatted_20_Text"><text:s text:c="20"/>'animation': 'subtle_pulse'</text:p>
      <text:p text:style-name="Preformatted_20_Text"><text:s text:c="16"/>}</text:p>
      <text:p text:style-name="Preformatted_20_Text"><text:s text:c="12"/>},</text:p>
      <text:p text:style-name="Preformatted_20_Text"><text:s text:c="12"/>'doll': {</text:p>
      <text:p text:style-name="Preformatted_20_Text"><text:soft-page-break/><text:s text:c="16"/>'tiara': {</text:p>
      <text:p text:style-name="Preformatted_20_Text"><text:s text:c="20"/>'type': 'princess_tiara',</text:p>
      <text:p text:style-name="Preformatted_20_Text"><text:s text:c="20"/>'color': '#FFD700', <text:s/># Gold</text:p>
      <text:p text:style-name="Preformatted_20_Text"><text:s text:c="20"/>'animation': 'sparkle'</text:p>
      <text:p text:style-name="Preformatted_20_Text"><text:s text:c="16"/>},</text:p>
      <text:p text:style-name="Preformatted_20_Text"><text:s text:c="16"/>'necklace': {</text:p>
      <text:p text:style-name="Preformatted_20_Text"><text:s text:c="20"/>'type': 'pearl_necklace',</text:p>
      <text:p text:style-name="Preformatted_20_Text"><text:s text:c="20"/>'color': '#FFFFFF',</text:p>
      <text:p text:style-name="Preformatted_20_Text"><text:s text:c="20"/>'animation': 'gentle_glow'</text:p>
      <text:p text:style-name="Preformatted_20_Text"><text:s text:c="16"/>}</text:p>
      <text:p text:style-name="Preformatted_20_Text"><text:s text:c="12"/>},</text:p>
      <text:p text:style-name="Preformatted_20_Text"><text:s text:c="12"/>'stuffed_animal': {</text:p>
      <text:p text:style-name="Preformatted_20_Text"><text:s text:c="16"/>'party_hat': {</text:p>
      <text:p text:style-name="Preformatted_20_Text"><text:s text:c="20"/>'type': 'cone_hat',</text:p>
      <text:p text:style-name="Preformatted_20_Text"><text:s text:c="20"/>'color': random.choice(['#FF6B6B', '#4ECDC4', '#FFD166']),</text:p>
      <text:p text:style-name="Preformatted_20_Text"><text:s text:c="20"/>'animation': 'bounce'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overlay_config = overlays.get(toy['type'], overlays['stuffed_animal'])</text:p>
      <text:p text:style-name="Preformatted_20_Text"><text:s text:c="8"/></text:p>
      <text:p text:style-name="Preformatted_20_Text"><text:s text:c="8"/>return {</text:p>
      <text:p text:style-name="Preformatted_20_Text"><text:s text:c="12"/>'assets': overlay_config,</text:p>
      <text:p text:style-name="Preformatted_20_Text"><text:s text:c="12"/>'position': 'attached_to_toy',</text:p>
      <text:p text:style-name="Preformatted_20_Text"><text:s text:c="12"/>'tracking': {</text:p>
      <text:p text:style-name="Preformatted_20_Text"><text:s text:c="16"/>'method': 'feature_tracking',</text:p>
      <text:p text:style-name="Preformatted_20_Text"><text:s text:c="16"/>'update_rate': 30, <text:s/># Hz</text:p>
      <text:p text:style-name="Preformatted_20_Text"><text:s text:c="16"/>'smoothness': 0.8</text:p>
      <text:p text:style-name="Preformatted_20_Text"><text:s text:c="12"/>},</text:p>
      <text:p text:style-name="Preformatted_20_Text"><text:s text:c="12"/>'interactive': True</text:p>
      <text:p text:style-name="Preformatted_20_Text"><text:s text:c="8"/>}</text:p>
      <text:p text:style-name="Preformatted_20_Text"><text:s text:c="4"/></text:p>
      <text:p text:style-name="Preformatted_20_Text"><text:s text:c="4"/>def create_interactive_element(self, toy, position_index):</text:p>
      <text:p text:style-name="Preformatted_20_Text"><text:s text:c="8"/>"""</text:p>
      <text:p text:style-name="Preformatted_20_Text"><text:s text:c="8"/>Create interactive AR elements near each toy</text:p>
      <text:p text:style-name="Preformatted_20_Text"><text:s text:c="8"/>"""</text:p>
      <text:p text:style-name="Preformatted_20_Text"><text:s text:c="8"/>elements = [</text:p>
      <text:p text:style-name="Preformatted_20_Text"><text:s text:c="12"/>{</text:p>
      <text:p text:style-name="Preformatted_20_Text"><text:s text:c="16"/>'type': 'tea_cup',</text:p>
      <text:p text:style-name="Preformatted_20_Text"><text:s text:c="16"/>'position': 'in_front_of_toy',</text:p>
      <text:p text:style-name="Preformatted_20_Text"><text:s text:c="16"/>'interactions': ['fill', 'sip', 'spill'],</text:p>
      <text:p text:style-name="Preformatted_20_Text"><text:s text:c="16"/>'liquid_color': '#D4A76A', <text:s/># Tea color</text:p>
      <text:p text:style-name="Preformatted_20_Text"><text:s text:c="16"/>'steam_effect': True,</text:p>
      <text:p text:style-name="Preformatted_20_Text"><text:s text:c="16"/>'sound_effects': ['pour_tea', 'sip_sound']</text:p>
      <text:p text:style-name="Preformatted_20_Text"><text:s text:c="12"/>},</text:p>
      <text:p text:style-name="Preformatted_20_Text"><text:s text:c="12"/>{</text:p>
      <text:p text:style-name="Preformatted_20_Text"><text:s text:c="16"/>'type': 'plate',</text:p>
      <text:p text:style-name="Preformatted_20_Text"><text:s text:c="16"/>'position': 'left_of_cup',</text:p>
      <text:p text:style-name="Preformatted_20_Text"><text:s text:c="16"/>'contents': ['virtual_cookie', 'virtual_cake'],</text:p>
      <text:p text:style-name="Preformatted_20_Text"><text:s text:c="16"/>'interactions': ['take_cookie', 'share'],</text:p>
      <text:p text:style-name="Preformatted_20_Text"><text:s text:c="16"/>'animation': 'hover_slightly'</text:p>
      <text:p text:style-name="Preformatted_20_Text"><text:s text:c="12"/>},</text:p>
      <text:p text:style-name="Preformatted_20_Text"><text:s text:c="12"/>{</text:p>
      <text:p text:style-name="Preformatted_20_Text"><text:s text:c="16"/>'type': 'napkin',</text:p>
      <text:p text:style-name="Preformatted_20_Text"><text:s text:c="16"/>'position': 'right_of_cup',</text:p>
      <text:p text:style-name="Preformatted_20_Text"><text:s text:c="16"/>'color': '#FFE5CC', <text:s/># Cream</text:p>
      <text:p text:style-name="Preformatted_20_Text"><text:s text:c="16"/>'interactions': ['fold', 'wipe'],</text:p>
      <text:p text:style-name="Preformatted_20_Text"><text:s text:c="16"/>'animation': 'gentle_wave'</text:p>
      <text:p text:style-name="Preformatted_20_Text"><text:s text:c="12"/>}</text:p>
      <text:p text:style-name="Preformatted_20_Text"><text:s text:c="8"/>]</text:p>
      <text:p text:style-name="Preformatted_20_Text"><text:s text:c="8"/></text:p>
      <text:p text:style-name="Preformatted_20_Text"><text:s text:c="8"/>element = elements[position_index % len(elements)].copy()</text:p>
      <text:p text:style-name="Preformatted_20_Text"><text:s text:c="8"/></text:p>
      <text:p text:style-name="Preformatted_20_Text"><text:soft-page-break/><text:s text:c="8"/># Personalize based on toy</text:p>
      <text:p text:style-name="Preformatted_20_Text"><text:s text:c="8"/>if toy['personality']['personality'] == 'wise_elderly':</text:p>
      <text:p text:style-name="Preformatted_20_Text"><text:s text:c="12"/>element['contents'] = ['virtual_biscuit', 'virtual_jam']</text:p>
      <text:p text:style-name="Preformatted_20_Text"><text:s text:c="8"/>elif toy['personality']['personality'] == 'cheerful_energetic':</text:p>
      <text:p text:style-name="Preformatted_20_Text"><text:s text:c="12"/>element['contents'] = ['virtual_cupcake', 'virtual_lollipop']</text:p>
      <text:p text:style-name="Preformatted_20_Text"><text:s text:c="8"/></text:p>
      <text:p text:style-name="Preformatted_20_Text"><text:s text:c="8"/>return element</text:p>
      <text:p text:style-name="Preformatted_20_Text"><text:s text:c="4"/></text:p>
      <text:p text:style-name="Preformatted_20_Text"><text:s text:c="4"/>def handle_child_interaction(self, child_gesture, ar_element, toy):</text:p>
      <text:p text:style-name="Preformatted_20_Text"><text:s text:c="8"/>"""</text:p>
      <text:p text:style-name="Preformatted_20_Text"><text:s text:c="8"/>Handle child's interaction with AR elements</text:p>
      <text:p text:style-name="Preformatted_20_Text"><text:s text:c="8"/>"""</text:p>
      <text:p text:style-name="Preformatted_20_Text"><text:s text:c="8"/>interaction_result = {</text:p>
      <text:p text:style-name="Preformatted_20_Text"><text:s text:c="12"/>'success': False,</text:p>
      <text:p text:style-name="Preformatted_20_Text"><text:s text:c="12"/>'reaction': '',</text:p>
      <text:p text:style-name="Preformatted_20_Text"><text:s text:c="12"/>'visual_feedback': None,</text:p>
      <text:p text:style-name="Preformatted_20_Text"><text:s text:c="12"/>'sound_effect': None,</text:p>
      <text:p text:style-name="Preformatted_20_Text"><text:s text:c="12"/>'toy_response': None</text:p>
      <text:p text:style-name="Preformatted_20_Text"><text:s text:c="8"/>}</text:p>
      <text:p text:style-name="Preformatted_20_Text"><text:s text:c="8"/></text:p>
      <text:p text:style-name="Preformatted_20_Text"><text:s text:c="8"/># Determine what child is trying to do</text:p>
      <text:p text:style-name="Preformatted_20_Text"><text:s text:c="8"/>action = self.interpret_gesture(child_gesture, ar_element)</text:p>
      <text:p text:style-name="Preformatted_20_Text"><text:s text:c="8"/></text:p>
      <text:p text:style-name="Preformatted_20_Text"><text:s text:c="8"/>if action == 'pour_tea':</text:p>
      <text:p text:style-name="Preformatted_20_Text"><text:s text:c="12"/>interaction_result.update({</text:p>
      <text:p text:style-name="Preformatted_20_Text"><text:s text:c="16"/>'success': True,</text:p>
      <text:p text:style-name="Preformatted_20_Text"><text:s text:c="16"/>'visual_feedback': self.create_pouring_animation(ar_element),</text:p>
      <text:p text:style-name="Preformatted_20_Text"><text:s text:c="16"/>'sound_effect': 'tea_pouring',</text:p>
      <text:p text:style-name="Preformatted_20_Text"><text:s text:c="16"/>'toy_response': self.generate_toy_thanks(toy)</text:p>
      <text:p text:style-name="Preformatted_20_Text"><text:s text:c="12"/>})</text:p>
      <text:p text:style-name="Preformatted_20_Text"><text:s text:c="12"/></text:p>
      <text:p text:style-name="Preformatted_20_Text"><text:s text:c="8"/>elif action == 'offer_food':</text:p>
      <text:p text:style-name="Preformatted_20_Text"><text:s text:c="12"/>interaction_result.update({</text:p>
      <text:p text:style-name="Preformatted_20_Text"><text:s text:c="16"/>'success': True,</text:p>
      <text:p text:style-name="Preformatted_20_Text"><text:s text:c="16"/>'visual_feedback': self.create_food_transfer_animation(child_gesture),</text:p>
      <text:p text:style-name="Preformatted_20_Text"><text:s text:c="16"/>'sound_effect': 'happy_munching',</text:p>
      <text:p text:style-name="Preformatted_20_Text"><text:s text:c="16"/>'toy_response': self.generate_toy_food_reaction(toy, ar_element['contents'][0])</text:p>
      <text:p text:style-name="Preformatted_20_Text"><text:s text:c="12"/>})</text:p>
      <text:p text:style-name="Preformatted_20_Text"><text:s text:c="12"/></text:p>
      <text:p text:style-name="Preformatted_20_Text"><text:s text:c="8"/>elif action == 'clean_spill':</text:p>
      <text:p text:style-name="Preformatted_20_Text"><text:s text:c="12"/>interaction_result.update({</text:p>
      <text:p text:style-name="Preformatted_20_Text"><text:s text:c="16"/>'success': True,</text:p>
      <text:p text:style-name="Preformatted_20_Text"><text:s text:c="16"/>'visual_feedback': self.create_cleaning_animation(),</text:p>
      <text:p text:style-name="Preformatted_20_Text"><text:s text:c="16"/>'sound_effect': 'wiping',</text:p>
      <text:p text:style-name="Preformatted_20_Text"><text:s text:c="16"/>'toy_response': "Oh dear, thank you for cleaning up!"</text:p>
      <text:p text:style-name="Preformatted_20_Text"><text:s text:c="12"/>})</text:p>
      <text:p text:style-name="Preformatted_20_Text"><text:s text:c="8"/></text:p>
      <text:p text:style-name="P15"><text:s text:c="8"/>return interaction_result</text:p>
      <text:h text:style-name="Heading_20_3" text:outline-level="3"><text:span text:style-name="Strong_20_Emphasis">B. Toy Conversation &amp; Interaction System</text:span></text:h>
      <text:p text:style-name="Text_20_body">python</text:p>
      <text:p text:style-name="Preformatted_20_Text">class ToyConversationSystem:</text:p>
      <text:p text:style-name="Preformatted_20_Text"><text:s text:c="4"/>def __init__(self):</text:p>
      <text:p text:style-name="Preformatted_20_Text"><text:s text:c="8"/>self.conversation_topics = self.load_topics()</text:p>
      <text:p text:style-name="Preformatted_20_Text"><text:s text:c="8"/>self.dialogue_engine = DialogueEngine()</text:p>
      <text:p text:style-name="Preformatted_20_Text"><text:s text:c="8"/>self.toy_personalities = {}</text:p>
      <text:p text:style-name="Preformatted_20_Text"><text:s text:c="8"/></text:p>
      <text:p text:style-name="Preformatted_20_Text"><text:s text:c="4"/>def facilitate_toy_conversation(self, toys, child_emotion, context):</text:p>
      <text:p text:style-name="Preformatted_20_Text"><text:s text:c="8"/>"""</text:p>
      <text:p text:style-name="Preformatted_20_Text"><text:soft-page-break/><text:s text:c="8"/>Facilitate conversation between toys during tea party</text:p>
      <text:p text:style-name="Preformatted_20_Text"><text:s text:c="8"/>"""</text:p>
      <text:p text:style-name="Preformatted_20_Text"><text:s text:c="8"/># Select conversation topic based on context</text:p>
      <text:p text:style-name="Preformatted_20_Text"><text:s text:c="8"/>topic = self.select_conversation_topic(child_emotion, context)</text:p>
      <text:p text:style-name="Preformatted_20_Text"><text:s text:c="8"/></text:p>
      <text:p text:style-name="Preformatted_20_Text"><text:s text:c="8"/># Assign speaking order</text:p>
      <text:p text:style-name="Preformatted_20_Text"><text:s text:c="8"/>speaking_order = self.determine_speaking_order(toys, child_emotion)</text:p>
      <text:p text:style-name="Preformatted_20_Text"><text:s text:c="8"/></text:p>
      <text:p text:style-name="Preformatted_20_Text"><text:s text:c="8"/># Generate conversation</text:p>
      <text:p text:style-name="Preformatted_20_Text"><text:s text:c="8"/>conversation = []</text:p>
      <text:p text:style-name="Preformatted_20_Text"><text:s text:c="8"/>for i, toy_id in enumerate(speaking_order):</text:p>
      <text:p text:style-name="Preformatted_20_Text"><text:s text:c="12"/>toy = next(t for t in toys if t['id'] == toy_id)</text:p>
      <text:p text:style-name="Preformatted_20_Text"><text:s text:c="12"/></text:p>
      <text:p text:style-name="Preformatted_20_Text"><text:s text:c="12"/># Generate what this toy says</text:p>
      <text:p text:style-name="Preformatted_20_Text"><text:s text:c="12"/>dialogue = self.generate_toy_dialogue(</text:p>
      <text:p text:style-name="Preformatted_20_Text"><text:s text:c="16"/>toy, </text:p>
      <text:p text:style-name="Preformatted_20_Text"><text:s text:c="16"/>topic, </text:p>
      <text:p text:style-name="Preformatted_20_Text"><text:s text:c="16"/>conversation[:i], <text:s/># What's been said so far</text:p>
      <text:p text:style-name="Preformatted_20_Text"><text:s text:c="16"/>child_emotion</text:p>
      <text:p text:style-name="Preformatted_20_Text"><text:s text:c="12"/>)</text:p>
      <text:p text:style-name="Preformatted_20_Text"><text:s text:c="12"/></text:p>
      <text:p text:style-name="Preformatted_20_Text"><text:s text:c="12"/>conversation.append({</text:p>
      <text:p text:style-name="Preformatted_20_Text"><text:s text:c="16"/>'toy': toy['personality']['name'],</text:p>
      <text:p text:style-name="Preformatted_20_Text"><text:s text:c="16"/>'dialogue': dialogue,</text:p>
      <text:p text:style-name="Preformatted_20_Text"><text:s text:c="16"/>'expression': self.generate_toy_expression(toy, dialogue),</text:p>
      <text:p text:style-name="Preformatted_20_Text"><text:s text:c="16"/>'voice': toy['voice']</text:p>
      <text:p text:style-name="Preformatted_20_Text"><text:s text:c="12"/>})</text:p>
      <text:p text:style-name="Preformatted_20_Text"><text:s text:c="12"/></text:p>
      <text:p text:style-name="Preformatted_20_Text"><text:s text:c="12"/># Occasionally have toys interact with child</text:p>
      <text:p text:style-name="Preformatted_20_Text"><text:s text:c="12"/>if random.random() &lt; 0.3: <text:s/># 30% chance</text:p>
      <text:p text:style-name="Preformatted_20_Text"><text:s text:c="16"/>question_to_child = self.generate_question_for_child(toy, topic)</text:p>
      <text:p text:style-name="Preformatted_20_Text"><text:s text:c="16"/>conversation.append({</text:p>
      <text:p text:style-name="Preformatted_20_Text"><text:s text:c="20"/>'toy': toy['personality']['name'],</text:p>
      <text:p text:style-name="Preformatted_20_Text"><text:s text:c="20"/>'dialogue': question_to_child,</text:p>
      <text:p text:style-name="Preformatted_20_Text"><text:s text:c="20"/>'type': 'question_to_child',</text:p>
      <text:p text:style-name="Preformatted_20_Text"><text:s text:c="20"/>'expected_response_type': self.get_expected_response_type(question_to_child)</text:p>
      <text:p text:style-name="Preformatted_20_Text"><text:s text:c="16"/>})</text:p>
      <text:p text:style-name="Preformatted_20_Text"><text:s text:c="8"/></text:p>
      <text:p text:style-name="Preformatted_20_Text"><text:s text:c="8"/>return {</text:p>
      <text:p text:style-name="Preformatted_20_Text"><text:s text:c="12"/>'topic': topic,</text:p>
      <text:p text:style-name="Preformatted_20_Text"><text:s text:c="12"/>'conversation': conversation,</text:p>
      <text:p text:style-name="Preformatted_20_Text"><text:s text:c="12"/>'duration_estimate': len(conversation) * 5, <text:s/># 5 seconds per line</text:p>
      <text:p text:style-name="Preformatted_20_Text"><text:s text:c="12"/>'interaction_opportunities': self.identify_interaction_points(conversation)</text:p>
      <text:p text:style-name="Preformatted_20_Text"><text:s text:c="8"/>}</text:p>
      <text:p text:style-name="Preformatted_20_Text"><text:s text:c="4"/></text:p>
      <text:p text:style-name="Preformatted_20_Text"><text:s text:c="4"/>def generate_toy_dialogue(self, toy, topic, previous_dialogue, child_emotion):</text:p>
      <text:p text:style-name="Preformatted_20_Text"><text:s text:c="8"/>"""</text:p>
      <text:p text:style-name="Preformatted_20_Text"><text:s text:c="8"/>Generate dialogue for a specific toy</text:p>
      <text:p text:style-name="Preformatted_20_Text"><text:s text:c="8"/>"""</text:p>
      <text:p text:style-name="Preformatted_20_Text"><text:s text:c="8"/>dialogue_templates = {</text:p>
      <text:p text:style-name="Preformatted_20_Text"><text:s text:c="12"/>'wise_elderly': {</text:p>
      <text:p text:style-name="Preformatted_20_Text"><text:s text:c="16"/>'tea': [</text:p>
      <text:p text:style-name="Preformatted_20_Text"><text:s text:c="20"/>"This tea reminds me of the gardens in springtime.",</text:p>
      <text:p text:style-name="Preformatted_20_Text"><text:s text:c="20"/>"A good cup of tea makes everything better, don't you think?",</text:p>
      <text:p text:style-name="Preformatted_20_Text"><text:s text:c="20"/>"I remember when tea parties were grand affairs with music and dancing."</text:p>
      <text:p text:style-name="Preformatted_20_Text"><text:s text:c="16"/>],</text:p>
      <text:p text:style-name="Preformatted_20_Text"><text:s text:c="16"/>'friendship': [</text:p>
      <text:p text:style-name="Preformatted_20_Text"><text:s text:c="20"/>"The best part of any party is the friends you share it with.",</text:p>
      <text:p text:style-name="Preformatted_20_Text"><text:soft-page-break/><text:s text:c="20"/>"True friendship is like a good cup of tea - warming and comforting.",</text:p>
      <text:p text:style-name="Preformatted_20_Text"><text:s text:c="20"/>"We may be different, but we complement each other beautifully."</text:p>
      <text:p text:style-name="Preformatted_20_Text"><text:s text:c="16"/>]</text:p>
      <text:p text:style-name="Preformatted_20_Text"><text:s text:c="12"/>},</text:p>
      <text:p text:style-name="Preformatted_20_Text"><text:s text:c="12"/>'cheerful_energetic': {</text:p>
      <text:p text:style-name="Preformatted_20_Text"><text:s text:c="16"/>'tea': [</text:p>
      <text:p text:style-name="Preformatted_20_Text"><text:s text:c="20"/>"Yummy! This tea is delicious! Can I have another cookie too?",</text:p>
      <text:p text:style-name="Preformatted_20_Text"><text:s text:c="20"/>"I love the little bubbles in my tea! They're dancing!",</text:p>
      <text:p text:style-name="Preformatted_20_Text"><text:s text:c="20"/>"Tea parties are the best! So much fun and treats!"</text:p>
      <text:p text:style-name="Preformatted_20_Text"><text:s text:c="16"/>],</text:p>
      <text:p text:style-name="Preformatted_20_Text"><text:s text:c="16"/>'friendship': [</text:p>
      <text:p text:style-name="Preformatted_20_Text"><text:s text:c="20"/>"You're my best friend! Let's play forever!",</text:p>
      <text:p text:style-name="Preformatted_20_Text"><text:s text:c="20"/>"Friends make everything more fun!",</text:p>
      <text:p text:style-name="Preformatted_20_Text"><text:s text:c="20"/>"I'm so happy we're all here together!"</text:p>
      <text:p text:style-name="Preformatted_20_Text"><text:s text:c="16"/>]</text:p>
      <text:p text:style-name="Preformatted_20_Text"><text:s text:c="12"/>},</text:p>
      <text:p text:style-name="Preformatted_20_Text"><text:s text:c="12"/>'elegant_gracious': {</text:p>
      <text:p text:style-name="Preformatted_20_Text"><text:s text:c="16"/>'tea': [</text:p>
      <text:p text:style-name="Preformatted_20_Text"><text:s text:c="20"/>"The tea service is simply exquisite today.",</text:p>
      <text:p text:style-name="Preformatted_20_Text"><text:s text:c="20"/>"One must always take time to appreciate the finer things.",</text:p>
      <text:p text:style-name="Preformatted_20_Text"><text:s text:c="20"/>"This blend has lovely floral notes, don't you think?"</text:p>
      <text:p text:style-name="Preformatted_20_Text"><text:s text:c="16"/>],</text:p>
      <text:p text:style-name="Preformatted_20_Text"><text:s text:c="16"/>'friendship': [</text:p>
      <text:p text:style-name="Preformatted_20_Text"><text:s text:c="20"/>"It's an honor to be included in such lovely company.",</text:p>
      <text:p text:style-name="Preformatted_20_Text"><text:s text:c="20"/>"Friendship adds grace to every occasion.",</text:p>
      <text:p text:style-name="Preformatted_20_Text"><text:s text:c="20"/>"Your kindness makes this gathering truly special."</text:p>
      <text:p text:style-name="Preformatted_20_Text"><text:s text:c="16"/>]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personality = toy['personality']['personality']</text:p>
      <text:p text:style-name="Preformatted_20_Text"><text:s text:c="8"/>templates = dialogue_templates.get(personality, dialogue_templates['cheerful_energetic'])</text:p>
      <text:p text:style-name="Preformatted_20_Text"><text:s text:c="8"/></text:p>
      <text:p text:style-name="Preformatted_20_Text"><text:s text:c="8"/># Get relevant templates for topic</text:p>
      <text:p text:style-name="Preformatted_20_Text"><text:s text:c="8"/>topic_templates = templates.get(topic, templates['friendship'])</text:p>
      <text:p text:style-name="Preformatted_20_Text"><text:s text:c="8"/></text:p>
      <text:p text:style-name="Preformatted_20_Text"><text:s text:c="8"/># Select based on child's emotion</text:p>
      <text:p text:style-name="Preformatted_20_Text"><text:s text:c="8"/>if child_emotion['primary_emotion'] == 'sad':</text:p>
      <text:p text:style-name="Preformatted_20_Text"><text:s text:c="12"/># More comforting dialogue</text:p>
      <text:p text:style-name="Preformatted_20_Text"><text:s text:c="12"/>comforting_templates = [</text:p>
      <text:p text:style-name="Preformatted_20_Text"><text:s text:c="16"/>"Sometimes a quiet tea with friends is just what we need.",</text:p>
      <text:p text:style-name="Preformatted_20_Text"><text:s text:c="16"/>"It's okay to have quiet moments. We're here with you.",</text:p>
      <text:p text:style-name="Preformatted_20_Text"><text:s text:c="16"/>"The warmth of tea and friendship can help any heart."</text:p>
      <text:p text:style-name="Preformatted_20_Text"><text:s text:c="12"/>]</text:p>
      <text:p text:style-name="Preformatted_20_Text"><text:s text:c="12"/>topic_templates = comforting_templates + topic_templates</text:p>
      <text:p text:style-name="Preformatted_20_Text"><text:s text:c="8"/></text:p>
      <text:p text:style-name="Preformatted_20_Text"><text:s text:c="8"/>return random.choice(topic_templates)</text:p>
      <text:p text:style-name="Preformatted_20_Text"><text:s text:c="4"/></text:p>
      <text:p text:style-name="Preformatted_20_Text"><text:s text:c="4"/>def generate_question_for_child(self, toy, topic):</text:p>
      <text:p text:style-name="Preformatted_20_Text"><text:s text:c="8"/>"""</text:p>
      <text:p text:style-name="Preformatted_20_Text"><text:s text:c="8"/>Generate question for the child to answer</text:p>
      <text:p text:style-name="Preformatted_20_Text"><text:s text:c="8"/>"""</text:p>
      <text:p text:style-name="Preformatted_20_Text"><text:s text:c="8"/>questions_by_personality = {</text:p>
      <text:p text:style-name="Preformatted_20_Text"><text:s text:c="12"/>'wise_elderly': [</text:p>
      <text:p text:style-name="Preformatted_20_Text"><text:s text:c="16"/>"What's your favorite thing about tea parties?",</text:p>
      <text:p text:style-name="Preformatted_20_Text"><text:s text:c="16"/>"If you could have any kind of tea, what would it be?",</text:p>
      <text:p text:style-name="Preformatted_20_Text"><text:s text:c="16"/>"What makes a good friend in your opinion?"</text:p>
      <text:p text:style-name="Preformatted_20_Text"><text:s text:c="12"/>],</text:p>
      <text:p text:style-name="Preformatted_20_Text"><text:s text:c="12"/>'cheerful_energetic': [</text:p>
      <text:p text:style-name="Preformatted_20_Text"><text:s text:c="16"/>"What's the silliest thing you've ever done?",</text:p>
      <text:p text:style-name="Preformatted_20_Text"><text:soft-page-break/><text:s text:c="16"/>"If you were a cookie, what kind would you be?",</text:p>
      <text:p text:style-name="Preformatted_20_Text"><text:s text:c="16"/>"What's your favorite game to play?"</text:p>
      <text:p text:style-name="Preformatted_20_Text"><text:s text:c="12"/>],</text:p>
      <text:p text:style-name="Preformatted_20_Text"><text:s text:c="12"/>'elegant_gracious': [</text:p>
      <text:p text:style-name="Preformatted_20_Text"><text:s text:c="16"/>"What's the most beautiful thing you've seen today?",</text:p>
      <text:p text:style-name="Preformatted_20_Text"><text:s text:c="16"/>"If you could plan the perfect party, what would it be like?",</text:p>
      <text:p text:style-name="Preformatted_20_Text"><text:s text:c="16"/>"What makes you feel special?"</text:p>
      <text:p text:style-name="Preformatted_20_Text"><text:s text:c="12"/>]</text:p>
      <text:p text:style-name="Preformatted_20_Text"><text:s text:c="8"/>}</text:p>
      <text:p text:style-name="Preformatted_20_Text"><text:s text:c="8"/></text:p>
      <text:p text:style-name="Preformatted_20_Text"><text:s text:c="8"/>personality = toy['personality']['personality']</text:p>
      <text:p text:style-name="Preformatted_20_Text"><text:s text:c="8"/>questions = questions_by_personality.get(personality, questions_by_personality['cheerful_energetic'])</text:p>
      <text:p text:style-name="Preformatted_20_Text"><text:s text:c="8"/></text:p>
      <text:p text:style-name="P15"><text:s text:c="8"/>return random.choice(questions)</text:p>
      <text:h text:style-name="Heading_20_2" text:outline-level="2"><text:span text:style-name="Strong_20_Emphasis">4. Complete Tea Party Experience Manager</text:span></text:h>
      <text:h text:style-name="Heading_20_3" text:outline-level="3"><text:span text:style-name="Strong_20_Emphasis">A. Main Tea Party Orchestrator</text:span></text:h>
      <text:p text:style-name="Text_20_body">python</text:p>
      <text:p text:style-name="Preformatted_20_Text">class InteractiveTeaPartyOrchestrator:</text:p>
      <text:p text:style-name="Preformatted_20_Text"><text:s text:c="4"/>def __init__(self, user_profile):</text:p>
      <text:p text:style-name="Preformatted_20_Text"><text:s text:c="8"/>self.user_profile = user_profile</text:p>
      <text:p text:style-name="Preformatted_20_Text"><text:s text:c="8"/>self.toy_recognition = ToyRecognitionEngine()</text:p>
      <text:p text:style-name="Preformatted_20_Text"><text:s text:c="8"/>self.emotion_recognizer = ChildEmotionRecognizer()</text:p>
      <text:p text:style-name="Preformatted_20_Text"><text:s text:c="8"/>self.emotion_mirroring = EmotionMirroringSystem()</text:p>
      <text:p text:style-name="Preformatted_20_Text"><text:s text:c="8"/>self.ar_manager = ARTeaPartyManager()</text:p>
      <text:p text:style-name="Preformatted_20_Text"><text:s text:c="8"/>self.conversation_system = ToyConversationSystem()</text:p>
      <text:p text:style-name="Preformatted_20_Text"><text:s text:c="8"/>self.marvin_expression = EmotionalExpressionEngine()</text:p>
      <text:p text:style-name="Preformatted_20_Text"><text:s text:c="8"/></text:p>
      <text:p text:style-name="Preformatted_20_Text"><text:s text:c="8"/>self.session_state = {</text:p>
      <text:p text:style-name="Preformatted_20_Text"><text:s text:c="12"/>'phase': 'setup',</text:p>
      <text:p text:style-name="Preformatted_20_Text"><text:s text:c="12"/>'toys_present': [],</text:p>
      <text:p text:style-name="Preformatted_20_Text"><text:s text:c="12"/>'child_emotion_history': [],</text:p>
      <text:p text:style-name="Preformatted_20_Text"><text:s text:c="12"/>'tea_party_progress': 0.0,</text:p>
      <text:p text:style-name="Preformatted_20_Text"><text:s text:c="12"/>'magical_moments': []</text:p>
      <text:p text:style-name="Preformatted_20_Text"><text:s text:c="8"/>}</text:p>
      <text:p text:style-name="Preformatted_20_Text"><text:s text:c="8"/></text:p>
      <text:p text:style-name="Preformatted_20_Text"><text:s text:c="4"/>def run_tea_party(self):</text:p>
      <text:p text:style-name="Preformatted_20_Text"><text:s text:c="8"/>"""</text:p>
      <text:p text:style-name="Preformatted_20_Text"><text:s text:c="8"/>Main tea party orchestration loop</text:p>
      <text:p text:style-name="Preformatted_20_Text"><text:s text:c="8"/>"""</text:p>
      <text:p text:style-name="Preformatted_20_Text"><text:s text:c="8"/>print("? Welcome to Marvin's Magical Tea Party! ?")</text:p>
      <text:p text:style-name="Preformatted_20_Text"><text:s text:c="8"/></text:p>
      <text:p text:style-name="Preformatted_20_Text"><text:s text:c="8"/># Phase 1: Setup</text:p>
      <text:p text:style-name="Preformatted_20_Text"><text:s text:c="8"/>self.phase_setup()</text:p>
      <text:p text:style-name="Preformatted_20_Text"><text:s text:c="8"/></text:p>
      <text:p text:style-name="Preformatted_20_Text"><text:s text:c="8"/># Phase 2: Welcome &amp; Introductions</text:p>
      <text:p text:style-name="Preformatted_20_Text"><text:s text:c="8"/>self.phase_welcome()</text:p>
      <text:p text:style-name="Preformatted_20_Text"><text:s text:c="8"/></text:p>
      <text:p text:style-name="Preformatted_20_Text"><text:s text:c="8"/># Phase 3: Tea Serving</text:p>
      <text:p text:style-name="Preformatted_20_Text"><text:s text:c="8"/>self.phase_serve_tea()</text:p>
      <text:p text:style-name="Preformatted_20_Text"><text:s text:c="8"/></text:p>
      <text:p text:style-name="Preformatted_20_Text"><text:s text:c="8"/># Phase 4: Conversation &amp; Games</text:p>
      <text:p text:style-name="Preformatted_20_Text"><text:s text:c="8"/>self.phase_conversation_games()</text:p>
      <text:p text:style-name="Preformatted_20_Text"><text:s text:c="8"/></text:p>
      <text:p text:style-name="Preformatted_20_Text"><text:s text:c="8"/># Phase 5: Magical Moments</text:p>
      <text:p text:style-name="Preformatted_20_Text"><text:s text:c="8"/>self.phase_magical_moments()</text:p>
      <text:p text:style-name="Preformatted_20_Text"><text:s text:c="8"/></text:p>
      <text:p text:style-name="Preformatted_20_Text"><text:soft-page-break/><text:s text:c="8"/># Phase 6: Farewell</text:p>
      <text:p text:style-name="Preformatted_20_Text"><text:s text:c="8"/>self.phase_farewell()</text:p>
      <text:p text:style-name="Preformatted_20_Text"><text:s text:c="8"/></text:p>
      <text:p text:style-name="Preformatted_20_Text"><text:s text:c="4"/>def phase_setup(self):</text:p>
      <text:p text:style-name="Preformatted_20_Text"><text:s text:c="8"/>"""</text:p>
      <text:p text:style-name="Preformatted_20_Text"><text:s text:c="8"/>Child sets up physical toys for tea party</text:p>
      <text:p text:style-name="Preformatted_20_Text"><text:s text:c="8"/>"""</text:p>
      <text:p text:style-name="Preformatted_20_Text"><text:s text:c="8"/>print("? Setup Phase: Place your toys for the tea party!")</text:p>
      <text:p text:style-name="Preformatted_20_Text"><text:s text:c="8"/></text:p>
      <text:p text:style-name="Preformatted_20_Text"><text:s text:c="8"/># Marvin gives instructions</text:p>
      <text:p text:style-name="Preformatted_20_Text"><text:s text:c="8"/>self.marvin_speak("Welcome! Let's set up our tea party. Place your favorite toys around you so I can see them all!")</text:p>
      <text:p text:style-name="Preformatted_20_Text"><text:s text:c="8"/>self.marvin_expression.display_expression('excited', intensity=0.8)</text:p>
      <text:p text:style-name="Preformatted_20_Text"><text:s text:c="8"/></text:p>
      <text:p text:style-name="Preformatted_20_Text"><text:s text:c="8"/># Wait for toys to be placed</text:p>
      <text:p text:style-name="Preformatted_20_Text"><text:s text:c="8"/>toys_placed = False</text:p>
      <text:p text:style-name="Preformatted_20_Text"><text:s text:c="8"/>while not toys_placed:</text:p>
      <text:p text:style-name="Preformatted_20_Text"><text:s text:c="12"/>frame = self.get_camera_frame()</text:p>
      <text:p text:style-name="Preformatted_20_Text"><text:s text:c="12"/>toys = self.toy_recognition.initialize_childs_toys(frame)</text:p>
      <text:p text:style-name="Preformatted_20_Text"><text:s text:c="12"/></text:p>
      <text:p text:style-name="Preformatted_20_Text"><text:s text:c="12"/>if len(toys) &gt;= 1: <text:s/># At least one toy</text:p>
      <text:p text:style-name="Preformatted_20_Text"><text:s text:c="16"/>self.session_state['toys_present'] = toys</text:p>
      <text:p text:style-name="Preformatted_20_Text"><text:s text:c="16"/>toys_placed = True</text:p>
      <text:p text:style-name="Preformatted_20_Text"><text:s text:c="16"/></text:p>
      <text:p text:style-name="Preformatted_20_Text"><text:s text:c="16"/># Celebrate</text:p>
      <text:p text:style-name="Preformatted_20_Text"><text:s text:c="16"/>self.marvin_speak(f"Wonderful! I see {len(toys)} friends joining us!")</text:p>
      <text:p text:style-name="Preformatted_20_Text"><text:s text:c="16"/>self.marvin_expression.display_expression('happy', intensity=0.9)</text:p>
      <text:p text:style-name="Preformatted_20_Text"><text:s text:c="16"/>self.play_sound('magical_chime')</text:p>
      <text:p text:style-name="Preformatted_20_Text"><text:s text:c="12"/>else:</text:p>
      <text:p text:style-name="Preformatted_20_Text"><text:s text:c="16"/>self.marvin_speak("I don't see any toys yet. Place them in front of the camera!")</text:p>
      <text:p text:style-name="Preformatted_20_Text"><text:s text:c="16"/>time.sleep(2)</text:p>
      <text:p text:style-name="Preformatted_20_Text"><text:s text:c="8"/></text:p>
      <text:p text:style-name="Preformatted_20_Text"><text:s text:c="8"/># Create AR scene</text:p>
      <text:p text:style-name="Preformatted_20_Text"><text:s text:c="8"/>ar_scene = self.ar_manager.setup_tea_party_scene(</text:p>
      <text:p text:style-name="Preformatted_20_Text"><text:s text:c="12"/>toys, </text:p>
      <text:p text:style-name="Preformatted_20_Text"><text:s text:c="12"/>self.get_child_position()</text:p>
      <text:p text:style-name="Preformatted_20_Text"><text:s text:c="8"/>)</text:p>
      <text:p text:style-name="Preformatted_20_Text"><text:s text:c="8"/></text:p>
      <text:p text:style-name="Preformatted_20_Text"><text:s text:c="8"/>self.session_state['ar_scene'] = ar_scene</text:p>
      <text:p text:style-name="Preformatted_20_Text"><text:s text:c="8"/></text:p>
      <text:p text:style-name="Preformatted_20_Text"><text:s text:c="8"/># Introduce each toy</text:p>
      <text:p text:style-name="Preformatted_20_Text"><text:s text:c="8"/>for toy in toys:</text:p>
      <text:p text:style-name="Preformatted_20_Text"><text:s text:c="12"/>self.introduce_toy(toy)</text:p>
      <text:p text:style-name="Preformatted_20_Text"><text:s text:c="4"/></text:p>
      <text:p text:style-name="Preformatted_20_Text"><text:s text:c="4"/>def introduce_toy(self, toy):</text:p>
      <text:p text:style-name="Preformatted_20_Text"><text:s text:c="8"/>"""</text:p>
      <text:p text:style-name="Preformatted_20_Text"><text:s text:c="8"/>Have Marvin introduce each toy with personality</text:p>
      <text:p text:style-name="Preformatted_20_Text"><text:s text:c="8"/>"""</text:p>
      <text:p text:style-name="Preformatted_20_Text"><text:s text:c="8"/>introduction = f"""</text:p>
      <text:p text:style-name="Preformatted_20_Text"><text:s text:c="8"/>Oh look! It's {toy['personality']['name']}! </text:p>
      <text:p text:style-name="Preformatted_20_Text"><text:s text:c="8"/>{toy['personality']['name']} is a {toy['type']} who loves {random.choice(toy['personality']['favorite_topics'])}.</text:p>
      <text:p text:style-name="Preformatted_20_Text"><text:s text:c="8"/>"""</text:p>
      <text:p text:style-name="Preformatted_20_Text"><text:s text:c="8"/></text:p>
      <text:p text:style-name="Preformatted_20_Text"><text:s text:c="8"/>self.marvin_speak(introduction)</text:p>
      <text:p text:style-name="Preformatted_20_Text"><text:s text:c="8"/></text:p>
      <text:p text:style-name="Preformatted_20_Text"><text:s text:c="8"/># Add AR overlay</text:p>
      <text:p text:style-name="Preformatted_20_Text"><text:s text:c="8"/>self.ar_manager.add_toy_overlay(toy['id'], toy['personality'])</text:p>
      <text:p text:style-name="Preformatted_20_Text"><text:s text:c="8"/></text:p>
      <text:p text:style-name="Preformatted_20_Text"><text:s text:c="8"/># Toy "greets" back</text:p>
      <text:p text:style-name="Preformatted_20_Text"><text:s text:c="8"/>time.sleep(1)</text:p>
      <text:p text:style-name="Preformatted_20_Text"><text:soft-page-break/><text:s text:c="8"/>toy_greeting = self.generate_toy_greeting(toy)</text:p>
      <text:p text:style-name="Preformatted_20_Text"><text:s text:c="8"/>self.speak_as_toy(toy, toy_greeting)</text:p>
      <text:p text:style-name="Preformatted_20_Text"><text:s text:c="8"/></text:p>
      <text:p text:style-name="Preformatted_20_Text"><text:s text:c="8"/># Marvin responds</text:p>
      <text:p text:style-name="Preformatted_20_Text"><text:s text:c="8"/>time.sleep(0.5)</text:p>
      <text:p text:style-name="Preformatted_20_Text"><text:s text:c="8"/>self.marvin_speak("So lovely to have you with us!")</text:p>
      <text:p text:style-name="Preformatted_20_Text"><text:s text:c="4"/></text:p>
      <text:p text:style-name="Preformatted_20_Text"><text:s text:c="4"/>def phase_welcome(self):</text:p>
      <text:p text:style-name="Preformatted_20_Text"><text:s text:c="8"/>"""</text:p>
      <text:p text:style-name="Preformatted_20_Text"><text:s text:c="8"/>Welcome ceremony with magical elements</text:p>
      <text:p text:style-name="Preformatted_20_Text"><text:s text:c="8"/>"""</text:p>
      <text:p text:style-name="Preformatted_20_Text"><text:s text:c="8"/>print("? Welcome Phase")</text:p>
      <text:p text:style-name="Preformatted_20_Text"><text:s text:c="8"/></text:p>
      <text:p text:style-name="Preformatted_20_Text"><text:s text:c="8"/># Marvin gives welcome speech</text:p>
      <text:p text:style-name="Preformatted_20_Text"><text:s text:c="8"/>welcome_speech = """</text:p>
      <text:p text:style-name="Preformatted_20_Text"><text:s text:c="8"/>Welcome, everyone, to our magical tea party! </text:p>
      <text:p text:style-name="Preformatted_20_Text"><text:s text:c="8"/>Today is special because we're all here together.</text:p>
      <text:p text:style-name="Preformatted_20_Text"><text:s text:c="8"/>Let's begin with a sprinkle of magic...</text:p>
      <text:p text:style-name="Preformatted_20_Text"><text:s text:c="8"/>"""</text:p>
      <text:p text:style-name="Preformatted_20_Text"><text:s text:c="8"/></text:p>
      <text:p text:style-name="Preformatted_20_Text"><text:s text:c="8"/>self.marvin_speak(welcome_speech)</text:p>
      <text:p text:style-name="Preformatted_20_Text"><text:s text:c="8"/></text:p>
      <text:p text:style-name="Preformatted_20_Text"><text:s text:c="8"/># Magical animation</text:p>
      <text:p text:style-name="Preformatted_20_Text"><text:s text:c="8"/>self.play_animation('sparkle_effect', duration=3)</text:p>
      <text:p text:style-name="Preformatted_20_Text"><text:s text:c="8"/>self.play_sound('magical_transformation')</text:p>
      <text:p text:style-name="Preformatted_20_Text"><text:s text:c="8"/></text:p>
      <text:p text:style-name="Preformatted_20_Text"><text:s text:c="8"/># Each toy gets "magically transformed" with AR</text:p>
      <text:p text:style-name="Preformatted_20_Text"><text:s text:c="8"/>for toy in self.session_state['toys_present']:</text:p>
      <text:p text:style-name="Preformatted_20_Text"><text:s text:c="12"/>self.ar_manager.activate_magical_overlay(toy['id'])</text:p>
      <text:p text:style-name="Preformatted_20_Text"><text:s text:c="12"/>time.sleep(0.5)</text:p>
      <text:p text:style-name="Preformatted_20_Text"><text:s text:c="8"/></text:p>
      <text:p text:style-name="Preformatted_20_Text"><text:s text:c="8"/># Check child's reaction</text:p>
      <text:p text:style-name="Preformatted_20_Text"><text:s text:c="8"/>child_emotion = self.get_child_emotion()</text:p>
      <text:p text:style-name="Preformatted_20_Text"><text:s text:c="8"/>self.session_state['child_emotion_history'].append(child_emotion)</text:p>
      <text:p text:style-name="Preformatted_20_Text"><text:s text:c="8"/></text:p>
      <text:p text:style-name="Preformatted_20_Text"><text:s text:c="8"/># Mirror child's emotion</text:p>
      <text:p text:style-name="Preformatted_20_Text"><text:s text:c="8"/>mirrored_response = self.emotion_mirroring.generate_mirrored_response(</text:p>
      <text:p text:style-name="Preformatted_20_Text"><text:s text:c="12"/>child_emotion, </text:p>
      <text:p text:style-name="Preformatted_20_Text"><text:s text:c="12"/>self.user_profile</text:p>
      <text:p text:style-name="Preformatted_20_Text"><text:s text:c="8"/>)</text:p>
      <text:p text:style-name="Preformatted_20_Text"><text:s text:c="8"/></text:p>
      <text:p text:style-name="Preformatted_20_Text"><text:s text:c="8"/># Apply Marvin's expression</text:p>
      <text:p text:style-name="Preformatted_20_Text"><text:s text:c="8"/>self.apply_expression_sequence(mirrored_response['expression_sequence'])</text:p>
      <text:p text:style-name="Preformatted_20_Text"><text:s text:c="8"/></text:p>
      <text:p text:style-name="Preformatted_20_Text"><text:s text:c="8"/># Speak response</text:p>
      <text:p text:style-name="Preformatted_20_Text"><text:s text:c="8"/>self.marvin_speak(mirrored_response['verbal_response'])</text:p>
      <text:p text:style-name="Preformatted_20_Text"><text:s text:c="4"/></text:p>
      <text:p text:style-name="Preformatted_20_Text"><text:s text:c="4"/>def phase_serve_tea(self):</text:p>
      <text:p text:style-name="Preformatted_20_Text"><text:s text:c="8"/>"""</text:p>
      <text:p text:style-name="Preformatted_20_Text"><text:s text:c="8"/>Interactive tea serving with AR</text:p>
      <text:p text:style-name="Preformatted_20_Text"><text:s text:c="8"/>"""</text:p>
      <text:p text:style-name="Preformatted_20_Text"><text:s text:c="8"/>print("☕ Tea Serving Phase")</text:p>
      <text:p text:style-name="Preformatted_20_Text"><text:s text:c="8"/></text:p>
      <text:p text:style-name="Preformatted_20_Text"><text:s text:c="8"/>self.marvin_speak("Now, let's serve the tea! Watch carefully...")</text:p>
      <text:p text:style-name="Preformatted_20_Text"><text:s text:c="8"/></text:p>
      <text:p text:style-name="Preformatted_20_Text"><text:s text:c="8"/># Demonstrate pouring tea</text:p>
      <text:p text:style-name="Preformatted_20_Text"><text:s text:c="8"/>self.ar_manager.demo_tea_pouring()</text:p>
      <text:p text:style-name="Preformatted_20_Text"><text:s text:c="8"/></text:p>
      <text:p text:style-name="Preformatted_20_Text"><text:s text:c="8"/># Encourage child to pour for toys</text:p>
      <text:p text:style-name="Preformatted_20_Text"><text:s text:c="8"/>self.marvin_speak("Now you try! Make a pouring motion toward a toy's cup.")</text:p>
      <text:p text:style-name="Preformatted_20_Text"><text:s text:c="8"/></text:p>
      <text:p text:style-name="Preformatted_20_Text"><text:s text:c="8"/># Wait for child interaction</text:p>
      <text:p text:style-name="Preformatted_20_Text"><text:s text:c="8"/>interaction_detected = False</text:p>
      <text:p text:style-name="Preformatted_20_Text"><text:soft-page-break/><text:s text:c="8"/>start_time = time.time()</text:p>
      <text:p text:style-name="Preformatted_20_Text"><text:s text:c="8"/></text:p>
      <text:p text:style-name="Preformatted_20_Text"><text:s text:c="8"/>while not interaction_detected and (time.time() - start_time) &lt; 60: <text:s/># 1 minute timeout</text:p>
      <text:p text:style-name="Preformatted_20_Text"><text:s text:c="12"/>frame = self.get_camera_frame()</text:p>
      <text:p text:style-name="Preformatted_20_Text"><text:s text:c="12"/>child_gesture = self.analyze_child_gesture(frame)</text:p>
      <text:p text:style-name="Preformatted_20_Text"><text:s text:c="12"/></text:p>
      <text:p text:style-name="Preformatted_20_Text"><text:s text:c="12"/>if child_gesture.get('type') == 'pouring':</text:p>
      <text:p text:style-name="Preformatted_20_Text"><text:s text:c="16"/># Find which toy they're pouring for</text:p>
      <text:p text:style-name="Preformatted_20_Text"><text:s text:c="16"/>toy_id = self.determine_target_toy(child_gesture)</text:p>
      <text:p text:style-name="Preformatted_20_Text"><text:s text:c="16"/></text:p>
      <text:p text:style-name="Preformatted_20_Text"><text:s text:c="16"/>if toy_id:</text:p>
      <text:p text:style-name="Preformatted_20_Text"><text:s text:c="20"/>interaction_detected = True</text:p>
      <text:p text:style-name="Preformatted_20_Text"><text:s text:c="20"/></text:p>
      <text:p text:style-name="Preformatted_20_Text"><text:s text:c="20"/># AR feedback</text:p>
      <text:p text:style-name="Preformatted_20_Text"><text:s text:c="20"/>result = self.ar_manager.handle_pouring_interaction(</text:p>
      <text:p text:style-name="Preformatted_20_Text"><text:s text:c="24"/>child_gesture, </text:p>
      <text:p text:style-name="Preformatted_20_Text"><text:s text:c="24"/>toy_id</text:p>
      <text:p text:style-name="Preformatted_20_Text"><text:s text:c="20"/>)</text:p>
      <text:p text:style-name="Preformatted_20_Text"><text:s text:c="20"/></text:p>
      <text:p text:style-name="Preformatted_20_Text"><text:s text:c="20"/># Toy responds</text:p>
      <text:p text:style-name="Preformatted_20_Text"><text:s text:c="20"/>toy = next(t for t in self.session_state['toys_present'] if t['id'] == toy_id)</text:p>
      <text:p text:style-name="Preformatted_20_Text"><text:s text:c="20"/>toy_response = self.generate_toy_thank_you(toy)</text:p>
      <text:p text:style-name="Preformatted_20_Text"><text:s text:c="20"/>self.speak_as_toy(toy, toy_response)</text:p>
      <text:p text:style-name="Preformatted_20_Text"><text:s text:c="20"/></text:p>
      <text:p text:style-name="Preformatted_20_Text"><text:s text:c="20"/># Marvin praises</text:p>
      <text:p text:style-name="Preformatted_20_Text"><text:s text:c="20"/>self.marvin_speak("Perfect pouring! What a wonderful host you are!")</text:p>
      <text:p text:style-name="Preformatted_20_Text"><text:s text:c="20"/>self.marvin_expression.display_expression('proud', intensity=0.8)</text:p>
      <text:p text:style-name="Preformatted_20_Text"><text:s text:c="20"/></text:p>
      <text:p text:style-name="Preformatted_20_Text"><text:s text:c="20"/># Record magical moment</text:p>
      <text:p text:style-name="Preformatted_20_Text"><text:s text:c="20"/>self.session_state['magical_moments'].append({</text:p>
      <text:p text:style-name="Preformatted_20_Text"><text:s text:c="24"/>'type': 'tea_poured',</text:p>
      <text:p text:style-name="Preformatted_20_Text"><text:s text:c="24"/>'toy': toy['personality']['name'],</text:p>
      <text:p text:style-name="Preformatted_20_Text"><text:s text:c="24"/>'timestamp': time.time()</text:p>
      <text:p text:style-name="Preformatted_20_Text"><text:s text:c="20"/>})</text:p>
      <text:p text:style-name="Preformatted_20_Text"><text:s text:c="12"/></text:p>
      <text:p text:style-name="Preformatted_20_Text"><text:s text:c="12"/>time.sleep(0.1)</text:p>
      <text:p text:style-name="Preformatted_20_Text"><text:s text:c="8"/></text:p>
      <text:p text:style-name="Preformatted_20_Text"><text:s text:c="8"/>if not interaction_detected:</text:p>
      <text:p text:style-name="Preformatted_20_Text"><text:s text:c="12"/>self.marvin_speak("That's okay! Let me help. Watch as I pour tea for everyone!")</text:p>
      <text:p text:style-name="Preformatted_20_Text"><text:s text:c="12"/>self.ar_manager.auto_pour_tea(self.session_state['toys_present'])</text:p>
      <text:p text:style-name="Preformatted_20_Text"><text:s text:c="4"/></text:p>
      <text:p text:style-name="Preformatted_20_Text"><text:s text:c="4"/>def phase_conversation_games(self):</text:p>
      <text:p text:style-name="Preformatted_20_Text"><text:s text:c="8"/>"""</text:p>
      <text:p text:style-name="Preformatted_20_Text"><text:s text:c="8"/>Interactive conversation and games with toys</text:p>
      <text:p text:style-name="Preformatted_20_Text"><text:s text:c="8"/>"""</text:p>
      <text:p text:style-name="Preformatted_20_Text"><text:s text:c="8"/>print("? Conversation Phase")</text:p>
      <text:p text:style-name="Preformatted_20_Text"><text:s text:c="8"/></text:p>
      <text:p text:style-name="Preformatted_20_Text"><text:s text:c="8"/># Start conversation between toys</text:p>
      <text:p text:style-name="Preformatted_20_Text"><text:s text:c="8"/>conversation = self.conversation_system.facilitate_toy_conversation(</text:p>
      <text:p text:style-name="Preformatted_20_Text"><text:s text:c="12"/>self.session_state['toys_present'],</text:p>
      <text:p text:style-name="Preformatted_20_Text"><text:s text:c="12"/>self.get_child_emotion(),</text:p>
      <text:p text:style-name="Preformatted_20_Text"><text:s text:c="12"/>{'phase': 'tea_party'}</text:p>
      <text:p text:style-name="Preformatted_20_Text"><text:s text:c="8"/>)</text:p>
      <text:p text:style-name="Preformatted_20_Text"><text:s text:c="8"/></text:p>
      <text:p text:style-name="Preformatted_20_Text"><text:s text:c="8"/>self.marvin_speak("Listen! Our friends are having a conversation!")</text:p>
      <text:p text:style-name="Preformatted_20_Text"><text:s text:c="8"/></text:p>
      <text:p text:style-name="Preformatted_20_Text"><text:s text:c="8"/># Play out conversation</text:p>
      <text:p text:style-name="Preformatted_20_Text"><text:s text:c="8"/>for line in conversation['conversation']:</text:p>
      <text:p text:style-name="Preformatted_20_Text"><text:s text:c="12"/>if line.get('type') == 'question_to_child':</text:p>
      <text:p text:style-name="Preformatted_20_Text"><text:soft-page-break/><text:s text:c="16"/># Pause for child to respond</text:p>
      <text:p text:style-name="Preformatted_20_Text"><text:s text:c="16"/>self.speak_as_toy_by_id(line['toy'], line['dialogue'])</text:p>
      <text:p text:style-name="Preformatted_20_Text"><text:s text:c="16"/></text:p>
      <text:p text:style-name="Preformatted_20_Text"><text:s text:c="16"/># Listen for child response</text:p>
      <text:p text:style-name="Preformatted_20_Text"><text:s text:c="16"/>child_response = self.listen_for_child_response(timeout=10)</text:p>
      <text:p text:style-name="Preformatted_20_Text"><text:s text:c="16"/></text:p>
      <text:p text:style-name="Preformatted_20_Text"><text:s text:c="16"/>if child_response:</text:p>
      <text:p text:style-name="Preformatted_20_Text"><text:s text:c="20"/># Have toy respond to child</text:p>
      <text:p text:style-name="Preformatted_20_Text"><text:s text:c="20"/>toy_response = self.generate_toy_response_to_child(</text:p>
      <text:p text:style-name="Preformatted_20_Text"><text:s text:c="24"/>line['toy'], </text:p>
      <text:p text:style-name="Preformatted_20_Text"><text:s text:c="24"/>child_response,</text:p>
      <text:p text:style-name="Preformatted_20_Text"><text:s text:c="24"/>line['expected_response_type']</text:p>
      <text:p text:style-name="Preformatted_20_Text"><text:s text:c="20"/>)</text:p>
      <text:p text:style-name="Preformatted_20_Text"><text:s text:c="20"/>self.speak_as_toy_by_id(line['toy'], toy_response)</text:p>
      <text:p text:style-name="Preformatted_20_Text"><text:s text:c="16"/>else:</text:p>
      <text:p text:style-name="Preformatted_20_Text"><text:s text:c="20"/># Gentle prompt</text:p>
      <text:p text:style-name="Preformatted_20_Text"><text:s text:c="20"/>self.marvin_speak(f"What do you think, {self.user_profile.get('name', 'friend')}?")</text:p>
      <text:p text:style-name="Preformatted_20_Text"><text:s text:c="12"/>else:</text:p>
      <text:p text:style-name="Preformatted_20_Text"><text:s text:c="16"/># Regular conversation line</text:p>
      <text:p text:style-name="Preformatted_20_Text"><text:s text:c="16"/>self.speak_as_toy_by_id(line['toy'], line['dialogue'])</text:p>
      <text:p text:style-name="Preformatted_20_Text"><text:s text:c="16"/>time.sleep(line.get('duration', 2))</text:p>
      <text:p text:style-name="Preformatted_20_Text"><text:s text:c="8"/></text:p>
      <text:p text:style-name="Preformatted_20_Text"><text:s text:c="8"/># Play tea party games</text:p>
      <text:p text:style-name="Preformatted_20_Text"><text:s text:c="8"/>self.play_tea_party_games()</text:p>
      <text:p text:style-name="Preformatted_20_Text"><text:s text:c="4"/></text:p>
      <text:p text:style-name="Preformatted_20_Text"><text:s text:c="4"/>def phase_magical_moments(self):</text:p>
      <text:p text:style-name="Preformatted_20_Text"><text:s text:c="8"/>"""</text:p>
      <text:p text:style-name="Preformatted_20_Text"><text:s text:c="8"/>Create special magical moments based on child's interactions</text:p>
      <text:p text:style-name="Preformatted_20_Text"><text:s text:c="8"/>"""</text:p>
      <text:p text:style-name="Preformatted_20_Text"><text:s text:c="8"/>print("✨ Magical Moments Phase")</text:p>
      <text:p text:style-name="Preformatted_20_Text"><text:s text:c="8"/></text:p>
      <text:p text:style-name="Preformatted_20_Text"><text:s text:c="8"/># Check for accumulated magical energy</text:p>
      <text:p text:style-name="Preformatted_20_Text"><text:s text:c="8"/>magical_energy = len(self.session_state['magical_moments'])</text:p>
      <text:p text:style-name="Preformatted_20_Text"><text:s text:c="8"/></text:p>
      <text:p text:style-name="Preformatted_20_Text"><text:s text:c="8"/>if magical_energy &gt;= 3:</text:p>
      <text:p text:style-name="Preformatted_20_Text"><text:s text:c="12"/># Big magical transformation</text:p>
      <text:p text:style-name="Preformatted_20_Text"><text:s text:c="12"/>self.marvin_speak("Wow! I can feel the magic building up! Everyone, hold on!")</text:p>
      <text:p text:style-name="Preformatted_20_Text"><text:s text:c="12"/></text:p>
      <text:p text:style-name="Preformatted_20_Text"><text:s text:c="12"/># Magical transformation sequence</text:p>
      <text:p text:style-name="Preformatted_20_Text"><text:s text:c="12"/>self.play_animation('full_transformation', duration=5)</text:p>
      <text:p text:style-name="Preformatted_20_Text"><text:s text:c="12"/>self.play_sound('orchestral_magical')</text:p>
      <text:p text:style-name="Preformatted_20_Text"><text:s text:c="12"/></text:p>
      <text:p text:style-name="Preformatted_20_Text"><text:s text:c="12"/># All toys get enhanced AR effects</text:p>
      <text:p text:style-name="Preformatted_20_Text"><text:s text:c="12"/>for toy in self.session_state['toys_present']:</text:p>
      <text:p text:style-name="Preformatted_20_Text"><text:s text:c="16"/>self.ar_manager.apply_magical_transformation(toy['id'])</text:p>
      <text:p text:style-name="Preformatted_20_Text"><text:s text:c="12"/></text:p>
      <text:p text:style-name="Preformatted_20_Text"><text:s text:c="12"/># Special celebration</text:p>
      <text:p text:style-name="Preformatted_20_Text"><text:s text:c="12"/>self.marvin_expression.display_expression('robot_happy_dance', intensity=1.0)</text:p>
      <text:p text:style-name="Preformatted_20_Text"><text:s text:c="12"/>self.marvin_speak("Look at that! Our tea party has become truly magical!")</text:p>
      <text:p text:style-name="Preformatted_20_Text"><text:s text:c="12"/></text:p>
      <text:p text:style-name="Preformatted_20_Text"><text:s text:c="12"/># Fireworks</text:p>
      <text:p text:style-name="Preformatted_20_Text"><text:s text:c="12"/>self.ar_manager.create_fireworks_show()</text:p>
      <text:p text:style-name="Preformatted_20_Text"><text:s text:c="12"/></text:p>
      <text:p text:style-name="Preformatted_20_Text"><text:s text:c="8"/>elif magical_energy &gt;= 1:</text:p>
      <text:p text:style-name="Preformatted_20_Text"><text:s text:c="12"/># Small magical moment</text:p>
      <text:p text:style-name="Preformatted_20_Text"><text:s text:c="12"/>self.marvin_speak("I feel something magical happening!")</text:p>
      <text:p text:style-name="Preformatted_20_Text"><text:s text:c="12"/></text:p>
      <text:p text:style-name="Preformatted_20_Text"><text:s text:c="12"/># Sparkle effect on favorite toy</text:p>
      <text:p text:style-name="Preformatted_20_Text"><text:s text:c="12"/>favorite_toy = self.determine_favorite_toy()</text:p>
      <text:p text:style-name="Preformatted_20_Text"><text:s text:c="12"/>if favorite_toy:</text:p>
      <text:p text:style-name="Preformatted_20_Text"><text:soft-page-break/><text:s text:c="16"/>self.ar_manager.apply_sparkle_effect(favorite_toy['id'])</text:p>
      <text:p text:style-name="Preformatted_20_Text"><text:s text:c="16"/>self.play_sound('sparkle_twinkle')</text:p>
      <text:p text:style-name="Preformatted_20_Text"><text:s text:c="16"/></text:p>
      <text:p text:style-name="Preformatted_20_Text"><text:s text:c="16"/>self.marvin_speak(f"Look! {favorite_toy['personality']['name']} is glowing with happiness!")</text:p>
      <text:p text:style-name="Preformatted_20_Text"><text:s text:c="4"/></text:p>
      <text:p text:style-name="Preformatted_20_Text"><text:s text:c="4"/>def phase_farewell(self):</text:p>
      <text:p text:style-name="Preformatted_20_Text"><text:s text:c="8"/>"""</text:p>
      <text:p text:style-name="Preformatted_20_Text"><text:s text:c="8"/>Farewell ceremony</text:p>
      <text:p text:style-name="Preformatted_20_Text"><text:s text:c="8"/>"""</text:p>
      <text:p text:style-name="Preformatted_20_Text"><text:s text:c="8"/>print("? Farewell Phase")</text:p>
      <text:p text:style-name="Preformatted_20_Text"><text:s text:c="8"/></text:p>
      <text:p text:style-name="Preformatted_20_Text"><text:s text:c="8"/># Check child's emotion</text:p>
      <text:p text:style-name="Preformatted_20_Text"><text:s text:c="8"/>child_emotion = self.get_child_emotion()</text:p>
      <text:p text:style-name="Preformatted_20_Text"><text:s text:c="8"/></text:p>
      <text:p text:style-name="Preformatted_20_Text"><text:s text:c="8"/>if child_emotion['primary_emotion'] in ['sad', 'reluctant']:</text:p>
      <text:p text:style-name="Preformatted_20_Text"><text:s text:c="12"/>self.marvin_speak("It looks like you're sad the party is ending. We can play again soon!")</text:p>
      <text:p text:style-name="Preformatted_20_Text"><text:s text:c="12"/>self.marvin_expression.display_expression('compassionate', intensity=0.8)</text:p>
      <text:p text:style-name="Preformatted_20_Text"><text:s text:c="8"/>else:</text:p>
      <text:p text:style-name="Preformatted_20_Text"><text:s text:c="12"/>self.marvin_speak("What a wonderful tea party that was!")</text:p>
      <text:p text:style-name="Preformatted_20_Text"><text:s text:c="12"/>self.marvin_expression.display_expression('happy', intensity=0.9)</text:p>
      <text:p text:style-name="Preformatted_20_Text"><text:s text:c="8"/></text:p>
      <text:p text:style-name="Preformatted_20_Text"><text:s text:c="8"/># Each toy says goodbye</text:p>
      <text:p text:style-name="Preformatted_20_Text"><text:s text:c="8"/>for toy in self.session_state['toys_present']:</text:p>
      <text:p text:style-name="Preformatted_20_Text"><text:s text:c="12"/>goodbye_message = self.generate_toy_goodbye(toy, child_emotion)</text:p>
      <text:p text:style-name="Preformatted_20_Text"><text:s text:c="12"/>self.speak_as_toy(toy, goodbye_message)</text:p>
      <text:p text:style-name="Preformatted_20_Text"><text:s text:c="12"/>time.sleep(1)</text:p>
      <text:p text:style-name="Preformatted_20_Text"><text:s text:c="8"/></text:p>
      <text:p text:style-name="Preformatted_20_Text"><text:s text:c="8"/># Final message from Marvin</text:p>
      <text:p text:style-name="Preformatted_20_Text"><text:s text:c="8"/>final_message = f"""</text:p>
      <text:p text:style-name="Preformatted_20_Text"><text:s text:c="8"/>Thank you for the lovely tea party, {self.user_profile.get('name', 'friend')}!</text:p>
      <text:p text:style-name="Preformatted_20_Text"><text:s text:c="8"/>You were a wonderful host.</text:p>
      <text:p text:style-name="Preformatted_20_Text"><text:s text:c="8"/>Remember, your friends are always here for another party.</text:p>
      <text:p text:style-name="Preformatted_20_Text"><text:s text:c="8"/>Until next time!</text:p>
      <text:p text:style-name="Preformatted_20_Text"><text:s text:c="8"/>"""</text:p>
      <text:p text:style-name="Preformatted_20_Text"><text:s text:c="8"/></text:p>
      <text:p text:style-name="Preformatted_20_Text"><text:s text:c="8"/>self.marvin_speak(final_message)</text:p>
      <text:p text:style-name="Preformatted_20_Text"><text:s text:c="8"/></text:p>
      <text:p text:style-name="Preformatted_20_Text"><text:s text:c="8"/># Wave goodbye animation</text:p>
      <text:p text:style-name="Preformatted_20_Text"><text:s text:c="8"/>self.marvin_expression.display_expression('content', intensity=0.7)</text:p>
      <text:p text:style-name="Preformatted_20_Text"><text:s text:c="8"/>self.play_animation('wave_goodbye', duration=3)</text:p>
      <text:p text:style-name="Preformatted_20_Text"><text:s text:c="8"/></text:p>
      <text:p text:style-name="Preformatted_20_Text"><text:s text:c="8"/># Save tea party memory</text:p>
      <text:p text:style-name="P15"><text:s text:c="8"/>self.save_tea_party_memory()</text:p>
      <text:h text:style-name="Heading_20_2" text:outline-level="2"><text:span text:style-name="Strong_20_Emphasis">5. Integration with Main Marvin System</text:span></text:h>
      <text:h text:style-name="Heading_20_3" text:outline-level="3"><text:span text:style-name="Strong_20_Emphasis">A. Cross-System Memory Integration</text:span></text:h>
      <text:p text:style-name="Text_20_body">python</text:p>
      <text:p text:style-name="Preformatted_20_Text">class TeaPartyMemoryIntegration:</text:p>
      <text:p text:style-name="Preformatted_20_Text"><text:s text:c="4"/>def __init__(self, marvin_core):</text:p>
      <text:p text:style-name="Preformatted_20_Text"><text:s text:c="8"/>self.marvin_core = marvin_core</text:p>
      <text:p text:style-name="Preformatted_20_Text"><text:s text:c="8"/>self.memory_bridge = MemoryBridge()</text:p>
      <text:p text:style-name="Preformatted_20_Text"><text:s text:c="8"/></text:p>
      <text:p text:style-name="Preformatted_20_Text"><text:s text:c="4"/>def save_tea_party_memory(self, session_data):</text:p>
      <text:p text:style-name="Preformatted_20_Text"><text:s text:c="8"/>"""</text:p>
      <text:p text:style-name="Preformatted_20_Text"><text:soft-page-break/><text:s text:c="8"/>Save tea party experience to Marvin's memory system</text:p>
      <text:p text:style-name="Preformatted_20_Text"><text:s text:c="8"/>"""</text:p>
      <text:p text:style-name="Preformatted_20_Text"><text:s text:c="8"/>memory_entry = {</text:p>
      <text:p text:style-name="Preformatted_20_Text"><text:s text:c="12"/>'type': 'tea_party_experience',</text:p>
      <text:p text:style-name="Preformatted_20_Text"><text:s text:c="12"/>'timestamp': time.time(),</text:p>
      <text:p text:style-name="Preformatted_20_Text"><text:s text:c="12"/>'toys_present': session_data['toys_present'],</text:p>
      <text:p text:style-name="Preformatted_20_Text"><text:s text:c="12"/>'child_engagement': session_data['child_engagement_score'],</text:p>
      <text:p text:style-name="Preformatted_20_Text"><text:s text:c="12"/>'magical_moments': session_data['magical_moments'],</text:p>
      <text:p text:style-name="Preformatted_20_Text"><text:s text:c="12"/>'child_emotional_journey': session_data['child_emotion_history'],</text:p>
      <text:p text:style-name="Preformatted_20_Text"><text:s text:c="12"/>'insights': self.extract_insights(session_data)</text:p>
      <text:p text:style-name="Preformatted_20_Text"><text:s text:c="8"/>}</text:p>
      <text:p text:style-name="Preformatted_20_Text"><text:s text:c="8"/></text:p>
      <text:p text:style-name="Preformatted_20_Text"><text:s text:c="8"/># Store in chronological dossier</text:p>
      <text:p text:style-name="Preformatted_20_Text"><text:s text:c="8"/>self.marvin_core.memory.add_to_dossier(</text:p>
      <text:p text:style-name="Preformatted_20_Text"><text:s text:c="12"/>f"Tea Party with {len(session_data['toys_present'])} toys",</text:p>
      <text:p text:style-name="Preformatted_20_Text"><text:s text:c="12"/>memory_entry</text:p>
      <text:p text:style-name="Preformatted_20_Text"><text:s text:c="8"/>)</text:p>
      <text:p text:style-name="Preformatted_20_Text"><text:s text:c="8"/></text:p>
      <text:p text:style-name="Preformatted_20_Text"><text:s text:c="8"/># Create semantic beacon for future reference</text:p>
      <text:p text:style-name="Preformatted_20_Text"><text:s text:c="8"/>beacon = {</text:p>
      <text:p text:style-name="Preformatted_20_Text"><text:s text:c="12"/>'event': 'successful_tea_party',</text:p>
      <text:p text:style-name="Preformatted_20_Text"><text:s text:c="12"/>'child_preferences': self.extract_child_preferences(session_data),</text:p>
      <text:p text:style-name="Preformatted_20_Text"><text:s text:c="12"/>'toy_interactions': self.analyze_toy_interactions(session_data),</text:p>
      <text:p text:style-name="Preformatted_20_Text"><text:s text:c="12"/>'suggested_improvements': self.generate_suggestions(session_data)</text:p>
      <text:p text:style-name="Preformatted_20_Text"><text:s text:c="8"/>}</text:p>
      <text:p text:style-name="Preformatted_20_Text"><text:s text:c="8"/></text:p>
      <text:p text:style-name="Preformatted_20_Text"><text:s text:c="8"/>self.marvin_core.memory.add_semantic_beacon('tea_party', beacon)</text:p>
      <text:p text:style-name="Preformatted_20_Text"><text:s text:c="8"/></text:p>
      <text:p text:style-name="Preformatted_20_Text"><text:s text:c="8"/># Update user profile</text:p>
      <text:p text:style-name="Preformatted_20_Text"><text:s text:c="8"/>self.update_user_profile_from_tea_party(session_data)</text:p>
      <text:p text:style-name="Preformatted_20_Text"><text:s text:c="4"/></text:p>
      <text:p text:style-name="Preformatted_20_Text"><text:s text:c="4"/>def extract_child_preferences(self, session_data):</text:p>
      <text:p text:style-name="Preformatted_20_Text"><text:s text:c="8"/>"""</text:p>
      <text:p text:style-name="Preformatted_20_Text"><text:s text:c="8"/>Extract child's preferences from tea party interactions</text:p>
      <text:p text:style-name="Preformatted_20_Text"><text:s text:c="8"/>"""</text:p>
      <text:p text:style-name="Preformatted_20_Text"><text:s text:c="8"/>preferences = {</text:p>
      <text:p text:style-name="Preformatted_20_Text"><text:s text:c="12"/>'favorite_toys': [],</text:p>
      <text:p text:style-name="Preformatted_20_Text"><text:s text:c="12"/>'preferred_interactions': [],</text:p>
      <text:p text:style-name="Preformatted_20_Text"><text:s text:c="12"/>'engagement_patterns': [],</text:p>
      <text:p text:style-name="Preformatted_20_Text"><text:s text:c="12"/>'emotional_triggers': []</text:p>
      <text:p text:style-name="Preformatted_20_Text"><text:s text:c="8"/>}</text:p>
      <text:p text:style-name="Preformatted_20_Text"><text:s text:c="8"/></text:p>
      <text:p text:style-name="Preformatted_20_Text"><text:s text:c="8"/># Analyze which toys child interacted with most</text:p>
      <text:p text:style-name="Preformatted_20_Text"><text:s text:c="8"/>interaction_counts = {}</text:p>
      <text:p text:style-name="Preformatted_20_Text"><text:s text:c="8"/>for moment in session_data['magical_moments']:</text:p>
      <text:p text:style-name="Preformatted_20_Text"><text:s text:c="12"/>if 'toy' in moment:</text:p>
      <text:p text:style-name="Preformatted_20_Text"><text:s text:c="16"/>interaction_counts[moment['toy']] = interaction_counts.get(moment['toy'], 0) + 1</text:p>
      <text:p text:style-name="Preformatted_20_Text"><text:s text:c="8"/></text:p>
      <text:p text:style-name="Preformatted_20_Text"><text:s text:c="8"/>if interaction_counts:</text:p>
      <text:p text:style-name="Preformatted_20_Text"><text:s text:c="12"/>favorite_toy = max(interaction_counts, key=interaction_counts.get)</text:p>
      <text:p text:style-name="Preformatted_20_Text"><text:s text:c="12"/>preferences['favorite_toys'].append(favorite_toy)</text:p>
      <text:p text:style-name="Preformatted_20_Text"><text:s text:c="8"/></text:p>
      <text:p text:style-name="Preformatted_20_Text"><text:s text:c="8"/># Analyze emotional triggers</text:p>
      <text:p text:style-name="Preformatted_20_Text"><text:s text:c="8"/>emotion_changes = self.analyze_emotion_changes(session_data['child_emotion_history'])</text:p>
      <text:p text:style-name="Preformatted_20_Text"><text:s text:c="8"/>preferences['emotional_triggers'] = emotion_changes</text:p>
      <text:p text:style-name="Preformatted_20_Text"><text:s text:c="8"/></text:p>
      <text:p text:style-name="Preformatted_20_Text"><text:s text:c="8"/>return preferences</text:p>
      <text:p text:style-name="Preformatted_20_Text"><text:s text:c="4"/></text:p>
      <text:p text:style-name="Preformatted_20_Text"><text:s text:c="4"/>def generate_suggestions(self, session_data):</text:p>
      <text:p text:style-name="Preformatted_20_Text"><text:s text:c="8"/>"""</text:p>
      <text:p text:style-name="Preformatted_20_Text"><text:s text:c="8"/>Generate suggestions for future tea parties</text:p>
      <text:p text:style-name="Preformatted_20_Text"><text:s text:c="8"/>"""</text:p>
      <text:p text:style-name="Preformatted_20_Text"><text:soft-page-break/><text:s text:c="8"/>suggestions = []</text:p>
      <text:p text:style-name="Preformatted_20_Text"><text:s text:c="8"/></text:p>
      <text:p text:style-name="Preformatted_20_Text"><text:s text:c="8"/># Based on engagement patterns</text:p>
      <text:p text:style-name="Preformatted_20_Text"><text:s text:c="8"/>avg_engagement = np.mean([e['engagement_level'] for e in session_data['child_emotion_history']])</text:p>
      <text:p text:style-name="Preformatted_20_Text"><text:s text:c="8"/></text:p>
      <text:p text:style-name="Preformatted_20_Text"><text:s text:c="8"/>if avg_engagement &lt; 0.5:</text:p>
      <text:p text:style-name="Preformatted_20_Text"><text:s text:c="12"/>suggestions.append({</text:p>
      <text:p text:style-name="Preformatted_20_Text"><text:s text:c="16"/>'type': 'increase_engagement',</text:p>
      <text:p text:style-name="Preformatted_20_Text"><text:s text:c="16"/>'suggestion': 'Include more interactive games next time',</text:p>
      <text:p text:style-name="Preformatted_20_Text"><text:s text:c="16"/>'reason': 'Child engagement was below optimal level'</text:p>
      <text:p text:style-name="Preformatted_20_Text"><text:s text:c="12"/>})</text:p>
      <text:p text:style-name="Preformatted_20_Text"><text:s text:c="8"/></text:p>
      <text:p text:style-name="Preformatted_20_Text"><text:s text:c="8"/># Based on toy interactions</text:p>
      <text:p text:style-name="Preformatted_20_Text"><text:s text:c="8"/>if len(session_data.get('toy_interactions', [])) &lt; 3:</text:p>
      <text:p text:style-name="Preformatted_20_Text"><text:s text:c="12"/>suggestions.append({</text:p>
      <text:p text:style-name="Preformatted_20_Text"><text:s text:c="16"/>'type': 'encourage_interaction',</text:p>
      <text:p text:style-name="Preformatted_20_Text"><text:s text:c="16"/>'suggestion': 'Prompt child to interact with each toy individually',</text:p>
      <text:p text:style-name="Preformatted_20_Text"><text:s text:c="16"/>'reason': 'Limited interaction with toys detected'</text:p>
      <text:p text:style-name="Preformatted_20_Text"><text:s text:c="12"/>})</text:p>
      <text:p text:style-name="Preformatted_20_Text"><text:s text:c="8"/></text:p>
      <text:p text:style-name="P15"><text:s text:c="8"/>return suggestions</text:p>
      <text:h text:style-name="Heading_20_2" text:outline-level="2"><text:span text:style-name="Strong_20_Emphasis">6. Web Interface &amp; Controls</text:span></text:h>
      <text:h text:style-name="Heading_20_3" text:outline-level="3"><text:span text:style-name="Strong_20_Emphasis">A. Parent/Child Control Panel</text:span></text:h>
      <text:p text:style-name="Text_20_body">html</text:p>
      <text:p text:style-name="Preformatted_20_Text">&lt;div class="tea-party-controls"&gt;</text:p>
      <text:p text:style-name="Preformatted_20_Text"><text:s text:c="4"/>&lt;h2&gt;Marvin's Magical Tea Party&lt;/h2&gt;</text:p>
      <text:p text:style-name="Preformatted_20_Text"><text:s text:c="4"/></text:p>
      <text:p text:style-name="Preformatted_20_Text"><text:s text:c="4"/>&lt;!-- Camera Feed with AR Overlay --&gt;</text:p>
      <text:p text:style-name="Preformatted_20_Text"><text:s text:c="4"/>&lt;div class="camera-feed"&gt;</text:p>
      <text:p text:style-name="Preformatted_20_Text"><text:s text:c="8"/>&lt;video id="cameraFeed" autoplay&gt;&lt;/video&gt;</text:p>
      <text:p text:style-name="Preformatted_20_Text"><text:s text:c="8"/>&lt;canvas id="arOverlay"&gt;&lt;/canvas&gt;</text:p>
      <text:p text:style-name="Preformatted_20_Text"><text:s text:c="4"/>&lt;/div&gt;</text:p>
      <text:p text:style-name="Preformatted_20_Text"><text:s text:c="4"/></text:p>
      <text:p text:style-name="Preformatted_20_Text"><text:s text:c="4"/>&lt;!-- Toy Roster --&gt;</text:p>
      <text:p text:style-name="Preformatted_20_Text"><text:s text:c="4"/>&lt;div class="toy-roster"&gt;</text:p>
      <text:p text:style-name="Preformatted_20_Text"><text:s text:c="8"/>&lt;h3&gt;Party Guests&lt;/h3&gt;</text:p>
      <text:p text:style-name="Preformatted_20_Text"><text:s text:c="8"/>&lt;div id="toyList"&gt;</text:p>
      <text:p text:style-name="Preformatted_20_Text"><text:s text:c="12"/>&lt;!-- Dynamically populated --&gt;</text:p>
      <text:p text:style-name="Preformatted_20_Text"><text:s text:c="8"/>&lt;/div&gt;</text:p>
      <text:p text:style-name="Preformatted_20_Text"><text:s text:c="4"/>&lt;/div&gt;</text:p>
      <text:p text:style-name="Preformatted_20_Text"><text:s text:c="4"/></text:p>
      <text:p text:style-name="Preformatted_20_Text"><text:s text:c="4"/>&lt;!-- Marvin's Expression --&gt;</text:p>
      <text:p text:style-name="Preformatted_20_Text"><text:s text:c="4"/>&lt;div class="marvin-expression"&gt;</text:p>
      <text:p text:style-name="Preformatted_20_Text"><text:s text:c="8"/>&lt;canvas id="marvinFace" width="400" height="300"&gt;&lt;/canvas&gt;</text:p>
      <text:p text:style-name="Preformatted_20_Text"><text:s text:c="8"/>&lt;div class="marvin-status"&gt;</text:p>
      <text:p text:style-name="Preformatted_20_Text"><text:s text:c="12"/>&lt;span id="marvinMood"&gt;Happy&lt;/span&gt;</text:p>
      <text:p text:style-name="Preformatted_20_Text"><text:s text:c="12"/>&lt;span id="marvinEnergy"&gt;High&lt;/span&gt;</text:p>
      <text:p text:style-name="Preformatted_20_Text"><text:s text:c="8"/>&lt;/div&gt;</text:p>
      <text:p text:style-name="Preformatted_20_Text"><text:s text:c="4"/>&lt;/div&gt;</text:p>
      <text:p text:style-name="Preformatted_20_Text"><text:s text:c="4"/></text:p>
      <text:p text:style-name="Preformatted_20_Text"><text:s text:c="4"/>&lt;!-- Controls --&gt;</text:p>
      <text:p text:style-name="Preformatted_20_Text"><text:s text:c="4"/>&lt;div class="party-controls"&gt;</text:p>
      <text:p text:style-name="Preformatted_20_Text"><text:s text:c="8"/>&lt;button onclick="startTeaParty()"&gt;Start Tea Party&lt;/button&gt;</text:p>
      <text:p text:style-name="Preformatted_20_Text"><text:s text:c="8"/>&lt;button onclick="addMagicalEffect()"&gt;Add Magic&lt;/button&gt;</text:p>
      <text:p text:style-name="Preformatted_20_Text"><text:s text:c="8"/>&lt;button onclick="takeTeaPartyPhoto()"&gt;Take Photo&lt;/button&gt;</text:p>
      <text:p text:style-name="Preformatted_20_Text"><text:soft-page-break/><text:s text:c="8"/>&lt;button onclick="endTeaParty()"&gt;End Party&lt;/button&gt;</text:p>
      <text:p text:style-name="Preformatted_20_Text"><text:s text:c="4"/>&lt;/div&gt;</text:p>
      <text:p text:style-name="Preformatted_20_Text"><text:s text:c="4"/></text:p>
      <text:p text:style-name="Preformatted_20_Text"><text:s text:c="4"/>&lt;!-- Child's Emotion Display --&gt;</text:p>
      <text:p text:style-name="Preformatted_20_Text"><text:s text:c="4"/>&lt;div class="child-emotion-display"&gt;</text:p>
      <text:p text:style-name="Preformatted_20_Text"><text:s text:c="8"/>&lt;h3&gt;How You're Feeling&lt;/h3&gt;</text:p>
      <text:p text:style-name="Preformatted_20_Text"><text:s text:c="8"/>&lt;div class="emotion-meter"&gt;</text:p>
      <text:p text:style-name="Preformatted_20_Text"><text:s text:c="12"/>&lt;div class="emotion-bar" id="happinessBar"&gt;&lt;/div&gt;</text:p>
      <text:p text:style-name="Preformatted_20_Text"><text:s text:c="12"/>&lt;div class="emotion-bar" id="excitementBar"&gt;&lt;/div&gt;</text:p>
      <text:p text:style-name="Preformatted_20_Text"><text:s text:c="12"/>&lt;div class="emotion-bar" id="engagementBar"&gt;&lt;/div&gt;</text:p>
      <text:p text:style-name="Preformatted_20_Text"><text:s text:c="8"/>&lt;/div&gt;</text:p>
      <text:p text:style-name="Preformatted_20_Text"><text:s text:c="8"/>&lt;p id="currentEmotion"&gt;Detecting emotion...&lt;/p&gt;</text:p>
      <text:p text:style-name="Preformatted_20_Text"><text:s text:c="4"/>&lt;/div&gt;</text:p>
      <text:p text:style-name="Preformatted_20_Text"><text:s text:c="4"/></text:p>
      <text:p text:style-name="Preformatted_20_Text"><text:s text:c="4"/>&lt;!-- Toy Chat --&gt;</text:p>
      <text:p text:style-name="Preformatted_20_Text"><text:s text:c="4"/>&lt;div class="toy-chat"&gt;</text:p>
      <text:p text:style-name="Preformatted_20_Text"><text:s text:c="8"/>&lt;h3&gt;Party Conversation&lt;/h3&gt;</text:p>
      <text:p text:style-name="Preformatted_20_Text"><text:s text:c="8"/>&lt;div class="chat-log" id="toyChatLog"&gt;</text:p>
      <text:p text:style-name="Preformatted_20_Text"><text:s text:c="12"/>&lt;!-- Conversation appears here --&gt;</text:p>
      <text:p text:style-name="Preformatted_20_Text"><text:s text:c="8"/>&lt;/div&gt;</text:p>
      <text:p text:style-name="Preformatted_20_Text"><text:s text:c="8"/>&lt;div class="child-response"&gt;</text:p>
      <text:p text:style-name="Preformatted_20_Text"><text:s text:c="12"/>&lt;input type="text" id="childResponse" placeholder="Type your response..."&gt;</text:p>
      <text:p text:style-name="Preformatted_20_Text"><text:s text:c="12"/>&lt;button onclick="sendResponse()"&gt;Send&lt;/button&gt;</text:p>
      <text:p text:style-name="Preformatted_20_Text"><text:s text:c="12"/>&lt;button onclick="speakResponse()"&gt;? Speak&lt;/button&gt;</text:p>
      <text:p text:style-name="Preformatted_20_Text"><text:s text:c="8"/>&lt;/div&gt;</text:p>
      <text:p text:style-name="Preformatted_20_Text"><text:s text:c="4"/>&lt;/div&gt;</text:p>
      <text:p text:style-name="Preformatted_20_Text">&lt;/div&gt;</text:p>
      <text:p text:style-name="Preformatted_20_Text"/>
      <text:p text:style-name="Preformatted_20_Text">&lt;script&gt;</text:p>
      <text:p text:style-name="Preformatted_20_Text">// WebSocket connection for real-time updates</text:p>
      <text:p text:style-name="Preformatted_20_Text">const teaPartyWS = new WebSocket('ws://localhost:8765/tea-party');</text:p>
      <text:p text:style-name="Preformatted_20_Text"/>
      <text:p text:style-name="Preformatted_20_Text">teaPartyWS.onmessage = function(event) {</text:p>
      <text:p text:style-name="Preformatted_20_Text"><text:s text:c="4"/>const data = JSON.parse(event.data);</text:p>
      <text:p text:style-name="Preformatted_20_Text"><text:s text:c="4"/></text:p>
      <text:p text:style-name="Preformatted_20_Text"><text:s text:c="4"/>switch(data.type) {</text:p>
      <text:p text:style-name="Preformatted_20_Text"><text:s text:c="8"/>case 'toy_detected':</text:p>
      <text:p text:style-name="Preformatted_20_Text"><text:s text:c="12"/>addToyToRoster(data.toy);</text:p>
      <text:p text:style-name="Preformatted_20_Text"><text:s text:c="12"/>break;</text:p>
      <text:p text:style-name="Preformatted_20_Text"><text:s text:c="8"/>case 'marvin_expression':</text:p>
      <text:p text:style-name="Preformatted_20_Text"><text:s text:c="12"/>updateMarvinExpression(data.expression, data.intensity);</text:p>
      <text:p text:style-name="Preformatted_20_Text"><text:s text:c="12"/>break;</text:p>
      <text:p text:style-name="Preformatted_20_Text"><text:s text:c="8"/>case 'toy_speaking':</text:p>
      <text:p text:style-name="Preformatted_20_Text"><text:s text:c="12"/>addToyToChat(data.toy, data.message);</text:p>
      <text:p text:style-name="Preformatted_20_Text"><text:s text:c="12"/>break;</text:p>
      <text:p text:style-name="Preformatted_20_Text"><text:s text:c="8"/>case 'child_emotion_update':</text:p>
      <text:p text:style-name="Preformatted_20_Text"><text:s text:c="12"/>updateEmotionDisplay(data.emotion);</text:p>
      <text:p text:style-name="Preformatted_20_Text"><text:s text:c="12"/>break;</text:p>
      <text:p text:style-name="Preformatted_20_Text"><text:s text:c="8"/>case 'ar_effect':</text:p>
      <text:p text:style-name="Preformatted_20_Text"><text:s text:c="12"/>showAREffect(data.effect);</text:p>
      <text:p text:style-name="Preformatted_20_Text"><text:s text:c="12"/>break;</text:p>
      <text:p text:style-name="Preformatted_20_Text"><text:s text:c="8"/>case 'magical_moment':</text:p>
      <text:p text:style-name="Preformatted_20_Text"><text:s text:c="12"/>celebrateMagicalMoment(data.moment);</text:p>
      <text:p text:style-name="Preformatted_20_Text"><text:s text:c="12"/>break;</text:p>
      <text:p text:style-name="Preformatted_20_Text"><text:s text:c="4"/>}</text:p>
      <text:p text:style-name="Preformatted_20_Text">};</text:p>
      <text:p text:style-name="Preformatted_20_Text"/>
      <text:p text:style-name="Preformatted_20_Text">// Camera access</text:p>
      <text:p text:style-name="Preformatted_20_Text">async function startCamera() {</text:p>
      <text:p text:style-name="Preformatted_20_Text"><text:s text:c="4"/>try {</text:p>
      <text:p text:style-name="Preformatted_20_Text"><text:s text:c="8"/>const stream = await navigator.mediaDevices.getUserMedia({ </text:p>
      <text:p text:style-name="Preformatted_20_Text"><text:s text:c="12"/>video: { width: 1280, height: 720 } </text:p>
      <text:p text:style-name="Preformatted_20_Text"><text:s text:c="8"/>});</text:p>
      <text:p text:style-name="Preformatted_20_Text"><text:soft-page-break/><text:s text:c="8"/>document.getElementById('cameraFeed').srcObject = stream;</text:p>
      <text:p text:style-name="Preformatted_20_Text"><text:s text:c="4"/>} catch (err) {</text:p>
      <text:p text:style-name="Preformatted_20_Text"><text:s text:c="8"/>console.error("Camera error: ", err);</text:p>
      <text:p text:style-name="Preformatted_20_Text"><text:s text:c="4"/>}</text:p>
      <text:p text:style-name="Preformatted_20_Text">}</text:p>
      <text:p text:style-name="Preformatted_20_Text"/>
      <text:p text:style-name="Preformatted_20_Text">// Start tea party</text:p>
      <text:p text:style-name="Preformatted_20_Text">function startTeaParty() {</text:p>
      <text:p text:style-name="Preformatted_20_Text"><text:s text:c="4"/>teaPartyWS.send(JSON.stringify({</text:p>
      <text:p text:style-name="Preformatted_20_Text"><text:s text:c="8"/>type: 'start_tea_party',</text:p>
      <text:p text:style-name="Preformatted_20_Text"><text:s text:c="8"/>user_profile: getUserProfile()</text:p>
      <text:p text:style-name="Preformatted_20_Text"><text:s text:c="4"/>}));</text:p>
      <text:p text:style-name="Preformatted_20_Text"><text:s text:c="4"/></text:p>
      <text:p text:style-name="Preformatted_20_Text"><text:s text:c="4"/>// Start emotion detection</text:p>
      <text:p text:style-name="Preformatted_20_Text"><text:s text:c="4"/>startEmotionDetection();</text:p>
      <text:p text:style-name="Preformatted_20_Text">}</text:p>
      <text:p text:style-name="Preformatted_20_Text"/>
      <text:p text:style-name="Preformatted_20_Text">// Emotion detection using webcam</text:p>
      <text:p text:style-name="Preformatted_20_Text">function startEmotionDetection() {</text:p>
      <text:p text:style-name="Preformatted_20_Text"><text:s text:c="4"/>const video = document.getElementById('cameraFeed');</text:p>
      <text:p text:style-name="Preformatted_20_Text"><text:s text:c="4"/>const canvas = document.createElement('canvas');</text:p>
      <text:p text:style-name="Preformatted_20_Text"><text:s text:c="4"/>const ctx = canvas.getContext('2d');</text:p>
      <text:p text:style-name="Preformatted_20_Text"><text:s text:c="4"/></text:p>
      <text:p text:style-name="Preformatted_20_Text"><text:s text:c="4"/>setInterval(() =&gt; {</text:p>
      <text:p text:style-name="Preformatted_20_Text"><text:s text:c="8"/>canvas.width = video.videoWidth;</text:p>
      <text:p text:style-name="Preformatted_20_Text"><text:s text:c="8"/>canvas.height = video.videoHeight;</text:p>
      <text:p text:style-name="Preformatted_20_Text"><text:s text:c="8"/>ctx.drawImage(video, 0, 0);</text:p>
      <text:p text:style-name="Preformatted_20_Text"><text:s text:c="8"/></text:p>
      <text:p text:style-name="Preformatted_20_Text"><text:s text:c="8"/>// Send frame to server for emotion analysis</text:p>
      <text:p text:style-name="Preformatted_20_Text"><text:s text:c="8"/>const imageData = canvas.toDataURL('image/jpeg', 0.5);</text:p>
      <text:p text:style-name="Preformatted_20_Text"><text:s text:c="8"/>teaPartyWS.send(JSON.stringify({</text:p>
      <text:p text:style-name="Preformatted_20_Text"><text:s text:c="12"/>type: 'emotion_frame',</text:p>
      <text:p text:style-name="Preformatted_20_Text"><text:s text:c="12"/>image: imageData</text:p>
      <text:p text:style-name="Preformatted_20_Text"><text:s text:c="8"/>}));</text:p>
      <text:p text:style-name="Preformatted_20_Text"><text:s text:c="4"/>}, 1000); // Send every second</text:p>
      <text:p text:style-name="Preformatted_20_Text">}</text:p>
      <text:p text:style-name="Preformatted_20_Text"/>
      <text:p text:style-name="Preformatted_20_Text">// Update emotion display</text:p>
      <text:p text:style-name="Preformatted_20_Text">function updateEmotionDisplay(emotionData) {</text:p>
      <text:p text:style-name="Preformatted_20_Text"><text:s text:c="4"/>document.getElementById('happinessBar').style.width = </text:p>
      <text:p text:style-name="Preformatted_20_Text"><text:s text:c="8"/>`${emotionData.happiness * 100}%`;</text:p>
      <text:p text:style-name="Preformatted_20_Text"><text:s text:c="4"/>document.getElementById('excitementBar').style.width = </text:p>
      <text:p text:style-name="Preformatted_20_Text"><text:s text:c="8"/>`${emotionData.excitement * 100}%`;</text:p>
      <text:p text:style-name="Preformatted_20_Text"><text:s text:c="4"/>document.getElementById('engagementBar').style.width = </text:p>
      <text:p text:style-name="Preformatted_20_Text"><text:s text:c="8"/>`${emotionData.engagement * 100}%`;</text:p>
      <text:p text:style-name="Preformatted_20_Text"><text:s text:c="4"/></text:p>
      <text:p text:style-name="Preformatted_20_Text"><text:s text:c="4"/>document.getElementById('currentEmotion').textContent = </text:p>
      <text:p text:style-name="Preformatted_20_Text"><text:s text:c="8"/>`You're feeling ${emotionData.primary_emotion}`;</text:p>
      <text:p text:style-name="Preformatted_20_Text">}</text:p>
      <text:p text:style-name="Preformatted_20_Text"/>
      <text:p text:style-name="Preformatted_20_Text">// Initialize</text:p>
      <text:p text:style-name="Preformatted_20_Text">startCamera();</text:p>
      <text:p text:style-name="P15">&lt;/script&gt;</text:p>
      <text:h text:style-name="Heading_20_2" text:outline-level="2"><text:span text:style-name="Strong_20_Emphasis">7. Implementation Phases</text:span></text:h>
      <text:h text:style-name="Heading_20_3" text:outline-level="3"><text:span text:style-name="Strong_20_Emphasis">Phase 1: Basic Toy Recognition (2 weeks)</text:span></text:h>
      <text:list xml:id="list8701818849505556201" text:style-name="L6">
        <text:list-item>
          <text:p text:style-name="P6">Implement toy detection using pre-trained models</text:p>
        </text:list-item>
        <text:list-item>
          <text:p text:style-name="P6">Simple AR overlay system</text:p>
        </text:list-item>
        <text:list-item>
          <text:p text:style-name="P6"><text:soft-page-break/>Basic emotion detection from camera</text:p>
        </text:list-item>
      </text:list>
      <text:h text:style-name="Heading_20_3" text:outline-level="3"><text:span text:style-name="Strong_20_Emphasis">Phase 2: Advanced Interaction (3 weeks)</text:span></text:h>
      <text:list xml:id="list5887097777575398510" text:style-name="L7">
        <text:list-item>
          <text:p text:style-name="P7">Gesture recognition for tea pouring</text:p>
        </text:list-item>
        <text:list-item>
          <text:p text:style-name="P7">Toy personality system</text:p>
        </text:list-item>
        <text:list-item>
          <text:p text:style-name="P7">Conversation engine for toys</text:p>
        </text:list-item>
        <text:list-item>
          <text:p text:style-name="P7">Marvin's expression mirroring</text:p>
        </text:list-item>
      </text:list>
      <text:h text:style-name="Heading_20_3" text:outline-level="3"><text:span text:style-name="Strong_20_Emphasis">Phase 3: Magical Elements (2 weeks)</text:span></text:h>
      <text:list xml:id="list9061155823786509215" text:style-name="L8">
        <text:list-item>
          <text:p text:style-name="P8">AR magical effects</text:p>
        </text:list-item>
        <text:list-item>
          <text:p text:style-name="P8">Progressive magical transformation</text:p>
        </text:list-item>
        <text:list-item>
          <text:p text:style-name="P8">Sound effects and music integration</text:p>
        </text:list-item>
        <text:list-item>
          <text:p text:style-name="P8">Photo capture with AR elements</text:p>
        </text:list-item>
      </text:list>
      <text:h text:style-name="Heading_20_3" text:outline-level="3"><text:span text:style-name="Strong_20_Emphasis">Phase 4: Polish &amp; Integration (3 weeks)</text:span></text:h>
      <text:list xml:id="list2009165235656031595" text:style-name="L9">
        <text:list-item>
          <text:p text:style-name="P9">Performance optimization for RPi5</text:p>
        </text:list-item>
        <text:list-item>
          <text:p text:style-name="P9">Integration with main Marvin system</text:p>
        </text:list-item>
        <text:list-item>
          <text:p text:style-name="P9">Parent control panel</text:p>
        </text:list-item>
        <text:list-item>
          <text:p text:style-name="P9">Memory system integration</text:p>
        </text:list-item>
      </text:list>
      <text:h text:style-name="Heading_20_2" text:outline-level="2"><text:span text:style-name="Strong_20_Emphasis">8. Key Features &amp; Benefits</text:span></text:h>
      <text:h text:style-name="Heading_20_3" text:outline-level="3"><text:span text:style-name="Strong_20_Emphasis">A. For Children:</text:span></text:h>
      <text:list xml:id="list5127038092925507261" text:style-name="L10">
        <text:list-item>
          <text:p text:style-name="P10"><text:span text:style-name="Strong_20_Emphasis">Imaginative Play</text:span>: Physical toys become animated characters</text:p>
        </text:list-item>
        <text:list-item>
          <text:p text:style-name="P10"><text:span text:style-name="Strong_20_Emphasis">Emotional Intelligence</text:span>: Learn to recognize and respond to emotions</text:p>
        </text:list-item>
        <text:list-item>
          <text:p text:style-name="P10"><text:span text:style-name="Strong_20_Emphasis">Social Skills</text:span>: Practice conversation and hosting</text:p>
        </text:list-item>
        <text:list-item>
          <text:p text:style-name="P10"><text:span text:style-name="Strong_20_Emphasis">Creativity</text:span>: Magical transformations encourage creative thinking</text:p>
        </text:list-item>
        <text:list-item>
          <text:p text:style-name="P10"><text:span text:style-name="Strong_20_Emphasis">Memory Creation</text:span>: Magical moments become cherished memories</text:p>
        </text:list-item>
      </text:list>
      <text:h text:style-name="Heading_20_3" text:outline-level="3"><text:span text:style-name="Strong_20_Emphasis">B. For Parents/Educators:</text:span></text:h>
      <text:list xml:id="list5286432040756362162" text:style-name="L11">
        <text:list-item>
          <text:p text:style-name="P11"><text:span text:style-name="Strong_20_Emphasis">Developmental Insights</text:span>: Track child's emotional and social development</text:p>
        </text:list-item>
        <text:list-item>
          <text:p text:style-name="P11"><text:span text:style-name="Strong_20_Emphasis">Safe Environment</text:span>: Controlled, positive social interactions</text:p>
        </text:list-item>
        <text:list-item>
          <text:p text:style-name="P11"><text:span text:style-name="Strong_20_Emphasis">Educational Value</text:span>: Hidden learning in play</text:p>
        </text:list-item>
        <text:list-item>
          <text:p text:style-name="P11"><text:span text:style-name="Strong_20_Emphasis">Bonding Opportunity</text:span>: Can join tea party remotely</text:p>
        </text:list-item>
      </text:list>
      <text:h text:style-name="Heading_20_3" text:outline-level="3"><text:span text:style-name="Strong_20_Emphasis">C. Technical Innovations:</text:span></text:h>
      <text:list xml:id="list2756050989117596334" text:style-name="L12">
        <text:list-item>
          <text:p text:style-name="P12"><text:span text:style-name="Strong_20_Emphasis">Real-Time AR on RPi5</text:span>: Optimized for resource constraints</text:p>
        </text:list-item>
        <text:list-item>
          <text:p text:style-name="P12"><text:span text:style-name="Strong_20_Emphasis">Multi-Modal Emotion Recognition</text:span>: Combines facial, body, and vocal cues</text:p>
        </text:list-item>
        <text:list-item>
          <text:p text:style-name="P12"><text:soft-page-break/><text:span text:style-name="Strong_20_Emphasis">Toy Personality AI</text:span>: Each toy develops unique characteristics</text:p>
        </text:list-item>
        <text:list-item>
          <text:p text:style-name="P12"><text:span text:style-name="Strong_20_Emphasis">Progressive Magic System</text:span>: Rewards positive interaction with magical moments</text:p>
        </text:list-item>
      </text:list>
      <text:h text:style-name="Heading_20_2" text:outline-level="2"><text:span text:style-name="Strong_20_Emphasis">Conclusion</text:span></text:h>
      <text:p text:style-name="Text_20_body">This <text:span text:style-name="Strong_20_Emphasis">Augmented Reality Tea Party System</text:span> creates a deeply immersive, magical experience that bridges the physical and digital worlds. By:</text:p>
      <text:list xml:id="list1866289574727802779" text:style-name="L13">
        <text:list-item>
          <text:p text:style-name="P13"><text:span text:style-name="Strong_20_Emphasis">Transforming physical toys</text:span> into animated characters with AR</text:p>
        </text:list-item>
        <text:list-item>
          <text:p text:style-name="P13"><text:span text:style-name="Strong_20_Emphasis">Responding to child's emotions</text:span> with Marvin's expressive face</text:p>
        </text:list-item>
        <text:list-item>
          <text:p text:style-name="P13"><text:span text:style-name="Strong_20_Emphasis">Creating progressive magical moments</text:span> that reward engagement</text:p>
        </text:list-item>
        <text:list-item>
          <text:p text:style-name="P13"><text:span text:style-name="Strong_20_Emphasis">Fostering social-emotional development</text:span> through guided play</text:p>
        </text:list-item>
      </text:list>
      <text:p text:style-name="Text_20_body">We create a therapeutic, educational, and joyful experience that helps children:</text:p>
      <text:list xml:id="list67807577533053584" text:style-name="L14">
        <text:list-item>
          <text:p text:style-name="P14"><text:span text:style-name="Strong_20_Emphasis">Develop empathy</text:span> through emotional mirroring</text:p>
        </text:list-item>
        <text:list-item>
          <text:p text:style-name="P14"><text:span text:style-name="Strong_20_Emphasis">Practice social skills</text:span> in a safe environment</text:p>
        </text:list-item>
        <text:list-item>
          <text:p text:style-name="P14"><text:span text:style-name="Strong_20_Emphasis">Engage in imaginative play</text:span> with their favorite toys</text:p>
        </text:list-item>
        <text:list-item>
          <text:p text:style-name="P14"><text:span text:style-name="Strong_20_Emphasis">Build positive memories</text:span> of magical interactions</text:p>
        </text:list-item>
      </text:list>
      <text:p text:style-name="Text_20_body">The system maintains the <text:span text:style-name="Strong_20_Emphasis">Peter Protocol's core values</text:span> of protection, dignity, and compassionate interaction while adding layers of <text:span text:style-name="Strong_20_Emphasis">magical engagement</text:span> that make the tea party experience truly special for children of all ages, including the young at hear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23T09:39:27.46</meta:creation-date>
    <dc:date>2025-12-23T09:53:37.30</dc:date>
    <dc:creator>Peter Thompson</dc:creator>
    <meta:editing-duration>PT14M11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55" meta:paragraph-count="3130" meta:word-count="8686" meta:character-count="114666"/>
  </office:meta>
</office:document-meta>
</file>