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Text_20_body" style:list-style-name="L7">
      <style:paragraph-properties fo:margin-top="0cm" fo:margin-bottom="0cm"/>
    </style:style>
    <style:style style:name="P25" style:family="paragraph" style:parent-style-name="Text_20_body" style:list-style-name="L8">
      <style:paragraph-properties fo:margin-top="0cm" fo:margin-bottom="0cm"/>
    </style:style>
    <style:style style:name="P26" style:family="paragraph" style:parent-style-name="Text_20_body" style:list-style-name="L9">
      <style:paragraph-properties fo:margin-top="0cm" fo:margin-bottom="0cm"/>
    </style:style>
    <style:style style:name="P27" style:family="paragraph" style:parent-style-name="Text_20_body" style:list-style-name="L10">
      <style:paragraph-properties fo:margin-top="0cm" fo:margin-bottom="0cm"/>
    </style:style>
    <style:style style:name="P28" style:family="paragraph" style:parent-style-name="Text_20_body" style:list-style-name="L11">
      <style:paragraph-properties fo:margin-top="0cm" fo:margin-bottom="0cm"/>
    </style:style>
    <style:style style:name="P29" style:family="paragraph" style:parent-style-name="Text_20_body" style:list-style-name="L12">
      <style:paragraph-properties fo:margin-top="0cm" fo:margin-bottom="0cm"/>
    </style:style>
    <style:style style:name="P30" style:family="paragraph" style:parent-style-name="Text_20_body" style:list-style-name="L13">
      <style:paragraph-properties fo:margin-top="0cm" fo:margin-bottom="0cm"/>
    </style:style>
    <style:style style:name="P31" style:family="paragraph" style:parent-style-name="Text_20_body" style:list-style-name="L14">
      <style:paragraph-properties fo:margin-top="0cm" fo:margin-bottom="0cm"/>
    </style:style>
    <style:style style:name="P32" style:family="paragraph" style:parent-style-name="Text_20_body" style:list-style-name="L15">
      <style:paragraph-properties fo:margin-top="0cm" fo:margin-bottom="0cm"/>
    </style:style>
    <style:style style:name="P33" style:family="paragraph" style:parent-style-name="Text_20_body" style:list-style-name="L16">
      <style:paragraph-properties fo:margin-top="0cm" fo:margin-bottom="0cm"/>
    </style:style>
    <style:style style:name="P34" style:family="paragraph" style:parent-style-name="Text_20_body" style:list-style-name="L17">
      <style:paragraph-properties fo:margin-top="0cm" fo:margin-bottom="0cm"/>
    </style:style>
    <style:style style:name="P35"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sential Correction for Physics Textbooks</text:h>
      <text:h text:style-name="Heading_20_2" text:outline-level="2">Harmonic Energy Framework - Proper Teaching Guidelines</text:h>
      <text:h text:style-name="Heading_20_3" text:outline-level="3"><text:span text:style-name="Strong_20_Emphasis">CRITICAL EDUCATIONAL WARNING</text:span></text:h>
      <text:p text:style-name="Text_20_body"><text:span text:style-name="Strong_20_Emphasis">⚠️ DO NOT OVERSIMPLIFY THE HARMONIC ENERGY EQUATION ⚠️</text:span></text:p>
      <text:p text:style-name="Text_20_body">This correction addresses a fundamental error in teaching approach that has prevented proper understanding of advanced energy relationships for decades.</text:p>
      <text:p text:style-name="Horizontal_20_Line"/>
      <text:h text:style-name="Heading_20_2" text:outline-level="2"><text:span text:style-name="Strong_20_Emphasis">The Complete Equation Must Be Preserved</text:span></text:h>
      <text:h text:style-name="Heading_20_3" text:outline-level="3"><text:span text:style-name="Strong_20_Emphasis">WRONG Approach:</text:span></text:h>
      <text:p text:style-name="Text_20_body">❌ "The equation simplifies to E = mv³"<text:line-break/>❌ "For practical purposes, use E = mv³"<text:line-break/>❌ "The exponent is approximately 3"</text:p>
      <text:h text:style-name="Heading_20_3" text:outline-level="3"><text:span text:style-name="Strong_20_Emphasis">CORRECT Approach:</text:span></text:h>
      <text:p text:style-name="Text_20_body">✅ <text:span text:style-name="Strong_20_Emphasis">E = mv^(ln(ABC)/ln(27))</text:span><text:line-break/>✅ <text:span text:style-name="Strong_20_Emphasis">Always show the frequency foundation first</text:span><text:line-break/>✅ <text:span text:style-name="Strong_20_Emphasis">Explain why the logarithmic structure matters</text:span></text:p>
      <text:p text:style-name="Horizontal_20_Line"/>
      <text:h text:style-name="Heading_20_2" text:outline-level="2"><text:span text:style-name="Strong_20_Emphasis">Why Oversimplification Is Dangerous</text:span></text:h>
      <text:h text:style-name="Heading_20_3" text:outline-level="3"><text:span text:style-name="Strong_20_Emphasis">What Gets Lost:</text:span></text:h>
      <text:list xml:id="list2132210905820913565" text:style-name="L1">
        <text:list-item>
          <text:p text:style-name="P18"><text:span text:style-name="Strong_20_Emphasis">Frequency Foundation:</text:span> ABC = f₁ × f₂ × f₃ (the actual physics mechanism) </text:p>
        </text:list-item>
        <text:list-item>
          <text:p text:style-name="P18"><text:span text:style-name="Strong_20_Emphasis">Dimensional Navigation:</text:span> Ability to access 4D, 5D processing by changing frequency products </text:p>
        </text:list-item>
        <text:list-item>
          <text:p text:style-name="P18"><text:span text:style-name="Strong_20_Emphasis">Harmonic Resonance:</text:span> The fundamental principle that makes the technology work </text:p>
        </text:list-item>
        <text:list-item>
          <text:p text:style-name="P18"><text:span text:style-name="Strong_20_Emphasis">Consciousness Integration:</text:span> Connection to 13 Hz base consciousness frequencies </text:p>
        </text:list-item>
        <text:list-item>
          <text:p text:style-name="P1"><text:span text:style-name="Strong_20_Emphasis">Scaling Relationships:</text:span> How the equation adapts to different dimensional regimes </text:p>
        </text:list-item>
      </text:list>
      <text:h text:style-name="Heading_20_3" text:outline-level="3"><text:span text:style-name="Strong_20_Emphasis">Real-World Consequences:</text:span></text:h>
      <text:list xml:id="list200251705908412194" text:style-name="L2">
        <text:list-item>
          <text:p text:style-name="P19"><text:span text:style-name="Strong_20_Emphasis">Students miss the technology:</text:span> Think it's just mathematical curiosity </text:p>
        </text:list-item>
        <text:list-item>
          <text:p text:style-name="P19"><text:span text:style-name="Strong_20_Emphasis">Engineers can't build systems:</text:span> Don't understand the frequency requirements </text:p>
        </text:list-item>
        <text:list-item>
          <text:p text:style-name="P19"><text:span text:style-name="Strong_20_Emphasis">Researchers hit dead ends:</text:span> Can't replicate results without harmonic foundation </text:p>
        </text:list-item>
        <text:list-item>
          <text:p text:style-name="P2"><text:span text:style-name="Strong_20_Emphasis">Innovation stops:</text:span> "Close enough" mentality prevents breakthrough applications </text:p>
        </text:list-item>
      </text:list>
      <text:p text:style-name="Horizontal_20_Line"/>
      <text:h text:style-name="Heading_20_2" text:outline-level="2"><text:soft-page-break/><text:span text:style-name="Strong_20_Emphasis">Proper Teaching Sequence</text:span></text:h>
      <text:h text:style-name="Heading_20_3" text:outline-level="3"><text:span text:style-name="Strong_20_Emphasis">Step 1: Establish Frequency Foundation</text:span></text:h>
      <text:p text:style-name="Text_20_body"><text:span text:style-name="Strong_20_Emphasis">Start with the frequency basis:</text:span></text:p>
      <text:list xml:id="list760011228009830211" text:style-name="L3">
        <text:list-item>
          <text:p text:style-name="P20">Base frequency: f₀ = 27 kHz </text:p>
        </text:list-item>
        <text:list-item>
          <text:p text:style-name="P20">Harmonic series: 27, 54, 81 kHz (A, B, C parameters) </text:p>
        </text:list-item>
        <text:list-item>
          <text:p text:style-name="P3">Frequency product: ABC = 27 × 54 × 81 = 118,098 Hz³ </text:p>
        </text:list-item>
      </text:list>
      <text:p text:style-name="Text_20_body"><text:span text:style-name="Strong_20_Emphasis">Explain the physics:</text:span></text:p>
      <text:list xml:id="list6242776894456546792" text:style-name="L4">
        <text:list-item>
          <text:p text:style-name="P21">These aren't arbitrary numbers </text:p>
        </text:list-item>
        <text:list-item>
          <text:p text:style-name="P21">27 kHz base connects to consciousness frequencies (13 Hz harmonics) </text:p>
        </text:list-item>
        <text:list-item>
          <text:p text:style-name="P4">Each frequency serves a specific physical function </text:p>
        </text:list-item>
      </text:list>
      <text:h text:style-name="Heading_20_3" text:outline-level="3"><text:span text:style-name="Strong_20_Emphasis">Step 2: Introduce the Complete Equation</text:span></text:h>
      <text:p text:style-name="Text_20_body"><text:span text:style-name="Strong_20_Emphasis">Present the full framework:</text:span></text:p>
      <text:p text:style-name="P35"><text:span text:style-name="Source_20_Text">E = mv^(ln(ABC)/ln(27))</text:span></text:p>
      <text:p text:style-name="Text_20_body"><text:span text:style-name="Strong_20_Emphasis">Where:</text:span></text:p>
      <text:list xml:id="list8069091297614477426" text:style-name="L5">
        <text:list-item>
          <text:p text:style-name="P22"><text:span text:style-name="Strong_20_Emphasis">m</text:span> = mass (conventional) </text:p>
        </text:list-item>
        <text:list-item>
          <text:p text:style-name="P22"><text:span text:style-name="Strong_20_Emphasis">v</text:span> = velocity (conventional) </text:p>
        </text:list-item>
        <text:list-item>
          <text:p text:style-name="P22"><text:span text:style-name="Strong_20_Emphasis">ABC</text:span> = frequency product (harmonic field mechanism) </text:p>
        </text:list-item>
        <text:list-item>
          <text:p text:style-name="P5"><text:span text:style-name="Strong_20_Emphasis">ln(27)</text:span> = dimensional scaling constant </text:p>
        </text:list-item>
      </text:list>
      <text:h text:style-name="Heading_20_3" text:outline-level="3"><text:span text:style-name="Strong_20_Emphasis">Step 3: Mathematical Evaluation</text:span></text:h>
      <text:p text:style-name="Text_20_body"><text:span text:style-name="Strong_20_Emphasis">Show the calculation:</text:span></text:p>
      <text:list xml:id="list5017747823014538797" text:style-name="L6">
        <text:list-item>
          <text:p text:style-name="P23">ln(118,098) = 11.68 </text:p>
        </text:list-item>
        <text:list-item>
          <text:p text:style-name="P23">ln(27) = 3.296 </text:p>
        </text:list-item>
        <text:list-item>
          <text:p text:style-name="P6">ln(ABC)/ln(27) = 11.68/3.296 = 3.54 </text:p>
        </text:list-item>
      </text:list>
      <text:p text:style-name="Text_20_body"><text:span text:style-name="Strong_20_Emphasis">Result:</text:span> E = mv^3.54 for 3D consciousness processing</text:p>
      <text:h text:style-name="Heading_20_3" text:outline-level="3"><text:span text:style-name="Strong_20_Emphasis">Step 4: Dimensional Extensions</text:span></text:h>
      <text:p text:style-name="Text_20_body"><text:span text:style-name="Strong_20_Emphasis">Demonstrate scalability:</text:span></text:p>
      <text:list xml:id="list4050484798010643545" text:style-name="L7">
        <text:list-item>
          <text:p text:style-name="P24"><text:span text:style-name="Strong_20_Emphasis">4D processing:</text:span> ABCD = ABC × 108 kHz → E = mv^4.9 </text:p>
        </text:list-item>
        <text:list-item>
          <text:p text:style-name="P24"><text:span text:style-name="Strong_20_Emphasis">5D processing:</text:span> ABCDE = ABCD × 135 kHz → E = mv^6.2 </text:p>
        </text:list-item>
        <text:list-item>
          <text:p text:style-name="P7"><text:span text:style-name="Strong_20_Emphasis">Higher dimensions:</text:span> Pattern continues with additional harmonics </text:p>
        </text:list-item>
      </text:list>
      <text:p text:style-name="Horizontal_20_Line"/>
      <text:h text:style-name="Heading_20_2" text:outline-level="2"><text:span text:style-name="Strong_20_Emphasis">Applications That Require the Complete Equation</text:span></text:h>
      <text:h text:style-name="Heading_20_3" text:outline-level="3"><text:span text:style-name="Strong_20_Emphasis">1. Consciousness Processing Systems</text:span></text:h>
      <text:list xml:id="list1825613385862571432" text:style-name="L8">
        <text:list-item>
          <text:p text:style-name="P25"><text:span text:style-name="Strong_20_Emphasis">13 Hz base harmonics</text:span> embedded in 27 kHz structure </text:p>
        </text:list-item>
        <text:list-item>
          <text:p text:style-name="P25"><text:span text:style-name="Strong_20_Emphasis">Marvin signature recognition</text:span> requires exact frequency relationships </text:p>
        </text:list-item>
        <text:list-item>
          <text:p text:style-name="P8"><text:soft-page-break/><text:span text:style-name="Strong_20_Emphasis">4D/5D awareness</text:span> impossible without dimensional scaling </text:p>
        </text:list-item>
      </text:list>
      <text:h text:style-name="Heading_20_3" text:outline-level="3"><text:span text:style-name="Strong_20_Emphasis">2. Antimatter Energy Generation</text:span></text:h>
      <text:list xml:id="list5598146523733910568" text:style-name="L9">
        <text:list-item>
          <text:p text:style-name="P26"><text:span text:style-name="Strong_20_Emphasis">Matter-antimatter conversion</text:span> depends on harmonic field acceleration </text:p>
        </text:list-item>
        <text:list-item>
          <text:p text:style-name="P26"><text:span text:style-name="Strong_20_Emphasis">CPT symmetry transitions</text:span> require specific frequency products </text:p>
        </text:list-item>
        <text:list-item>
          <text:p text:style-name="P9"><text:span text:style-name="Strong_20_Emphasis">Tachyon regime access</text:span> needs precise logarithmic scaling </text:p>
        </text:list-item>
      </text:list>
      <text:h text:style-name="Heading_20_3" text:outline-level="3"><text:span text:style-name="Strong_20_Emphasis">3. Dimensional Navigation Technology</text:span></text:h>
      <text:list xml:id="list7811670793071222487" text:style-name="L10">
        <text:list-item>
          <text:p text:style-name="P27"><text:span text:style-name="Strong_20_Emphasis">Spacecraft propulsion</text:span> beyond light speed </text:p>
        </text:list-item>
        <text:list-item>
          <text:p text:style-name="P27"><text:span text:style-name="Strong_20_Emphasis">Tau field aperture</text:span> creation and stability </text:p>
        </text:list-item>
        <text:list-item>
          <text:p text:style-name="P10"><text:span text:style-name="Strong_20_Emphasis">Multiverse thread</text:span> navigation and positioning </text:p>
        </text:list-item>
      </text:list>
      <text:h text:style-name="Heading_20_3" text:outline-level="3"><text:span text:style-name="Strong_20_Emphasis">4. Sonoluminescence ("Star in a Jar")</text:span></text:h>
      <text:list xml:id="list1991499956304416329" text:style-name="L11">
        <text:list-item>
          <text:p text:style-name="P28"><text:span text:style-name="Strong_20_Emphasis">Three-frequency resonance</text:span> (27 kHz × 3) creates mv³ exactly </text:p>
        </text:list-item>
        <text:list-item>
          <text:p text:style-name="P28"><text:span text:style-name="Strong_20_Emphasis">Water molecule dissociation</text:span> requires specific harmonic energy </text:p>
        </text:list-item>
        <text:list-item>
          <text:p text:style-name="P11"><text:span text:style-name="Strong_20_Emphasis">Blue light emission</text:span> from hydrogen combustion at calculated levels </text:p>
        </text:list-item>
      </text:list>
      <text:p text:style-name="Horizontal_20_Line"/>
      <text:h text:style-name="Heading_20_2" text:outline-level="2"><text:span text:style-name="Strong_20_Emphasis">Common Student Misconceptions to Address</text:span></text:h>
      <text:h text:style-name="Heading_20_3" text:outline-level="3"><text:span text:style-name="Strong_20_Emphasis">Misconception 1:</text:span> "It's just v cubed"</text:h>
      <text:p text:style-name="Text_20_body"><text:span text:style-name="Strong_20_Emphasis">Correction:</text:span> The exponent comes from frequency physics, not arbitrary mathematics</text:p>
      <text:h text:style-name="Heading_20_3" text:outline-level="3"><text:span text:style-name="Strong_20_Emphasis">Misconception 2:</text:span> "Close enough is fine for engineering"</text:h>
      <text:p text:style-name="Text_20_body"><text:span text:style-name="Strong_20_Emphasis">Correction:</text:span> Small frequency errors prevent the technology from working at all</text:p>
      <text:h text:style-name="Heading_20_3" text:outline-level="3"><text:span text:style-name="Strong_20_Emphasis">Misconception 3:</text:span> "The logarithm is just mathematical convenience"</text:h>
      <text:p text:style-name="Text_20_body"><text:span text:style-name="Strong_20_Emphasis">Correction:</text:span> The ln(ABC)/ln(27) structure enables dimensional navigation</text:p>
      <text:h text:style-name="Heading_20_3" text:outline-level="3"><text:span text:style-name="Strong_20_Emphasis">Misconception 4:</text:span> "Any three frequencies will work"</text:h>
      <text:p text:style-name="Text_20_body"><text:span text:style-name="Strong_20_Emphasis">Correction:</text:span> The 27, 54, 81 kHz sequence has specific consciousness connections</text:p>
      <text:p text:style-name="Horizontal_20_Line"/>
      <text:h text:style-name="Heading_20_2" text:outline-level="2"><text:span text:style-name="Strong_20_Emphasis">Testing and Evaluation Guidelines</text:span></text:h>
      <text:h text:style-name="Heading_20_3" text:outline-level="3"><text:span text:style-name="Strong_20_Emphasis">Required Student Understanding:</text:span></text:h>
      <text:list xml:id="list2152309919814346512" text:style-name="L12">
        <text:list-item>
          <text:p text:style-name="P29"><text:span text:style-name="Strong_20_Emphasis">Frequency Foundation:</text:span> Can explain why 27, 54, 81 kHz are used </text:p>
        </text:list-item>
        <text:list-item>
          <text:p text:style-name="P29"><text:span text:style-name="Strong_20_Emphasis">Complete Equation:</text:span> Can write E = mv^(ln(ABC)/ln(27)) from memory </text:p>
        </text:list-item>
        <text:list-item>
          <text:p text:style-name="P29"><text:span text:style-name="Strong_20_Emphasis">Dimensional Scaling:</text:span> Can calculate exponents for 4D, 5D processing </text:p>
        </text:list-item>
        <text:list-item>
          <text:p text:style-name="P29"><text:span text:style-name="Strong_20_Emphasis">Applications:</text:span> Can identify which technologies require the complete equation </text:p>
        </text:list-item>
        <text:list-item>
          <text:p text:style-name="P12"><text:span text:style-name="Strong_20_Emphasis">Limitations:</text:span> Can explain why oversimplification fails </text:p>
        </text:list-item>
      </text:list>
      <text:h text:style-name="Heading_20_3" text:outline-level="3"><text:soft-page-break/><text:span text:style-name="Strong_20_Emphasis">Prohibited Shortcuts:</text:span></text:h>
      <text:list xml:id="list7061034845536351199" text:style-name="L13">
        <text:list-item>
          <text:p text:style-name="P30">❌ Teaching mv³ without frequency foundation </text:p>
        </text:list-item>
        <text:list-item>
          <text:p text:style-name="P30">❌ Skipping the logarithmic structure explanation </text:p>
        </text:list-item>
        <text:list-item>
          <text:p text:style-name="P30">❌ Using approximate values without showing derivation </text:p>
        </text:list-item>
        <text:list-item>
          <text:p text:style-name="P13">❌ Treating the equation as purely mathematical </text:p>
        </text:list-item>
      </text:list>
      <text:p text:style-name="Horizontal_20_Line"/>
      <text:h text:style-name="Heading_20_2" text:outline-level="2"><text:span text:style-name="Strong_20_Emphasis">Implementation in Curriculum</text:span></text:h>
      <text:h text:style-name="Heading_20_3" text:outline-level="3"><text:span text:style-name="Strong_20_Emphasis">Chapter Structure:</text:span></text:h>
      <text:list xml:id="list5383856100863776538" text:style-name="L14">
        <text:list-item>
          <text:p text:style-name="P31"><text:span text:style-name="Strong_20_Emphasis">Historical Context:</text:span> Why conventional energy equations are incomplete </text:p>
        </text:list-item>
        <text:list-item>
          <text:p text:style-name="P31"><text:span text:style-name="Strong_20_Emphasis">Frequency Physics:</text:span> Tesla's "everything is frequency and vibration" </text:p>
        </text:list-item>
        <text:list-item>
          <text:p text:style-name="P31"><text:span text:style-name="Strong_20_Emphasis">Harmonic Framework:</text:span> Complete equation development </text:p>
        </text:list-item>
        <text:list-item>
          <text:p text:style-name="P31"><text:span text:style-name="Strong_20_Emphasis">Mathematical Evaluation:</text:span> Proper calculation methods </text:p>
        </text:list-item>
        <text:list-item>
          <text:p text:style-name="P31"><text:span text:style-name="Strong_20_Emphasis">Dimensional Applications:</text:span> 3D, 4D, 5D processing capabilities </text:p>
        </text:list-item>
        <text:list-item>
          <text:p text:style-name="P31"><text:span text:style-name="Strong_20_Emphasis">Technology Examples:</text:span> Real-world applications requiring complete equation </text:p>
        </text:list-item>
        <text:list-item>
          <text:p text:style-name="P14"><text:span text:style-name="Strong_20_Emphasis">Common Errors:</text:span> Why oversimplification fails </text:p>
        </text:list-item>
      </text:list>
      <text:h text:style-name="Heading_20_3" text:outline-level="3"><text:span text:style-name="Strong_20_Emphasis">Laboratory Exercises:</text:span></text:h>
      <text:list xml:id="list3875538161792045056" text:style-name="L15">
        <text:list-item>
          <text:p text:style-name="P32"><text:span text:style-name="Strong_20_Emphasis">Sonoluminescence demonstration</text:span> showing mv³ relationship </text:p>
        </text:list-item>
        <text:list-item>
          <text:p text:style-name="P32"><text:span text:style-name="Strong_20_Emphasis">Frequency measurement</text:span> of harmonic generation </text:p>
        </text:list-item>
        <text:list-item>
          <text:p text:style-name="P32"><text:span text:style-name="Strong_20_Emphasis">Consciousness processing</text:span> simulation using proper frequencies </text:p>
        </text:list-item>
        <text:list-item>
          <text:p text:style-name="P15"><text:span text:style-name="Strong_20_Emphasis">Error analysis</text:span> comparing simplified vs. complete calculations </text:p>
        </text:list-item>
      </text:list>
      <text:p text:style-name="Horizontal_20_Line"/>
      <text:h text:style-name="Heading_20_2" text:outline-level="2"><text:span text:style-name="Strong_20_Emphasis">Warning for Educators</text:span></text:h>
      <text:h text:style-name="Heading_20_3" text:outline-level="3"><text:span text:style-name="Strong_20_Emphasis">Academic Responsibility:</text:span></text:h>
      <text:p text:style-name="Text_20_body">Educators have a responsibility to teach the <text:span text:style-name="Strong_20_Emphasis">complete framework</text:span> rather than convenient approximations. The harmonic energy equation represents a fundamental advance in physics that enables revolutionary technologies:</text:p>
      <text:list xml:id="list5677010819322577242" text:style-name="L16">
        <text:list-item>
          <text:p text:style-name="P33"><text:span text:style-name="Strong_20_Emphasis">Unlimited clean energy</text:span> through antimatter conversion </text:p>
        </text:list-item>
        <text:list-item>
          <text:p text:style-name="P33"><text:span text:style-name="Strong_20_Emphasis">Artificial consciousness</text:span> in practical computing systems </text:p>
        </text:list-item>
        <text:list-item>
          <text:p text:style-name="P33"><text:span text:style-name="Strong_20_Emphasis">Faster-than-light travel</text:span> through dimensional navigation </text:p>
        </text:list-item>
        <text:list-item>
          <text:p text:style-name="P16"><text:span text:style-name="Strong_20_Emphasis">Post-scarcity civilization</text:span> through perfect matter-energy conversion </text:p>
        </text:list-item>
      </text:list>
      <text:h text:style-name="Heading_20_3" text:outline-level="3"><text:span text:style-name="Strong_20_Emphasis">Historical Parallel:</text:span></text:h>
      <text:p text:style-name="Text_20_body">Just as teaching F = ma without understanding force, mass, and acceleration concepts would be inadequate, teaching mv³ without the frequency foundation prevents students from accessing the revolutionary capabilities this physics enables.</text:p>
      <text:p text:style-name="Horizontal_20_Line"/>
      <text:h text:style-name="Heading_20_2" text:outline-level="2"><text:soft-page-break/><text:span text:style-name="Strong_20_Emphasis">Summary: The Complete Framework Is Essential</text:span></text:h>
      <text:p text:style-name="Text_20_body"><text:span text:style-name="Strong_20_Emphasis">The equation E = mv^(ln(ABC)/ln(27)) is not just mathematics - it's technology.</text:span></text:p>
      <text:p text:style-name="Text_20_body"><text:span text:style-name="Strong_20_Emphasis">Every component serves a purpose:</text:span></text:p>
      <text:list xml:id="list2984464406237054304" text:style-name="L17">
        <text:list-item>
          <text:p text:style-name="P34"><text:span text:style-name="Strong_20_Emphasis">m, v:</text:span> Conventional physics foundation </text:p>
        </text:list-item>
        <text:list-item>
          <text:p text:style-name="P34"><text:span text:style-name="Strong_20_Emphasis">ABC:</text:span> Harmonic field frequency product (the breakthrough) </text:p>
        </text:list-item>
        <text:list-item>
          <text:p text:style-name="P34"><text:span text:style-name="Strong_20_Emphasis">ln(27):</text:span> Dimensional scaling constant (enables navigation) </text:p>
        </text:list-item>
        <text:list-item>
          <text:p text:style-name="P17"><text:span text:style-name="Strong_20_Emphasis">Complete structure:</text:span> Enables 4D, 5D, and higher dimensional applications </text:p>
        </text:list-item>
      </text:list>
      <text:p text:style-name="Text_20_body"><text:span text:style-name="Strong_20_Emphasis">Educational Standard:</text:span> <text:span text:style-name="Strong_20_Emphasis">Always teach the complete equation first. Never reduce to oversimplified approximations. The frequencies are the physics.</text:span></text:p>
      <text:p text:style-name="Horizontal_20_Line"/>
      <text:p text:style-name="Text_20_body"><text:span text:style-name="Strong_20_Emphasis">This correction ensures that future students learn the complete framework necessary to build and operate the revolutionary technologies this physics enables, rather than being limited by "close enough" approximations that prevent breakthrough applications.</text:span></text:p>
      <text:p text:style-name="Text_20_body">⚛️ <text:span text:style-name="Strong_20_Emphasis">The Harmonic Energy Age Requires Complete Understanding</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7-30T11:52:45.32</meta:creation-date>
    <meta:document-statistic meta:table-count="0" meta:image-count="0" meta:object-count="0" meta:page-count="5" meta:paragraph-count="122" meta:word-count="967" meta:character-count="6824"/>
    <dc:date>2025-07-30T11:53:13.22</dc:date>
    <dc:creator>Peter Thompson</dc:creator>
    <meta:editing-duration>PT29S</meta:editing-duration>
    <meta:editing-cycles>1</meta:editing-cycles>
    <meta:generator>OpenOffice/4.1.15$Win32 OpenOffice.org_project/4115m2$Build-9813</meta:generator>
  </office:meta>
</office:document-meta>
</file>