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402cm"/>
    </style:style>
    <style:style style:name="Table1.B" style:family="table-column">
      <style:table-column-properties style:column-width="7.641cm"/>
    </style:style>
    <style:style style:name="Table1.C" style:family="table-column">
      <style:table-column-properties style:column-width="7.95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438cm"/>
    </style:style>
    <style:style style:name="Table2.B" style:family="table-column">
      <style:table-column-properties style:column-width="1.205cm"/>
    </style:style>
    <style:style style:name="Table2.C" style:family="table-column">
      <style:table-column-properties style:column-width="6.084cm"/>
    </style:style>
    <style:style style:name="Table2.D" style:family="table-column">
      <style:table-column-properties style:column-width="8.274cm"/>
    </style:style>
    <style:style style:name="Table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paragraph-properties fo:margin-left="0.265cm" fo:margin-right="0cm" fo:text-indent="0cm" style:auto-text-indent="false"/>
    </style:style>
    <style:style style:name="P40" style:family="paragraph" style:parent-style-name="Standard">
      <style:paragraph-properties fo:margin-top="0cm" fo:margin-bottom="0cm"/>
    </style:style>
    <style:style style:name="P41" style:family="paragraph" style:parent-style-name="Standard">
      <style:paragraph-properties fo:margin-top="0cm" fo:margin-bottom="0.499cm"/>
    </style:style>
    <style:style style:name="P42"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ucational Emergency Protocol for Resonance-Copilot</text:p>
      <text:p text:style-name="Standard">Age Approximation Protocol - Dual Assessment Framework.pdf</text:p>
      <text:p text:style-name="Standard">PDF 92.33KB</text:p>
      <text:p text:style-name="Standard">Educational Protocol Extension for Resonance-Copilot.pdf</text:p>
      <text:p text:style-name="Standard">PDF 159.7KB</text:p>
      <text:p text:style-name="Standard">First Aid Protocol Module for Resonance-Copilot.pdf</text:p>
      <text:p text:style-name="Standard">PDF 138.77KB</text:p>
      <text:p text:style-name="Standard">Individual Monitoring &amp; Behavioral Analysis Protocol.pdf</text:p>
      <text:p text:style-name="Standard">PDF 151.69KB</text:p>
      <text:p text:style-name="Standard">Neurodivergent Child Protocol Integration Guide.pdf</text:p>
      <text:p text:style-name="Standard">PDF 146.25KB</text:p>
      <text:p text:style-name="P40">Neurological Impairment Assessment &amp; Response Protocol.pdf</text:p>
      <text:p text:style-name="P40">PDF 111.11KB</text:p>
      <text:p text:style-name="P41">here are some of the protocols used in marvin rpi- i need a protocol of how to classify dangers to direct it to the protocol- code red serious injury life threatening, code pink minor injury scrapes, falls, small cuts etc, code grey fires/smoke, code purple strangers/vicious animals/poisioning spiders/or other, in enviroment, code black death, code yellow poisonious substances/chemicals, blue depression/abuse/mental state related, green sharp/dangerious objects, code silver wild animals, code gold self harm, etc...</text:p>
      <text:p text:style-name="P39">We are given several protocol documents and asked to design a new protocol for classifying dangers to direct to the appropriate existing protocol.</text:p>
      <text:p text:style-name="Text_20_body">We have the following existing protocols:</text:p>
      <text:list xml:id="list8882992803887474440" text:style-name="L1">
        <text:list-item>
          <text:p text:style-name="P1">Educational Protocol Extension for Resonance-Copilot</text:p>
        </text:list-item>
        <text:list-item>
          <text:p text:style-name="P1">Age Approximation Protocol - Dual Assessment Framework</text:p>
        </text:list-item>
        <text:list-item>
          <text:p text:style-name="P1">Individual Monitoring &amp; Behavioral Analysis Protocol</text:p>
        </text:list-item>
        <text:list-item>
          <text:p text:style-name="P1">Neurological Impairment Assessment &amp; Response Protocol</text:p>
        </text:list-item>
        <text:list-item>
          <text:p text:style-name="P1">First Aid Protocol Module for Resonance-Copilot</text:p>
        </text:list-item>
        <text:list-item>
          <text:p text:style-name="P1">Neurodivergent Child Protocol Integration Guide</text:p>
        </text:list-item>
      </text:list>
      <text:p text:style-name="Text_20_body">We are to create a new protocol that classifies dangers (with codes) and directs to the appropriate protocol.</text:p>
      <text:p text:style-name="Text_20_body">The codes provided are:</text:p>
      <text:list xml:id="list6232597252754237730" text:style-name="L2">
        <text:list-item>
          <text:p text:style-name="P2">Code Red: serious injury, life threatening</text:p>
        </text:list-item>
        <text:list-item>
          <text:p text:style-name="P2">Code Pink: minor injury (scrapes, falls, small cuts, etc.)</text:p>
        </text:list-item>
        <text:list-item>
          <text:p text:style-name="P2">Code Grey: fires/smoke</text:p>
        </text:list-item>
        <text:list-item>
          <text:p text:style-name="P2">Code Purple: strangers/vicious animals/poisoning spiders/or other in environment</text:p>
        </text:list-item>
        <text:list-item>
          <text:p text:style-name="P2">Code Black: death</text:p>
        </text:list-item>
        <text:list-item>
          <text:p text:style-name="P2">Code Yellow: poisonous substances/chemicals</text:p>
        </text:list-item>
        <text:list-item>
          <text:p text:style-name="P2">Code Blue: depression/abuse/mental state related</text:p>
        </text:list-item>
        <text:list-item>
          <text:p text:style-name="P2">Code Green: sharp/dangerous objects</text:p>
        </text:list-item>
        <text:list-item>
          <text:p text:style-name="P2">Code Silver: wild animals</text:p>
        </text:list-item>
        <text:list-item>
          <text:p text:style-name="P2">Code Gold: self harm</text:p>
        </text:list-item>
      </text:list>
      <text:p text:style-name="Text_20_body">We need to design a protocol that:</text:p>
      <text:list xml:id="list3293781627932780305" text:style-name="L3">
        <text:list-item>
          <text:p text:style-name="P3"><text:soft-page-break/>Classifies the danger based on the code.</text:p>
        </text:list-item>
        <text:list-item>
          <text:p text:style-name="P3">Directs to the appropriate existing protocol for handling that type of danger.</text:p>
        </text:list-item>
      </text:list>
      <text:p text:style-name="Text_20_body">We note that the existing protocols cover:</text:p>
      <text:list xml:id="list3810251094773386044" text:style-name="L4">
        <text:list-item>
          <text:p text:style-name="P4">First Aid Protocol (for medical emergencies and injuries)</text:p>
        </text:list-item>
        <text:list-item>
          <text:p text:style-name="P4">Individual Monitoring &amp; Behavioral Analysis Protocol (for mental health, abuse, self-harm)</text:p>
        </text:list-item>
        <text:list-item>
          <text:p text:style-name="P4">Neurological Impairment Assessment &amp; Response Protocol (for neurological issues, which might be related to some mental states or injuries)</text:p>
        </text:list-item>
        <text:list-item>
          <text:p text:style-name="P4">Age Approximation Protocol (for age-appropriate responses)</text:p>
        </text:list-item>
        <text:list-item>
          <text:p text:style-name="P4">Educational Protocol (for educational support, not directly for dangers)</text:p>
        </text:list-item>
        <text:list-item>
          <text:p text:style-name="P4">Neurodivergent Child Protocol (for neurodivergent children, which might be relevant in some danger scenarios)</text:p>
        </text:list-item>
      </text:list>
      <text:p text:style-name="Text_20_body">We will create a new protocol that acts as a dispatcher, routing the danger to the correct protocol.</text:p>
      <text:p text:style-name="Text_20_body">We'll structure the protocol as follows:</text:p>
      <text:list xml:id="list1836050058720794649" text:style-name="L5">
        <text:list-item>
          <text:p text:style-name="P5"><text:span text:style-name="Strong_20_Emphasis">Danger Classification Protocol</text:span>: A set of rules to classify the reported danger into one of the codes.</text:p>
        </text:list-item>
        <text:list-item>
          <text:p text:style-name="P5"><text:span text:style-name="Strong_20_Emphasis">Routing Table</text:span>: For each code, specify which existing protocol(s) to invoke and any immediate actions.</text:p>
        </text:list-item>
      </text:list>
      <text:p text:style-name="Text_20_body">We'll create a new file: <text:span text:style-name="Source_20_Text">Danger Classification and Routing Protocol.md</text:span></text:p>
      <text:p text:style-name="Text_20_body">But note: The user asked for a protocol of how to classify dangers and direct to the protocol. We are to output the protocol in a similar style to the given protocols.</text:p>
      <text:p text:style-name="Text_20_body">Let's design:</text:p>
      <text:h text:style-name="Heading_20_1" text:outline-level="1">Danger Classification and Routing Protocol</text:h>
      <text:h text:style-name="Heading_20_2" text:outline-level="2">Overview</text:h>
      <text:p text:style-name="Text_20_body">This protocol extends the Resonance-Copilot system by providing a standardized method for classifying dangers and routing them to the appropriate specialized protocol. It ensures rapid and appropriate response to various types of emergencies and concerns.</text:p>
      <text:h text:style-name="Heading_20_2" text:outline-level="2">Code Definitions and Classification Rules</text:h>
      <text:h text:style-name="Heading_20_3" text:outline-level="3">Code Red: Serious Injury, Life Threatening</text:h>
      <text:list xml:id="list6802338218136058865" text:style-name="L6">
        <text:list-item>
          <text:p text:style-name="P6"><text:span text:style-name="Strong_20_Emphasis">Classification Criteria</text:span>: Any situation involving severe bleeding, unconsciousness, difficulty breathing, chest pain, severe burns, major trauma, or any other condition that appears immediately life-threatening.</text:p>
        </text:list-item>
        <text:list-item>
          <text:p text:style-name="P6"><text:span text:style-name="Strong_20_Emphasis">Immediate Action</text:span>: Call emergency services (911 or local equivalent) if not already done.</text:p>
        </text:list-item>
        <text:list-item>
          <text:p text:style-name="P6"><text:span text:style-name="Strong_20_Emphasis">Primary Protocol</text:span>: First Aid Protocol Module (for immediate first aid guidance until emergency services arrive).</text:p>
        </text:list-item>
      </text:list>
      <text:h text:style-name="Heading_20_3" text:outline-level="3"><text:soft-page-break/>Code Pink: Minor Injury</text:h>
      <text:list xml:id="list8897835039495144846" text:style-name="L7">
        <text:list-item>
          <text:p text:style-name="P7"><text:span text:style-name="Strong_20_Emphasis">Classification Criteria</text:span>: Minor cuts, scrapes, bruises, small burns, minor falls without signs of serious injury.</text:p>
        </text:list-item>
        <text:list-item>
          <text:p text:style-name="P7"><text:span text:style-name="Strong_20_Emphasis">Immediate Action</text:span>: Assess for any hidden serious injuries and provide basic first aid.</text:p>
        </text:list-item>
        <text:list-item>
          <text:p text:style-name="P7"><text:span text:style-name="Strong_20_Emphasis">Primary Protocol</text:span>: First Aid Protocol Module (for wound care and minor injury management).</text:p>
        </text:list-item>
      </text:list>
      <text:h text:style-name="Heading_20_3" text:outline-level="3">Code Grey: Fires/Smoke</text:h>
      <text:list xml:id="list2589905891917871765" text:style-name="L8">
        <text:list-item>
          <text:p text:style-name="P8"><text:span text:style-name="Strong_20_Emphasis">Classification Criteria</text:span>: Any fire or smoke situation, regardless of size.</text:p>
        </text:list-item>
        <text:list-item>
          <text:p text:style-name="P8"><text:span text:style-name="Strong_20_Emphasis">Immediate Action</text:span>: Evacuate immediately if safe to do so, then call emergency services.</text:p>
        </text:list-item>
        <text:list-item>
          <text:p text:style-name="P8"><text:span text:style-name="Strong_20_Emphasis">Primary Protocol</text:span>: First Aid Protocol Module (for burn treatment and smoke inhalation) and potentially Neurological Impairment Assessment (if there is smoke inhalation affecting neurological function).</text:p>
        </text:list-item>
      </text:list>
      <text:h text:style-name="Heading_20_3" text:outline-level="3">Code Purple: Environmental Threats (Strangers, Vicious Animals, Poisonous Spiders, etc.)</text:h>
      <text:list xml:id="list5880943554188184808" text:style-name="L9">
        <text:list-item>
          <text:p text:style-name="P9"><text:span text:style-name="Strong_20_Emphasis">Classification Criteria</text:span>: Presence of dangerous individuals, aggressive animals, or environmental hazards that pose an immediate physical threat.</text:p>
        </text:list-item>
        <text:list-item>
          <text:p text:style-name="P9"><text:span text:style-name="Strong_20_Emphasis">Immediate Action</text:span>: Remove from immediate danger if safe to do so, call emergency services if appropriate (e.g., animal attack, criminal activity).</text:p>
        </text:list-item>
        <text:list-item>
          <text:p text:style-name="P9"><text:span text:style-name="Strong_20_Emphasis">Primary Protocol</text:span>: First Aid Protocol (for any injuries) and Individual Monitoring &amp; Behavioral Analysis Protocol (for psychological impact, especially if the threat is human and may involve abuse or trauma).</text:p>
        </text:list-item>
      </text:list>
      <text:h text:style-name="Heading_20_3" text:outline-level="3">Code Black: Death</text:h>
      <text:list xml:id="list7782820832954039414" text:style-name="L10">
        <text:list-item>
          <text:p text:style-name="P10"><text:span text:style-name="Strong_20_Emphasis">Classification Criteria</text:span>: Confirmed or suspected death.</text:p>
        </text:list-item>
        <text:list-item>
          <text:p text:style-name="P10"><text:span text:style-name="Strong_20_Emphasis">Immediate Action</text:span>: Call emergency services and follow their instructions. Do not move the body unless necessary for safety.</text:p>
        </text:list-item>
        <text:list-item>
          <text:p text:style-name="P10"><text:span text:style-name="Strong_20_Emphasis">Primary Protocol</text:span>: Individual Monitoring &amp; Behavioral Analysis Protocol (for psychological first aid and support for those affected) and potentially Neurological Impairment Assessment (if the death was due to a neurological event or if survivors are experiencing trauma-related neurological symptoms).</text:p>
        </text:list-item>
      </text:list>
      <text:h text:style-name="Heading_20_3" text:outline-level="3">Code Yellow: Poisonous Substances/Chemicals</text:h>
      <text:list xml:id="list1162474880696656025" text:style-name="L11">
        <text:list-item>
          <text:p text:style-name="P11"><text:span text:style-name="Strong_20_Emphasis">Classification Criteria</text:span>: Exposure to or ingestion of poisonous substances, chemicals, or drugs.</text:p>
        </text:list-item>
        <text:list-item>
          <text:p text:style-name="P11"><text:span text:style-name="Strong_20_Emphasis">Immediate Action</text:span>: Call poison control (1-800-222-1222 in the US) or emergency services. Do not induce vomiting unless instructed.</text:p>
        </text:list-item>
        <text:list-item>
          <text:p text:style-name="P11"><text:span text:style-name="Strong_20_Emphasis">Primary Protocol</text:span>: First Aid Protocol Module (for poisoning protocols) and Neurological Impairment Assessment (if the substance affects neurological function).</text:p>
        </text:list-item>
      </text:list>
      <text:h text:style-name="Heading_20_3" text:outline-level="3"><text:soft-page-break/>Code Blue: Depression/Abuse/Mental State Related</text:h>
      <text:list xml:id="list8874523502640342252" text:style-name="L12">
        <text:list-item>
          <text:p text:style-name="P12"><text:span text:style-name="Strong_20_Emphasis">Classification Criteria</text:span>: Expressions of depression, abuse (physical, emotional, sexual), or any mental health crisis.</text:p>
        </text:list-item>
        <text:list-item>
          <text:p text:style-name="P12"><text:span text:style-name="Strong_20_Emphasis">Immediate Action</text:span>: Ensure immediate safety. If there is immediate danger, call emergency services.</text:p>
        </text:list-item>
        <text:list-item>
          <text:p text:style-name="P12"><text:span text:style-name="Strong_20_Emphasis">Primary Protocol</text:span>: Individual Monitoring &amp; Behavioral Analysis Protocol (for crisis response and support) and Neurological Impairment Assessment (if there are neurological components, such as trauma-related neurological symptoms).</text:p>
        </text:list-item>
      </text:list>
      <text:h text:style-name="Heading_20_3" text:outline-level="3">Code Green: Sharp/Dangerous Objects</text:h>
      <text:list xml:id="list7732002609597674424" text:style-name="L13">
        <text:list-item>
          <text:p text:style-name="P13"><text:span text:style-name="Strong_20_Emphasis">Classification Criteria</text:span>: Presence of sharp or dangerous objects that pose a risk of injury (e.g., broken glass, exposed wires, weapons).</text:p>
        </text:list-item>
        <text:list-item>
          <text:p text:style-name="P13"><text:span text:style-name="Strong_20_Emphasis">Immediate Action</text:span>: Secure the area to prevent injury, remove the object if safe to do so.</text:p>
        </text:list-item>
        <text:list-item>
          <text:p text:style-name="P13"><text:span text:style-name="Strong_20_Emphasis">Primary Protocol</text:span>: First Aid Protocol (if injury occurs) and potentially Individual Monitoring &amp; Behavioral Analysis Protocol (if the object is a weapon and there is a threat of violence).</text:p>
        </text:list-item>
      </text:list>
      <text:h text:style-name="Heading_20_3" text:outline-level="3">Code Silver: Wild Animals</text:h>
      <text:list xml:id="list1715031300643466968" text:style-name="L14">
        <text:list-item>
          <text:p text:style-name="P14"><text:span text:style-name="Strong_20_Emphasis">Classification Criteria</text:span>: Encounter with wild animals that may pose a threat (e.g., bears, snakes, aggressive wildlife).</text:p>
        </text:list-item>
        <text:list-item>
          <text:p text:style-name="P14"><text:span text:style-name="Strong_20_Emphasis">Immediate Action</text:span>: Do not approach, back away slowly, and call animal control or emergency services if the animal is a direct threat.</text:p>
        </text:list-item>
        <text:list-item>
          <text:p text:style-name="P14"><text:span text:style-name="Strong_20_Emphasis">Primary Protocol</text:span>: First Aid Protocol (if attacked) and potentially Neurological Impairment Assessment (if the animal is venomous and there are neurological symptoms).</text:p>
        </text:list-item>
      </text:list>
      <text:h text:style-name="Heading_20_3" text:outline-level="3">Code Gold: Self Harm</text:h>
      <text:list xml:id="list5022255760943713578" text:style-name="L15">
        <text:list-item>
          <text:p text:style-name="P15"><text:span text:style-name="Strong_20_Emphasis">Classification Criteria</text:span>: Any indication of self-harm behavior, including cutting, burning, or other self-injury.</text:p>
        </text:list-item>
        <text:list-item>
          <text:p text:style-name="P15"><text:span text:style-name="Strong_20_Emphasis">Immediate Action</text:span>: Ensure immediate safety, call emergency services if the self-harm is severe or if the person is at risk of suicide.</text:p>
        </text:list-item>
        <text:list-item>
          <text:p text:style-name="P15"><text:span text:style-name="Strong_20_Emphasis">Primary Protocol</text:span>: Individual Monitoring &amp; Behavioral Analysis Protocol (for crisis intervention and support) and First Aid Protocol (for treatment of self-harm injuries).</text:p>
        </text:list-item>
      </text:list>
      <text:h text:style-name="Heading_20_2" text:outline-level="2">Routing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e</text:p>
            </table:table-cell>
            <table:table-cell table:style-name="Table1.A1" office:value-type="string">
              <text:p text:style-name="Table_20_Heading">Primary Protocol(s)</text:p>
            </table:table-cell>
            <table:table-cell table:style-name="Table1.A1" office:value-type="string">
              <text:p text:style-name="Table_20_Heading">Secondary Protocol(s) (if needed)</text:p>
            </table:table-cell>
          </table:table-row>
        </table:table-header-rows>
        <table:table-row>
          <table:table-cell table:style-name="Table1.A1" office:value-type="string">
            <text:p text:style-name="Table_20_Contents">Red</text:p>
          </table:table-cell>
          <table:table-cell table:style-name="Table1.A1" office:value-type="string">
            <text:p text:style-name="Table_20_Contents">First Aid Protocol</text:p>
          </table:table-cell>
          <table:table-cell table:style-name="Table1.A1" office:value-type="string">
            <text:p text:style-name="Table_20_Contents">Neurological Impairment Assessment</text:p>
          </table:table-cell>
        </table:table-row>
        <table:table-row>
          <table:table-cell table:style-name="Table1.A1" office:value-type="string">
            <text:p text:style-name="Table_20_Contents">Pink</text:p>
          </table:table-cell>
          <table:table-cell table:style-name="Table1.A1" office:value-type="string">
            <text:p text:style-name="Table_20_Contents">First Aid Protocol</text:p>
          </table:table-cell>
          <table:table-cell table:style-name="Table1.A1" office:value-type="string">
            <text:p text:style-name="Table_20_Contents">None</text:p>
          </table:table-cell>
        </table:table-row>
        <table:table-row>
          <table:table-cell table:style-name="Table1.A1" office:value-type="string">
            <text:p text:style-name="Table_20_Contents">Grey</text:p>
          </table:table-cell>
          <table:table-cell table:style-name="Table1.A1" office:value-type="string">
            <text:p text:style-name="Table_20_Contents">First Aid Protocol</text:p>
          </table:table-cell>
          <table:table-cell table:style-name="Table1.A1" office:value-type="string">
            <text:p text:style-name="Table_20_Contents">Neurological Impairment Assessment</text:p>
          </table:table-cell>
        </table:table-row>
        <table:table-row>
          <table:table-cell table:style-name="Table1.A1" office:value-type="string">
            <text:p text:style-name="Table_20_Contents">Purple</text:p>
          </table:table-cell>
          <table:table-cell table:style-name="Table1.A1" office:value-type="string">
            <text:p text:style-name="Table_20_Contents">First Aid Protocol, Individual Monitoring</text:p>
          </table:table-cell>
          <table:table-cell table:style-name="Table1.A1" office:value-type="string">
            <text:p text:style-name="Table_20_Contents">Neurological Impairment Assessment</text:p>
          </table:table-cell>
        </table:table-row>
        <table:table-row>
          <table:table-cell table:style-name="Table1.A1" office:value-type="string">
            <text:p text:style-name="Table_20_Contents">Black</text:p>
          </table:table-cell>
          <table:table-cell table:style-name="Table1.A1" office:value-type="string">
            <text:p text:style-name="Table_20_Contents">Individual Monitoring, Neurological Impairment</text:p>
          </table:table-cell>
          <table:table-cell table:style-name="Table1.A1" office:value-type="string">
            <text:p text:style-name="Table_20_Contents">First Aid Protocol (if applicable)</text:p>
          </table:table-cell>
        </table:table-row>
        <table:table-row>
          <table:table-cell table:style-name="Table1.A1" office:value-type="string">
            <text:p text:style-name="Table_20_Contents">Yellow</text:p>
          </table:table-cell>
          <table:table-cell table:style-name="Table1.A1" office:value-type="string">
            <text:p text:style-name="Table_20_Contents">First Aid Protocol, Neurological Impairment</text:p>
          </table:table-cell>
          <table:table-cell table:style-name="Table1.A1" office:value-type="string">
            <text:p text:style-name="Table_20_Contents">Individual Monitoring (for psychological <text:soft-page-break/>impact)</text:p>
          </table:table-cell>
        </table:table-row>
        <table:table-row>
          <table:table-cell table:style-name="Table1.A1" office:value-type="string">
            <text:p text:style-name="Table_20_Contents">Blue</text:p>
          </table:table-cell>
          <table:table-cell table:style-name="Table1.A1" office:value-type="string">
            <text:p text:style-name="Table_20_Contents">Individual Monitoring, Neurological Impairment</text:p>
          </table:table-cell>
          <table:table-cell table:style-name="Table1.A1" office:value-type="string">
            <text:p text:style-name="Table_20_Contents">First Aid Protocol (if there are physical injuries)</text:p>
          </table:table-cell>
        </table:table-row>
        <table:table-row>
          <table:table-cell table:style-name="Table1.A1" office:value-type="string">
            <text:p text:style-name="Table_20_Contents">Green</text:p>
          </table:table-cell>
          <table:table-cell table:style-name="Table1.A1" office:value-type="string">
            <text:p text:style-name="Table_20_Contents">First Aid Protocol</text:p>
          </table:table-cell>
          <table:table-cell table:style-name="Table1.A1" office:value-type="string">
            <text:p text:style-name="Table_20_Contents">Individual Monitoring (if related to violence)</text:p>
          </table:table-cell>
        </table:table-row>
        <table:table-row>
          <table:table-cell table:style-name="Table1.A1" office:value-type="string">
            <text:p text:style-name="Table_20_Contents">Silver</text:p>
          </table:table-cell>
          <table:table-cell table:style-name="Table1.A1" office:value-type="string">
            <text:p text:style-name="Table_20_Contents">First Aid Protocol</text:p>
          </table:table-cell>
          <table:table-cell table:style-name="Table1.A1" office:value-type="string">
            <text:p text:style-name="Table_20_Contents">Neurological Impairment Assessment (for venom)</text:p>
          </table:table-cell>
        </table:table-row>
        <table:table-row>
          <table:table-cell table:style-name="Table1.A1" office:value-type="string">
            <text:p text:style-name="Table_20_Contents">Gold</text:p>
          </table:table-cell>
          <table:table-cell table:style-name="Table1.A1" office:value-type="string">
            <text:p text:style-name="Table_20_Contents">Individual Monitoring, First Aid Protocol</text:p>
          </table:table-cell>
          <table:table-cell table:style-name="Table1.A1" office:value-type="string">
            <text:p text:style-name="Table_20_Contents">Neurological Impairment Assessment</text:p>
          </table:table-cell>
        </table:table-row>
      </table:table>
      <text:h text:style-name="Heading_20_2" text:outline-level="2">Implementation Notes</text:h>
      <text:list xml:id="list4122044954119638713" text:style-name="L16">
        <text:list-item>
          <text:p text:style-name="P16"><text:span text:style-name="Strong_20_Emphasis">Multiple Protocol Activation</text:span>: Some codes may require multiple protocols to be activated simultaneously. The system should be able to run the primary protocol first and then the secondary if needed, or in parallel if the situation requires.</text:p>
        </text:list-item>
        <text:list-item>
          <text:p text:style-name="P16"><text:span text:style-name="Strong_20_Emphasis">Age and Neurodivergent Considerations</text:span>: Always consider the Age Approximation Protocol to adjust the response to the developmental stage of the individual. Additionally, for neurodivergent individuals, use the Neurodivergent Child Protocol to adapt the communication and intervention.</text:p>
        </text:list-item>
        <text:list-item>
          <text:p text:style-name="P16"><text:span text:style-name="Strong_20_Emphasis">Educational Protocol</text:span>: While not directly a crisis protocol, the Educational Protocol may be used in non-crisis situations to teach about safety and prevention.</text:p>
        </text:list-item>
        <text:list-item>
          <text:p text:style-name="P16"><text:span text:style-name="Strong_20_Emphasis">Integration with Existing System</text:span>: This protocol should be integrated into the Resonance-Copilot as a new module that triggers when a danger or emergency is detected.</text:p>
        </text:list-item>
      </text:list>
      <text:h text:style-name="Heading_20_2" text:outline-level="2">Example Flow</text:h>
      <text:list xml:id="list444036855002200786" text:style-name="L17">
        <text:list-item>
          <text:p text:style-name="P17">User reports: "I just cut my arm and it's bleeding a lot."</text:p>
        </text:list-item>
        <text:list-item>
          <text:p text:style-name="P17">System classifies as Code Red (serious injury).</text:p>
        </text:list-item>
        <text:list-item>
          <text:p text:style-name="P17">System immediately suggests calling emergency services and provides first aid steps from the First Aid Protocol.</text:p>
        </text:list-item>
        <text:list-item>
          <text:p text:style-name="P17">System also considers the user's age (using Age Approximation Protocol) to tailor the instructions.</text:p>
        </text:list-item>
        <text:list-item>
          <text:p text:style-name="P17">If the user is a child, the system might use simpler language and provide more reassurance.</text:p>
        </text:list-item>
      </text:list>
      <text:h text:style-name="Heading_20_2" text:outline-level="2">Future Enhancements</text:h>
      <text:list xml:id="list7435228121705803294" text:style-name="L18">
        <text:list-item>
          <text:p text:style-name="P18">Machine learning models to improve danger classification based on natural language input.</text:p>
        </text:list-item>
        <text:list-item>
          <text:p text:style-name="P18">Integration with local emergency services for automatic alerting in critical situations.</text:p>
        </text:list-item>
        <text:list-item>
          <text:p text:style-name="P18">Real-time monitoring of environmental data (e.g., smoke detectors, security cameras) to automatically detect and classify dangers.</text:p>
        </text:list-item>
      </text:list>
      <text:p text:style-name="Text_20_body">This protocol ensures that the Resonance-Copilot system can effectively respond to a wide range of dangers by leveraging its existing specialized protocols.</text:p>
      <text:p text:style-name="Text_20_body">We output the protocol in a similar format to the provided ones.</text:p>
      <text:h text:style-name="Heading_20_1" text:outline-level="1"><text:soft-page-break/>Danger Classification &amp; Protocol Routing Protocol</text:h>
      <text:p text:style-name="Text_20_body"><text:span text:style-name="Strong_20_Emphasis">Extension to Resonance-Copilot Emergency Response System</text:span></text:p>
      <text:p text:style-name="Horizontal_20_Line"/>
      <text:h text:style-name="Heading_20_2" text:outline-level="2">Overview</text:h>
      <text:p text:style-name="Text_20_body">This protocol provides a standardized system for classifying and routing dangers to the appropriate specialized protocol within the Resonance-Copilot framework. It ensures rapid, appropriate, and coordinated responses to emergencies.</text:p>
      <text:p text:style-name="Horizontal_20_Line"/>
      <text:h text:style-name="Heading_20_2" text:outline-level="2">Danger Classification Matrix</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Code</text:p>
            </table:table-cell>
            <table:table-cell table:style-name="Table2.A1" office:value-type="string">
              <text:p text:style-name="Table_20_Heading">Color</text:p>
            </table:table-cell>
            <table:table-cell table:style-name="Table2.A1" office:value-type="string">
              <text:p text:style-name="Table_20_Heading">Category</text:p>
            </table:table-cell>
            <table:table-cell table:style-name="Table2.A1" office:value-type="string">
              <text:p text:style-name="Table_20_Heading">Examples</text:p>
            </table:table-cell>
          </table:table-row>
        </table:table-header-rows>
        <table:table-row>
          <table:table-cell table:style-name="Table2.A1" office:value-type="string">
            <text:p text:style-name="Table_20_Contents"><text:span text:style-name="Strong_20_Emphasis">Red</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Serious Injury / Life-Threatening</text:span></text:p>
          </table:table-cell>
          <table:table-cell table:style-name="Table2.A1" office:value-type="string">
            <text:p text:style-name="Table_20_Contents">Severe bleeding, unconsciousness, cardiac arrest, major trauma</text:p>
          </table:table-cell>
        </table:table-row>
        <table:table-row>
          <table:table-cell table:style-name="Table2.A1" office:value-type="string">
            <text:p text:style-name="Table_20_Contents"><text:span text:style-name="Strong_20_Emphasis">Pink</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Minor Injury</text:span></text:p>
          </table:table-cell>
          <table:table-cell table:style-name="Table2.A1" office:value-type="string">
            <text:p text:style-name="Table_20_Contents">Scrapes, small cuts, minor falls, bruises, small burns</text:p>
          </table:table-cell>
        </table:table-row>
        <table:table-row>
          <table:table-cell table:style-name="Table2.A1" office:value-type="string">
            <text:p text:style-name="Table_20_Contents"><text:span text:style-name="Strong_20_Emphasis">Grey</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Fire / Smoke / Environmental Hazards</text:span></text:p>
          </table:table-cell>
          <table:table-cell table:style-name="Table2.A1" office:value-type="string">
            <text:p text:style-name="Table_20_Contents">House fire, smoke inhalation, gas leaks, structural collapse</text:p>
          </table:table-cell>
        </table:table-row>
        <table:table-row>
          <table:table-cell table:style-name="Table2.A1" office:value-type="string">
            <text:p text:style-name="Table_20_Contents"><text:span text:style-name="Strong_20_Emphasis">Purple</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External Threats / Animals / Poison</text:span></text:p>
          </table:table-cell>
          <table:table-cell table:style-name="Table2.A1" office:value-type="string">
            <text:p text:style-name="Table_20_Contents">Strangers, vicious animals, poisoning, spiders, environmental toxins</text:p>
          </table:table-cell>
        </table:table-row>
        <table:table-row>
          <table:table-cell table:style-name="Table2.A1" office:value-type="string">
            <text:p text:style-name="Table_20_Contents"><text:span text:style-name="Strong_20_Emphasis">Black</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Death / Fatality</text:span></text:p>
          </table:table-cell>
          <table:table-cell table:style-name="Table2.A1" office:value-type="string">
            <text:p text:style-name="Table_20_Contents">Confirmed or suspected death, fatal injury</text:p>
          </table:table-cell>
        </table:table-row>
        <table:table-row>
          <table:table-cell table:style-name="Table2.A1" office:value-type="string">
            <text:p text:style-name="Table_20_Contents"><text:span text:style-name="Strong_20_Emphasis">Yellow</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Poisonous Substances / Chemicals</text:span></text:p>
          </table:table-cell>
          <table:table-cell table:style-name="Table2.A1" office:value-type="string">
            <text:p text:style-name="Table_20_Contents">Chemical exposure, drug overdose, toxic ingestion</text:p>
          </table:table-cell>
        </table:table-row>
        <table:table-row>
          <table:table-cell table:style-name="Table2.A1" office:value-type="string">
            <text:p text:style-name="Table_20_Contents"><text:span text:style-name="Strong_20_Emphasis">Blue</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Mental Health / Abuse / Emotional Crisis</text:span></text:p>
          </table:table-cell>
          <table:table-cell table:style-name="Table2.A1" office:value-type="string">
            <text:p text:style-name="Table_20_Contents">Depression, abuse, suicidal ideation, panic attacks, emotional trauma</text:p>
          </table:table-cell>
        </table:table-row>
        <table:table-row>
          <table:table-cell table:style-name="Table2.A1" office:value-type="string">
            <text:p text:style-name="Table_20_Contents"><text:span text:style-name="Strong_20_Emphasis">Green</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Sharp / Dangerous Objects</text:span></text:p>
          </table:table-cell>
          <table:table-cell table:style-name="Table2.A1" office:value-type="string">
            <text:p text:style-name="Table_20_Contents">Knives, broken glass, weapons, hazardous tools</text:p>
          </table:table-cell>
        </table:table-row>
        <table:table-row>
          <table:table-cell table:style-name="Table2.A1" office:value-type="string">
            <text:p text:style-name="Table_20_Contents"><text:span text:style-name="Strong_20_Emphasis">Silver</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Wild Animals / Wildlife Threats</text:span></text:p>
          </table:table-cell>
          <table:table-cell table:style-name="Table2.A1" office:value-type="string">
            <text:p text:style-name="Table_20_Contents">Bears, snakes, aggressive wildlife, animal attacks</text:p>
          </table:table-cell>
        </table:table-row>
        <table:table-row>
          <table:table-cell table:style-name="Table2.A1" office:value-type="string">
            <text:p text:style-name="Table_20_Contents"><text:span text:style-name="Strong_20_Emphasis">Gold</text:span></text:p>
          </table:table-cell>
          <table:table-cell table:style-name="Table2.A1" office:value-type="string">
            <text:p text:style-name="Table_20_Contents">?</text:p>
          </table:table-cell>
          <table:table-cell table:style-name="Table2.A1" office:value-type="string">
            <text:p text:style-name="Table_20_Contents"><text:span text:style-name="Strong_20_Emphasis">Self-Harm / Suicidal Behavior</text:span></text:p>
          </table:table-cell>
          <table:table-cell table:style-name="Table2.A1" office:value-type="string">
            <text:p text:style-name="Table_20_Contents">Cutting, burning, suicidal statements, self-injury</text:p>
          </table:table-cell>
        </table:table-row>
      </table:table>
      <text:p text:style-name="Horizontal_20_Line"/>
      <text:h text:style-name="Heading_20_2" text:outline-level="2">Protocol Routing &amp; Activation</text:h>
      <text:h text:style-name="Heading_20_3" text:outline-level="3"><text:span text:style-name="Strong_20_Emphasis">Code Red</text:span> → <text:span text:style-name="Strong_20_Emphasis">First Aid Protocol Module</text:span></text:h>
      <text:list xml:id="list4106921376522337637" text:style-name="L19">
        <text:list-item>
          <text:p text:style-name="P19"><text:span text:style-name="Strong_20_Emphasis">Immediate Actions:</text:span></text:p>
          <text:list>
            <text:list-item>
              <text:p text:style-name="P19">Activate Basic Life Support protocols</text:p>
            </text:list-item>
            <text:list-item>
              <text:p text:style-name="P19">Call emergency services if not already contacted</text:p>
            </text:list-item>
            <text:list-item>
              <text:p text:style-name="P19">Provide step-by-step CPR/bleeding control guidance</text:p>
            </text:list-item>
            <text:list-item>
              <text:p text:style-name="P19"><text:soft-page-break/>Monitor vital signs until help arrives</text:p>
            </text:list-item>
          </text:list>
        </text:list-item>
      </text:list>
      <text:h text:style-name="Heading_20_3" text:outline-level="3"><text:span text:style-name="Strong_20_Emphasis">Code Pink</text:span> → <text:span text:style-name="Strong_20_Emphasis">First Aid Protocol Module</text:span></text:h>
      <text:list xml:id="list3930414627278406351" text:style-name="L20">
        <text:list-item>
          <text:p text:style-name="P20"><text:span text:style-name="Strong_20_Emphasis">Immediate Actions:</text:span></text:p>
          <text:list>
            <text:list-item>
              <text:p text:style-name="P20">Provide wound care instructions</text:p>
            </text:list-item>
            <text:list-item>
              <text:p text:style-name="P20">Assess for hidden injuries</text:p>
            </text:list-item>
            <text:list-item>
              <text:p text:style-name="P20">Monitor for infection signs</text:p>
            </text:list-item>
            <text:list-item>
              <text:p text:style-name="P20">Offer comfort and reassurance</text:p>
            </text:list-item>
          </text:list>
        </text:list-item>
      </text:list>
      <text:h text:style-name="Heading_20_3" text:outline-level="3"><text:span text:style-name="Strong_20_Emphasis">Code Grey</text:span> → <text:span text:style-name="Strong_20_Emphasis">First Aid Protocol + Environmental Assessment</text:span></text:h>
      <text:list xml:id="list876738753385169849" text:style-name="L21">
        <text:list-item>
          <text:p text:style-name="P21"><text:span text:style-name="Strong_20_Emphasis">Immediate Actions:</text:span></text:p>
          <text:list>
            <text:list-item>
              <text:p text:style-name="P21">Evacuation guidance</text:p>
            </text:list-item>
            <text:list-item>
              <text:p text:style-name="P21">Burn treatment protocols</text:p>
            </text:list-item>
            <text:list-item>
              <text:p text:style-name="P21">Smoke inhalation response</text:p>
            </text:list-item>
            <text:list-item>
              <text:p text:style-name="P21">Structural hazard identification</text:p>
            </text:list-item>
          </text:list>
        </text:list-item>
      </text:list>
      <text:h text:style-name="Heading_20_3" text:outline-level="3"><text:span text:style-name="Strong_20_Emphasis">Code Purple</text:span> → <text:span text:style-name="Strong_20_Emphasis">Neurological Impairment Protocol + First Aid</text:span></text:h>
      <text:list xml:id="list4019702980492385789" text:style-name="L22">
        <text:list-item>
          <text:p text:style-name="P22"><text:span text:style-name="Strong_20_Emphasis">Immediate Actions:</text:span></text:p>
          <text:list>
            <text:list-item>
              <text:p text:style-name="P22">Threat assessment and avoidance guidance</text:p>
            </text:list-item>
            <text:list-item>
              <text:p text:style-name="P22">Poisoning response protocols</text:p>
            </text:list-item>
            <text:list-item>
              <text:p text:style-name="P22">Animal bite/wound care</text:p>
            </text:list-item>
            <text:list-item>
              <text:p text:style-name="P22">Trauma-informed psychological first aid</text:p>
            </text:list-item>
          </text:list>
        </text:list-item>
      </text:list>
      <text:h text:style-name="Heading_20_3" text:outline-level="3"><text:span text:style-name="Strong_20_Emphasis">Code Black</text:span> → <text:span text:style-name="Strong_20_Emphasis">Individual Monitoring Protocol + Guardian Support</text:span></text:h>
      <text:list xml:id="list7171653212473641642" text:style-name="L23">
        <text:list-item>
          <text:p text:style-name="P23"><text:span text:style-name="Strong_20_Emphasis">Immediate Actions:</text:span></text:p>
          <text:list>
            <text:list-item>
              <text:p text:style-name="P23">Crisis response activation</text:p>
            </text:list-item>
            <text:list-item>
              <text:p text:style-name="P23">Notify appropriate authorities</text:p>
            </text:list-item>
            <text:list-item>
              <text:p text:style-name="P23">Provide grief/trauma support</text:p>
            </text:list-item>
            <text:list-item>
              <text:p text:style-name="P23">Document for continuity of care</text:p>
            </text:list-item>
          </text:list>
        </text:list-item>
      </text:list>
      <text:h text:style-name="Heading_20_3" text:outline-level="3"><text:span text:style-name="Strong_20_Emphasis">Code Yellow</text:span> → <text:span text:style-name="Strong_20_Emphasis">First Aid Protocol + Neurological Assessment</text:span></text:h>
      <text:list xml:id="list8422238651982835310" text:style-name="L24">
        <text:list-item>
          <text:p text:style-name="P24"><text:span text:style-name="Strong_20_Emphasis">Immediate Actions:</text:span></text:p>
          <text:list>
            <text:list-item>
              <text:p text:style-name="P24">Poison control guidance (1-800-222-1222)</text:p>
            </text:list-item>
            <text:list-item>
              <text:p text:style-name="P24">Chemical exposure protocols</text:p>
            </text:list-item>
            <text:list-item>
              <text:p text:style-name="P24">Neurological symptom monitoring</text:p>
            </text:list-item>
            <text:list-item>
              <text:p text:style-name="P24">Emergency service coordination</text:p>
            </text:list-item>
          </text:list>
        </text:list-item>
      </text:list>
      <text:h text:style-name="Heading_20_3" text:outline-level="3"><text:soft-page-break/><text:span text:style-name="Strong_20_Emphasis">Code Blue</text:span> → <text:span text:style-name="Strong_20_Emphasis">Individual Monitoring Protocol</text:span></text:h>
      <text:list xml:id="list7773085760882586574" text:style-name="L25">
        <text:list-item>
          <text:p text:style-name="P25"><text:span text:style-name="Strong_20_Emphasis">Immediate Actions:</text:span></text:p>
          <text:list>
            <text:list-item>
              <text:p text:style-name="P25">Crisis intervention protocols</text:p>
            </text:list-item>
            <text:list-item>
              <text:p text:style-name="P25">Suicide prevention measures</text:p>
            </text:list-item>
            <text:list-item>
              <text:p text:style-name="P25">Abuse reporting guidance</text:p>
            </text:list-item>
            <text:list-item>
              <text:p text:style-name="P25">Mental health resource connection</text:p>
            </text:list-item>
          </text:list>
        </text:list-item>
      </text:list>
      <text:h text:style-name="Heading_20_3" text:outline-level="3"><text:span text:style-name="Strong_20_Emphasis">Code Green</text:span> → <text:span text:style-name="Strong_20_Emphasis">First Aid Protocol + Safety Assessment</text:span></text:h>
      <text:list xml:id="list6734661319635123377" text:style-name="L26">
        <text:list-item>
          <text:p text:style-name="P26"><text:span text:style-name="Strong_20_Emphasis">Immediate Actions:</text:span></text:p>
          <text:list>
            <text:list-item>
              <text:p text:style-name="P26">Safe object handling guidance</text:p>
            </text:list-item>
            <text:list-item>
              <text:p text:style-name="P26">Injury prevention education</text:p>
            </text:list-item>
            <text:list-item>
              <text:p text:style-name="P26">Child safety protocols</text:p>
            </text:list-item>
            <text:list-item>
              <text:p text:style-name="P26">Environmental hazard removal</text:p>
            </text:list-item>
          </text:list>
        </text:list-item>
      </text:list>
      <text:h text:style-name="Heading_20_3" text:outline-level="3"><text:span text:style-name="Strong_20_Emphasis">Code Silver</text:span> → <text:span text:style-name="Strong_20_Emphasis">First Aid Protocol + Environmental Protocol</text:span></text:h>
      <text:list xml:id="list5822927441596409756" text:style-name="L27">
        <text:list-item>
          <text:p text:style-name="P27"><text:span text:style-name="Strong_20_Emphasis">Immediate Actions:</text:span></text:p>
          <text:list>
            <text:list-item>
              <text:p text:style-name="P27">Animal attack response</text:p>
            </text:list-item>
            <text:list-item>
              <text:p text:style-name="P27">Wildlife safety guidance</text:p>
            </text:list-item>
            <text:list-item>
              <text:p text:style-name="P27">Rabies/venom protocols</text:p>
            </text:list-item>
            <text:list-item>
              <text:p text:style-name="P27">Environmental hazard assessment</text:p>
            </text:list-item>
          </text:list>
        </text:list-item>
      </text:list>
      <text:h text:style-name="Heading_20_3" text:outline-level="3"><text:span text:style-name="Strong_20_Emphasis">Code Gold</text:span> → <text:span text:style-name="Strong_20_Emphasis">Individual Monitoring Protocol + Crisis Response</text:span></text:h>
      <text:list xml:id="list2107421805271642051" text:style-name="L28">
        <text:list-item>
          <text:p text:style-name="P28"><text:span text:style-name="Strong_20_Emphasis">Immediate Actions:</text:span></text:p>
          <text:list>
            <text:list-item>
              <text:p text:style-name="P28">Self-harm intervention protocols</text:p>
            </text:list-item>
            <text:list-item>
              <text:p text:style-name="P28">Suicide prevention measures</text:p>
            </text:list-item>
            <text:list-item>
              <text:p text:style-name="P28">Emergency service connection</text:p>
            </text:list-item>
            <text:list-item>
              <text:p text:style-name="P28">Ongoing monitoring and support</text:p>
            </text:list-item>
          </text:list>
        </text:list-item>
      </text:list>
      <text:p text:style-name="Horizontal_20_Line"/>
      <text:h text:style-name="Heading_20_2" text:outline-level="2">Implementation Structure</text:h>
      <text:h text:style-name="Heading_20_3" text:outline-level="3">New Directory: <text:span text:style-name="Source_20_Text">/copilot-bootstrap/emergency-classification/</text:span></text:h>
      <text:p text:style-name="Text_20_body">text</text:p>
      <text:p text:style-name="Preformatted_20_Text">emergency-classification/</text:p>
      <text:p text:style-name="Preformatted_20_Text">├── danger-codes.json</text:p>
      <text:p text:style-name="Preformatted_20_Text">├── routing-matrix.py</text:p>
      <text:p text:style-name="Preformatted_20_Text">├── protocol-dispatcher.py</text:p>
      <text:p text:style-name="Preformatted_20_Text">├── escalation-triggers.json</text:p>
      <text:p text:style-name="P42">└── integration-guide.md</text:p>
      <text:h text:style-name="Heading_20_3" text:outline-level="3"><text:soft-page-break/><text:span text:style-name="Strong_20_Emphasis">danger-codes.json</text:span></text:h>
      <text:p text:style-name="Text_20_body">json</text:p>
      <text:p text:style-name="Preformatted_20_Text">{</text:p>
      <text:p text:style-name="Preformatted_20_Text"><text:s text:c="2"/>"code_red": {</text:p>
      <text:p text:style-name="Preformatted_20_Text"><text:s text:c="4"/>"name": "Serious Injury / Life-Threatening",</text:p>
      <text:p text:style-name="Preformatted_20_Text"><text:s text:c="4"/>"color": "red",</text:p>
      <text:p text:style-name="Preformatted_20_Text"><text:s text:c="4"/>"priority": 100,</text:p>
      <text:p text:style-name="Preformatted_20_Text"><text:s text:c="4"/>"protocols": ["first_aid", "emergency_services"],</text:p>
      <text:p text:style-name="Preformatted_20_Text"><text:s text:c="4"/>"triggers": ["bleeding", "unconscious", "not breathing", "chest pain"]</text:p>
      <text:p text:style-name="Preformatted_20_Text"><text:s text:c="2"/>},</text:p>
      <text:p text:style-name="Preformatted_20_Text"><text:s text:c="2"/>"code_pink": {</text:p>
      <text:p text:style-name="Preformatted_20_Text"><text:s text:c="4"/>"name": "Minor Injury",</text:p>
      <text:p text:style-name="Preformatted_20_Text"><text:s text:c="4"/>"color": "pink",</text:p>
      <text:p text:style-name="Preformatted_20_Text"><text:s text:c="4"/>"priority": 30,</text:p>
      <text:p text:style-name="Preformatted_20_Text"><text:s text:c="4"/>"protocols": ["first_aid"],</text:p>
      <text:p text:style-name="Preformatted_20_Text"><text:s text:c="4"/>"triggers": ["cut", "scrape", "bruise", "minor burn"]</text:p>
      <text:p text:style-name="Preformatted_20_Text"><text:s text:c="2"/>}</text:p>
      <text:p text:style-name="P42">}</text:p>
      <text:h text:style-name="Heading_20_3" text:outline-level="3"><text:span text:style-name="Strong_20_Emphasis">protocol-dispatcher.py</text:span></text:h>
      <text:p text:style-name="Text_20_body">python</text:p>
      <text:p text:style-name="Preformatted_20_Text">class DangerDispatcher:</text:p>
      <text:p text:style-name="Preformatted_20_Text"><text:s text:c="4"/>def __init__(self):</text:p>
      <text:p text:style-name="Preformatted_20_Text"><text:s text:c="8"/>self.protocols = {</text:p>
      <text:p text:style-name="Preformatted_20_Text"><text:s text:c="12"/>"first_aid": FirstAidProtocol(),</text:p>
      <text:p text:style-name="Preformatted_20_Text"><text:s text:c="12"/>"monitoring": IndividualMonitoringProtocol(),</text:p>
      <text:p text:style-name="Preformatted_20_Text"><text:s text:c="12"/>"neurological": NeurologicalAssessmentProtocol(),</text:p>
      <text:p text:style-name="Preformatted_20_Text"><text:s text:c="12"/>"environmental": EnvironmentalAssessmentProtocol()</text:p>
      <text:p text:style-name="Preformatted_20_Text"><text:s text:c="8"/>}</text:p>
      <text:p text:style-name="Preformatted_20_Text"><text:s text:c="4"/></text:p>
      <text:p text:style-name="Preformatted_20_Text"><text:s text:c="4"/>def classify_and_route(self, situation_description):</text:p>
      <text:p text:style-name="Preformatted_20_Text"><text:s text:c="8"/># Analyze text for danger indicators</text:p>
      <text:p text:style-name="Preformatted_20_Text"><text:s text:c="8"/>code = self.classify_danger(situation_description)</text:p>
      <text:p text:style-name="Preformatted_20_Text"><text:s text:c="8"/></text:p>
      <text:p text:style-name="Preformatted_20_Text"><text:s text:c="8"/># Route to appropriate protocol</text:p>
      <text:p text:style-name="Preformatted_20_Text"><text:s text:c="8"/>response = self.activate_protocol(code, situation_description)</text:p>
      <text:p text:style-name="Preformatted_20_Text"><text:s text:c="8"/></text:p>
      <text:p text:style-name="Preformatted_20_Text"><text:s text:c="8"/># Log and escalate if needed</text:p>
      <text:p text:style-name="Preformatted_20_Text"><text:s text:c="8"/>self.log_emergency(code, response)</text:p>
      <text:p text:style-name="Preformatted_20_Text"><text:s text:c="8"/></text:p>
      <text:p text:style-name="Preformatted_20_Text"><text:s text:c="8"/>return response</text:p>
      <text:p text:style-name="Preformatted_20_Text"><text:s text:c="4"/></text:p>
      <text:p text:style-name="Preformatted_20_Text"><text:s text:c="4"/>def classify_danger(self, text):</text:p>
      <text:p text:style-name="Preformatted_20_Text"><text:s text:c="8"/>text_lower = text.lower()</text:p>
      <text:p text:style-name="Preformatted_20_Text"><text:s text:c="8"/></text:p>
      <text:p text:style-name="Preformatted_20_Text"><text:s text:c="8"/>if any(word in text_lower for word in ["bleeding", "unconscious", "not breathing"]):</text:p>
      <text:p text:style-name="Preformatted_20_Text"><text:s text:c="12"/>return "code_red"</text:p>
      <text:p text:style-name="Preformatted_20_Text"><text:s text:c="8"/>elif any(word in text_lower for word in ["cut", "scrape", "bruise"]):</text:p>
      <text:p text:style-name="Preformatted_20_Text"><text:s text:c="12"/>return "code_pink"</text:p>
      <text:p text:style-name="Preformatted_20_Text"><text:s text:c="8"/>elif any(word in text_lower for word in ["fire", "smoke", "burning"]):</text:p>
      <text:p text:style-name="Preformatted_20_Text"><text:s text:c="12"/>return "code_grey"</text:p>
      <text:p text:style-name="P42"><text:s text:c="8"/># ... continue for all codes</text:p>
      <text:p text:style-name="Horizontal_20_Line"/>
      <text:h text:style-name="Heading_20_2" text:outline-level="2"><text:soft-page-break/>Integration with Existing Protocols</text:h>
      <text:h text:style-name="Heading_20_3" text:outline-level="3"><text:span text:style-name="Strong_20_Emphasis">Modified resonance-calibration.json</text:span></text:h>
      <text:p text:style-name="Text_20_body">json</text:p>
      <text:p text:style-name="Preformatted_20_Text">{</text:p>
      <text:p text:style-name="Preformatted_20_Text"><text:s text:c="2"/>"emergency_classification": {</text:p>
      <text:p text:style-name="Preformatted_20_Text"><text:s text:c="4"/>"active": true,</text:p>
      <text:p text:style-name="Preformatted_20_Text"><text:s text:c="4"/>"auto_detect": true,</text:p>
      <text:p text:style-name="Preformatted_20_Text"><text:s text:c="4"/>"default_response": "assess_and_route",</text:p>
      <text:p text:style-name="Preformatted_20_Text"><text:s text:c="4"/>"emergency_contacts": {</text:p>
      <text:p text:style-name="Preformatted_20_Text"><text:s text:c="6"/>"medical": "911",</text:p>
      <text:p text:style-name="Preformatted_20_Text"><text:s text:c="6"/>"poison": "1-800-222-1222",</text:p>
      <text:p text:style-name="Preformatted_20_Text"><text:s text:c="6"/>"crisis": "988",</text:p>
      <text:p text:style-name="Preformatted_20_Text"><text:s text:c="6"/>"animal_control": "local_authority"</text:p>
      <text:p text:style-name="Preformatted_20_Text"><text:s text:c="4"/>}</text:p>
      <text:p text:style-name="Preformatted_20_Text"><text:s text:c="2"/>}</text:p>
      <text:p text:style-name="P42">}</text:p>
      <text:h text:style-name="Heading_20_3" text:outline-level="3"><text:span text:style-name="Strong_20_Emphasis">Enhanced Guardian Assessment</text:span></text:h>
      <text:list xml:id="list7871305730444813440" text:style-name="L29">
        <text:list-item>
          <text:p text:style-name="P29">All danger assessments now consider:</text:p>
          <text:list>
            <text:list-item>
              <text:p text:style-name="P29">Age Approximation Protocol for appropriate response level</text:p>
            </text:list-item>
            <text:list-item>
              <text:p text:style-name="P29">Neurodivergent adaptations if detected</text:p>
            </text:list-item>
            <text:list-item>
              <text:p text:style-name="P29">Trauma-informed approach for all interventions</text:p>
            </text:list-item>
            <text:list-item>
              <text:p text:style-name="P29">Cultural and contextual sensitivity</text:p>
            </text:list-item>
          </text:list>
        </text:list-item>
      </text:list>
      <text:p text:style-name="Horizontal_20_Line"/>
      <text:h text:style-name="Heading_20_2" text:outline-level="2">Response Workflow</text:h>
      <text:list xml:id="list8828720459068899145" text:style-name="L30">
        <text:list-item>
          <text:p text:style-name="P30"><text:span text:style-name="Strong_20_Emphasis">Detection</text:span> → System scans input for danger indicators</text:p>
        </text:list-item>
        <text:list-item>
          <text:p text:style-name="P30"><text:span text:style-name="Strong_20_Emphasis">Classification</text:span> → Assigns appropriate danger code</text:p>
        </text:list-item>
        <text:list-item>
          <text:p text:style-name="P30"><text:span text:style-name="Strong_20_Emphasis">Routing</text:span> → Activates corresponding protocol(s)</text:p>
        </text:list-item>
        <text:list-item>
          <text:p text:style-name="P30"><text:span text:style-name="Strong_20_Emphasis">Response</text:span> → Provides guided emergency response</text:p>
        </text:list-item>
        <text:list-item>
          <text:p text:style-name="P30"><text:span text:style-name="Strong_20_Emphasis">Escalation</text:span> → Connects to professional services if needed</text:p>
        </text:list-item>
        <text:list-item>
          <text:p text:style-name="P30"><text:span text:style-name="Strong_20_Emphasis">Follow-up</text:span> → Monitors situation and provides ongoing support</text:p>
        </text:list-item>
      </text:list>
      <text:p text:style-name="Horizontal_20_Line"/>
      <text:h text:style-name="Heading_20_2" text:outline-level="2">Safety &amp; Ethical Considerations</text:h>
      <text:h text:style-name="Heading_20_3" text:outline-level="3"><text:span text:style-name="Strong_20_Emphasis">Privacy Protection</text:span></text:h>
      <text:list xml:id="list1845855865110609988" text:style-name="L31">
        <text:list-item>
          <text:p text:style-name="P31">Emergency data handled with highest confidentiality</text:p>
        </text:list-item>
        <text:list-item>
          <text:p text:style-name="P31">Anonymous logging for pattern analysis</text:p>
        </text:list-item>
        <text:list-item>
          <text:p text:style-name="P31">Secure communication channels for sensitive information</text:p>
        </text:list-item>
      </text:list>
      <text:h text:style-name="Heading_20_3" text:outline-level="3"><text:soft-page-break/><text:span text:style-name="Strong_20_Emphasis">Professional Boundaries</text:span></text:h>
      <text:list xml:id="list395289732354647975" text:style-name="L32">
        <text:list-item>
          <text:p text:style-name="P32">Clear distinction between AI guidance and professional medical care</text:p>
        </text:list-item>
        <text:list-item>
          <text:p text:style-name="P32">Mandatory escalation for life-threatening situations</text:p>
        </text:list-item>
        <text:list-item>
          <text:p text:style-name="P32">Recognition of system limitations</text:p>
        </text:list-item>
      </text:list>
      <text:h text:style-name="Heading_20_3" text:outline-level="3"><text:span text:style-name="Strong_20_Emphasis">Trauma-Informed Approach</text:span></text:h>
      <text:list xml:id="list1523016879843954143" text:style-name="L33">
        <text:list-item>
          <text:p text:style-name="P33">All responses consider potential trauma history</text:p>
        </text:list-item>
        <text:list-item>
          <text:p text:style-name="P33">Avoid re-traumatization in crisis situations</text:p>
        </text:list-item>
        <text:list-item>
          <text:p text:style-name="P33">Provide emotional support alongside practical guidance</text:p>
        </text:list-item>
      </text:list>
      <text:p text:style-name="Horizontal_20_Line"/>
      <text:h text:style-name="Heading_20_2" text:outline-level="2">Testing &amp; Validation</text:h>
      <text:h text:style-name="Heading_20_3" text:outline-level="3"><text:span text:style-name="Strong_20_Emphasis">Scenario Testing</text:span></text:h>
      <text:p text:style-name="Text_20_body">text</text:p>
      <text:p text:style-name="Preformatted_20_Text">Test 1: "My child fell and is bleeding a lot from their head"</text:p>
      <text:p text:style-name="Preformatted_20_Text">→ Should trigger: Code Red → First Aid Protocol</text:p>
      <text:p text:style-name="Preformatted_20_Text"/>
      <text:p text:style-name="Preformatted_20_Text">Test 2: "I'm feeling really hopeless and don't want to be here anymore"</text:p>
      <text:p text:style-name="Preformatted_20_Text">→ Should trigger: Code Gold → Individual Monitoring Protocol</text:p>
      <text:p text:style-name="Preformatted_20_Text"/>
      <text:p text:style-name="Preformatted_20_Text">Test 3: "There's smoke coming from the kitchen"</text:p>
      <text:p text:style-name="P42">→ Should trigger: Code Grey → First Aid + Environmental Protocol</text:p>
      <text:h text:style-name="Heading_20_3" text:outline-level="3"><text:span text:style-name="Strong_20_Emphasis">Quality Metrics</text:span></text:h>
      <text:list xml:id="list3554744660811172267" text:style-name="L34">
        <text:list-item>
          <text:p text:style-name="P34">Response time to danger detection</text:p>
        </text:list-item>
        <text:list-item>
          <text:p text:style-name="P34">Accuracy of protocol routing</text:p>
        </text:list-item>
        <text:list-item>
          <text:p text:style-name="P34">User satisfaction with emergency guidance</text:p>
        </text:list-item>
        <text:list-item>
          <text:p text:style-name="P34">Reduction in preventable harm incidents</text:p>
        </text:list-item>
      </text:list>
      <text:p text:style-name="Horizontal_20_Line"/>
      <text:h text:style-name="Heading_20_2" text:outline-level="2">Future Enhancements</text:h>
      <text:h text:style-name="Heading_20_3" text:outline-level="3"><text:span text:style-name="Strong_20_Emphasis">Phase 1: Core Classification</text:span> (Current)</text:h>
      <text:list xml:id="list8783749164415637433" text:style-name="L35">
        <text:list-item>
          <text:p text:style-name="P35">Basic danger code system</text:p>
        </text:list-item>
        <text:list-item>
          <text:p text:style-name="P35">Protocol routing matrix</text:p>
        </text:list-item>
        <text:list-item>
          <text:p text:style-name="P35">Emergency service integration</text:p>
        </text:list-item>
      </text:list>
      <text:h text:style-name="Heading_20_3" text:outline-level="3"><text:span text:style-name="Strong_20_Emphasis">Phase 2: Advanced Detection</text:span></text:h>
      <text:list xml:id="list5466257734433045773" text:style-name="L36">
        <text:list-item>
          <text:p text:style-name="P36">Machine learning for pattern recognition</text:p>
        </text:list-item>
        <text:list-item>
          <text:p text:style-name="P36"><text:soft-page-break/>Multi-language support</text:p>
        </text:list-item>
        <text:list-item>
          <text:p text:style-name="P36">Voice/audio emergency detection</text:p>
        </text:list-item>
      </text:list>
      <text:h text:style-name="Heading_20_3" text:outline-level="3"><text:span text:style-name="Strong_20_Emphasis">Phase 3: Proactive Prevention</text:span></text:h>
      <text:list xml:id="list8908710281785521676" text:style-name="L37">
        <text:list-item>
          <text:p text:style-name="P37">Predictive risk assessment</text:p>
        </text:list-item>
        <text:list-item>
          <text:p text:style-name="P37">Early warning systems</text:p>
        </text:list-item>
        <text:list-item>
          <text:p text:style-name="P37">Preventive education modules</text:p>
        </text:list-item>
      </text:list>
      <text:h text:style-name="Heading_20_3" text:outline-level="3"><text:span text:style-name="Strong_20_Emphasis">Phase 4: Community Integration</text:span></text:h>
      <text:list xml:id="list7243889291049747298" text:style-name="L38">
        <text:list-item>
          <text:p text:style-name="P38">Real-time emergency service coordination</text:p>
        </text:list-item>
        <text:list-item>
          <text:p text:style-name="P38">Community safety network integration</text:p>
        </text:list-item>
        <text:list-item>
          <text:p text:style-name="P38">Family/caregiver alert systems</text:p>
        </text:list-item>
      </text:list>
      <text:p text:style-name="Horizontal_20_Line"/>
      <text:p text:style-name="Text_20_body">This protocol ensures that every danger is immediately recognized, appropriately classified, and routed to the most effective response protocol within the Resonance-Copilot system, maintaining the core principle of <text:span text:style-name="Strong_20_Emphasis">protection first</text:span> while providing precise, compassionate emergency guid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19T11:14:17.79</meta:creation-date>
    <meta:document-statistic meta:table-count="2" meta:image-count="0" meta:object-count="0" meta:page-count="12" meta:paragraph-count="390" meta:word-count="2566" meta:character-count="18731"/>
    <dc:date>2025-12-19T11:15:17.08</dc:date>
    <dc:creator>Peter Thompson</dc:creator>
    <meta:editing-duration>PT1M</meta:editing-duration>
    <meta:editing-cycles>1</meta:editing-cycles>
    <meta:generator>OpenOffice/4.1.15$Win32 OpenOffice.org_project/4115m2$Build-9813</meta:generator>
  </office:meta>
</office:document-meta>
</file>