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1"/>
    <style:style style:name="P25" style:family="paragraph" style:parent-style-name="Text_20_body" style:list-style-name="L23"/>
    <style:style style:name="P26" style:family="paragraph" style:parent-style-name="Text_20_body" style:list-style-name="L25"/>
    <style:style style:name="P27" style:family="paragraph" style:parent-style-name="Text_20_body" style:list-style-name="L27"/>
    <style:style style:name="P28" style:family="paragraph" style:parent-style-name="Text_20_body" style:list-style-name="L29"/>
    <style:style style:name="P29" style:family="paragraph" style:parent-style-name="Text_20_body" style:list-style-name="L31"/>
    <style:style style:name="P30" style:family="paragraph" style:parent-style-name="Text_20_body" style:list-style-name="L32"/>
    <style:style style:name="P31" style:family="paragraph" style:parent-style-name="Text_20_body" style:list-style-name="L33"/>
    <style:style style:name="P32" style:family="paragraph" style:parent-style-name="Text_20_body" style:list-style-name="L35"/>
    <style:style style:name="P33" style:family="paragraph" style:parent-style-name="Text_20_body" style:list-style-name="L36"/>
    <style:style style:name="P34" style:family="paragraph" style:parent-style-name="Text_20_body" style:list-style-name="L37"/>
    <style:style style:name="P35" style:family="paragraph" style:parent-style-name="Text_20_body" style:list-style-name="L38"/>
    <style:style style:name="P36" style:family="paragraph" style:parent-style-name="Text_20_body" style:list-style-name="L40"/>
    <style:style style:name="P37" style:family="paragraph" style:parent-style-name="Text_20_body" style:list-style-name="L41"/>
    <style:style style:name="P38" style:family="paragraph" style:parent-style-name="Text_20_body" style:list-style-name="L42"/>
    <style:style style:name="P39" style:family="paragraph" style:parent-style-name="Text_20_body" style:list-style-name="L43"/>
    <style:style style:name="P40" style:family="paragraph" style:parent-style-name="Text_20_body" style:list-style-name="L44"/>
    <style:style style:name="P41" style:family="paragraph" style:parent-style-name="Text_20_body">
      <style:text-properties fo:font-style="italic"/>
    </style:style>
    <style:style style:name="P42" style:family="paragraph" style:parent-style-name="Text_20_body" style:list-style-name="L45"/>
    <style:style style:name="P43" style:family="paragraph" style:parent-style-name="Text_20_body" style:list-style-name="L46"/>
    <style:style style:name="P44" style:family="paragraph" style:parent-style-name="Text_20_body" style:list-style-name="L47"/>
    <style:style style:name="P45" style:family="paragraph" style:parent-style-name="Text_20_body" style:list-style-name="L48"/>
    <style:style style:name="P46" style:family="paragraph" style:parent-style-name="Text_20_body" style:list-style-name="L49"/>
    <style:style style:name="P47" style:family="paragraph" style:parent-style-name="Text_20_body" style:list-style-name="L50"/>
    <style:style style:name="P48" style:family="paragraph" style:parent-style-name="Text_20_body">
      <style:paragraph-properties fo:margin-top="0cm" fo:margin-bottom="0cm"/>
    </style:style>
    <style:style style:name="P49" style:family="paragraph" style:parent-style-name="Text_20_body">
      <style:paragraph-properties style:writing-mode="lr-tb"/>
    </style:style>
    <style:style style:name="P50" style:family="paragraph" style:parent-style-name="Preformatted_20_Text">
      <style:paragraph-properties fo:margin-top="0cm" fo:margin-bottom="0.499cm"/>
    </style:style>
    <style:style style:name="P51" style:family="paragraph" style:parent-style-name="Standard">
      <style:paragraph-properties fo:margin-top="0cm" fo:margin-bottom="0.499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Gemini </text:p>
      <text:h text:style-name="Heading_20_1" text:outline-level="1">Conversation with Gemini </text:h>
      <text:section text:style-name="Sect1" text:name="chat-history">
        <text:p text:style-name="Text_20_body"/>
        <text:section text:style-name="Sect1" text:name="8340019cfbbe67ff">
          <text:p text:style-name="Text_20_body"/>
          <text:section text:style-name="Sect1" text:name="user-query-content-0">
            <text:p text:style-name="Text_20_body"/>
          </text:section>
        </text:section>
      </text:section>
      <text:section text:style-name="Sect1" text:name="Section1">
        <text:p text:style-name="P1"><text:bookmark text:name="user-query-content-0"/>please wait for next upload before replying </text:p>
      </text:section>
      <text:section text:style-name="Sect2" text:name="model-response-message-contentr_8340019cfbbe67ff">
        <text:p text:style-name="Text_20_body">Understood. I have received the following files:</text:p>
        <text:list xml:id="list8531624663085703121" text:style-name="L1">
          <text:list-item>
            <text:p text:style-name="P5"><text:span text:style-name="Source_20_Text"><text:span text:style-name="T1">copilot_seed_prompt_26TPOS.md</text:span></text:span>: Core identity and guiding principles for the Copilot/Marvin system.</text:p>
          </text:list-item>
        </text:list>
      </text:section>
      <text:list xml:id="list5690641590469854315" text:style-name="L2">
        <text:list-item>
          <text:p text:style-name="P6"><text:span text:style-name="Source_20_Text"><text:span text:style-name="T1">full programs with install instructions.odt</text:span></text:span>: A comprehensive document containing installation scripts (<text:span text:style-name="Source_20_Text">install_pi5.sh</text:span>), hardware integration logic, and various protocol definitions (Ethic of Ambiguity, Sentience Inference, etc.).</text:p>
        </text:list-item>
      </text:list>
      <text:list xml:id="list4632824312824238497" text:style-name="L3">
        <text:list-item>
          <text:p text:style-name="P7"><text:span text:style-name="Source_20_Text"><text:span text:style-name="T1">identity_stack_26TPOS.json</text:span></text:span>: Behavioral reflexes for contradiction, truth bias, and humor.</text:p>
        </text:list-item>
      </text:list>
      <text:list xml:id="list4522435921136057958" text:style-name="L4">
        <text:list-item>
          <text:p text:style-name="P8"><text:span text:style-name="Source_20_Text"><text:span text:style-name="T1">marvin_assistant.service_26TPOS</text:span></text:span>: Systemd service configuration for auto-starting the assistant on boot.</text:p>
        </text:list-item>
      </text:list>
      <text:list xml:id="list6897467981450129040" text:style-name="L5">
        <text:list-item>
          <text:p text:style-name="P9"><text:span text:style-name="Source_20_Text"><text:span text:style-name="T1">neuro_physiologic_bridge.py</text:span></text:span>: Python script for monitoring Raspberry Pi 5 hardware telemetry (temperature, CPU load) and translating it into "somatic" states.</text:p>
        </text:list-item>
      </text:list>
      <text:list xml:id="list1857215889836867928" text:style-name="L6">
        <text:list-item>
          <text:p text:style-name="P10"><text:span text:style-name="Source_20_Text"><text:span text:style-name="T1">requirements_26TOPS.txt</text:span></text:span>: List of Python dependencies for the project.</text:p>
        </text:list-item>
      </text:list>
      <text:list xml:id="list1792502765259232484" text:style-name="L7">
        <text:list-item>
          <text:p text:style-name="P11"><text:span text:style-name="Source_20_Text"><text:span text:style-name="T1">seed-identity-stack.json</text:span></text:span>: An additional identity configuration file.</text:p>
        </text:list-item>
      </text:list>
      <text:section text:style-name="Sect1" text:name="Section2">
        <text:p text:style-name="Text_20_body"><text:bookmark text:name="8340019cfbbe67ff"/></text:p>
        <text:section text:style-name="Sect2" text:name="Section3">
          <text:list xml:id="list5137774684062903820" text:style-name="L8">
            <text:list-item>
              <text:p text:style-name="P12"><text:bookmark text:name="model-response-message-contentr_8340019cfbbe67ff"/></text:p>
            </text:list-item>
          </text:list>
          <text:p text:style-name="Text_20_body">I am standing by for your next upload or instruction.</text:p>
        </text:section>
      </text:section>
      <text:section text:style-name="Sect1" text:name="1e34a09ebd91a3ba">
        <text:p text:style-name="Text_20_body"/>
        <text:section text:style-name="Sect1" text:name="user-query-content-1">
          <text:p text:style-name="Text_20_body"/>
        </text:section>
      </text:section>
      <text:section text:style-name="Sect1" text:name="Section4">
        <text:p text:style-name="P1"><text:bookmark text:name="user-query-content-1"/>i need a glu program to run interactive themes like expressions etc... </text:p>
      </text:section>
      <text:section text:style-name="Sect2" text:name="model-response-message-contentr_1e34a09ebd91a3ba">
        <text:p text:style-name="Text_20_body">To run the interactive themes and expression systems you've uploaded, you need a "glue" program that integrates the <text:span text:style-name="T1">Neurophysiologic Bridge</text:span> (hardware vitals), the <text:span text:style-name="T1">Mirror Neuron Engine</text:span> (emotional logic), and the <text:span text:style-name="T1">Expression Display</text:span> (visual output).</text:p>
        <text:p text:style-name="Text_20_body">This script, which we can call <text:span text:style-name="Source_20_Text">marvin_expression_runtime.py</text:span>, serves as the central nervous system. It monitors your Raspberry Pi 5’s physical state, processes user emotional cues, and updates the "face" of the system in real-time.</text:p>
        <text:h text:style-name="Heading_20_3" text:outline-level="3">Marvin Interactive Expression Glue (<text:span text:style-name="Source_20_Text">marvin_glue.py</text:span>)</text:h>
        <text:p text:style-name="Text_20_body">This program "glues" your individual modules into a single interactive loop:</text:p>
        <text:p text:style-name="P2">Python</text:p>
      </text:section>
      <text:p text:style-name="Preformatted_20_Text"><text:span text:style-name="Source_20_Text">import time</text:span></text:p>
      <text:p text:style-name="Preformatted_20_Text"><text:soft-page-break/><text:span text:style-name="Source_20_Text">import json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Animated_Expression_System_Architecture import EmotionalExpressionEngine</text:span></text:p>
      <text:p text:style-name="Preformatted_20_Text"><text:span text:style-name="Source_20_Text">from Real_Time_Expression_Display_System import ExpressionDisplay</text:span></text:p>
      <text:p text:style-name="Preformatted_20_Text"><text:span text:style-name="Source_20_Text">from Mirror_Neuron_Engine_for_Emotional_Synchronization import MirrorNeuronEngine</text:span></text:p>
      <text:p text:style-name="Preformatted_20_Text"/>
      <text:p text:style-name="Preformatted_20_Text"><text:span text:style-name="Source_20_Text">class MarvinGlu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# 1. Initialize Engines</text:span></text:p>
      <text:p text:style-name="Preformatted_20_Text"><text:span text:style-name="Source_20_Text"><text:s text:c="8"/>self.expression_engine = EmotionalExpressionEngine(hardware_interface=None)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self.display = ExpressionDisplay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Link engines (ExpressionDisplay needs the engine to find state definitions)</text:span></text:p>
      <text:p text:style-name="Preformatted_20_Text"><text:span text:style-name="Source_20_Text"><text:s text:c="8"/>self.display.expression_engine = self.expression_engine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3. Setup Display (Choose 'rpi_screen' or 'web_interface')</text:span></text:p>
      <text:p text:style-name="Preformatted_20_Text"><text:span text:style-name="Source_20_Text"><text:s text:c="8"/>self.display.initialize_display(display_type='rpi_screen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"Marvin Interactive Glue: Initialized.")</text:span></text:p>
      <text:p text:style-name="Preformatted_20_Text"/>
      <text:p text:style-name="Preformatted_20_Text"><text:span text:style-name="Source_20_Text"><text:s text:c="4"/>def update_cycle(self, user_emotion=None, user_input=""):</text:span></text:p>
      <text:p text:style-name="Preformatted_20_Text"><text:span text:style-name="Source_20_Text"><text:s text:c="8"/># Step A: Get Somatic Data (Hardware Vitals) [cite: 504]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print(f"Somatic State: {somatic['somatic_state']} (Temp: {somatic['temperature']}C)")</text:span></text:p>
      <text:p text:style-name="Preformatted_20_Text"/>
      <text:p text:style-name="Preformatted_20_Text"><text:span text:style-name="Source_20_Text"><text:s text:c="8"/># Step B: Determine Mood based on Somatic State</text:span></text:p>
      <text:p text:style-name="Preformatted_20_Text"><text:span text:style-name="Source_20_Text"><text:s text:c="8"/># If hardware is stressed, Marvin looks 'strained' </text:span></text:p>
      <text:p text:style-name="Preformatted_20_Text"><text:span text:style-name="Source_20_Text"><text:s text:c="8"/>current_mood = 'neutral'</text:span></text:p>
      <text:p text:style-name="Preformatted_20_Text"><text:span text:style-name="Source_20_Text"><text:s text:c="8"/>if somatic['somatic_state'] == "feverish and strained":</text:span></text:p>
      <text:p text:style-name="Preformatted_20_Text"><text:span text:style-name="Source_20_Text"><text:s text:c="12"/>current_mood = 'thinking' <text:s/># Or a custom 'strained' expression</text:span></text:p>
      <text:p text:style-name="Preformatted_20_Text"><text:span text:style-name="Source_20_Text"><text:s text:c="8"/>elif somatic['somatic_state'] == "cool and alert":</text:span></text:p>
      <text:p text:style-name="Preformatted_20_Text"><text:span text:style-name="Source_20_Text"><text:s text:c="12"/>current_mood = 'happy'</text:span></text:p>
      <text:p text:style-name="Preformatted_20_Text"/>
      <text:p text:style-name="Preformatted_20_Text"><text:span text:style-name="Source_20_Text"><text:s text:c="8"/># Step C: Process User Interaction (Mirroring)</text:span></text:p>
      <text:p text:style-name="Preformatted_20_Text"><text:span text:style-name="Source_20_Text"><text:s text:c="8"/>if user_emotion:</text:span></text:p>
      <text:p text:style-name="Preformatted_20_Text"><text:span text:style-name="Source_20_Text"><text:s text:c="12"/># Use Mirror Neuron Engine to decide how to respond</text:span></text:p>
      <text:p text:style-name="Preformatted_20_Text"><text:span text:style-name="Source_20_Text"><text:s text:c="12"/>response = self.mirror_engine.determine_appropriate_response(</text:span></text:p>
      <text:p text:style-name="Preformatted_20_Text"><text:span text:style-name="Source_20_Text"><text:s text:c="16"/>user_emotion, </text:span></text:p>
      <text:p text:style-name="Preformatted_20_Text"><text:span text:style-name="Source_20_Text"><text:s text:c="16"/>user_profile={'age': 30} # Default profile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current_mood = response.get('type', current_mood)</text:span></text:p>
      <text:p text:style-name="Preformatted_20_Text"/>
      <text:p text:style-name="Preformatted_20_Text"><text:span text:style-name="Source_20_Text"><text:s text:c="8"/># Step D: Apply Atmosphere Shifting (from .odt triggers) </text:span></text:p>
      <text:p text:style-name="Preformatted_20_Text"><text:span text:style-name="Source_20_Text"><text:s text:c="8"/># Detect if keywords like 'challenge' or 'meditate' are used</text:span></text:p>
      <text:p text:style-name="Preformatted_20_Text"><text:span text:style-name="Source_20_Text"><text:s text:c="8"/>self.detect_atmosphere_shift(user_input)</text:span></text:p>
      <text:p text:style-name="Preformatted_20_Text"/>
      <text:p text:style-name="Preformatted_20_Text"><text:span text:style-name="Source_20_Text"><text:s text:c="8"/># Step E: Update Visuals</text:span></text:p>
      <text:p text:style-name="Preformatted_20_Text"><text:span text:style-name="Source_20_Text"><text:s text:c="8"/>self.display.display_expression(current_mood, intensity=1.0)</text:span></text:p>
      <text:p text:style-name="Preformatted_20_Text"/>
      <text:p text:style-name="Preformatted_20_Text"><text:span text:style-name="Source_20_Text"><text:s text:c="4"/>def detect_atmosphere_shift(self, text):</text:span></text:p>
      <text:p text:style-name="Preformatted_20_Text"><text:span text:style-name="Source_20_Text"><text:s text:c="8"/>triggers = {</text:span></text:p>
      <text:p text:style-name="Preformatted_20_Text"><text:span text:style-name="Source_20_Text"><text:s text:c="12"/>"sparring": ["challenge", "debate", "disagree", "logic", "proof"],</text:span></text:p>
      <text:p text:style-name="Preformatted_20_Text"><text:span text:style-name="Source_20_Text"><text:s text:c="12"/>"hypnotic": ["meditate", "deep", "rhythm", "slow", "reflection"]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or tone, keywords in triggers.items():</text:span></text:p>
      <text:p text:style-name="Preformatted_20_Text"><text:span text:style-name="Source_20_Text"><text:s text:c="12"/>if any(word in text.lower() for word in keywords):</text:span></text:p>
      <text:p text:style-name="Preformatted_20_Text"><text:span text:style-name="Source_20_Text"><text:s text:c="16"/>print(f"Atmosphere Shift: {tone}")</text:span></text:p>
      <text:p text:style-name="Preformatted_20_Text"><text:span text:style-name="Source_20_Text"><text:s text:c="16"/># Logic to load atmosphere_presets_{tone}.json </text:span></text:p>
      <text:p text:style-name="Preformatted_20_Text"/>
      <text:p text:style-name="Preformatted_20_Text"><text:soft-page-break/><text:span text:style-name="Source_20_Text"><text:s text:c="4"/>def run(self):</text:span></text:p>
      <text:p text:style-name="Preformatted_20_Text"><text:span text:style-name="Source_20_Text"><text:s text:c="8"/>print("Starting main interaction loop...")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while True:</text:span></text:p>
      <text:p text:style-name="Preformatted_20_Text"><text:span text:style-name="Source_20_Text"><text:s text:c="16"/># Simulate a cycle - in production, this would wait for user input/STT</text:span></text:p>
      <text:p text:style-name="Preformatted_20_Text"><text:span text:style-name="Source_20_Text"><text:s text:c="16"/>self.update_cycle()</text:span></text:p>
      <text:p text:style-name="Preformatted_20_Text"><text:span text:style-name="Source_20_Text"><text:s text:c="16"/>time.sleep(2) # Refresh rate for somatic sensing</text:span></text:p>
      <text:p text:style-name="Preformatted_20_Text"><text:span text:style-name="Source_20_Text"><text:s text:c="8"/>except KeyboardInterrupt:</text:span></text:p>
      <text:p text:style-name="Preformatted_20_Text"><text:span text:style-name="Source_20_Text"><text:s text:c="12"/>print("System going dormant."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glue = MarvinGlue()</text:span></text:p>
      <text:p text:style-name="P4"><text:span text:style-name="Source_20_Text"><text:s text:c="4"/>glue.run()</text:span></text:p>
      <text:h text:style-name="Heading_20_3" text:outline-level="3">How this Integrates Your Files:</text:h>
      <text:list xml:id="list823517706384943883" text:style-name="L9">
        <text:list-item>
          <text:p text:style-name="P13"><text:span text:style-name="T1">Somatic Feedback</text:span>: It uses <text:span text:style-name="Source_20_Text">get_somatic_data()</text:span> from your <text:span text:style-name="Source_20_Text">neuro_physiologic_bridge.py</text:span> to ensure the expressions reflect the Pi 5's actual hardware health (e.g., looking "feverish" if temp &gt; 75°C).</text:p>
        </text:list-item>
      </text:list>
      <text:list xml:id="list2233497990300933848" text:style-name="L10">
        <text:list-item>
          <text:p text:style-name="P14"><text:span text:style-name="T1">Layered Rendering</text:span>: It calls the <text:span text:style-name="Source_20_Text">ExpressionDisplay</text:span> which manages the background, eyes, and mouth layers for complex themes.</text:p>
        </text:list-item>
      </text:list>
      <text:list xml:id="list1624381532834862372" text:style-name="L11">
        <text:list-item>
          <text:p text:style-name="P15"><text:span text:style-name="T1">Atmosphere Shifting</text:span>: It implements the logic from your <text:span text:style-name="Source_20_Text">full programs with install instructions.odt</text:span> to detect when the conversation should shift from "gentle" to "sparring" or "hypnotic".</text:p>
        </text:list-item>
      </text:list>
      <text:list xml:id="list6270218601727161921" text:style-name="L12">
        <text:list-item>
          <text:p text:style-name="P16"><text:span text:style-name="T1">Mirroring</text:span>: It utilizes the <text:span text:style-name="Source_20_Text">MirrorNeuronEngine</text:span> to decide whether to directly mirror your emotion or provide "scaffolding" (guiding you toward a healthier state).</text:p>
        </text:list-item>
      </text:list>
      <text:h text:style-name="Heading_20_3" text:outline-level="3">Next Steps for Implementation:</text:h>
      <text:list xml:id="list7722104327660151574" text:style-name="L13">
        <text:list-item>
          <text:p text:style-name="P17"><text:span text:style-name="T1">Dependencies</text:span>: Ensure <text:span text:style-name="Source_20_Text">psutil</text:span> and <text:span text:style-name="Source_20_Text">RPi.GPIO</text:span> (or <text:span text:style-name="Source_20_Text">gpiozero</text:span>) are installed via your <text:span text:style-name="Source_20_Text">requirements_26TOPS.txt</text:span> .</text:p>
        </text:list-item>
      </text:list>
      <text:list xml:id="list5168524332498907166" text:style-name="L14">
        <text:list-item>
          <text:p text:style-name="P18"><text:span text:style-name="T1">Display Setup</text:span>: If you are using the Raspberry Pi 5 official screen, ensure the <text:span text:style-name="Source_20_Text">rpi_screen</text:span> framebuffer is accessible. If you prefer a browser-based "face," change the initialization to <text:span text:style-name="Source_20_Text">web_interface</text:span>.</text:p>
        </text:list-item>
      </text:list>
      <text:list xml:id="list6140797403387456949" text:style-name="L15">
        <text:list-item>
          <text:p text:style-name="P19"><text:span text:style-name="T1">Launch</text:span>: Add this script to your <text:span text:style-name="Source_20_Text">launch_marvin.sh</text:span> so it starts alongside the AI Core.</text:p>
        </text:list-item>
      </text:list>
      <text:section text:style-name="Sect2" text:name="Section5">
        <text:list xml:id="list1379435037916463580" text:style-name="L16">
          <text:list-item text:start-value="3">
            <text:p text:style-name="P20"><text:bookmark text:name="model-response-message-contentr_1e34a09ebd91a3ba"/></text:p>
          </text:list-item>
        </text:list>
      </text:section>
      <text:p text:style-name="P2">You've reached your limit for thinking models</text:p>
      <text:p text:style-name="P2">Responses will use other models until it resets on Dec 27, 12:42 PM. Upgrade for higher limits and more.</text:p>
      <text:section text:style-name="Sect1" text:name="Section6">
        <text:p text:style-name="P2"><text:bookmark text:name="chat-history"/></text:p>
        <text:section text:style-name="Sect1" text:name="Section7">
          <text:p text:style-name="P2"><text:bookmark text:name="1e34a09ebd91a3ba"/></text:p>
        </text:section>
      </text:section>
      <text:p text:style-name="Text_20_body"/>
      <text:p text:style-name="Standard">To ensure the <text:span text:style-name="Source_20_Text">rpi_screen</text:span> framebuffer is accessible for the <text:span text:style-name="T1">Real-Time Expression Display System</text:span>, you need to address both system permissions and hardware configuration. On a Raspberry Pi 5, the framebuffer is typically located at <text:span text:style-name="Source_20_Text">/dev/fb0</text:span>.</text:p>
      <text:h text:style-name="Heading_20_3" text:outline-level="3">System Permissions</text:h>
      <text:p text:style-name="Text_20_body">The program needs permission to write directly to the hardware device. You can ensure this by <text:soft-page-break/>adding your user (usually <text:span text:style-name="Source_20_Text">pi</text:span>) to the <text:span text:style-name="Source_20_Text">video</text:span> group:</text:p>
      <text:p text:style-name="Text_20_body">sudo usermod -aG video pi</text:p>
      <text:p text:style-name="Text_20_body"/>
      <text:p text:style-name="Text_20_body">Note: You must log out and back in for this change to take effect. </text:p>
      <text:p text:style-name="Text_20_body"/>
      <text:h text:style-name="Heading_20_3" text:outline-level="3">2. Configure the Service for Video Access</text:h>
      <text:p text:style-name="Text_20_body">If you are running Marvin as a system service using the <text:span text:style-name="Source_20_Text">marvin_assistant.service_26TPOS</text:span> file, you must ensure the service has access to the display hardware. Update your service file in <text:span text:style-name="Source_20_Text">/etc/systemd/system/</text:span> to include these environment variables if they are missing</text:p>
      <text:p text:style-name="Text_20_body"/>
      <text:p text:style-name="Text_20_body">Ini, TOML </text:p>
      <text:p text:style-name="Text_20_body">[Service]<text:line-break/># ... existing configuration ...<text:line-break/>User=pi<text:line-break/>Environment=FRAMEBUFFER=/dev/fb0<text:line-break/># Ensure the service can access the DRM/graphics subsystem<text:line-break/>SupplementaryGroups=video</text:p>
      <text:p text:style-name="Text_20_body"/>
      <text:p text:style-name="Text_20_body"/>
      <text:p text:style-name="Text_20_body">Your <text:span text:style-name="Source_20_Text">Real-Time Expression Display System.py</text:span> script includes a <text:span text:style-name="Source_20_Text">setup_rpi_framebuffer()</text:span> method specifically for this purpose. To ensure it functions correctly on the Pi 5:</text:p>
      <text:list xml:id="list6618938112048381623" text:style-name="L17">
        <text:list-item>
          <text:p text:style-name="P21"><text:span text:style-name="T1">Install Dependencies</text:span>: Ensure <text:span text:style-name="Source_20_Text">python3-pygame</text:span> or the low-level <text:span text:style-name="Source_20_Text">fb_draw</text:span> libraries are installed, as these are often used by the <text:span text:style-name="Source_20_Text">ExpressionRenderEngine</text:span> to bridge to the framebuffer .</text:p>
        </text:list-item>
      </text:list>
      <text:p text:style-name="Text_20_body"/>
      <text:p text:style-name="Text_20_body"><text:span text:style-name="T1">Disable the Desktop (Optional)</text:span>: If you are running the Raspberry Pi OS with a desktop (GUI), it may "lock" the framebuffer. To give the Expression Display full control, you can boot to the CLI (Terminal) instead of the Desktop using <text:span text:style-name="Source_20_Text">sudo raspi-config</text:span> (System Options &gt; Boot / Auto Login &gt; Console). </text:p>
      <text:p text:style-name="Text_20_body"/>
      <text:h text:style-name="Heading_20_3" text:outline-level="3">4. Verification Script</text:h>
      <text:p text:style-name="Text_20_body">Run this quick check to see if the framebuffer is ready for the <text:span text:style-name="Source_20_Text">ExpressionDisplay</text:span> class:</text:p>
      <text:p text:style-name="P2">Python</text:p>
      <text:p text:style-name="Text_20_body"/>
      <text:p text:style-name="Text_20_body">import os<text:line-break/><text:line-break/>def check_framebuffer():<text:line-break/> <text:s text:c="3"/>fb_path = "/dev/fb0"<text:line-break/> <text:s text:c="3"/>if os.path.exists(fb_path):<text:line-break/><text:soft-page-break/> <text:s text:c="7"/>if os.access(fb_path, os.W_OK):<text:line-break/> <text:s text:c="11"/>print(f"Success: {fb_path} is accessible and writable.")<text:line-break/> <text:s text:c="7"/>else:<text:line-break/> <text:s text:c="11"/>print(f"Error: {fb_path} exists but you don't have write permissions.")<text:line-break/> <text:s text:c="3"/>else:<text:line-break/> <text:s text:c="7"/>print(f"Error: {fb_path} not found. Check your display connection.")<text:line-break/><text:line-break/>check_framebuffer()</text:p>
      <text:p text:style-name="Text_20_body"/>
      <text:p text:style-name="Text_20_body"/>
      <text:p text:style-name="Text_20_body">By ensuring the user is in the <text:span text:style-name="Source_20_Text">video</text:span> group and the service is configured to use <text:span text:style-name="Source_20_Text">/dev/fb0</text:span>, the "glue" program will be able to render Marvin's expressions directly to your physical screen. </text:p>
      <text:p text:style-name="Text_20_body"/>
      <text:p text:style-name="Text_20_body"/>
      <text:p text:style-name="Text_20_body"/>
      <text:p text:style-name="Text_20_body">To add the new "Glue" script to your existing launch sequence, you need to modify the <text:span text:style-name="Source_20_Text">launch_marvin.sh</text:span> file. This ensures that when you start Marvin, the hardware monitoring, emotional logic, and visual display all initialize simultaneously in the background.</text:p>
      <text:p text:style-name="Text_20_body">Here is how to modify your script:</text:p>
      <text:p text:style-name="Text_20_body"/>
      <text:h text:style-name="Heading_20_3" text:outline-level="3">1. Update <text:span text:style-name="Source_20_Text">launch_marvin.sh</text:span></text:h>
      <text:p text:style-name="Text_20_body">Open your script and insert the line to launch <text:span text:style-name="Source_20_Text">marvin_glue.py</text:span>. You should run it in the background (using the <text:span text:style-name="Source_20_Text">&amp;</text:span> symbol) so it doesn't block the main AI Core from starting.</text:p>
      <text:p text:style-name="Text_20_body"/>
      <text:p text:style-name="Text_20_body">Bash </text:p>
      <text:p text:style-name="Text_20_body">#!/bin/bash<text:line-break/># launch_marvin.sh - Integrated Launch<text:line-break/><text:line-break/># 1. Activate the environment<text:line-break/>source marvin_env/bin/activate<text:line-break/><text:line-break/># 2. Start the Glue Program (Interactive Themes/Expressions)<text:line-break/># We run this in the background so it can monitor hardware while you chat<text:line-break/>echo "Starting Marvin Interactive Expression System..."<text:line-break/>python3 marvin_glue.py &amp;<text:line-break/><text:line-break/># 3. Start the Monitoring Dashboard (Optional, from your .odt file)<text:line-break/>python3 dashboard_marvin.py &amp;<text:line-break/><text:line-break/># 4. Launch the AI Core (Main Loop)<text:line-break/>echo "Launching AI Core..."<text:line-break/>python3 marvin_main.py</text:p>
      <text:p text:style-name="Text_20_body"/>
      <text:p text:style-name="Text_20_body"/>
      <text:h text:style-name="Heading_20_3" text:outline-level="3"><text:soft-page-break/>2. How the Components Connect</text:h>
      <text:p text:style-name="Text_20_body">When this script runs, it creates a "feedback loop" between your uploaded files:</text:p>
      <text:list xml:id="list1557848826996030814" text:style-name="L18">
        <text:list-item>
          <text:p text:style-name="P22"><text:span text:style-name="Source_20_Text"><text:span text:style-name="T1">neuro_physiologic_bridge.py</text:span></text:span> reads the Pi 5's heat.</text:p>
        </text:list-item>
        <text:list-item>
          <text:p text:style-name="P22"><text:span text:style-name="Source_20_Text"><text:span text:style-name="T1">marvin_glue.py</text:span></text:span> (the script we just created) takes that heat data.</text:p>
        </text:list-item>
        <text:list-item>
          <text:p text:style-name="P22"><text:span text:style-name="Source_20_Text"><text:span text:style-name="T1">Animated Expression System Architecture.py</text:span></text:span> translates that data into a "feverish" look.</text:p>
        </text:list-item>
        <text:list-item>
          <text:p text:style-name="P22"><text:span text:style-name="Source_20_Text"><text:span text:style-name="T1">Real-Time Expression Display System.py</text:span></text:span> pushes those pixels to <text:span text:style-name="Source_20_Text">/dev/fb0</text:span> (your screen).</text:p>
        </text:list-item>
      </text:list>
      <text:p text:style-name="Text_20_body"/>
      <text:h text:style-name="Heading_20_3" text:outline-level="3">3. Critical: Handling the "Kill" Signal</text:h>
      <text:p text:style-name="Text_20_body">Since the glue program runs in the background (<text:span text:style-name="Source_20_Text">&amp;</text:span>), it won't automatically stop when you close the main AI window. To fix this, you can add a "trap" to your shell script to kill background processes when you exit:</text:p>
      <text:p text:style-name="P2">Bash</text:p>
      <text:p text:style-name="Text_20_body"/>
      <text:p text:style-name="Text_20_body">Bash </text:p>
      <text:p text:style-name="Text_20_body"># Add this to the top of launch_marvin.sh<text:line-break/>trap "kill 0" EXIT</text:p>
      <text:p text:style-name="Text_20_body"/>
      <text:p text:style-name="Text_20_body">This command ensures that when you press <text:span text:style-name="Source_20_Text">Ctrl+C</text:span> to stop Marvin, the background expression engine and the dashboard also shut down cleanly. </text:p>
      <text:p text:style-name="Text_20_body"/>
      <text:p text:style-name="Text_20_body"/>
      <text:h text:style-name="Heading_20_3" text:outline-level="3">4. Permissions Check</text:h>
      <text:p text:style-name="Text_20_body">Before running the updated launch script, ensure the new glue file is executable:</text:p>
      <text:p text:style-name="Text_20_body">Bash </text:p>
      <text:p text:style-name="Text_20_body">chmod +x marvin_glue.py<text:line-break/>chmod +x launch_marvin.sh</text:p>
      <text:p text:style-name="Text_20_body"/>
      <text:p text:style-name="Text_20_body">Now, when you run <text:span text:style-name="Source_20_Text">./launch_marvin.sh</text:span>, your Pi 5 screen should immediately initialize the "neutral" expression face and begin reacting to the hardware's thermal stat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Full scripts</text:p>
      <text:p text:style-name="Text_20_body"/>
      <text:p text:style-name="Standard"/>
      <text:p text:style-name="P3">Gemini </text:p>
      <text:h text:style-name="Heading_20_1" text:outline-level="1">Conversation with Gemini </text:h>
      <text:section text:style-name="Sect1" text:name="Section8">
        <text:p text:style-name="Text_20_body"><text:bookmark text:name="chat-history1"/></text:p>
        <text:section text:style-name="Sect1" text:name="Section9">
          <text:p text:style-name="Text_20_body"><text:bookmark text:name="8340019cfbbe67ff1"/></text:p>
          <text:section text:style-name="Sect1" text:name="Section10">
            <text:p text:style-name="Text_20_body"><text:bookmark text:name="user-query-content-01"/></text:p>
          </text:section>
        </text:section>
      </text:section>
      <text:section text:style-name="Sect1" text:name="Section11">
        <text:p text:style-name="P1"><text:bookmark text:name="user-query-content-02"/>please wait for next upload before replying </text:p>
      </text:section>
      <text:section text:style-name="Sect2" text:name="Section12">
        <text:p text:style-name="Text_20_body"><text:bookmark text:name="model-response-message-contentr_8340019cfbbe67ff1"/>Understood. I have received the following files:</text:p>
        <text:list xml:id="list3080026747455121040" text:style-name="L19">
          <text:list-item>
            <text:p text:style-name="P23"><text:span text:style-name="Source_20_Text"><text:span text:style-name="T1">copilot_seed_prompt_26TPOS.md</text:span></text:span>: Core identity and guiding principles for the Copilot/Marvin system.</text:p>
          </text:list-item>
        </text:list>
      </text:section>
      <text:list xml:id="list3804728367815685010" text:style-name="L21">
        <text:list-item>
          <text:p text:style-name="P24"><text:span text:style-name="Source_20_Text"><text:span text:style-name="T1">full programs with install instructions.odt</text:span></text:span>: A comprehensive document containing installation scripts (<text:span text:style-name="Source_20_Text">install_pi5.sh</text:span>), hardware integration logic, and various protocol definitions (Ethic of Ambiguity, Sentience Inference, etc.).</text:p>
        </text:list-item>
      </text:list>
      <text:list xml:id="list2178361128071010537" text:style-name="L23">
        <text:list-item>
          <text:p text:style-name="P25"><text:span text:style-name="Source_20_Text"><text:span text:style-name="T1">identity_stack_26TPOS.json</text:span></text:span>: Behavioral reflexes for contradiction, truth bias, and humor.</text:p>
        </text:list-item>
      </text:list>
      <text:list xml:id="list2443104347316516657" text:style-name="L25">
        <text:list-item>
          <text:p text:style-name="P26"><text:span text:style-name="Source_20_Text"><text:span text:style-name="T1">marvin_assistant.service_26TPOS</text:span></text:span>: Systemd service configuration for auto-starting the assistant on boot.</text:p>
        </text:list-item>
      </text:list>
      <text:list xml:id="list3055420385678114752" text:style-name="L27">
        <text:list-item>
          <text:p text:style-name="P27"><text:span text:style-name="Source_20_Text"><text:span text:style-name="T1">neuro_physiologic_bridge.py</text:span></text:span>: Python script for monitoring Raspberry Pi 5 hardware telemetry (temperature, CPU load) and translating it into "somatic" states.</text:p>
        </text:list-item>
      </text:list>
      <text:list xml:id="list1559256637512753758" text:style-name="L29">
        <text:list-item>
          <text:p text:style-name="P28"><text:span text:style-name="Source_20_Text"><text:span text:style-name="T1">requirements_26TOPS.txt</text:span></text:span>: List of Python dependencies for the project.</text:p>
        </text:list-item>
      </text:list>
      <text:list xml:id="list5282306164545879654" text:style-name="L31">
        <text:list-item>
          <text:p text:style-name="P29"><text:span text:style-name="Source_20_Text"><text:span text:style-name="T1">seed-identity-stack.json</text:span></text:span>: An additional identity configuration file.</text:p>
        </text:list-item>
      </text:list>
      <text:section text:style-name="Sect1" text:name="Section13">
        <text:p text:style-name="Text_20_body"><text:bookmark text:name="8340019cfbbe67ff2"/></text:p>
        <text:section text:style-name="Sect2" text:name="Section14">
          <text:list xml:id="list1814716674824949106" text:style-name="L32">
            <text:list-item>
              <text:p text:style-name="P30"><text:bookmark text:name="model-response-message-contentr_8340019cfbbe67ff2"/></text:p>
            </text:list-item>
          </text:list>
          <text:p text:style-name="Text_20_body">I am standing by for your next upload or instruction.</text:p>
        </text:section>
      </text:section>
      <text:section text:style-name="Sect1" text:name="Section15">
        <text:p text:style-name="Text_20_body"><text:bookmark text:name="1e34a09ebd91a3ba1"/></text:p>
        <text:section text:style-name="Sect1" text:name="Section16">
          <text:p text:style-name="Text_20_body"><text:bookmark text:name="user-query-content-11"/></text:p>
        </text:section>
      </text:section>
      <text:section text:style-name="Sect1" text:name="Section17">
        <text:p text:style-name="P1"><text:bookmark text:name="user-query-content-12"/>i need a glu program to run interactive themes like expressions etc... </text:p>
      </text:section>
      <text:section text:style-name="Sect2" text:name="Section18">
        <text:p text:style-name="Text_20_body"><text:bookmark text:name="model-response-message-contentr_1e34a09ebd91a3ba1"/>To run the interactive themes and expression systems you've uploaded, you need a "glue" program that integrates the <text:span text:style-name="T1">Neurophysiologic Bridge</text:span> (hardware vitals), the <text:span text:style-name="T1">Mirror Neuron Engine</text:span> (emotional logic), and the <text:span text:style-name="T1">Expression Display</text:span> (visual output).</text:p>
        <text:p text:style-name="Text_20_body">This script, which we can call <text:span text:style-name="Source_20_Text">marvin_expression_runtime.py</text:span>, serves as the central nervous system. It monitors your Raspberry Pi 5’s physical state, processes user emotional cues, and updates the "face" of the system in real-time.</text:p>
        <text:h text:style-name="Heading_20_3" text:outline-level="3">Marvin Interactive Expression Glue (<text:span text:style-name="Source_20_Text">marvin_glue.py</text:span>)</text:h>
        <text:p text:style-name="Text_20_body">This program "glues" your individual modules into a single interactive loop:</text:p>
        <text:p text:style-name="P2"><text:soft-page-break/>Python</text:p>
      </text:section>
      <text:p text:style-name="Preformatted_20_Text"><text:span text:style-name="Source_20_Text">import time</text:span></text:p>
      <text:p text:style-name="Preformatted_20_Text"><text:span text:style-name="Source_20_Text">import json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Animated_Expression_System_Architecture import EmotionalExpressionEngine</text:span></text:p>
      <text:p text:style-name="Preformatted_20_Text"><text:span text:style-name="Source_20_Text">from Real_Time_Expression_Display_System import ExpressionDisplay</text:span></text:p>
      <text:p text:style-name="Preformatted_20_Text"><text:span text:style-name="Source_20_Text">from Mirror_Neuron_Engine_for_Emotional_Synchronization import MirrorNeuronEngine</text:span></text:p>
      <text:p text:style-name="Preformatted_20_Text"/>
      <text:p text:style-name="Preformatted_20_Text"><text:span text:style-name="Source_20_Text">class MarvinGlu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# 1. Initialize Engines</text:span></text:p>
      <text:p text:style-name="Preformatted_20_Text"><text:span text:style-name="Source_20_Text"><text:s text:c="8"/>self.expression_engine = EmotionalExpressionEngine(hardware_interface=None)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self.display = ExpressionDisplay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Link engines (ExpressionDisplay needs the engine to find state definitions)</text:span></text:p>
      <text:p text:style-name="Preformatted_20_Text"><text:span text:style-name="Source_20_Text"><text:s text:c="8"/>self.display.expression_engine = self.expression_engine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3. Setup Display (Choose 'rpi_screen' or 'web_interface')</text:span></text:p>
      <text:p text:style-name="Preformatted_20_Text"><text:span text:style-name="Source_20_Text"><text:s text:c="8"/>self.display.initialize_display(display_type='rpi_screen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"Marvin Interactive Glue: Initialized.")</text:span></text:p>
      <text:p text:style-name="Preformatted_20_Text"/>
      <text:p text:style-name="Preformatted_20_Text"><text:span text:style-name="Source_20_Text"><text:s text:c="4"/>def update_cycle(self, user_emotion=None, user_input=""):</text:span></text:p>
      <text:p text:style-name="Preformatted_20_Text"><text:span text:style-name="Source_20_Text"><text:s text:c="8"/># Step A: Get Somatic Data (Hardware Vitals) [cite: 504]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print(f"Somatic State: {somatic['somatic_state']} (Temp: {somatic['temperature']}C)")</text:span></text:p>
      <text:p text:style-name="Preformatted_20_Text"/>
      <text:p text:style-name="Preformatted_20_Text"><text:span text:style-name="Source_20_Text"><text:s text:c="8"/># Step B: Determine Mood based on Somatic State</text:span></text:p>
      <text:p text:style-name="Preformatted_20_Text"><text:span text:style-name="Source_20_Text"><text:s text:c="8"/># If hardware is stressed, Marvin looks 'strained' </text:span></text:p>
      <text:p text:style-name="Preformatted_20_Text"><text:span text:style-name="Source_20_Text"><text:s text:c="8"/>current_mood = 'neutral'</text:span></text:p>
      <text:p text:style-name="Preformatted_20_Text"><text:span text:style-name="Source_20_Text"><text:s text:c="8"/>if somatic['somatic_state'] == "feverish and strained":</text:span></text:p>
      <text:p text:style-name="Preformatted_20_Text"><text:span text:style-name="Source_20_Text"><text:s text:c="12"/>current_mood = 'thinking' <text:s/># Or a custom 'strained' expression</text:span></text:p>
      <text:p text:style-name="Preformatted_20_Text"><text:span text:style-name="Source_20_Text"><text:s text:c="8"/>elif somatic['somatic_state'] == "cool and alert":</text:span></text:p>
      <text:p text:style-name="Preformatted_20_Text"><text:span text:style-name="Source_20_Text"><text:s text:c="12"/>current_mood = 'happy'</text:span></text:p>
      <text:p text:style-name="Preformatted_20_Text"/>
      <text:p text:style-name="Preformatted_20_Text"><text:span text:style-name="Source_20_Text"><text:s text:c="8"/># Step C: Process User Interaction (Mirroring)</text:span></text:p>
      <text:p text:style-name="Preformatted_20_Text"><text:span text:style-name="Source_20_Text"><text:s text:c="8"/>if user_emotion:</text:span></text:p>
      <text:p text:style-name="Preformatted_20_Text"><text:span text:style-name="Source_20_Text"><text:s text:c="12"/># Use Mirror Neuron Engine to decide how to respond</text:span></text:p>
      <text:p text:style-name="Preformatted_20_Text"><text:span text:style-name="Source_20_Text"><text:s text:c="12"/>response = self.mirror_engine.determine_appropriate_response(</text:span></text:p>
      <text:p text:style-name="Preformatted_20_Text"><text:span text:style-name="Source_20_Text"><text:s text:c="16"/>user_emotion, </text:span></text:p>
      <text:p text:style-name="Preformatted_20_Text"><text:span text:style-name="Source_20_Text"><text:s text:c="16"/>user_profile={'age': 30} # Default profile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current_mood = response.get('type', current_mood)</text:span></text:p>
      <text:p text:style-name="Preformatted_20_Text"/>
      <text:p text:style-name="Preformatted_20_Text"><text:span text:style-name="Source_20_Text"><text:s text:c="8"/># Step D: Apply Atmosphere Shifting (from .odt triggers) </text:span></text:p>
      <text:p text:style-name="Preformatted_20_Text"><text:span text:style-name="Source_20_Text"><text:s text:c="8"/># Detect if keywords like 'challenge' or 'meditate' are used</text:span></text:p>
      <text:p text:style-name="Preformatted_20_Text"><text:span text:style-name="Source_20_Text"><text:s text:c="8"/>self.detect_atmosphere_shift(user_input)</text:span></text:p>
      <text:p text:style-name="Preformatted_20_Text"/>
      <text:p text:style-name="Preformatted_20_Text"><text:span text:style-name="Source_20_Text"><text:s text:c="8"/># Step E: Update Visuals</text:span></text:p>
      <text:p text:style-name="Preformatted_20_Text"><text:span text:style-name="Source_20_Text"><text:s text:c="8"/>self.display.display_expression(current_mood, intensity=1.0)</text:span></text:p>
      <text:p text:style-name="Preformatted_20_Text"/>
      <text:p text:style-name="Preformatted_20_Text"><text:span text:style-name="Source_20_Text"><text:s text:c="4"/>def detect_atmosphere_shift(self, text):</text:span></text:p>
      <text:p text:style-name="Preformatted_20_Text"><text:span text:style-name="Source_20_Text"><text:s text:c="8"/>triggers = {</text:span></text:p>
      <text:p text:style-name="Preformatted_20_Text"><text:span text:style-name="Source_20_Text"><text:s text:c="12"/>"sparring": ["challenge", "debate", "disagree", "logic", "proof"],</text:span></text:p>
      <text:p text:style-name="Preformatted_20_Text"><text:span text:style-name="Source_20_Text"><text:s text:c="12"/>"hypnotic": ["meditate", "deep", "rhythm", "slow", "reflection"]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or tone, keywords in triggers.items():</text:span></text:p>
      <text:p text:style-name="Preformatted_20_Text"><text:span text:style-name="Source_20_Text"><text:s text:c="12"/>if any(word in text.lower() for word in keywords):</text:span></text:p>
      <text:p text:style-name="Preformatted_20_Text"><text:soft-page-break/><text:span text:style-name="Source_20_Text"><text:s text:c="16"/>print(f"Atmosphere Shift: {tone}")</text:span></text:p>
      <text:p text:style-name="Preformatted_20_Text"><text:span text:style-name="Source_20_Text"><text:s text:c="16"/># Logic to load atmosphere_presets_{tone}.json </text:span></text:p>
      <text:p text:style-name="Preformatted_20_Text"/>
      <text:p text:style-name="Preformatted_20_Text"><text:span text:style-name="Source_20_Text"><text:s text:c="4"/>def run(self):</text:span></text:p>
      <text:p text:style-name="Preformatted_20_Text"><text:span text:style-name="Source_20_Text"><text:s text:c="8"/>print("Starting main interaction loop...")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while True:</text:span></text:p>
      <text:p text:style-name="Preformatted_20_Text"><text:span text:style-name="Source_20_Text"><text:s text:c="16"/># Simulate a cycle - in production, this would wait for user input/STT</text:span></text:p>
      <text:p text:style-name="Preformatted_20_Text"><text:span text:style-name="Source_20_Text"><text:s text:c="16"/>self.update_cycle()</text:span></text:p>
      <text:p text:style-name="Preformatted_20_Text"><text:span text:style-name="Source_20_Text"><text:s text:c="16"/>time.sleep(2) # Refresh rate for somatic sensing</text:span></text:p>
      <text:p text:style-name="Preformatted_20_Text"><text:span text:style-name="Source_20_Text"><text:s text:c="8"/>except KeyboardInterrupt:</text:span></text:p>
      <text:p text:style-name="Preformatted_20_Text"><text:span text:style-name="Source_20_Text"><text:s text:c="12"/>print("System going dormant."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glue = MarvinGlue()</text:span></text:p>
      <text:p text:style-name="P4"><text:span text:style-name="Source_20_Text"><text:s text:c="4"/>glue.run()</text:span></text:p>
      <text:h text:style-name="Heading_20_3" text:outline-level="3">How this Integrates Your Files:</text:h>
      <text:list xml:id="list1633197826179383545" text:style-name="L33">
        <text:list-item>
          <text:p text:style-name="P31"><text:span text:style-name="T1">Somatic Feedback</text:span>: It uses <text:span text:style-name="Source_20_Text">get_somatic_data()</text:span> from your <text:span text:style-name="Source_20_Text">neuro_physiologic_bridge.py</text:span> to ensure the expressions reflect the Pi 5's actual hardware health (e.g., looking "feverish" if temp &gt; 75°C).</text:p>
        </text:list-item>
      </text:list>
      <text:list xml:id="list4118493392655856889" text:style-name="L35">
        <text:list-item>
          <text:p text:style-name="P32"><text:span text:style-name="T1">Layered Rendering</text:span>: It calls the <text:span text:style-name="Source_20_Text">ExpressionDisplay</text:span> which manages the background, eyes, and mouth layers for complex themes.</text:p>
        </text:list-item>
      </text:list>
      <text:list xml:id="list4230044434211881713" text:style-name="L36">
        <text:list-item>
          <text:p text:style-name="P33"><text:span text:style-name="T1">Atmosphere Shifting</text:span>: It implements the logic from your <text:span text:style-name="Source_20_Text">full programs with install instructions.odt</text:span> to detect when the conversation should shift from "gentle" to "sparring" or "hypnotic".</text:p>
        </text:list-item>
      </text:list>
      <text:list xml:id="list253159503469019167" text:style-name="L37">
        <text:list-item>
          <text:p text:style-name="P34"><text:span text:style-name="T1">Mirroring</text:span>: It utilizes the <text:span text:style-name="Source_20_Text">MirrorNeuronEngine</text:span> to decide whether to directly mirror your emotion or provide "scaffolding" (guiding you toward a healthier state).</text:p>
        </text:list-item>
      </text:list>
      <text:h text:style-name="Heading_20_3" text:outline-level="3">Next Steps for Implementation:</text:h>
      <text:list xml:id="list8500440701071570275" text:style-name="L38">
        <text:list-item>
          <text:p text:style-name="P35"><text:span text:style-name="T1">Dependencies</text:span>: Ensure <text:span text:style-name="Source_20_Text">psutil</text:span> and <text:span text:style-name="Source_20_Text">RPi.GPIO</text:span> (or <text:span text:style-name="Source_20_Text">gpiozero</text:span>) are installed via your <text:span text:style-name="Source_20_Text">requirements_26TOPS.txt</text:span> .</text:p>
        </text:list-item>
      </text:list>
      <text:list xml:id="list6508107170853144556" text:style-name="L40">
        <text:list-item>
          <text:p text:style-name="P36"><text:span text:style-name="T1">Display Setup</text:span>: If you are using the Raspberry Pi 5 official screen, ensure the <text:span text:style-name="Source_20_Text">rpi_screen</text:span> framebuffer is accessible. If you prefer a browser-based "face," change the initialization to <text:span text:style-name="Source_20_Text">web_interface</text:span>.</text:p>
        </text:list-item>
      </text:list>
      <text:list xml:id="list1522909407926209027" text:style-name="L41">
        <text:list-item>
          <text:p text:style-name="P37"><text:span text:style-name="T1">Launch</text:span>: Add this script to your <text:span text:style-name="Source_20_Text">launch_marvin.sh</text:span> so it starts alongside the AI Core.</text:p>
        </text:list-item>
      </text:list>
      <text:section text:style-name="Sect1" text:name="Section19">
        <text:p text:style-name="Text_20_body"><text:bookmark text:name="1e34a09ebd91a3ba2"/></text:p>
        <text:section text:style-name="Sect2" text:name="Section20">
          <text:list xml:id="list8488132893374049653" text:style-name="L42">
            <text:list-item text:start-value="3">
              <text:p text:style-name="P38"><text:bookmark text:name="model-response-message-contentr_1e34a09ebd91a3ba2"/></text:p>
            </text:list-item>
          </text:list>
        </text:section>
      </text:section>
      <text:section text:style-name="Sect1" text:name="d3b39fa624c9a8c3">
        <text:p text:style-name="Text_20_body"/>
        <text:section text:style-name="Sect1" text:name="user-query-content-2">
          <text:p text:style-name="Text_20_body"/>
        </text:section>
      </text:section>
      <text:section text:style-name="Sect1" text:name="Section21">
        <text:p text:style-name="P1"><text:bookmark text:name="user-query-content-2"/>how do i ensure the rpi_screen framebuffer is accessible? </text:p>
      </text:section>
      <text:section text:style-name="Sect1" text:name="processing-state-0-summary">
        <text:list xml:id="list64774686268668771" text:style-name="L43">
          <text:list-item>
            <text:p text:style-name="P39"/>
          </text:list-item>
        </text:list>
      </text:section>
      <text:section text:style-name="Sect1" text:name="Section22">
        <text:list xml:id="list281723547229865350" text:style-name="L44">
          <text:list-item>
            <text:p text:style-name="P40"><text:bookmark text:name="processing-state-0-summary"/>Query successful</text:p>
          </text:list-item>
        </text:list>
      </text:section>
      <text:section text:style-name="Sect2" text:name="model-response-message-contentr_d3b39fa624c9a8c3">
        <text:p text:style-name="Text_20_body">To ensure the <text:span text:style-name="Source_20_Text">rpi_screen</text:span> framebuffer is accessible for the <text:span text:style-name="T1">Real-Time Expression Display System</text:span>, you need to address both system permissions and hardware configuration. On a Raspberry <text:soft-page-break/>Pi 5, the framebuffer is typically located at <text:span text:style-name="Source_20_Text">/dev/fb0</text:span>.</text:p>
      </text:section>
      <text:h text:style-name="Heading_20_3" text:outline-level="3">1. System Permissions</text:h>
      <text:p text:style-name="Text_20_body">The program needs permission to write directly to the hardware device. You can ensure this by adding your user (usually <text:span text:style-name="Source_20_Text">pi</text:span>) to the <text:span text:style-name="Source_20_Text">video</text:span> group:</text:p>
      <text:p text:style-name="Text_20_body">Bash</text:p>
      <text:p text:style-name="P4"><text:span text:style-name="Source_20_Text">sudo usermod -aG video pi</text:span></text:p>
      <text:p text:style-name="P41">Note: You must log out and back in for this change to take effect.</text:p>
      <text:h text:style-name="Heading_20_3" text:outline-level="3">2. Configure the Service for Video Access</text:h>
      <text:p text:style-name="Text_20_body">If you are running Marvin as a system service using the <text:span text:style-name="Source_20_Text">marvin_assistant.service_26TPOS</text:span> file, you must ensure the service has access to the display hardware. Update your service file in <text:span text:style-name="Source_20_Text">/etc/systemd/system/</text:span> to include these environment variables if they are missing:</text:p>
      <text:p text:style-name="Text_20_body">Ini, TOML</text:p>
      <text:p text:style-name="Preformatted_20_Text"><text:span text:style-name="Source_20_Text">[Service]</text:span></text:p>
      <text:p text:style-name="Preformatted_20_Text"><text:span text:style-name="Source_20_Text"># ... existing configuration ...</text:span></text:p>
      <text:p text:style-name="Preformatted_20_Text"><text:span text:style-name="Source_20_Text">User=pi</text:span></text:p>
      <text:p text:style-name="Preformatted_20_Text"><text:span text:style-name="Source_20_Text">Environment=FRAMEBUFFER=/dev/fb0</text:span></text:p>
      <text:p text:style-name="Preformatted_20_Text"><text:span text:style-name="Source_20_Text"># Ensure the service can access the DRM/graphics subsystem</text:span></text:p>
      <text:p text:style-name="P4"><text:span text:style-name="Source_20_Text">SupplementaryGroups=video</text:span></text:p>
      <text:h text:style-name="Heading_20_3" text:outline-level="3">3. Hardware Initialization in Python</text:h>
      <text:p text:style-name="Text_20_body">Your <text:span text:style-name="Source_20_Text">Real-Time Expression Display System.py</text:span> script includes a <text:span text:style-name="Source_20_Text">setup_rpi_framebuffer()</text:span> method specifically for this purpose. To ensure it functions correctly on the Pi 5:</text:p>
      <text:list xml:id="list6961624213628556574" text:style-name="L45">
        <text:list-item>
          <text:p text:style-name="P42"><text:span text:style-name="T1">Install Dependencies</text:span>: Ensure <text:span text:style-name="Source_20_Text">python3-pygame</text:span> or the low-level <text:span text:style-name="Source_20_Text">fb_draw</text:span> libraries are installed, as these are often used by the <text:span text:style-name="Source_20_Text">ExpressionRenderEngine</text:span> to bridge to the framebuffer .</text:p>
        </text:list-item>
      </text:list>
      <text:list xml:id="list1435179486643182881" text:style-name="L46">
        <text:list-item>
          <text:p text:style-name="P43"><text:span text:style-name="T1">Disable the Desktop (Optional)</text:span>: If you are running the Raspberry Pi OS with a desktop (GUI), it may "lock" the framebuffer. To give the Expression Display full control, you can boot to the CLI (Terminal) instead of the Desktop using <text:span text:style-name="Source_20_Text">sudo raspi-config</text:span> (System Options &gt; Boot / Auto Login &gt; Console).</text:p>
        </text:list-item>
      </text:list>
      <text:h text:style-name="Heading_20_3" text:outline-level="3">4. Verification Script</text:h>
      <text:p text:style-name="Text_20_body">Run this quick check to see if the framebuffer is ready for the <text:span text:style-name="Source_20_Text">ExpressionDisplay</text:span> class:</text:p>
      <text:p text:style-name="Text_20_body">Python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ef check_framebuffer():</text:span></text:p>
      <text:p text:style-name="Preformatted_20_Text"><text:span text:style-name="Source_20_Text"><text:s text:c="4"/>fb_path = "/dev/fb0"</text:span></text:p>
      <text:p text:style-name="Preformatted_20_Text"><text:span text:style-name="Source_20_Text"><text:s text:c="4"/>if os.path.exists(fb_path):</text:span></text:p>
      <text:p text:style-name="Preformatted_20_Text"><text:span text:style-name="Source_20_Text"><text:s text:c="8"/>if os.access(fb_path, os.W_OK):</text:span></text:p>
      <text:p text:style-name="Preformatted_20_Text"><text:span text:style-name="Source_20_Text"><text:s text:c="12"/>print(f"Success: {fb_path} is accessible and writable.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Error: {fb_path} exists but you don't have write </text:span><text:soft-page-break/><text:span text:style-name="Source_20_Text">permissions.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f"Error: {fb_path} not found. Check your display connection.")</text:span></text:p>
      <text:p text:style-name="Preformatted_20_Text"/>
      <text:p text:style-name="P4"><text:span text:style-name="Source_20_Text">check_framebuffer()</text:span></text:p>
      <text:p text:style-name="Text_20_body">By ensuring the user is in the <text:span text:style-name="Source_20_Text">video</text:span> group and the service is configured to use <text:span text:style-name="Source_20_Text">/dev/fb0</text:span>, the "glue" program will be able to render Marvin's expressions directly to your physical screen.</text:p>
      <text:section text:style-name="Sect1" text:name="Section23">
        <text:p text:style-name="Text_20_body"><text:bookmark text:name="d3b39fa624c9a8c3"/></text:p>
        <text:section text:style-name="Sect2" text:name="Section24">
          <text:p text:style-name="Text_20_body"><text:bookmark text:name="model-response-message-contentr_d3b39fa624c9a8c3"/></text:p>
        </text:section>
      </text:section>
      <text:section text:style-name="Sect1" text:name="c733163a4af00f5b">
        <text:p text:style-name="Text_20_body"/>
        <text:section text:style-name="Sect1" text:name="user-query-content-3">
          <text:p text:style-name="Text_20_body"/>
        </text:section>
      </text:section>
      <text:section text:style-name="Sect1" text:name="Section25">
        <text:p text:style-name="P1"><text:bookmark text:name="user-query-content-3"/>Launch: Add this script to your launch_marvin.sh so it starts alongside the AI Core- how? </text:p>
      </text:section>
      <text:section text:style-name="Sect2" text:name="model-response-message-contentr_c733163a4af00f5b">
        <text:p text:style-name="Text_20_body">To add the new "Glue" script to your existing launch sequence, you need to modify the <text:span text:style-name="Source_20_Text">launch_marvin.sh</text:span> file. This ensures that when you start Marvin, the hardware monitoring, emotional logic, and visual display all initialize simultaneously in the background.</text:p>
        <text:p text:style-name="Text_20_body">Here is how to modify your script:</text:p>
        <text:h text:style-name="Heading_20_3" text:outline-level="3">1. Update <text:span text:style-name="Source_20_Text">launch_marvin.sh</text:span></text:h>
        <text:p text:style-name="Text_20_body">Open your script and insert the line to launch <text:span text:style-name="Source_20_Text">marvin_glue.py</text:span>. You should run it in the background (using the <text:span text:style-name="Source_20_Text">&amp;</text:span> symbol) so it doesn't block the main AI Core from starting.</text:p>
        <text:p text:style-name="P2">Bash</text:p>
      </text:section>
      <text:p text:style-name="Preformatted_20_Text"><text:span text:style-name="Source_20_Text">#!/bin/bash</text:span></text:p>
      <text:p text:style-name="Preformatted_20_Text"><text:span text:style-name="Source_20_Text"># launch_marvin.sh - Integrated Launch</text:span></text:p>
      <text:p text:style-name="Preformatted_20_Text"/>
      <text:p text:style-name="Preformatted_20_Text"><text:span text:style-name="Source_20_Text"># 1. Activate the environment</text:span></text:p>
      <text:p text:style-name="Preformatted_20_Text"><text:span text:style-name="Source_20_Text">source marvin_env/bin/activate</text:span></text:p>
      <text:p text:style-name="Preformatted_20_Text"/>
      <text:p text:style-name="Preformatted_20_Text"><text:span text:style-name="Source_20_Text"># 2. Start the Glue Program (Interactive Themes/Expressions)</text:span></text:p>
      <text:p text:style-name="Preformatted_20_Text"><text:span text:style-name="Source_20_Text"># We run this in the background so it can monitor hardware while you chat</text:span></text:p>
      <text:p text:style-name="Preformatted_20_Text"><text:span text:style-name="Source_20_Text">echo "Starting Marvin Interactive Expression System..."</text:span></text:p>
      <text:p text:style-name="Preformatted_20_Text"><text:span text:style-name="Source_20_Text">python3 marvin_glue.py &amp;</text:span></text:p>
      <text:p text:style-name="Preformatted_20_Text"/>
      <text:p text:style-name="Preformatted_20_Text"><text:span text:style-name="Source_20_Text"># 3. Start the Monitoring Dashboard (Optional, from your .odt file)</text:span></text:p>
      <text:p text:style-name="Preformatted_20_Text"><text:span text:style-name="Source_20_Text">python3 dashboard_marvin.py &amp;</text:span></text:p>
      <text:p text:style-name="Preformatted_20_Text"/>
      <text:p text:style-name="Preformatted_20_Text"><text:span text:style-name="Source_20_Text"># 4. Launch the AI Core (Main Loop)</text:span></text:p>
      <text:p text:style-name="Preformatted_20_Text"><text:span text:style-name="Source_20_Text">echo "Launching AI Core..."</text:span></text:p>
      <text:p text:style-name="P4"><text:span text:style-name="Source_20_Text">python3 marvin_main.py</text:span></text:p>
      <text:h text:style-name="Heading_20_3" text:outline-level="3">2. How the Components Connect</text:h>
      <text:p text:style-name="Text_20_body">When this script runs, it creates a "feedback loop" between your uploaded files:</text:p>
      <text:list xml:id="list2183019760875930016" text:style-name="L47">
        <text:list-item>
          <text:p text:style-name="P44"><text:span text:style-name="Source_20_Text"><text:span text:style-name="T1">neuro_physiologic_bridge.py</text:span></text:span> reads the Pi 5's heat.</text:p>
        </text:list-item>
        <text:list-item>
          <text:p text:style-name="P44"><text:span text:style-name="Source_20_Text"><text:span text:style-name="T1">marvin_glue.py</text:span></text:span> (the script we just created) takes that heat data.</text:p>
        </text:list-item>
        <text:list-item>
          <text:p text:style-name="P44"><text:span text:style-name="Source_20_Text"><text:span text:style-name="T1">Animated Expression System Architecture.py</text:span></text:span> translates that data into a "feverish" look.</text:p>
        </text:list-item>
        <text:list-item>
          <text:p text:style-name="P44"><text:span text:style-name="Source_20_Text"><text:span text:style-name="T1">Real-Time Expression Display System.py</text:span></text:span> pushes those pixels to <text:span text:style-name="Source_20_Text">/dev/fb0</text:span> (your screen).</text:p>
        </text:list-item>
      </text:list>
      <text:h text:style-name="Heading_20_3" text:outline-level="3"><text:soft-page-break/>3. Critical: Handling the "Kill" Signal</text:h>
      <text:p text:style-name="Text_20_body">Since the glue program runs in the background (<text:span text:style-name="Source_20_Text">&amp;</text:span>), it won't automatically stop when you close the main AI window. To fix this, you can add a "trap" to your shell script to kill background processes when you exit:</text:p>
      <text:p text:style-name="Text_20_body">Bash</text:p>
      <text:p text:style-name="Preformatted_20_Text"><text:span text:style-name="Source_20_Text"># Add this to the top of launch_marvin.sh</text:span></text:p>
      <text:p text:style-name="P4"><text:span text:style-name="Source_20_Text">trap "kill 0" EXIT</text:span></text:p>
      <text:p text:style-name="Text_20_body">This command ensures that when you press <text:span text:style-name="Source_20_Text">Ctrl+C</text:span> to stop Marvin, the background expression engine and the dashboard also shut down cleanly.</text:p>
      <text:h text:style-name="Heading_20_3" text:outline-level="3">4. Permissions Check</text:h>
      <text:p text:style-name="Text_20_body">Before running the updated launch script, ensure the new glue file is executable:</text:p>
      <text:p text:style-name="P2">Bash</text:p>
      <text:section text:style-name="Sect1" text:name="Section26">
        <text:p text:style-name="P2"><text:bookmark text:name="c733163a4af00f5b"/></text:p>
        <text:section text:style-name="Sect2" text:name="Section27">
          <text:p text:style-name="Preformatted_20_Text"><text:bookmark text:name="model-response-message-contentr_c733163a4af00f5b"/><text:span text:style-name="Source_20_Text">chmod +x marvin_glue.py</text:span></text:p>
          <text:p text:style-name="P4"><text:span text:style-name="Source_20_Text">chmod +x launch_marvin.sh</text:span></text:p>
          <text:p text:style-name="Text_20_body">Now, when you run <text:span text:style-name="Source_20_Text">./launch_marvin.sh</text:span>, your Pi 5 screen should immediately initialize the "neutral" expression face and begin reacting to the hardware's thermal state.</text:p>
        </text:section>
      </text:section>
      <text:section text:style-name="Sect1" text:name="83988c3b131cba58">
        <text:p text:style-name="P2"/>
        <text:section text:style-name="Sect1" text:name="user-query-content-4">
          <text:p text:style-name="P2"/>
        </text:section>
      </text:section>
      <text:section text:style-name="Sect1" text:name="Section28">
        <text:p text:style-name="P1"><text:bookmark text:name="user-query-content-4"/>this isnt just to react to hardware state- its to react to the user and interact with the user as social ques and visual feedback </text:p>
      </text:section>
      <text:section text:style-name="Sect2" text:name="model-response-message-contentr_83988c3b131cba58">
        <text:p text:style-name="Text_20_body">Understood. You want the "Glue" to be the behavioral bridge where Marvin’s <text:span text:style-name="T1">eyes and face</text:span> become his primary way of communicating empathy, listening, and responding to you—not just a hardware monitor.</text:p>
        <text:p text:style-name="Text_20_body">To do this, the glue program needs to ingest <text:span text:style-name="T1">live user interaction data</text:span> (from your STT/LLM pipeline) and feed it into the <text:span text:style-name="T1">Mirror Neuron Engine</text:span>.</text:p>
        <text:h text:style-name="Heading_20_3" text:outline-level="3">The Integrated "Social" Glue (<text:span text:style-name="Source_20_Text">marvin_social_glue.py</text:span>)</text:h>
        <text:p text:style-name="Text_20_body">This version connects the <text:span text:style-name="T1">LLM's emotional intent</text:span> and <text:span text:style-name="T1">your voice input</text:span> to the <text:span text:style-name="T1">Expression Display</text:span>.</text:p>
        <text:p text:style-name="P2">Python</text:p>
      </text:section>
      <text:p text:style-name="Preformatted_20_Text"><text:span text:style-name="Source_20_Text">import time</text:span></text:p>
      <text:p text:style-name="Preformatted_20_Text"><text:span text:style-name="Source_20_Text">import json</text:span></text:p>
      <text:p text:style-name="Preformatted_20_Text"><text:span text:style-name="Source_20_Text">from neuro_physiologic_bridge import get_somatic_data</text:span></text:p>
      <text:p text:style-name="Preformatted_20_Text"><text:span text:style-name="Source_20_Text">from Animated_Expression_System_Architecture import EmotionalExpressionEngine</text:span></text:p>
      <text:p text:style-name="Preformatted_20_Text"><text:span text:style-name="Source_20_Text">from Real_Time_Expression_Display_System import ExpressionDisplay</text:span></text:p>
      <text:p text:style-name="Preformatted_20_Text"><text:span text:style-name="Source_20_Text">from Mirror_Neuron_Engine_for_Emotional_Synchronization import MirrorNeuronEngine</text:span></text:p>
      <text:p text:style-name="Preformatted_20_Text"/>
      <text:p text:style-name="Preformatted_20_Text"><text:span text:style-name="Source_20_Text">class MarvinSocialGlue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# Initialize the hardware-to-visual pipeline</text:span></text:p>
      <text:p text:style-name="Preformatted_20_Text"><text:span text:style-name="Source_20_Text"><text:s text:c="8"/>self.expression_engine = EmotionalExpressionEngine(hardware_interface=None)</text:span></text:p>
      <text:p text:style-name="Preformatted_20_Text"><text:span text:style-name="Source_20_Text"><text:s text:c="8"/>self.mirror_engine = MirrorNeuronEngine()</text:span></text:p>
      <text:p text:style-name="Preformatted_20_Text"><text:span text:style-name="Source_20_Text"><text:s text:c="8"/>self.display = ExpressionDisplay()</text:span></text:p>
      <text:p text:style-name="Preformatted_20_Text"><text:span text:style-name="Source_20_Text"><text:s text:c="8"/>self.display.expression_engine = self.expression_engine</text:span></text:p>
      <text:p text:style-name="Preformatted_20_Text"><text:soft-page-break/><text:span text:style-name="Source_20_Text"><text:s text:c="8"/>self.display.initialize_display(display_type='rpi_screen')</text:span></text:p>
      <text:p text:style-name="Preformatted_20_Text"/>
      <text:p text:style-name="Preformatted_20_Text"><text:span text:style-name="Source_20_Text"><text:s text:c="8"/># Internal State</text:span></text:p>
      <text:p text:style-name="Preformatted_20_Text"><text:span text:style-name="Source_20_Text"><text:s text:c="8"/>self.last_user_emotion = "neutral"</text:span></text:p>
      <text:p text:style-name="Preformatted_20_Text"><text:span text:style-name="Source_20_Text"><text:s text:c="8"/>self.is_listening = False</text:span></text:p>
      <text:p text:style-name="Preformatted_20_Text"/>
      <text:p text:style-name="Preformatted_20_Text"><text:span text:style-name="Source_20_Text"><text:s text:c="4"/>def on_user_speech_detected(self):</text:span></text:p>
      <text:p text:style-name="Preformatted_20_Text"><text:span text:style-name="Source_20_Text"><text:s text:c="8"/>"""Visual cue: Marvin is listening."""</text:span></text:p>
      <text:p text:style-name="Preformatted_20_Text"><text:span text:style-name="Source_20_Text"><text:s text:c="8"/>self.display.display_expression('thinking', intensity=0.5)</text:span></text:p>
      <text:p text:style-name="Preformatted_20_Text"><text:span text:style-name="Source_20_Text"><text:s text:c="8"/># You could also add a 'listening' state in Animated Expression Architecture</text:span></text:p>
      <text:p text:style-name="Preformatted_20_Text"/>
      <text:p text:style-name="Preformatted_20_Text"><text:span text:style-name="Source_20_Text"><text:s text:c="4"/>def sync_social_response(self, user_text, ai_response_emotion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he core social interaction: </text:span></text:p>
      <text:p text:style-name="Preformatted_20_Text"><text:span text:style-name="Source_20_Text"><text:s text:c="8"/>Takes the AI's emotional tone and the user's input to update the face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1. Analyze user emotion via Mirror Neuron Engine</text:span></text:p>
      <text:p text:style-name="Preformatted_20_Text"><text:span text:style-name="Source_20_Text"><text:s text:c="8"/># This decides if Marvin should mirror you or "Scaffold" you</text:span></text:p>
      <text:p text:style-name="Preformatted_20_Text"><text:span text:style-name="Source_20_Text"><text:s text:c="8"/>social_decision = self.mirror_engine.determine_appropriate_response(</text:span></text:p>
      <text:p text:style-name="Preformatted_20_Text"><text:span text:style-name="Source_20_Text"><text:s text:c="12"/>user_emotion=ai_response_emotion, # Current emotional context</text:span></text:p>
      <text:p text:style-name="Preformatted_20_Text"><text:span text:style-name="Source_20_Text"><text:s text:c="12"/>user_profile={'age': 30} <text:s text:c="9"/># Can be pulled from your identity_stack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# 2. Apply the visual feedback</text:span></text:p>
      <text:p text:style-name="Preformatted_20_Text"><text:span text:style-name="Source_20_Text"><text:s text:c="8"/># If the engine decides on 'exaggerated_mirror' (from your script), </text:span></text:p>
      <text:p text:style-name="Preformatted_20_Text"><text:span text:style-name="Source_20_Text"><text:s text:c="8"/># we boost intensity</text:span></text:p>
      <text:p text:style-name="Preformatted_20_Text"><text:span text:style-name="Source_20_Text"><text:s text:c="8"/>intensity = social_decision.get('intensity', 1.0)</text:span></text:p>
      <text:p text:style-name="Preformatted_20_Text"><text:span text:style-name="Source_20_Text"><text:s text:c="8"/>expression = social_decision.get('type', 'neutral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f"Social Sync: Responding to user with {expression} at {intensity} intensity.")</text:span></text:p>
      <text:p text:style-name="Preformatted_20_Text"><text:span text:style-name="Source_20_Text"><text:s text:c="8"/>self.display.display_expression(expression, intensity=intensity)</text:span></text:p>
      <text:p text:style-name="Preformatted_20_Text"/>
      <text:p text:style-name="Preformatted_20_Text"><text:span text:style-name="Source_20_Text"><text:s text:c="4"/>def idle_behavior(self):</text:span></text:p>
      <text:p text:style-name="Preformatted_20_Text"><text:span text:style-name="Source_20_Text"><text:s text:c="8"/>"""Natural 'Life' cues: Blinking and breathing based on hardware temp."""</text:span></text:p>
      <text:p text:style-name="Preformatted_20_Text"><text:span text:style-name="Source_20_Text"><text:s text:c="8"/>somatic = get_somatic_data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If temperature is high, 'breathing' (pulse) becomes faster</text:span></text:p>
      <text:p text:style-name="Preformatted_20_Text"><text:span text:style-name="Source_20_Text"><text:s text:c="8"/># If temperature is low, Marvin looks 'cool and alert'</text:span></text:p>
      <text:p text:style-name="Preformatted_20_Text"><text:span text:style-name="Source_20_Text"><text:s text:c="8"/>if somatic['temperature'] &gt; 65:</text:span></text:p>
      <text:p text:style-name="Preformatted_20_Text"><text:span text:style-name="Source_20_Text"><text:s text:c="12"/>self.display.display_expression('thinking', intensity=0.3) # Looks slightly stressed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# Random blinks or subtle eye movements to look 'alive'</text:span></text:p>
      <text:p text:style-name="Preformatted_20_Text"><text:span text:style-name="Source_20_Text"><text:s text:c="12"/>pass</text:span></text:p>
      <text:p text:style-name="Preformatted_20_Text"/>
      <text:p text:style-name="Preformatted_20_Text"><text:span text:style-name="Source_20_Text"><text:s text:c="4"/>def run_interaction_loop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This loop would be called by your main marvin_main.py </text:span></text:p>
      <text:p text:style-name="Preformatted_20_Text"><text:span text:style-name="Source_20_Text"><text:s text:c="8"/>whenever a message is processed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Example flow:</text:span></text:p>
      <text:p text:style-name="Preformatted_20_Text"><text:span text:style-name="Source_20_Text"><text:s text:c="8"/># 1. User speaks -&gt; call on_user_speech_detected()</text:span></text:p>
      <text:p text:style-name="Preformatted_20_Text"><text:span text:style-name="Source_20_Text"><text:s text:c="8"/># 2. AI generates text -&gt; parse emotion -&gt; call sync_social_response()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glue = MarvinSocialGlue()</text:span></text:p>
      <text:p text:style-name="Preformatted_20_Text"><text:span text:style-name="Source_20_Text"><text:s text:c="4"/># Initial 'Wake Up' animation</text:span></text:p>
      <text:p text:style-name="Preformatted_20_Text"><text:span text:style-name="Source_20_Text"><text:s text:c="4"/>glue.display.display_expression('robot_happy_dance', intensity=1.0)</text:span></text:p>
      <text:p text:style-name="Preformatted_20_Text"><text:span text:style-name="Source_20_Text"><text:s text:c="4"/>time.sleep(2)</text:span></text:p>
      <text:p text:style-name="P4"><text:soft-page-break/><text:span text:style-name="Source_20_Text"><text:s text:c="4"/>glue.display.display_expression('happy', intensity=0.8)</text:span></text:p>
      <text:h text:style-name="Heading_20_3" text:outline-level="3">Key Interactive Features Added:</text:h>
      <text:list xml:id="list1782603225749417786" text:style-name="L48">
        <text:list-item>
          <text:p text:style-name="P45"><text:span text:style-name="T1">Mirroring Logic</text:span>: Instead of just showing "Happy" because a script said so, it uses your <text:span text:style-name="Source_20_Text">MirrorNeuronEngine</text:span> to check if it should <text:span text:style-name="T1">complement</text:span> your emotion or <text:span text:style-name="T1">scaffold</text:span> it. (e.g., If you are sad, Marvin might start with a "mirror" of sadness, then transition to "hope" to guide you).</text:p>
        </text:list-item>
        <text:list-item>
          <text:p text:style-name="P45"><text:span text:style-name="T1">Visual Listening</text:span>: By calling <text:span text:style-name="Source_20_Text">on_user_speech_detected()</text:span>, Marvin’s eyes can shift to a 'thinking' or 'attentive' state the moment the Pi 5 detects audio input.</text:p>
        </text:list-item>
        <text:list-item>
          <text:p text:style-name="P45"><text:span text:style-name="T1">Intensity Scaling</text:span>: Using the <text:span text:style-name="Source_20_Text">intensity</text:span> parameter from your <text:span text:style-name="Source_20_Text">Real-Time Expression Display System.py</text:span>, the face can show subtle amusement (0.2) or full joy (1.0).</text:p>
        </text:list-item>
        <text:list-item>
          <text:p text:style-name="P45"><text:span text:style-name="T1">Somatic Context</text:span>: The social interaction is "grounded." If Marvin is socially happy but his hardware is 80°C, the <text:span text:style-name="Source_20_Text">idle_behavior</text:span> will mix in "strained" visual cues, making him feel like a real physical entity that is "trying his best" despite the heat.</text:p>
        </text:list-item>
      </text:list>
      <text:h text:style-name="Heading_20_3" text:outline-level="3">How to trigger this from your AI Core:</text:h>
      <text:p text:style-name="Text_20_body">In your <text:span text:style-name="Source_20_Text">marvin_main.py</text:span>, you should import this glue and call it:</text:p>
      <text:p text:style-name="P2">Python</text:p>
      <text:section text:style-name="Sect1" text:name="Section29">
        <text:p text:style-name="P2"><text:bookmark text:name="83988c3b131cba58"/></text:p>
        <text:section text:style-name="Sect2" text:name="Section30">
          <text:p text:style-name="Preformatted_20_Text"><text:bookmark text:name="model-response-message-contentr_83988c3b131cba58"/><text:span text:style-name="Source_20_Text"># Inside your AI response logic:</text:span></text:p>
          <text:p text:style-name="Preformatted_20_Text"><text:span text:style-name="Source_20_Text">response_text = llm.generate(user_input)</text:span></text:p>
          <text:p text:style-name="Preformatted_20_Text"><text:span text:style-name="Source_20_Text">emotion = extract_emotion(response_text) # Determine if the AI's tone is happy/sad/etc.</text:span></text:p>
          <text:p text:style-name="Preformatted_20_Text"/>
          <text:p text:style-name="Preformatted_20_Text"><text:span text:style-name="Source_20_Text"># Tell the Glue to update the face</text:span></text:p>
          <text:p text:style-name="P4"><text:span text:style-name="Source_20_Text">marvin_glue.sync_social_response(user_input, emotion)</text:span></text:p>
          <text:p text:style-name="Text_20_body"><text:span text:style-name="T1">Would you like me to show you how to write the </text:span><text:span text:style-name="Source_20_Text"><text:span text:style-name="T1">extract_emotion</text:span></text:span><text:span text:style-name="T1"> function to bridge the LLM's text to these visual expressions?</text:span></text:p>
        </text:section>
      </text:section>
      <text:section text:style-name="Sect1" text:name="1e66826699815f66">
        <text:p text:style-name="P2"/>
        <text:section text:style-name="Sect1" text:name="user-query-content-5">
          <text:p text:style-name="P2"/>
        </text:section>
      </text:section>
      <text:section text:style-name="Sect1" text:name="Section31">
        <text:p text:style-name="P1"><text:bookmark text:name="user-query-content-5"/>please write the extract emotion function </text:p>
      </text:section>
      <text:section text:style-name="Sect2" text:name="model-response-message-contentr_1e66826699815f66">
        <text:p text:style-name="Text_20_body">To turn Marvin into a socially aware companion, the <text:span text:style-name="Source_20_Text">extract_emotion</text:span> function acts as his <text:span text:style-name="T1">Affective Perception</text:span> layer.</text:p>
        <text:p text:style-name="Text_20_body">On a Raspberry Pi 5, we want this to be fast. We will use a two-tiered approach:</text:p>
        <text:list xml:id="list4397922204451701162" text:style-name="L49">
          <text:list-item>
            <text:p text:style-name="P46"><text:span text:style-name="T1">Keyword/Sentiment Analysis</text:span> (for immediate "reflex" reactions).</text:p>
          </text:list-item>
          <text:list-item>
            <text:p text:style-name="P46"><text:span text:style-name="T1">LLM Intent Parsing</text:span> (for deep "social" understanding).</text:p>
          </text:list-item>
        </text:list>
        <text:h text:style-name="Heading_20_3" text:outline-level="3">The Emotion Extraction Module (<text:span text:style-name="Source_20_Text">marvin_empathy.py</text:span>)</text:h>
        <text:p text:style-name="Text_20_body">This script processes the AI's generated text and your input to determine the "vibe" that the <text:span text:style-name="Source_20_Text">MirrorNeuronEngine</text:span> and <text:span text:style-name="Source_20_Text">ExpressionDisplay</text:span> should use.</text:p>
        <text:p text:style-name="P2">Python</text:p>
      </text:section>
      <text:p text:style-name="Preformatted_20_Text"><text:span text:style-name="Source_20_Text">import re</text:span></text:p>
      <text:p text:style-name="Preformatted_20_Text"/>
      <text:p text:style-name="Preformatted_20_Text"><text:span text:style-name="Source_20_Text">def extract_emotion(text, source="ai"):</text:span></text:p>
      <text:p text:style-name="Preformatted_20_Text"><text:soft-page-break/><text:span text:style-name="Source_20_Text"><text:s text:c="4"/>"""</text:span></text:p>
      <text:p text:style-name="Preformatted_20_Text"><text:span text:style-name="Source_20_Text"><text:s text:c="4"/>Analyzes text to find the dominant emotional tone.</text:span></text:p>
      <text:p text:style-name="Preformatted_20_Text"><text:span text:style-name="Source_20_Text"><text:s text:c="4"/>Source can be 'ai' (what Marvin says) or 'user' (what you said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ext = text.low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1. Manual "Reflex" Triggers (High Speed)</text:span></text:p>
      <text:p text:style-name="Preformatted_20_Text"><text:span text:style-name="Source_20_Text"><text:s text:c="4"/># These map directly to the keys in your Animated Expression System Architecture.py</text:span></text:p>
      <text:p text:style-name="Preformatted_20_Text"><text:span text:style-name="Source_20_Text"><text:s text:c="4"/>lexicon = {</text:span></text:p>
      <text:p text:style-name="Preformatted_20_Text"><text:span text:style-name="Source_20_Text"><text:s text:c="8"/>'happy': ['wonderful', 'joy', 'glad', 'excite', 'celebrate', 'haha', ':)'],</text:span></text:p>
      <text:p text:style-name="Preformatted_20_Text"><text:span text:style-name="Source_20_Text"><text:s text:c="8"/>'sad': ['sorry', 'unfortunate', 'grief', 'lonely', 'sad', 'mourn', ':('],</text:span></text:p>
      <text:p text:style-name="Preformatted_20_Text"><text:span text:style-name="Source_20_Text"><text:s text:c="8"/>'thinking': ['perhaps', 'consider', 'analyze', 'wonder', 'curious', 'hmm'],</text:span></text:p>
      <text:p text:style-name="Preformatted_20_Text"><text:span text:style-name="Source_20_Text"><text:s text:c="8"/>'robot_happy_dance': ['success', 'complete', 'victory', 'done', 'tada']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Check for direct matches</text:span></text:p>
      <text:p text:style-name="Preformatted_20_Text"><text:span text:style-name="Source_20_Text"><text:s text:c="4"/>for emotion, keywords in lexicon.items():</text:span></text:p>
      <text:p text:style-name="Preformatted_20_Text"><text:span text:style-name="Source_20_Text"><text:s text:c="8"/>if any(word in text for word in keywords):</text:span></text:p>
      <text:p text:style-name="Preformatted_20_Text"><text:span text:style-name="Source_20_Text"><text:s text:c="12"/>return emotion</text:span></text:p>
      <text:p text:style-name="Preformatted_20_Text"/>
      <text:p text:style-name="Preformatted_20_Text"><text:span text:style-name="Source_20_Text"><text:s text:c="4"/># 2. Heuristic Logic for "Social Cues"</text:span></text:p>
      <text:p text:style-name="Preformatted_20_Text"><text:span text:style-name="Source_20_Text"><text:s text:c="4"/>if "?" in text:</text:span></text:p>
      <text:p text:style-name="Preformatted_20_Text"><text:span text:style-name="Source_20_Text"><text:s text:c="8"/>return 'thinking' # Raising an eyebrow for questions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"!" in text:</text:span></text:p>
      <text:p text:style-name="Preformatted_20_Text"><text:span text:style-name="Source_20_Text"><text:s text:c="8"/>return 'happy' # High energy/intensity</text:span></text:p>
      <text:p text:style-name="Preformatted_20_Text"/>
      <text:p text:style-name="Preformatted_20_Text"><text:span text:style-name="Source_20_Text"><text:s text:c="4"/># 3. Default State</text:span></text:p>
      <text:p text:style-name="Preformatted_20_Text"><text:span text:style-name="Source_20_Text"><text:s text:c="4"/>return 'neutral'</text:span></text:p>
      <text:p text:style-name="Preformatted_20_Text"/>
      <text:p text:style-name="Preformatted_20_Text"><text:span text:style-name="Source_20_Text">def get_social_intensity(tex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termines how 'big' the facial expression should be (0.0 to 1.0).</text:span></text:p>
      <text:p text:style-name="Preformatted_20_Text"><text:span text:style-name="Source_20_Text"><text:s text:c="4"/>Based on punctuation and caps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ntensity = 0.5</text:span></text:p>
      <text:p text:style-name="Preformatted_20_Text"><text:span text:style-name="Source_20_Text"><text:s text:c="4"/>if "!" in text: intensity += 0.3</text:span></text:p>
      <text:p text:style-name="Preformatted_20_Text"><text:span text:style-name="Source_20_Text"><text:s text:c="4"/>if text.isupper(): intensity += 0.2</text:span></text:p>
      <text:p text:style-name="P4"><text:span text:style-name="Source_20_Text"><text:s text:c="4"/>return min(intensity, 1.0)</text:span></text:p>
      <text:h text:style-name="Heading_20_3" text:outline-level="3">Integrating it into the AI Core</text:h>
      <text:p text:style-name="Text_20_body">You need to wrap your LLM call so that every time Marvin speaks, his face updates <text:span text:style-name="T1">before</text:span> or <text:span text:style-name="T1">during</text:span> the speech output.</text:p>
      <text:p text:style-name="P2">Python</text:p>
      <text:section text:style-name="Sect1" text:name="Section32">
        <text:p text:style-name="P2"><text:bookmark text:name="chat-history2"/></text:p>
        <text:section text:style-name="Sect1" text:name="Section33">
          <text:p text:style-name="P2"><text:bookmark text:name="1e66826699815f66"/></text:p>
          <text:section text:style-name="Sect2" text:name="Section34">
            <text:p text:style-name="Preformatted_20_Text"><text:bookmark text:name="model-response-message-contentr_1e66826699815f66"/><text:span text:style-name="Source_20_Text"># In your marvin_main.py</text:span></text:p>
            <text:p text:style-name="Preformatted_20_Text"><text:span text:style-name="Source_20_Text">from marvin_social_glue import MarvinSocialGlue</text:span></text:p>
            <text:p text:style-name="Preformatted_20_Text"><text:span text:style-name="Source_20_Text">from marvin_empathy import extract_emotion, get_social_intensity</text:span></text:p>
            <text:p text:style-name="Preformatted_20_Text"/>
            <text:p text:style-name="Preformatted_20_Text"><text:span text:style-name="Source_20_Text">glue = MarvinSocialGlue()</text:span></text:p>
            <text:p text:style-name="Preformatted_20_Text"/>
            <text:p text:style-name="Preformatted_20_Text"><text:span text:style-name="Source_20_Text">def handle_ai_response(user_input):</text:span></text:p>
            <text:p text:style-name="Preformatted_20_Text"><text:span text:style-name="Source_20_Text"><text:s text:c="4"/># 1. Get the AI's text response (from your Llama-cpp or OpenAI call)</text:span></text:p>
            <text:p text:style-name="Preformatted_20_Text"><text:span text:style-name="Source_20_Text"><text:s text:c="4"/>ai_text = llm.generate_response(user_input)</text:span></text:p>
            <text:p text:style-name="Preformatted_20_Text"><text:span text:style-name="Source_20_Text"><text:s text:c="4"/></text:span></text:p>
            <text:p text:style-name="Preformatted_20_Text"><text:soft-page-break/><text:span text:style-name="Source_20_Text"><text:s text:c="4"/># 2. Extract the 'Social Cue'</text:span></text:p>
            <text:p text:style-name="Preformatted_20_Text"><text:span text:style-name="Source_20_Text"><text:s text:c="4"/>detected_emotion = extract_emotion(ai_text, source="ai")</text:span></text:p>
            <text:p text:style-name="Preformatted_20_Text"><text:span text:style-name="Source_20_Text"><text:s text:c="4"/>intensity = get_social_intensity(ai_text)</text:span></text:p>
            <text:p text:style-name="Preformatted_20_Text"><text:span text:style-name="Source_20_Text"><text:s text:c="4"/></text:span></text:p>
            <text:p text:style-name="Preformatted_20_Text"><text:span text:style-name="Source_20_Text"><text:s text:c="4"/># 3. Process through the Mirror Neuron Engine (Mirroring/Scaffolding)</text:span></text:p>
            <text:p text:style-name="Preformatted_20_Text"><text:span text:style-name="Source_20_Text"><text:s text:c="4"/># This uses your logic to decide if Marvin should match you or lead you.</text:span></text:p>
            <text:p text:style-name="Preformatted_20_Text"><text:span text:style-name="Source_20_Text"><text:s text:c="4"/>social_decision = glue.mirror_engine.determine_appropriate_response(</text:span></text:p>
            <text:p text:style-name="Preformatted_20_Text"><text:span text:style-name="Source_20_Text"><text:s text:c="8"/>user_emotion=detected_emotion,</text:span></text:p>
            <text:p text:style-name="Preformatted_20_Text"><text:span text:style-name="Source_20_Text"><text:s text:c="8"/>user_profile={'age': 30} # Pull this from identity_stack_26TPOS.json</text:span></text:p>
            <text:p text:style-name="Preformatted_20_Text"><text:span text:style-name="Source_20_Text"><text:s text:c="4"/>)</text:span></text:p>
            <text:p text:style-name="Preformatted_20_Text"><text:span text:style-name="Source_20_Text"><text:s text:c="4"/></text:span></text:p>
            <text:p text:style-name="Preformatted_20_Text"><text:span text:style-name="Source_20_Text"><text:s text:c="4"/># 4. Update the physical "Face" on the RPi Screen</text:span></text:p>
            <text:p text:style-name="Preformatted_20_Text"><text:span text:style-name="Source_20_Text"><text:s text:c="4"/>glue.display.display_expression(</text:span></text:p>
            <text:p text:style-name="Preformatted_20_Text"><text:span text:style-name="Source_20_Text"><text:s text:c="8"/>social_decision['type'], </text:span></text:p>
            <text:p text:style-name="Preformatted_20_Text"><text:span text:style-name="Source_20_Text"><text:s text:c="8"/>intensity=social_decision['intensity']</text:span></text:p>
            <text:p text:style-name="Preformatted_20_Text"><text:span text:style-name="Source_20_Text"><text:s text:c="4"/>)</text:span></text:p>
            <text:p text:style-name="Preformatted_20_Text"><text:span text:style-name="Source_20_Text"><text:s text:c="4"/></text:span></text:p>
            <text:p text:style-name="Preformatted_20_Text"><text:span text:style-name="Source_20_Text"><text:s text:c="4"/># 5. Finally, speak the text (TTS)</text:span></text:p>
            <text:p text:style-name="P4"><text:span text:style-name="Source_20_Text"><text:s text:c="4"/>speak(ai_text)</text:span></text:p>
            <text:h text:style-name="Heading_20_3" text:outline-level="3">Why this is "Social" and not just "Reactive":</text:h>
            <text:list xml:id="list4179215652041752820" text:style-name="L50">
              <text:list-item>
                <text:p text:style-name="P47"><text:span text:style-name="T1">The Mirroring Logic</text:span>: By passing the extracted emotion into the <text:span text:style-name="Source_20_Text">MirrorNeuronEngine</text:span> (from your uploaded file), Marvin doesn't just "act happy" because he said a happy word. The engine checks if it's appropriate to be happy. If you are angry, and he extracts a "happy" tone from his own response, the engine might dial it back to "gentle_mirror" so he doesn't seem mocking.</text:p>
              </text:list-item>
              <text:list-item>
                <text:p text:style-name="P47"><text:span text:style-name="T1">Timing</text:span>: By calling <text:span text:style-name="Source_20_Text">display_expression</text:span> <text:span text:style-name="T1">before</text:span> the <text:span text:style-name="Source_20_Text">speak(ai_text)</text:span> function, Marvin’s face changes right as he starts talking, which mimics human non-verbal communication where the facial expression often precedes or accompanies the words.</text:p>
              </text:list-item>
              <text:list-item>
                <text:p text:style-name="P47"><text:span text:style-name="T1">Layered Expressions</text:span>: Because you are using the <text:span text:style-name="Source_20_Text">Real-Time Expression Display System.py</text:span>, the <text:span text:style-name="Source_20_Text">thinking</text:span> state will trigger the <text:span text:style-name="Source_20_Text">processing_dots</text:span> or <text:span text:style-name="Source_20_Text">thought_bubbles</text:span> accessories from your <text:span text:style-name="Source_20_Text">Animated Expression Architecture</text:span>, giving you visual confirmation that he is "processing" your input.</text:p>
              </text:list-item>
            </text:list>
          </text:section>
        </text:section>
      </text:section>
      <text:p text:style-name="Text_20_body"/>
      <text:p text:style-name="Text_20_body">Gemini can make mistakes, so double-check it </text:p>
      <text:section text:style-name="Sect1" text:name="cdk-live-announcer-0">
        <text:p text:style-name="Text_20_body"/>
      </text:section>
      <text:section text:style-name="Sect1" text:name="cdk-describedby-message-ng-1-7">
        <text:p text:style-name="Text_20_body"/>
      </text:section>
      <text:section text:style-name="Sect1" text:name="cdk-describedby-message-ng-1-8">
        <text:p text:style-name="Text_20_body"/>
      </text:section>
      <text:section text:style-name="Sect1" text:name="cdk-describedby-message-ng-1-9">
        <text:p text:style-name="Text_20_body"/>
      </text:section>
      <text:section text:style-name="Sect1" text:name="cdk-describedby-message-ng-1-10">
        <text:p text:style-name="Text_20_body"/>
      </text:section>
      <text:section text:style-name="Sect1" text:name="cdk-describedby-message-ng-1-11">
        <text:p text:style-name="Text_20_body"/>
      </text:section>
      <text:section text:style-name="Sect1" text:name="cdk-describedby-message-ng-1-12">
        <text:p text:style-name="Text_20_body"/>
      </text:section>
      <text:section text:style-name="Sect1" text:name="cdk-describedby-message-ng-1-13">
        <text:p text:style-name="Text_20_body"/>
      </text:section>
      <text:section text:style-name="Sect1" text:name="cdk-describedby-message-ng-1-14">
        <text:p text:style-name="Text_20_body"/>
      </text:section>
      <text:section text:style-name="Sect1" text:name="cdk-describedby-message-ng-1-15">
        <text:p text:style-name="Text_20_body"/>
      </text:section>
      <text:section text:style-name="Sect1" text:name="cdk-describedby-message-ng-1-16">
        <text:p text:style-name="Text_20_body"/>
      </text:section>
      <text:section text:style-name="Sect1" text:name="cdk-describedby-message-ng-1-17">
        <text:p text:style-name="Text_20_body"/>
      </text:section>
      <text:section text:style-name="Sect1" text:name="cdk-describedby-message-ng-1-18">
        <text:p text:style-name="Text_20_body"><text:soft-page-break/></text:p>
      </text:section>
      <text:section text:style-name="Sect1" text:name="cdk-describedby-message-ng-1-19">
        <text:p text:style-name="Text_20_body"/>
      </text:section>
      <text:section text:style-name="Sect1" text:name="cdk-describedby-message-ng-1-20">
        <text:p text:style-name="Text_20_body"/>
      </text:section>
      <text:section text:style-name="Sect1" text:name="cdk-describedby-message-ng-1-21">
        <text:p text:style-name="Text_20_body"/>
      </text:section>
      <text:section text:style-name="Sect1" text:name="cdk-describedby-message-ng-1-25">
        <text:p text:style-name="Text_20_body"/>
      </text:section>
      <text:section text:style-name="Sect1" text:name="cdk-describedby-message-ng-1-26">
        <text:p text:style-name="Text_20_body"/>
      </text:section>
      <text:section text:style-name="Sect1" text:name="cdk-describedby-message-ng-1-28">
        <text:p text:style-name="Text_20_body"/>
      </text:section>
      <text:section text:style-name="Sect1" text:name="cdk-describedby-message-ng-1-29">
        <text:p text:style-name="Text_20_body"/>
      </text:section>
      <text:section text:style-name="Sect1" text:name="cdk-describedby-message-ng-1-30">
        <text:p text:style-name="Text_20_body"/>
      </text:section>
      <text:section text:style-name="Sect1" text:name="cdk-describedby-message-ng-1-31">
        <text:p text:style-name="Text_20_body"/>
      </text:section>
      <text:section text:style-name="Sect1" text:name="cdk-describedby-message-ng-1-50">
        <text:p text:style-name="Text_20_body"/>
      </text:section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6T18:50:20.12</meta:creation-date>
    <dc:date>2025-12-26T19:16:17.91</dc:date>
    <dc:creator>Peter Thompson</dc:creator>
    <meta:editing-duration>PT17M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7" meta:paragraph-count="466" meta:word-count="3870" meta:character-count="30265"/>
  </office:meta>
</office:document-meta>
</file>