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2">
      <style:paragraph-properties fo:margin-top="0cm" fo:margin-bottom="0cm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I'll work through the mathematical claims in your document to verify them.## Mathematical Verification Results</text:p>
      <text:p text:style-name="Text_20_body">Here's what the mathematics actually shows:</text:p>
      <text:p text:style-name="Text_20_body"><text:span text:style-name="Strong_20_Emphasis">✅ CORRECT CALCULATIONS:</text:span></text:p>
      <text:list xml:id="list8190910268831708968" text:style-name="L1">
        <text:list-item>
          <text:p text:style-name="P1"><text:span text:style-name="Strong_20_Emphasis">Basic Logarithmic Math</text:span>: The calculation ln(118,098)/ln(27) = 3.54 is essentially correct (actual: 3.544)</text:p>
        </text:list-item>
        <text:list-item>
          <text:p text:style-name="P1"><text:span text:style-name="Strong_20_Emphasis">Sonoluminescence Frequency</text:span>: 27,000³ = 1.9683 × 10¹³ Hz - this calculation is accurate</text:p>
        </text:list-item>
        <text:list-item>
          <text:p text:style-name="P1"><text:span text:style-name="Strong_20_Emphasis">Energy Totals</text:span>: The 36.2 kW total (15.2 + 8.7 + 12.3) adds up correctly</text:p>
        </text:list-item>
      </text:list>
      <text:p text:style-name="Text_20_body"><text:span text:style-name="Strong_20_Emphasis">❌ PROBLEMATIC CLAIMS:</text:span></text:p>
      <text:list xml:id="list23701068072526588" text:style-name="L2">
        <text:list-item>
          <text:p text:style-name="P2"><text:span text:style-name="Strong_20_Emphasis">Consciousness Frequency Connection</text:span>: 13 × 2¹¹ = 26,624 Hz, not 27,000 Hz. This is a 1.4% error, which undermines the claimed precision of the "consciousness interface."</text:p>
        </text:list-item>
        <text:list-item>
          <text:p text:style-name="P2"><text:span text:style-name="Strong_20_Emphasis">4D/5D Exponents Are Wrong</text:span>:</text:p>
          <text:list>
            <text:list-item>
              <text:p text:style-name="P4">4D calculation gives 4.96, not the claimed "around 5.6" </text:p>
            </text:list-item>
            <text:list-item>
              <text:p text:style-name="P4">5D calculation gives 6.45, not the claimed "around 6.8" </text:p>
            </text:list-item>
          </text:list>
        </text:list-item>
        <text:list-item>
          <text:p text:style-name="P2"><text:span text:style-name="Strong_20_Emphasis">Harmonic Ratios</text:span>: The 19:13:4 ratios (1.462 and 3.250) don't follow established musical harmonic principles, which use simple integer ratios like 3:2, 4:3, etc.</text:p>
        </text:list-item>
      </text:list>
      <text:p text:style-name="Text_20_body"><text:span text:style-name="Strong_20_Emphasis">⚠️ FUNDAMENTAL ISSUES:</text:span></text:p>
      <text:list xml:id="list9155992551571286416" text:style-name="L3">
        <text:list-item>
          <text:p text:style-name="P3"><text:span text:style-name="Strong_20_Emphasis">No Physical Derivation</text:span>: While the arithmetic is mostly correct, there's no physics-based reason why these specific numbers should determine energy relationships.</text:p>
        </text:list-item>
        <text:list-item>
          <text:p text:style-name="P3"><text:span text:style-name="Strong_20_Emphasis">Arbitrary Base Frequencies</text:span>: The choice of 27, 54, 81 kHz appears arbitrary - no experimental evidence supports these as fundamental constants.</text:p>
        </text:list-item>
        <text:list-item>
          <text:p text:style-name="P3"><text:span text:style-name="Strong_20_Emphasis">Units Don't Match</text:span>: The equation E = mv^(ln(ABC)/ln(27)) has dimensional problems - the exponent should be dimensionless, but ABC has units of Hz³.</text:p>
        </text:list-item>
      </text:list>
      <text:p text:style-name="Text_20_body"><text:span text:style-name="Strong_20_Emphasis">CONCLUSION</text:span>: Your arithmetic is largely correct, but the underlying physics assumptions are unsupported. The mathematical precision creates an illusion of scientific rigor, but the fundamental premises lack experimental validatio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Thompson</meta:initial-creator>
    <meta:creation-date>2025-08-02T14:51:36.32</meta:creation-date>
    <meta:document-statistic meta:table-count="0" meta:image-count="0" meta:object-count="0" meta:page-count="1" meta:paragraph-count="17" meta:word-count="253" meta:character-count="1641"/>
    <dc:date>2025-08-02T15:52:10.66</dc:date>
    <dc:creator>Peter Thompson</dc:creator>
    <meta:editing-duration>PT45M23S</meta:editing-duration>
    <meta:editing-cycles>1</meta:editing-cycles>
    <meta:generator>OpenOffice/4.1.15$Win32 OpenOffice.org_project/4115m2$Build-9813</meta:generator>
  </office:meta>
</office:document-meta>
</file>