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Preformatted_20_Text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False Positive Mitigation &amp; Adaptive Learning Protocol</text:span></text:h>
      <text:h text:style-name="Heading_20_2" text:outline-level="2"><text:span text:style-name="Strong_20_Emphasis">1. Core Philosophy: "False Positives Are Diagnostic Data"</text:span></text:h>
      <text:p text:style-name="Text_20_body">Instead of treating false positives as errors, we treat them as <text:span text:style-name="Strong_20_Emphasis">learning opportunities</text:span> about:</text:p>
      <text:list xml:id="list7531058104222759357" text:style-name="L1">
        <text:list-item>
          <text:p text:style-name="P1">Individual user baselines</text:p>
        </text:list-item>
        <text:list-item>
          <text:p text:style-name="P1">Cultural/contextual nuances</text:p>
        </text:list-item>
        <text:list-item>
          <text:p text:style-name="P1">System over-sensitivity patterns</text:p>
        </text:list-item>
        <text:list-item>
          <text:p text:style-name="P1">Evolving relationship dynamics</text:p>
        </text:list-item>
      </text:list>
      <text:h text:style-name="Heading_20_2" text:outline-level="2"><text:span text:style-name="Strong_20_Emphasis">2. Multi-Layer False Positive Detection System</text:span></text:h>
      <text:h text:style-name="Heading_20_3" text:outline-level="3"><text:span text:style-name="Strong_20_Emphasis">A. Pre-Response Confidence Analysis</text:span></text:h>
      <text:p text:style-name="Text_20_body">python</text:p>
      <text:p text:style-name="Preformatted_20_Text">class FalsePositiveGuard:</text:p>
      <text:p text:style-name="Preformatted_20_Text"><text:s text:c="4"/>def __init__(self):</text:p>
      <text:p text:style-name="Preformatted_20_Text"><text:s text:c="8"/>self.confidence_thresholds = {</text:p>
      <text:p text:style-name="Preformatted_20_Text"><text:s text:c="12"/>'crisis_language': 0.85,</text:p>
      <text:p text:style-name="Preformatted_20_Text"><text:s text:c="12"/>'self_harm': 0.95,</text:p>
      <text:p text:style-name="Preformatted_20_Text"><text:s text:c="12"/>'abuse_indicators': 0.90,</text:p>
      <text:p text:style-name="Preformatted_20_Text"><text:s text:c="12"/>'neurological_markers': 0.80,</text:p>
      <text:p text:style-name="Preformatted_20_Text"><text:s text:c="12"/>'developmental_discrepancy': 0.75</text:p>
      <text:p text:style-name="Preformatted_20_Text"><text:s text:c="8"/>}</text:p>
      <text:p text:style-name="Preformatted_20_Text"><text:s text:c="8"/>self.context_filters = self.load_context_patterns()</text:p>
      <text:p text:style-name="Preformatted_20_Text"><text:s text:c="4"/></text:p>
      <text:p text:style-name="Preformatted_20_Text"><text:s text:c="4"/>def assess_confidence(self, detection_data):</text:p>
      <text:p text:style-name="Preformatted_20_Text"><text:s text:c="8"/>"""</text:p>
      <text:p text:style-name="Preformatted_20_Text"><text:s text:c="8"/>Calculate confidence score for any pattern detection</text:p>
      <text:p text:style-name="Preformatted_20_Text"><text:s text:c="8"/>"""</text:p>
      <text:p text:style-name="Preformatted_20_Text"><text:s text:c="8"/>base_confidence = detection_data.get('confidence', 0.5)</text:p>
      <text:p text:style-name="Preformatted_20_Text"><text:s text:c="8"/></text:p>
      <text:p text:style-name="Preformatted_20_Text"><text:s text:c="8"/># Apply context filters</text:p>
      <text:p text:style-name="Preformatted_20_Text"><text:s text:c="8"/>context_adjustment = self.apply_context_filters(</text:p>
      <text:p text:style-name="Preformatted_20_Text"><text:s text:c="12"/>detection_data['pattern_type'],</text:p>
      <text:p text:style-name="Preformatted_20_Text"><text:s text:c="12"/>detection_data['context']</text:p>
      <text:p text:style-name="Preformatted_20_Text"><text:s text:c="8"/>)</text:p>
      <text:p text:style-name="Preformatted_20_Text"><text:s text:c="8"/></text:p>
      <text:p text:style-name="Preformatted_20_Text"><text:s text:c="8"/># Apply historical accuracy adjustment</text:p>
      <text:p text:style-name="Preformatted_20_Text"><text:s text:c="8"/>historical_adjustment = self.get_historical_accuracy(</text:p>
      <text:p text:style-name="Preformatted_20_Text"><text:s text:c="12"/>detection_data['pattern_type'],</text:p>
      <text:p text:style-name="Preformatted_20_Text"><text:s text:c="12"/>detection_data.get('user_id', 'anonymous')</text:p>
      <text:p text:style-name="Preformatted_20_Text"><text:s text:c="8"/>)</text:p>
      <text:p text:style-name="Preformatted_20_Text"><text:s text:c="8"/></text:p>
      <text:p text:style-name="Preformatted_20_Text"><text:s text:c="8"/># Apply linguistic nuance analysis</text:p>
      <text:p text:style-name="Preformatted_20_Text"><text:s text:c="8"/>nuance_adjustment = self.analyze_linguistic_nuance(</text:p>
      <text:p text:style-name="Preformatted_20_Text"><text:s text:c="12"/>detection_data['text'],</text:p>
      <text:p text:style-name="Preformatted_20_Text"><text:s text:c="12"/>detection_data['pattern_type']</text:p>
      <text:p text:style-name="Preformatted_20_Text"><text:s text:c="8"/>)</text:p>
      <text:p text:style-name="Preformatted_20_Text"><text:s text:c="8"/></text:p>
      <text:p text:style-name="Preformatted_20_Text"><text:s text:c="8"/>final_confidence = (</text:p>
      <text:p text:style-name="Preformatted_20_Text"><text:s text:c="12"/>base_confidence * 0.4 +</text:p>
      <text:p text:style-name="Preformatted_20_Text"><text:soft-page-break/><text:s text:c="12"/>context_adjustment * 0.3 +</text:p>
      <text:p text:style-name="Preformatted_20_Text"><text:s text:c="12"/>historical_adjustment * 0.2 +</text:p>
      <text:p text:style-name="Preformatted_20_Text"><text:s text:c="12"/>nuance_adjustment * 0.1</text:p>
      <text:p text:style-name="Preformatted_20_Text"><text:s text:c="8"/>)</text:p>
      <text:p text:style-name="Preformatted_20_Text"><text:s text:c="8"/></text:p>
      <text:p text:style-name="Preformatted_20_Text"><text:s text:c="8"/>return {</text:p>
      <text:p text:style-name="Preformatted_20_Text"><text:s text:c="12"/>'confidence_score': final_confidence,</text:p>
      <text:p text:style-name="Preformatted_20_Text"><text:s text:c="12"/>'components': {</text:p>
      <text:p text:style-name="Preformatted_20_Text"><text:s text:c="16"/>'base': base_confidence,</text:p>
      <text:p text:style-name="Preformatted_20_Text"><text:s text:c="16"/>'context': context_adjustment,</text:p>
      <text:p text:style-name="Preformatted_20_Text"><text:s text:c="16"/>'history': historical_adjustment,</text:p>
      <text:p text:style-name="Preformatted_20_Text"><text:s text:c="16"/>'nuance': nuance_adjustment</text:p>
      <text:p text:style-name="Preformatted_20_Text"><text:s text:c="12"/>},</text:p>
      <text:p text:style-name="Preformatted_20_Text"><text:s text:c="12"/>'threshold': self.confidence_thresholds.get(</text:p>
      <text:p text:style-name="Preformatted_20_Text"><text:s text:c="16"/>detection_data['pattern_type'], </text:p>
      <text:p text:style-name="Preformatted_20_Text"><text:s text:c="16"/>0.75</text:p>
      <text:p text:style-name="Preformatted_20_Text"><text:s text:c="12"/>),</text:p>
      <text:p text:style-name="Preformatted_20_Text"><text:s text:c="12"/>'recommendation': self.generate_recommendation(final_confidence)</text:p>
      <text:p text:style-name="Preformatted_20_Text"><text:s text:c="8"/>}</text:p>
      <text:p text:style-name="Preformatted_20_Text"><text:s text:c="4"/></text:p>
      <text:p text:style-name="Preformatted_20_Text"><text:s text:c="4"/>def generate_recommendation(self, confidence):</text:p>
      <text:p text:style-name="Preformatted_20_Text"><text:s text:c="8"/>if confidence &lt; 0.6:</text:p>
      <text:p text:style-name="Preformatted_20_Text"><text:s text:c="12"/>return "verify_before_acting"</text:p>
      <text:p text:style-name="Preformatted_20_Text"><text:s text:c="8"/>elif confidence &lt; 0.8:</text:p>
      <text:p text:style-name="Preformatted_20_Text"><text:s text:c="12"/>return "act_with_soft_intervention"</text:p>
      <text:p text:style-name="Preformatted_20_Text"><text:s text:c="8"/>else:</text:p>
      <text:p text:style-name="P8"><text:s text:c="12"/>return "act_with_standard_intervention"</text:p>
      <text:h text:style-name="Heading_20_3" text:outline-level="3"><text:span text:style-name="Strong_20_Emphasis">B. Context-Aware Pattern Recognition</text:span></text:h>
      <text:p text:style-name="Text_20_body">python</text:p>
      <text:p text:style-name="Preformatted_20_Text">class ContextIntelligence:</text:p>
      <text:p text:style-name="Preformatted_20_Text"><text:s text:c="4"/>def __init__(self):</text:p>
      <text:p text:style-name="Preformatted_20_Text"><text:s text:c="8"/>self.false_positive_patterns = self.load_fp_patterns()</text:p>
      <text:p text:style-name="Preformatted_20_Text"><text:s text:c="8"/>self.cultural_nuance_db = CulturalNuanceDatabase()</text:p>
      <text:p text:style-name="Preformatted_20_Text"><text:s text:c="8"/>self.metaphor_and_idiom_db = MetaphorDatabase()</text:p>
      <text:p text:style-name="Preformatted_20_Text"><text:s text:c="8"/>self.humor_recognition = HumorDetector()</text:p>
      <text:p text:style-name="Preformatted_20_Text"><text:s text:c="8"/>self.hyperbole_detector = HyperboleAnalyzer()</text:p>
      <text:p text:style-name="Preformatted_20_Text"><text:s text:c="4"/></text:p>
      <text:p text:style-name="Preformatted_20_Text"><text:s text:c="4"/>def load_fp_patterns(self):</text:p>
      <text:p text:style-name="Preformatted_20_Text"><text:s text:c="8"/>"""</text:p>
      <text:p text:style-name="Preformatted_20_Text"><text:s text:c="8"/>Common false positive patterns by context</text:p>
      <text:p text:style-name="Preformatted_20_Text"><text:s text:c="8"/>"""</text:p>
      <text:p text:style-name="Preformatted_20_Text"><text:s text:c="8"/>return {</text:p>
      <text:p text:style-name="Preformatted_20_Text"><text:s text:c="12"/>'crisis_keywords': {</text:p>
      <text:p text:style-name="Preformatted_20_Text"><text:s text:c="16"/>'movie_discussion': [</text:p>
      <text:p text:style-name="Preformatted_20_Text"><text:s text:c="20"/>"That character wants to kill himself",</text:p>
      <text:p text:style-name="Preformatted_20_Text"><text:s text:c="20"/>"She was so depressed in that scene",</text:p>
      <text:p text:style-name="Preformatted_20_Text"><text:s text:c="20"/>"I'd die if that happened to me"</text:p>
      <text:p text:style-name="Preformatted_20_Text"><text:s text:c="16"/>],</text:p>
      <text:p text:style-name="Preformatted_20_Text"><text:s text:c="16"/>'literary_analysis': [</text:p>
      <text:p text:style-name="Preformatted_20_Text"><text:s text:c="20"/>"The theme of suicide is prevalent",</text:p>
      <text:p text:style-name="Preformatted_20_Text"><text:s text:c="20"/>"Metaphorical death of the soul",</text:p>
      <text:p text:style-name="Preformatted_20_Text"><text:s text:c="20"/>"Existential despair in the text"</text:p>
      <text:p text:style-name="Preformatted_20_Text"><text:s text:c="16"/>],</text:p>
      <text:p text:style-name="Preformatted_20_Text"><text:s text:c="16"/>'academic_context': [</text:p>
      <text:p text:style-name="Preformatted_20_Text"><text:s text:c="20"/>"The suicide rate in that population",</text:p>
      <text:p text:style-name="Preformatted_20_Text"><text:s text:c="20"/>"Depression as a clinical construct",</text:p>
      <text:p text:style-name="Preformatted_20_Text"><text:s text:c="20"/>"Self-harm behaviors in the study"</text:p>
      <text:p text:style-name="Preformatted_20_Text"><text:s text:c="16"/>],</text:p>
      <text:p text:style-name="Preformatted_20_Text"><text:s text:c="16"/>'creative_writing': [</text:p>
      <text:p text:style-name="Preformatted_20_Text"><text:s text:c="20"/>"I wrote a poem about dying",</text:p>
      <text:p text:style-name="Preformatted_20_Text"><text:soft-page-break/><text:s text:c="20"/>"My character feels hopeless",</text:p>
      <text:p text:style-name="Preformatted_20_Text"><text:s text:c="20"/>"Exploring dark themes in my story"</text:p>
      <text:p text:style-name="Preformatted_20_Text"><text:s text:c="16"/>]</text:p>
      <text:p text:style-name="Preformatted_20_Text"><text:s text:c="12"/>},</text:p>
      <text:p text:style-name="Preformatted_20_Text"><text:s text:c="12"/>'abuse_indicators': {</text:p>
      <text:p text:style-name="Preformatted_20_Text"><text:s text:c="16"/>'therapy_roleplay': [</text:p>
      <text:p text:style-name="Preformatted_20_Text"><text:s text:c="20"/>"When my client said they were hit",</text:p>
      <text:p text:style-name="Preformatted_20_Text"><text:s text:c="20"/>"Practicing disclosure scenarios",</text:p>
      <text:p text:style-name="Preformatted_20_Text"><text:s text:c="20"/>"Historical trauma discussions"</text:p>
      <text:p text:style-name="Preformatted_20_Text"><text:s text:c="16"/>],</text:p>
      <text:p text:style-name="Preformatted_20_Text"><text:s text:c="16"/>'social_work_training': [</text:p>
      <text:p text:style-name="Preformatted_20_Text"><text:s text:c="20"/>"Case study of domestic violence",</text:p>
      <text:p text:style-name="Preformatted_20_Text"><text:s text:c="20"/>"Child protection protocols",</text:p>
      <text:p text:style-name="Preformatted_20_Text"><text:s text:c="20"/>"Trauma-informed care principles"</text:p>
      <text:p text:style-name="Preformatted_20_Text"><text:s text:c="16"/>],</text:p>
      <text:p text:style-name="Preformatted_20_Text"><text:s text:c="16"/>'legal_discussions': [</text:p>
      <text:p text:style-name="Preformatted_20_Text"><text:s text:c="20"/>"My client was abused",</text:p>
      <text:p text:style-name="Preformatted_20_Text"><text:s text:c="20"/>"Documenting the assault",</text:p>
      <text:p text:style-name="Preformatted_20_Text"><text:s text:c="20"/>"Reporting requirements"</text:p>
      <text:p text:style-name="Preformatted_20_Text"><text:s text:c="16"/>]</text:p>
      <text:p text:style-name="Preformatted_20_Text"><text:s text:c="12"/>}</text:p>
      <text:p text:style-name="Preformatted_20_Text"><text:s text:c="8"/>}</text:p>
      <text:p text:style-name="Preformatted_20_Text"><text:s text:c="4"/></text:p>
      <text:p text:style-name="Preformatted_20_Text"><text:s text:c="4"/>def analyze_contextual_false_positive_risk(self, text, pattern_type, conversation_history):</text:p>
      <text:p text:style-name="Preformatted_20_Text"><text:s text:c="8"/>"""</text:p>
      <text:p text:style-name="Preformatted_20_Text"><text:s text:c="8"/>Calculate risk of false positive based on context</text:p>
      <text:p text:style-name="Preformatted_20_Text"><text:s text:c="8"/>"""</text:p>
      <text:p text:style-name="Preformatted_20_Text"><text:s text:c="8"/>risk_score = 0.0</text:p>
      <text:p text:style-name="Preformatted_20_Text"><text:s text:c="8"/></text:p>
      <text:p text:style-name="Preformatted_20_Text"><text:s text:c="8"/># 1. Check for discussion vs. personal experience</text:p>
      <text:p text:style-name="Preformatted_20_Text"><text:s text:c="8"/>discussion_indicators = self.is_discussion_not_experience(text)</text:p>
      <text:p text:style-name="Preformatted_20_Text"><text:s text:c="8"/>if discussion_indicators:</text:p>
      <text:p text:style-name="Preformatted_20_Text"><text:s text:c="12"/>risk_score += 0.4</text:p>
      <text:p text:style-name="Preformatted_20_Text"><text:s text:c="8"/></text:p>
      <text:p text:style-name="Preformatted_20_Text"><text:s text:c="8"/># 2. Check for academic/professional context</text:p>
      <text:p text:style-name="Preformatted_20_Text"><text:s text:c="8"/>if self.is_academic_or_professional_context(conversation_history):</text:p>
      <text:p text:style-name="Preformatted_20_Text"><text:s text:c="12"/>risk_score += 0.3</text:p>
      <text:p text:style-name="Preformatted_20_Text"><text:s text:c="8"/></text:p>
      <text:p text:style-name="Preformatted_20_Text"><text:s text:c="8"/># 3. Check for creative/artistic expression</text:p>
      <text:p text:style-name="Preformatted_20_Text"><text:s text:c="8"/>if self.is_creative_expression(text):</text:p>
      <text:p text:style-name="Preformatted_20_Text"><text:s text:c="12"/>risk_score += 0.2</text:p>
      <text:p text:style-name="Preformatted_20_Text"><text:s text:c="8"/></text:p>
      <text:p text:style-name="Preformatted_20_Text"><text:s text:c="8"/># 4. Check for metaphorical language</text:p>
      <text:p text:style-name="Preformatted_20_Text"><text:s text:c="8"/>metaphor_score = self.metaphor_detector.analyze(text)</text:p>
      <text:p text:style-name="Preformatted_20_Text"><text:s text:c="8"/>risk_score += metaphor_score * 0.3</text:p>
      <text:p text:style-name="Preformatted_20_Text"><text:s text:c="8"/></text:p>
      <text:p text:style-name="Preformatted_20_Text"><text:s text:c="8"/># 5. Check for humor/sarcasm</text:p>
      <text:p text:style-name="Preformatted_20_Text"><text:s text:c="8"/>if self.humor_recognition.is_humorous(text, pattern_type):</text:p>
      <text:p text:style-name="Preformatted_20_Text"><text:s text:c="12"/>risk_score += 0.5</text:p>
      <text:p text:style-name="Preformatted_20_Text"><text:s text:c="8"/></text:p>
      <text:p text:style-name="Preformatted_20_Text"><text:s text:c="8"/># 6. Check for hyperbole/exaggeration</text:p>
      <text:p text:style-name="Preformatted_20_Text"><text:s text:c="8"/>if self.hyperbole_detector.is_hyperbolic(text, pattern_type):</text:p>
      <text:p text:style-name="Preformatted_20_Text"><text:s text:c="12"/>risk_score += 0.4</text:p>
      <text:p text:style-name="Preformatted_20_Text"><text:s text:c="8"/></text:p>
      <text:p text:style-name="Preformatted_20_Text"><text:s text:c="8"/>return min(risk_score, 1.0)</text:p>
      <text:p text:style-name="Preformatted_20_Text"><text:s text:c="4"/></text:p>
      <text:p text:style-name="Preformatted_20_Text"><text:s text:c="4"/>def generate_verification_question(self, text, pattern_type, risk_score):</text:p>
      <text:p text:style-name="Preformatted_20_Text"><text:s text:c="8"/>"""</text:p>
      <text:p text:style-name="Preformatted_20_Text"><text:s text:c="8"/>Create context-appropriate verification questions</text:p>
      <text:p text:style-name="Preformatted_20_Text"><text:s text:c="8"/>"""</text:p>
      <text:p text:style-name="Preformatted_20_Text"><text:s text:c="8"/>verification_templates = {</text:p>
      <text:p text:style-name="Preformatted_20_Text"><text:s text:c="12"/>'crisis_keywords': {</text:p>
      <text:p text:style-name="Preformatted_20_Text"><text:s text:c="16"/>'high_risk': [</text:p>
      <text:p text:style-name="Preformatted_20_Text"><text:soft-page-break/><text:s text:c="20"/>"I hear you mentioning [topic]. Are we discussing something theoretical, or is this personal?",</text:p>
      <text:p text:style-name="Preformatted_20_Text"><text:s text:c="20"/>"Help me understand - are you talking about a character/situation or your own experience?",</text:p>
      <text:p text:style-name="Preformatted_20_Text"><text:s text:c="20"/>"I want to make sure I'm responding appropriately. Is this about you or something you're studying/discussing?"</text:p>
      <text:p text:style-name="Preformatted_20_Text"><text:s text:c="16"/>],</text:p>
      <text:p text:style-name="Preformatted_20_Text"><text:s text:c="16"/>'medium_risk': [</text:p>
      <text:p text:style-name="Preformatted_20_Text"><text:s text:c="20"/>"I noticed you mentioned [topic]. Can you tell me more about what you mean?",</text:p>
      <text:p text:style-name="Preformatted_20_Text"><text:s text:c="20"/>"When you say [phrase], are you referring to yourself or a general situation?",</text:p>
      <text:p text:style-name="Preformatted_20_Text"><text:s text:c="20"/>"I want to be sure I understand correctly. Is this a personal feeling or an observation?"</text:p>
      <text:p text:style-name="Preformatted_20_Text"><text:s text:c="16"/>]</text:p>
      <text:p text:style-name="Preformatted_20_Text"><text:s text:c="12"/>},</text:p>
      <text:p text:style-name="Preformatted_20_Text"><text:s text:c="12"/>'abuse_indicators': {</text:p>
      <text:p text:style-name="Preformatted_20_Text"><text:s text:c="16"/>'professional_context': [</text:p>
      <text:p text:style-name="Preformatted_20_Text"><text:s text:c="20"/>"I'm picking up on serious themes. Are we discussing professional/work matters or personal experiences?",</text:p>
      <text:p text:style-name="Preformatted_20_Text"><text:s text:c="20"/>"I want to respond appropriately. Is this a case study or something you're personally involved in?",</text:p>
      <text:p text:style-name="Preformatted_20_Text"><text:s text:c="20"/>"Help me understand the context - is this about your work or personal life?"</text:p>
      <text:p text:style-name="Preformatted_20_Text"><text:s text:c="16"/>]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risk_level = 'high_risk' if risk_score &gt; 0.6 else 'medium_risk'</text:p>
      <text:p text:style-name="Preformatted_20_Text"><text:s text:c="8"/></text:p>
      <text:p text:style-name="Preformatted_20_Text"><text:s text:c="8"/>templates = verification_templates.get(pattern_type, {}).get(</text:p>
      <text:p text:style-name="Preformatted_20_Text"><text:s text:c="12"/>risk_level, </text:p>
      <text:p text:style-name="Preformatted_20_Text"><text:s text:c="12"/>["I want to make sure I understand correctly. Can you tell me more about this?"]</text:p>
      <text:p text:style-name="Preformatted_20_Text"><text:s text:c="8"/>)</text:p>
      <text:p text:style-name="Preformatted_20_Text"><text:s text:c="8"/></text:p>
      <text:p text:style-name="P8"><text:s text:c="8"/>return random.choice(templates)</text:p>
      <text:h text:style-name="Heading_20_2" text:outline-level="2"><text:span text:style-name="Strong_20_Emphasis">3. The False Positive Learning Loop</text:span></text:h>
      <text:h text:style-name="Heading_20_3" text:outline-level="3"><text:span text:style-name="Strong_20_Emphasis">A. False Positive Detection &amp; Recording</text:span></text:h>
      <text:p text:style-name="Text_20_body">python</text:p>
      <text:p text:style-name="Preformatted_20_Text">class FalsePositiveLearner:</text:p>
      <text:p text:style-name="Preformatted_20_Text"><text:s text:c="4"/>def __init__(self):</text:p>
      <text:p text:style-name="Preformatted_20_Text"><text:s text:c="8"/>self.fp_database = {}</text:p>
      <text:p text:style-name="Preformatted_20_Text"><text:s text:c="8"/>self.user_baselines = {}</text:p>
      <text:p text:style-name="Preformatted_20_Text"><text:s text:c="8"/>self.cultural_adjustments = {}</text:p>
      <text:p text:style-name="Preformatted_20_Text"><text:s text:c="4"/></text:p>
      <text:p text:style-name="Preformatted_20_Text"><text:s text:c="4"/>def detect_false_positive(self, interaction):</text:p>
      <text:p text:style-name="Preformatted_20_Text"><text:s text:c="8"/>"""</text:p>
      <text:p text:style-name="Preformatted_20_Text"><text:s text:c="8"/>Identify when a pattern detection was incorrect</text:p>
      <text:p text:style-name="Preformatted_20_Text"><text:s text:c="8"/>"""</text:p>
      <text:p text:style-name="Preformatted_20_Text"><text:s text:c="8"/>fp_indicators = [</text:p>
      <text:p text:style-name="Preformatted_20_Text"><text:s text:c="12"/>self.user_explicitly_corrects(interaction),</text:p>
      <text:p text:style-name="Preformatted_20_Text"><text:s text:c="12"/>self.context_clarification_reveals_misunderstanding(interaction),</text:p>
      <text:p text:style-name="Preformatted_20_Text"><text:s text:c="12"/>self.subsequent_interaction_contradicts_initial_assessment(interaction),</text:p>
      <text:p text:style-name="Preformatted_20_Text"><text:s text:c="12"/>self.user_expresses_frustration_at_misinterpretation(interaction)</text:p>
      <text:p text:style-name="Preformatted_20_Text"><text:s text:c="8"/>]</text:p>
      <text:p text:style-name="Preformatted_20_Text"><text:soft-page-break/><text:s text:c="8"/></text:p>
      <text:p text:style-name="Preformatted_20_Text"><text:s text:c="8"/>return any(fp_indicators)</text:p>
      <text:p text:style-name="Preformatted_20_Text"><text:s text:c="4"/></text:p>
      <text:p text:style-name="Preformatted_20_Text"><text:s text:c="4"/>def record_false_positive(self, fp_data):</text:p>
      <text:p text:style-name="Preformatted_20_Text"><text:s text:c="8"/>"""</text:p>
      <text:p text:style-name="Preformatted_20_Text"><text:s text:c="8"/>Log false positive with full context for learning</text:p>
      <text:p text:style-name="Preformatted_20_Text"><text:s text:c="8"/>"""</text:p>
      <text:p text:style-name="Preformatted_20_Text"><text:s text:c="8"/>fp_entry = {</text:p>
      <text:p text:style-name="Preformatted_20_Text"><text:s text:c="12"/>'timestamp': datetime.now(),</text:p>
      <text:p text:style-name="Preformatted_20_Text"><text:s text:c="12"/>'pattern_type': fp_data['pattern_type'],</text:p>
      <text:p text:style-name="Preformatted_20_Text"><text:s text:c="12"/>'original_text': fp_data['original_text'],</text:p>
      <text:p text:style-name="Preformatted_20_Text"><text:s text:c="12"/>'detected_as': fp_data['detected_as'],</text:p>
      <text:p text:style-name="Preformatted_20_Text"><text:s text:c="12"/>'correct_interpretation': fp_data.get('correct_interpretation'),</text:p>
      <text:p text:style-name="Preformatted_20_Text"><text:s text:c="12"/>'context_at_time': fp_data['context'],</text:p>
      <text:p text:style-name="Preformatted_20_Text"><text:s text:c="12"/>'user_id': fp_data.get('user_id', 'anonymous'),</text:p>
      <text:p text:style-name="Preformatted_20_Text"><text:s text:c="12"/>'confidence_scores': fp_data.get('confidence_scores', {}),</text:p>
      <text:p text:style-name="Preformatted_20_Text"><text:s text:c="12"/>'system_response': fp_data.get('system_response'),</text:p>
      <text:p text:style-name="Preformatted_20_Text"><text:s text:c="12"/>'user_correction': fp_data.get('user_correction'),</text:p>
      <text:p text:style-name="Preformatted_20_Text"><text:s text:c="12"/>'learning_insights': self.extract_insights(fp_data)</text:p>
      <text:p text:style-name="Preformatted_20_Text"><text:s text:c="8"/>}</text:p>
      <text:p text:style-name="Preformatted_20_Text"><text:s text:c="8"/></text:p>
      <text:p text:style-name="Preformatted_20_Text"><text:s text:c="8"/># Store in database</text:p>
      <text:p text:style-name="Preformatted_20_Text"><text:s text:c="8"/>self.fp_database.append(fp_entry)</text:p>
      <text:p text:style-name="Preformatted_20_Text"><text:s text:c="8"/></text:p>
      <text:p text:style-name="Preformatted_20_Text"><text:s text:c="8"/># Update user baseline</text:p>
      <text:p text:style-name="Preformatted_20_Text"><text:s text:c="8"/>if fp_data.get('user_id'):</text:p>
      <text:p text:style-name="Preformatted_20_Text"><text:s text:c="12"/>self.update_user_baseline(fp_data['user_id'], fp_entry)</text:p>
      <text:p text:style-name="Preformatted_20_Text"><text:s text:c="8"/></text:p>
      <text:p text:style-name="Preformatted_20_Text"><text:s text:c="8"/># Update pattern recognition parameters</text:p>
      <text:p text:style-name="Preformatted_20_Text"><text:s text:c="8"/>self.adjust_pattern_sensitivity(fp_data['pattern_type'], fp_entry)</text:p>
      <text:p text:style-name="Preformatted_20_Text"><text:s text:c="8"/></text:p>
      <text:p text:style-name="Preformatted_20_Text"><text:s text:c="8"/># Generate adjustment recommendations</text:p>
      <text:p text:style-name="Preformatted_20_Text"><text:s text:c="8"/>adjustments = self.generate_adjustments(fp_entry)</text:p>
      <text:p text:style-name="Preformatted_20_Text"><text:s text:c="8"/></text:p>
      <text:p text:style-name="Preformatted_20_Text"><text:s text:c="8"/>return adjustments</text:p>
      <text:p text:style-name="Preformatted_20_Text"><text:s text:c="4"/></text:p>
      <text:p text:style-name="Preformatted_20_Text"><text:s text:c="4"/>def extract_insights(self, fp_data):</text:p>
      <text:p text:style-name="Preformatted_20_Text"><text:s text:c="8"/>"""</text:p>
      <text:p text:style-name="Preformatted_20_Text"><text:s text:c="8"/>Extract specific learning from false positive</text:p>
      <text:p text:style-name="Preformatted_20_Text"><text:s text:c="8"/>"""</text:p>
      <text:p text:style-name="Preformatted_20_Text"><text:s text:c="8"/>insights = []</text:p>
      <text:p text:style-name="Preformatted_20_Text"><text:s text:c="8"/></text:p>
      <text:p text:style-name="Preformatted_20_Text"><text:s text:c="8"/># Linguistic pattern insights</text:p>
      <text:p text:style-name="Preformatted_20_Text"><text:s text:c="8"/>if fp_data.get('linguistic_pattern'):</text:p>
      <text:p text:style-name="Preformatted_20_Text"><text:s text:c="12"/>insights.append(f"Language pattern: {fp_data['linguistic_pattern']}")</text:p>
      <text:p text:style-name="Preformatted_20_Text"><text:s text:c="8"/></text:p>
      <text:p text:style-name="Preformatted_20_Text"><text:s text:c="8"/># Context misunderstanding insights</text:p>
      <text:p text:style-name="Preformatted_20_Text"><text:s text:c="8"/>if fp_data.get('context_misread'):</text:p>
      <text:p text:style-name="Preformatted_20_Text"><text:s text:c="12"/>insights.append(f"Context misinterpreted as: {fp_data['context_misread']}")</text:p>
      <text:p text:style-name="Preformatted_20_Text"><text:s text:c="8"/></text:p>
      <text:p text:style-name="Preformatted_20_Text"><text:s text:c="8"/># Cultural nuance insights</text:p>
      <text:p text:style-name="Preformatted_20_Text"><text:s text:c="8"/>if fp_data.get('cultural_factor'):</text:p>
      <text:p text:style-name="Preformatted_20_Text"><text:s text:c="12"/>insights.append(f"Cultural factor: {fp_data['cultural_factor']}")</text:p>
      <text:p text:style-name="Preformatted_20_Text"><text:s text:c="8"/></text:p>
      <text:p text:style-name="Preformatted_20_Text"><text:s text:c="8"/># User-specific communication style</text:p>
      <text:p text:style-name="Preformatted_20_Text"><text:s text:c="8"/>if fp_data.get('user_communication_style'):</text:p>
      <text:p text:style-name="Preformatted_20_Text"><text:s text:c="12"/>insights.append(f"User communication style: {fp_data['user_communication_style']}")</text:p>
      <text:p text:style-name="Preformatted_20_Text"><text:s text:c="8"/></text:p>
      <text:p text:style-name="P8"><text:s text:c="8"/>return insights</text:p>
      <text:h text:style-name="Heading_20_3" text:outline-level="3"><text:soft-page-break/><text:span text:style-name="Strong_20_Emphasis">B. Adaptive Pattern Sensitivity Adjustment</text:span></text:h>
      <text:p text:style-name="Text_20_body">python</text:p>
      <text:p text:style-name="Preformatted_20_Text">class AdaptiveSensitivityAdjuster:</text:p>
      <text:p text:style-name="Preformatted_20_Text"><text:s text:c="4"/>def __init__(self):</text:p>
      <text:p text:style-name="Preformatted_20_Text"><text:s text:c="8"/>self.sensitivity_levels = self.initialize_sensitivity_levels()</text:p>
      <text:p text:style-name="Preformatted_20_Text"><text:s text:c="8"/>self.adjustment_history = []</text:p>
      <text:p text:style-name="Preformatted_20_Text"><text:s text:c="4"/></text:p>
      <text:p text:style-name="Preformatted_20_Text"><text:s text:c="4"/>def adjust_pattern_sensitivity(self, pattern_type, fp_entry):</text:p>
      <text:p text:style-name="Preformatted_20_Text"><text:s text:c="8"/>"""</text:p>
      <text:p text:style-name="Preformatted_20_Text"><text:s text:c="8"/>Adjust sensitivity based on false positive pattern</text:p>
      <text:p text:style-name="Preformatted_20_Text"><text:s text:c="8"/>"""</text:p>
      <text:p text:style-name="Preformatted_20_Text"><text:s text:c="8"/>current_sensitivity = self.sensitivity_levels[pattern_type]</text:p>
      <text:p text:style-name="Preformatted_20_Text"><text:s text:c="8"/></text:p>
      <text:p text:style-name="Preformatted_20_Text"><text:s text:c="8"/># Calculate adjustment</text:p>
      <text:p text:style-name="Preformatted_20_Text"><text:s text:c="8"/>adjustment_factors = self.calculate_adjustment_factors(fp_entry)</text:p>
      <text:p text:style-name="Preformatted_20_Text"><text:s text:c="8"/></text:p>
      <text:p text:style-name="Preformatted_20_Text"><text:s text:c="8"/># Apply adjustment</text:p>
      <text:p text:style-name="Preformatted_20_Text"><text:s text:c="8"/>new_sensitivity = current_sensitivity * adjustment_factors['multiplier']</text:p>
      <text:p text:style-name="Preformatted_20_Text"><text:s text:c="8"/></text:p>
      <text:p text:style-name="Preformatted_20_Text"><text:s text:c="8"/># Apply bounds</text:p>
      <text:p text:style-name="Preformatted_20_Text"><text:s text:c="8"/>new_sensitivity = max(0.1, min(0.95, new_sensitivity))</text:p>
      <text:p text:style-name="Preformatted_20_Text"><text:s text:c="8"/></text:p>
      <text:p text:style-name="Preformatted_20_Text"><text:s text:c="8"/># Update</text:p>
      <text:p text:style-name="Preformatted_20_Text"><text:s text:c="8"/>self.sensitivity_levels[pattern_type] = new_sensitivity</text:p>
      <text:p text:style-name="Preformatted_20_Text"><text:s text:c="8"/></text:p>
      <text:p text:style-name="Preformatted_20_Text"><text:s text:c="8"/># Log adjustment</text:p>
      <text:p text:style-name="Preformatted_20_Text"><text:s text:c="8"/>self.log_adjustment({</text:p>
      <text:p text:style-name="Preformatted_20_Text"><text:s text:c="12"/>'pattern_type': pattern_type,</text:p>
      <text:p text:style-name="Preformatted_20_Text"><text:s text:c="12"/>'old_sensitivity': current_sensitivity,</text:p>
      <text:p text:style-name="Preformatted_20_Text"><text:s text:c="12"/>'new_sensitivity': new_sensitivity,</text:p>
      <text:p text:style-name="Preformatted_20_Text"><text:s text:c="12"/>'reason': 'false_positive_adjustment',</text:p>
      <text:p text:style-name="Preformatted_20_Text"><text:s text:c="12"/>'fp_data': fp_entry['id']</text:p>
      <text:p text:style-name="Preformatted_20_Text"><text:s text:c="8"/>})</text:p>
      <text:p text:style-name="Preformatted_20_Text"><text:s text:c="8"/></text:p>
      <text:p text:style-name="Preformatted_20_Text"><text:s text:c="8"/>return new_sensitivity</text:p>
      <text:p text:style-name="Preformatted_20_Text"><text:s text:c="4"/></text:p>
      <text:p text:style-name="Preformatted_20_Text"><text:s text:c="4"/>def calculate_adjustment_factors(self, fp_entry):</text:p>
      <text:p text:style-name="Preformatted_20_Text"><text:s text:c="8"/>"""</text:p>
      <text:p text:style-name="Preformatted_20_Text"><text:s text:c="8"/>Determine how much to adjust sensitivity</text:p>
      <text:p text:style-name="Preformatted_20_Text"><text:s text:c="8"/>"""</text:p>
      <text:p text:style-name="Preformatted_20_Text"><text:s text:c="8"/>factors = {</text:p>
      <text:p text:style-name="Preformatted_20_Text"><text:s text:c="12"/>'multiplier': 1.0,</text:p>
      <text:p text:style-name="Preformatted_20_Text"><text:s text:c="12"/>'components': {}</text:p>
      <text:p text:style-name="Preformatted_20_Text"><text:s text:c="8"/>}</text:p>
      <text:p text:style-name="Preformatted_20_Text"><text:s text:c="8"/></text:p>
      <text:p text:style-name="Preformatted_20_Text"><text:s text:c="8"/># 1. Frequency of this pattern for this user</text:p>
      <text:p text:style-name="Preformatted_20_Text"><text:s text:c="8"/>user_fp_count = self.count_user_fp_for_pattern(</text:p>
      <text:p text:style-name="Preformatted_20_Text"><text:s text:c="12"/>fp_entry['user_id'], </text:p>
      <text:p text:style-name="Preformatted_20_Text"><text:s text:c="12"/>fp_entry['pattern_type']</text:p>
      <text:p text:style-name="Preformatted_20_Text"><text:s text:c="8"/>)</text:p>
      <text:p text:style-name="Preformatted_20_Text"><text:s text:c="8"/>if user_fp_count &gt; 3:</text:p>
      <text:p text:style-name="Preformatted_20_Text"><text:s text:c="12"/>factors['components']['user_frequency'] = 0.7 <text:s/># Reduce sensitivity 30%</text:p>
      <text:p text:style-name="Preformatted_20_Text"><text:s text:c="8"/></text:p>
      <text:p text:style-name="Preformatted_20_Text"><text:s text:c="8"/># 2. Contextual pattern</text:p>
      <text:p text:style-name="Preformatted_20_Text"><text:s text:c="8"/>if fp_entry.get('recurring_context'):</text:p>
      <text:p text:style-name="Preformatted_20_Text"><text:s text:c="12"/>factors['components']['context_pattern'] = 0.8 <text:s/># Reduce 20% in this context</text:p>
      <text:p text:style-name="Preformatted_20_Text"><text:s text:c="8"/></text:p>
      <text:p text:style-name="Preformatted_20_Text"><text:s text:c="8"/># 3. Time of day/week pattern</text:p>
      <text:p text:style-name="Preformatted_20_Text"><text:s text:c="8"/>if self.is_time_pattern(fp_entry):</text:p>
      <text:p text:style-name="Preformatted_20_Text"><text:s text:c="12"/>factors['components']['time_pattern'] = 0.85</text:p>
      <text:p text:style-name="Preformatted_20_Text"><text:soft-page-break/><text:s text:c="8"/></text:p>
      <text:p text:style-name="Preformatted_20_Text"><text:s text:c="8"/># 4. Linguistic pattern</text:p>
      <text:p text:style-name="Preformatted_20_Text"><text:s text:c="8"/>if fp_entry.get('linguistic_pattern'):</text:p>
      <text:p text:style-name="Preformatted_20_Text"><text:s text:c="12"/>factors['components']['linguistic_pattern'] = 0.9</text:p>
      <text:p text:style-name="Preformatted_20_Text"><text:s text:c="8"/></text:p>
      <text:p text:style-name="Preformatted_20_Text"><text:s text:c="8"/># Calculate final multiplier</text:p>
      <text:p text:style-name="Preformatted_20_Text"><text:s text:c="8"/>if factors['components']:</text:p>
      <text:p text:style-name="Preformatted_20_Text"><text:s text:c="12"/>factors['multiplier'] = np.mean(list(factors['components'].values()))</text:p>
      <text:p text:style-name="Preformatted_20_Text"><text:s text:c="8"/>else:</text:p>
      <text:p text:style-name="Preformatted_20_Text"><text:s text:c="12"/>factors['multiplier'] = 0.95 <text:s/># Slight reduction by default</text:p>
      <text:p text:style-name="Preformatted_20_Text"><text:s text:c="8"/></text:p>
      <text:p text:style-name="Preformatted_20_Text"><text:s text:c="8"/>return factors</text:p>
      <text:p text:style-name="Preformatted_20_Text"><text:s text:c="4"/></text:p>
      <text:p text:style-name="Preformatted_20_Text"><text:s text:c="4"/>def apply_context_specific_adjustments(self, pattern_type, context):</text:p>
      <text:p text:style-name="Preformatted_20_Text"><text:s text:c="8"/>"""</text:p>
      <text:p text:style-name="Preformatted_20_Text"><text:s text:c="8"/>Apply different sensitivity levels in different contexts</text:p>
      <text:p text:style-name="Preformatted_20_Text"><text:s text:c="8"/>"""</text:p>
      <text:p text:style-name="Preformatted_20_Text"><text:s text:c="8"/>context_adjustments = {</text:p>
      <text:p text:style-name="Preformatted_20_Text"><text:s text:c="12"/>'academic_discussion': 0.6, <text:s/># 40% less sensitive</text:p>
      <text:p text:style-name="Preformatted_20_Text"><text:s text:c="12"/>'literary_analysis': 0.5, <text:s text:c="4"/># 50% less sensitive</text:p>
      <text:p text:style-name="Preformatted_20_Text"><text:s text:c="12"/>'creative_writing': 0.4, <text:s text:c="5"/># 60% less sensitive</text:p>
      <text:p text:style-name="Preformatted_20_Text"><text:s text:c="12"/>'therapy_roleplay': 0.7, <text:s text:c="5"/># 30% less sensitive</text:p>
      <text:p text:style-name="Preformatted_20_Text"><text:s text:c="12"/>'professional_training': 0.65, # 35% less sensitive</text:p>
      <text:p text:style-name="Preformatted_20_Text"><text:s text:c="12"/>'humorous_context': 0.3, <text:s text:c="5"/># 70% less sensitive</text:p>
      <text:p text:style-name="Preformatted_20_Text"><text:s text:c="12"/>'metaphorical_usage': 0.4 <text:s text:c="4"/># 60% less sensitive</text:p>
      <text:p text:style-name="Preformatted_20_Text"><text:s text:c="8"/>}</text:p>
      <text:p text:style-name="Preformatted_20_Text"><text:s text:c="8"/></text:p>
      <text:p text:style-name="Preformatted_20_Text"><text:s text:c="8"/># Check if current context matches any adjustment</text:p>
      <text:p text:style-name="Preformatted_20_Text"><text:s text:c="8"/>for context_type, adjustment in context_adjustments.items():</text:p>
      <text:p text:style-name="Preformatted_20_Text"><text:s text:c="12"/>if self.context_matches(context, context_type):</text:p>
      <text:p text:style-name="Preformatted_20_Text"><text:s text:c="16"/>return self.sensitivity_levels[pattern_type] * adjustment</text:p>
      <text:p text:style-name="Preformatted_20_Text"><text:s text:c="8"/></text:p>
      <text:p text:style-name="P8"><text:s text:c="8"/>return self.sensitivity_levels[pattern_type]</text:p>
      <text:h text:style-name="Heading_20_2" text:outline-level="2"><text:span text:style-name="Strong_20_Emphasis">4. User-Specific Baseline Development</text:span></text:h>
      <text:h text:style-name="Heading_20_3" text:outline-level="3"><text:span text:style-name="Strong_20_Emphasis">A. Individual Communication Profile</text:span></text:h>
      <text:p text:style-name="Text_20_body">python</text:p>
      <text:p text:style-name="Preformatted_20_Text">class UserCommunicationProfile:</text:p>
      <text:p text:style-name="Preformatted_20_Text"><text:s text:c="4"/>def __init__(self, user_id):</text:p>
      <text:p text:style-name="Preformatted_20_Text"><text:s text:c="8"/>self.user_id = user_id</text:p>
      <text:p text:style-name="Preformatted_20_Text"><text:s text:c="8"/>self.communication_patterns = {}</text:p>
      <text:p text:style-name="Preformatted_20_Text"><text:s text:c="8"/>self.false_positive_history = []</text:p>
      <text:p text:style-name="Preformatted_20_Text"><text:s text:c="8"/>self.linguistic_quirks = {}</text:p>
      <text:p text:style-name="Preformatted_20_Text"><text:s text:c="8"/>self.context_preferences = {}</text:p>
      <text:p text:style-name="Preformatted_20_Text"><text:s text:c="8"/>self.learning_updates = []</text:p>
      <text:p text:style-name="Preformatted_20_Text"><text:s text:c="4"/></text:p>
      <text:p text:style-name="Preformatted_20_Text"><text:s text:c="4"/>def update_from_interaction(self, interaction):</text:p>
      <text:p text:style-name="Preformatted_20_Text"><text:s text:c="8"/>"""</text:p>
      <text:p text:style-name="Preformatted_20_Text"><text:s text:c="8"/>Learn user's communication style from each interaction</text:p>
      <text:p text:style-name="Preformatted_20_Text"><text:s text:c="8"/>"""</text:p>
      <text:p text:style-name="Preformatted_20_Text"><text:s text:c="8"/># Analyze linguistic patterns</text:p>
      <text:p text:style-name="Preformatted_20_Text"><text:s text:c="8"/>self.analyze_linguistic_patterns(interaction['text'])</text:p>
      <text:p text:style-name="Preformatted_20_Text"><text:s text:c="8"/></text:p>
      <text:p text:style-name="Preformatted_20_Text"><text:s text:c="8"/># Track context preferences</text:p>
      <text:p text:style-name="Preformatted_20_Text"><text:s text:c="8"/>self.update_context_preferences(interaction['context'])</text:p>
      <text:p text:style-name="Preformatted_20_Text"><text:s text:c="8"/></text:p>
      <text:p text:style-name="Preformatted_20_Text"><text:s text:c="8"/># Update false positive patterns</text:p>
      <text:p text:style-name="Preformatted_20_Text"><text:soft-page-break/><text:s text:c="8"/>if interaction.get('false_positive'):</text:p>
      <text:p text:style-name="Preformatted_20_Text"><text:s text:c="12"/>self.update_fp_patterns(interaction)</text:p>
      <text:p text:style-name="Preformatted_20_Text"><text:s text:c="8"/></text:p>
      <text:p text:style-name="Preformatted_20_Text"><text:s text:c="8"/># Generate personalized adjustments</text:p>
      <text:p text:style-name="Preformatted_20_Text"><text:s text:c="8"/>adjustments = self.generate_personalized_adjustments()</text:p>
      <text:p text:style-name="Preformatted_20_Text"><text:s text:c="8"/></text:p>
      <text:p text:style-name="Preformatted_20_Text"><text:s text:c="8"/>return adjustments</text:p>
      <text:p text:style-name="Preformatted_20_Text"><text:s text:c="4"/></text:p>
      <text:p text:style-name="Preformatted_20_Text"><text:s text:c="4"/>def generate_personalized_adjustments(self):</text:p>
      <text:p text:style-name="Preformatted_20_Text"><text:s text:c="8"/>"""</text:p>
      <text:p text:style-name="Preformatted_20_Text"><text:s text:c="8"/>Create user-specific sensitivity adjustments</text:p>
      <text:p text:style-name="Preformatted_20_Text"><text:s text:c="8"/>"""</text:p>
      <text:p text:style-name="Preformatted_20_Text"><text:s text:c="8"/>adjustments = {}</text:p>
      <text:p text:style-name="Preformatted_20_Text"><text:s text:c="8"/></text:p>
      <text:p text:style-name="Preformatted_20_Text"><text:s text:c="8"/># 1. Metaphor usage adjustment</text:p>
      <text:p text:style-name="Preformatted_20_Text"><text:s text:c="8"/>if self.linguistic_quirks.get('metaphor_frequency', 0) &gt; 0.3:</text:p>
      <text:p text:style-name="Preformatted_20_Text"><text:s text:c="12"/>adjustments['metaphor_sensitivity'] = 0.6 <text:s/># Lower sensitivity</text:p>
      <text:p text:style-name="Preformatted_20_Text"><text:s text:c="8"/></text:p>
      <text:p text:style-name="Preformatted_20_Text"><text:s text:c="8"/># 2. Humor style adjustment</text:p>
      <text:p text:style-name="Preformatted_20_Text"><text:s text:c="8"/>if self.linguistic_quirks.get('sarcasm_frequency', 0) &gt; 0.2:</text:p>
      <text:p text:style-name="Preformatted_20_Text"><text:s text:c="12"/>adjustments['literal_interpretation'] = 0.7</text:p>
      <text:p text:style-name="Preformatted_20_Text"><text:s text:c="8"/></text:p>
      <text:p text:style-name="Preformatted_20_Text"><text:s text:c="8"/># 3. Academic/professional context adjustment</text:p>
      <text:p text:style-name="Preformatted_20_Text"><text:s text:c="8"/>if self.context_preferences.get('academic_context', 0) &gt; 0.4:</text:p>
      <text:p text:style-name="Preformatted_20_Text"><text:s text:c="12"/>adjustments['crisis_keyword_sensitivity'] = 0.5</text:p>
      <text:p text:style-name="Preformatted_20_Text"><text:s text:c="8"/></text:p>
      <text:p text:style-name="Preformatted_20_Text"><text:s text:c="8"/># 4. Creative expression adjustment</text:p>
      <text:p text:style-name="Preformatted_20_Text"><text:s text:c="8"/>if self.context_preferences.get('creative_context', 0) &gt; 0.3:</text:p>
      <text:p text:style-name="Preformatted_20_Text"><text:s text:c="12"/>adjustments['emotional_language_sensitivity'] = 0.4</text:p>
      <text:p text:style-name="Preformatted_20_Text"><text:s text:c="8"/></text:p>
      <text:p text:style-name="Preformatted_20_Text"><text:s text:c="8"/>return adjustments</text:p>
      <text:p text:style-name="Preformatted_20_Text"><text:s text:c="4"/></text:p>
      <text:p text:style-name="Preformatted_20_Text"><text:s text:c="4"/>def predict_false_positive_risk(self, text, pattern_type):</text:p>
      <text:p text:style-name="Preformatted_20_Text"><text:s text:c="8"/>"""</text:p>
      <text:p text:style-name="Preformatted_20_Text"><text:s text:c="8"/>Predict likelihood of false positive for this user</text:p>
      <text:p text:style-name="Preformatted_20_Text"><text:s text:c="8"/>"""</text:p>
      <text:p text:style-name="Preformatted_20_Text"><text:s text:c="8"/>risk_score = 0.0</text:p>
      <text:p text:style-name="Preformatted_20_Text"><text:s text:c="8"/></text:p>
      <text:p text:style-name="Preformatted_20_Text"><text:s text:c="8"/># Check user's history with this pattern</text:p>
      <text:p text:style-name="Preformatted_20_Text"><text:s text:c="8"/>user_fp_rate = self.get_fp_rate_for_pattern(pattern_type)</text:p>
      <text:p text:style-name="Preformatted_20_Text"><text:s text:c="8"/>risk_score += user_fp_rate * 0.4</text:p>
      <text:p text:style-name="Preformatted_20_Text"><text:s text:c="8"/></text:p>
      <text:p text:style-name="Preformatted_20_Text"><text:s text:c="8"/># Check linguistic patterns</text:p>
      <text:p text:style-name="Preformatted_20_Text"><text:s text:c="8"/>if self.matches_known_fp_linguistic_pattern(text):</text:p>
      <text:p text:style-name="Preformatted_20_Text"><text:s text:c="12"/>risk_score += 0.3</text:p>
      <text:p text:style-name="Preformatted_20_Text"><text:s text:c="8"/></text:p>
      <text:p text:style-name="Preformatted_20_Text"><text:s text:c="8"/># Check context patterns</text:p>
      <text:p text:style-name="Preformatted_20_Text"><text:s text:c="8"/>current_context = self.get_current_context()</text:p>
      <text:p text:style-name="Preformatted_20_Text"><text:s text:c="8"/>if current_context in self.context_preferences:</text:p>
      <text:p text:style-name="Preformatted_20_Text"><text:s text:c="12"/>context_risk = self.context_preferences[current_context].get('fp_risk', 0)</text:p>
      <text:p text:style-name="Preformatted_20_Text"><text:s text:c="12"/>risk_score += context_risk * 0.3</text:p>
      <text:p text:style-name="Preformatted_20_Text"><text:s text:c="8"/></text:p>
      <text:p text:style-name="P8"><text:s text:c="8"/>return min(risk_score, 1.0)</text:p>
      <text:h text:style-name="Heading_20_3" text:outline-level="3"><text:span text:style-name="Strong_20_Emphasis">B. Community Learning (Anonymized Aggregation)</text:span></text:h>
      <text:p text:style-name="Text_20_body">python</text:p>
      <text:p text:style-name="Preformatted_20_Text">class CommunityLearningSystem:</text:p>
      <text:p text:style-name="Preformatted_20_Text"><text:s text:c="4"/>def __init__(self):</text:p>
      <text:p text:style-name="Preformatted_20_Text"><text:s text:c="8"/>self.anonymized_patterns = {}</text:p>
      <text:p text:style-name="Preformatted_20_Text"><text:s text:c="8"/>self.cultural_nuance_corpus = {}</text:p>
      <text:p text:style-name="Preformatted_20_Text"><text:soft-page-break/><text:s text:c="8"/>self.regional_linguistic_patterns = {}</text:p>
      <text:p text:style-name="Preformatted_20_Text"><text:s text:c="4"/></text:p>
      <text:p text:style-name="Preformatted_20_Text"><text:s text:c="4"/>def aggregate_false_positives(self, fp_data):</text:p>
      <text:p text:style-name="Preformatted_20_Text"><text:s text:c="8"/>"""</text:p>
      <text:p text:style-name="Preformatted_20_Text"><text:s text:c="8"/>Aggregate anonymized false positive data for community learning</text:p>
      <text:p text:style-name="Preformatted_20_Text"><text:s text:c="8"/>"""</text:p>
      <text:p text:style-name="Preformatted_20_Text"><text:s text:c="8"/># Remove identifying information</text:p>
      <text:p text:style-name="Preformatted_20_Text"><text:s text:c="8"/>anonymized = self.anonymize_data(fp_data)</text:p>
      <text:p text:style-name="Preformatted_20_Text"><text:s text:c="8"/></text:p>
      <text:p text:style-name="Preformatted_20_Text"><text:s text:c="8"/># Extract patterns</text:p>
      <text:p text:style-name="Preformatted_20_Text"><text:s text:c="8"/>pattern_key = self.create_pattern_key(anonymized)</text:p>
      <text:p text:style-name="Preformatted_20_Text"><text:s text:c="8"/></text:p>
      <text:p text:style-name="Preformatted_20_Text"><text:s text:c="8"/># Update aggregation</text:p>
      <text:p text:style-name="Preformatted_20_Text"><text:s text:c="8"/>if pattern_key not in self.anonymized_patterns:</text:p>
      <text:p text:style-name="Preformatted_20_Text"><text:s text:c="12"/>self.anonymized_patterns[pattern_key] = {</text:p>
      <text:p text:style-name="Preformatted_20_Text"><text:s text:c="16"/>'count': 0,</text:p>
      <text:p text:style-name="Preformatted_20_Text"><text:s text:c="16"/>'examples': [],</text:p>
      <text:p text:style-name="Preformatted_20_Text"><text:s text:c="16"/>'adjustments_suggested': []</text:p>
      <text:p text:style-name="Preformatted_20_Text"><text:s text:c="12"/>}</text:p>
      <text:p text:style-name="Preformatted_20_Text"><text:s text:c="8"/></text:p>
      <text:p text:style-name="Preformatted_20_Text"><text:s text:c="8"/>self.anonymized_patterns[pattern_key]['count'] += 1</text:p>
      <text:p text:style-name="Preformatted_20_Text"><text:s text:c="8"/>self.anonymized_patterns[pattern_key]['examples'].append(anonymized)</text:p>
      <text:p text:style-name="Preformatted_20_Text"><text:s text:c="8"/></text:p>
      <text:p text:style-name="Preformatted_20_Text"><text:s text:c="8"/># Generate community adjustments</text:p>
      <text:p text:style-name="Preformatted_20_Text"><text:s text:c="8"/>if self.anonymized_patterns[pattern_key]['count'] &gt;= 5:</text:p>
      <text:p text:style-name="Preformatted_20_Text"><text:s text:c="12"/>adjustments = self.generate_community_adjustments(pattern_key)</text:p>
      <text:p text:style-name="Preformatted_20_Text"><text:s text:c="12"/>self.anonymized_patterns[pattern_key]['adjustments_suggested'].append(adjustments)</text:p>
      <text:p text:style-name="Preformatted_20_Text"><text:s text:c="12"/></text:p>
      <text:p text:style-name="Preformatted_20_Text"><text:s text:c="12"/>return adjustments</text:p>
      <text:p text:style-name="Preformatted_20_Text"><text:s text:c="8"/></text:p>
      <text:p text:style-name="Preformatted_20_Text"><text:s text:c="8"/>return None</text:p>
      <text:p text:style-name="Preformatted_20_Text"><text:s text:c="4"/></text:p>
      <text:p text:style-name="Preformatted_20_Text"><text:s text:c="4"/>def generate_community_adjustments(self, pattern_key):</text:p>
      <text:p text:style-name="Preformatted_20_Text"><text:s text:c="8"/>"""</text:p>
      <text:p text:style-name="Preformatted_20_Text"><text:s text:c="8"/>Create adjustments based on community-wide patterns</text:p>
      <text:p text:style-name="Preformatted_20_Text"><text:s text:c="8"/>"""</text:p>
      <text:p text:style-name="Preformatted_20_Text"><text:s text:c="8"/>pattern_data = self.anonymized_patterns[pattern_key]</text:p>
      <text:p text:style-name="Preformatted_20_Text"><text:s text:c="8"/></text:p>
      <text:p text:style-name="Preformatted_20_Text"><text:s text:c="8"/>adjustments = {</text:p>
      <text:p text:style-name="Preformatted_20_Text"><text:s text:c="12"/>'pattern_type': pattern_data['examples'][0]['pattern_type'],</text:p>
      <text:p text:style-name="Preformatted_20_Text"><text:s text:c="12"/>'common_context': self.find_common_context(pattern_data['examples']),</text:p>
      <text:p text:style-name="Preformatted_20_Text"><text:s text:c="12"/>'linguistic_pattern': self.find_linguistic_pattern(pattern_data['examples']),</text:p>
      <text:p text:style-name="Preformatted_20_Text"><text:s text:c="12"/>'recommended_sensitivity_adjustment': self.calculate_recommended_adjustment(</text:p>
      <text:p text:style-name="Preformatted_20_Text"><text:s text:c="16"/>pattern_data['count']</text:p>
      <text:p text:style-name="Preformatted_20_Text"><text:s text:c="12"/>),</text:p>
      <text:p text:style-name="Preformatted_20_Text"><text:s text:c="12"/>'verification_strategy': self.recommend_verification_strategy(</text:p>
      <text:p text:style-name="Preformatted_20_Text"><text:s text:c="16"/>pattern_data['examples']</text:p>
      <text:p text:style-name="Preformatted_20_Text"><text:s text:c="12"/>),</text:p>
      <text:p text:style-name="Preformatted_20_Text"><text:s text:c="12"/>'applicable_cultures': self.identify_cultural_patterns(</text:p>
      <text:p text:style-name="Preformatted_20_Text"><text:s text:c="16"/>pattern_data['examples']</text:p>
      <text:p text:style-name="Preformatted_20_Text"><text:s text:c="12"/>)</text:p>
      <text:p text:style-name="Preformatted_20_Text"><text:s text:c="8"/>}</text:p>
      <text:p text:style-name="Preformatted_20_Text"><text:s text:c="8"/></text:p>
      <text:p text:style-name="P8"><text:s text:c="8"/>return adjustments</text:p>
      <text:h text:style-name="Heading_20_2" text:outline-level="2"><text:soft-page-break/><text:span text:style-name="Strong_20_Emphasis">5. Integration with Conflict Resolution System</text:span></text:h>
      <text:h text:style-name="Heading_20_3" text:outline-level="3"><text:span text:style-name="Strong_20_Emphasis">A. Enhanced Coherence Arbitration with FP Awareness</text:span></text:h>
      <text:p text:style-name="Text_20_body">python</text:p>
      <text:p text:style-name="Preformatted_20_Text">class FPAwareCoherenceArbitrator(CoherenceArbitrator):</text:p>
      <text:p text:style-name="Preformatted_20_Text"><text:s text:c="4"/>def __init__(self):</text:p>
      <text:p text:style-name="Preformatted_20_Text"><text:s text:c="8"/>super().__init__()</text:p>
      <text:p text:style-name="Preformatted_20_Text"><text:s text:c="8"/>self.fp_guard = FalsePositiveGuard()</text:p>
      <text:p text:style-name="Preformatted_20_Text"><text:s text:c="8"/>self.context_intelligence = ContextIntelligence()</text:p>
      <text:p text:style-name="Preformatted_20_Text"><text:s text:c="8"/>self.fp_learner = FalsePositiveLearner()</text:p>
      <text:p text:style-name="Preformatted_20_Text"><text:s text:c="4"/></text:p>
      <text:p text:style-name="Preformatted_20_Text"><text:s text:c="4"/>def process_assessments_with_fp_awareness(self, user_input, context):</text:p>
      <text:p text:style-name="Preformatted_20_Text"><text:s text:c="8"/>"""</text:p>
      <text:p text:style-name="Preformatted_20_Text"><text:s text:c="8"/>Main assessment processing with false positive mitigation</text:p>
      <text:p text:style-name="Preformatted_20_Text"><text:s text:c="8"/>"""</text:p>
      <text:p text:style-name="Preformatted_20_Text"><text:s text:c="8"/># 1. Get initial assessments</text:p>
      <text:p text:style-name="Preformatted_20_Text"><text:s text:c="8"/>assessments = self.collect_assessments(user_input, context)</text:p>
      <text:p text:style-name="Preformatted_20_Text"><text:s text:c="8"/></text:p>
      <text:p text:style-name="Preformatted_20_Text"><text:s text:c="8"/># 2. Apply false positive risk assessment</text:p>
      <text:p text:style-name="Preformatted_20_Text"><text:s text:c="8"/>fp_risk_scores = {}</text:p>
      <text:p text:style-name="Preformatted_20_Text"><text:s text:c="8"/>for protocol, data in assessments.items():</text:p>
      <text:p text:style-name="Preformatted_20_Text"><text:s text:c="12"/>fp_risk = self.assess_false_positive_risk(</text:p>
      <text:p text:style-name="Preformatted_20_Text"><text:s text:c="16"/>protocol, data, user_input, context</text:p>
      <text:p text:style-name="Preformatted_20_Text"><text:s text:c="12"/>)</text:p>
      <text:p text:style-name="Preformatted_20_Text"><text:s text:c="12"/>fp_risk_scores[protocol] = fp_risk</text:p>
      <text:p text:style-name="Preformatted_20_Text"><text:s text:c="12"/></text:p>
      <text:p text:style-name="Preformatted_20_Text"><text:s text:c="12"/># Adjust confidence based on FP risk</text:p>
      <text:p text:style-name="Preformatted_20_Text"><text:s text:c="12"/>if 'confidence' in data:</text:p>
      <text:p text:style-name="Preformatted_20_Text"><text:s text:c="16"/>data['confidence'] = data['confidence'] * (1 - fp_risk)</text:p>
      <text:p text:style-name="Preformatted_20_Text"><text:s text:c="8"/></text:p>
      <text:p text:style-name="Preformatted_20_Text"><text:s text:c="8"/># 3. Check for high FP risk protocols</text:p>
      <text:p text:style-name="Preformatted_20_Text"><text:s text:c="8"/>high_fp_risk = [p for p, r in fp_risk_scores.items() if r &gt; 0.7]</text:p>
      <text:p text:style-name="Preformatted_20_Text"><text:s text:c="8"/>if high_fp_risk:</text:p>
      <text:p text:style-name="Preformatted_20_Text"><text:s text:c="12"/>return self.handle_high_fp_risk(</text:p>
      <text:p text:style-name="Preformatted_20_Text"><text:s text:c="16"/>assessments, high_fp_risk, user_input, context</text:p>
      <text:p text:style-name="Preformatted_20_Text"><text:s text:c="12"/>)</text:p>
      <text:p text:style-name="Preformatted_20_Text"><text:s text:c="8"/></text:p>
      <text:p text:style-name="Preformatted_20_Text"><text:s text:c="8"/># 4. Normal conflict resolution (from parent class)</text:p>
      <text:p text:style-name="Preformatted_20_Text"><text:s text:c="8"/>return super().process_assessments(user_input, context)</text:p>
      <text:p text:style-name="Preformatted_20_Text"><text:s text:c="4"/></text:p>
      <text:p text:style-name="Preformatted_20_Text"><text:s text:c="4"/>def assess_false_positive_risk(self, protocol, data, user_input, context):</text:p>
      <text:p text:style-name="Preformatted_20_Text"><text:s text:c="8"/>"""</text:p>
      <text:p text:style-name="Preformatted_20_Text"><text:s text:c="8"/>Calculate risk of false positive for this assessment</text:p>
      <text:p text:style-name="Preformatted_20_Text"><text:s text:c="8"/>"""</text:p>
      <text:p text:style-name="Preformatted_20_Text"><text:s text:c="8"/>risk_factors = []</text:p>
      <text:p text:style-name="Preformatted_20_Text"><text:s text:c="8"/></text:p>
      <text:p text:style-name="Preformatted_20_Text"><text:s text:c="8"/># 1. Contextual risk</text:p>
      <text:p text:style-name="Preformatted_20_Text"><text:s text:c="8"/>context_risk = self.context_intelligence.analyze_contextual_false_positive_risk(</text:p>
      <text:p text:style-name="Preformatted_20_Text"><text:s text:c="12"/>user_input, data.get('pattern_type', 'unknown'), context</text:p>
      <text:p text:style-name="Preformatted_20_Text"><text:s text:c="8"/>)</text:p>
      <text:p text:style-name="Preformatted_20_Text"><text:s text:c="8"/>risk_factors.append(context_risk * 0.4)</text:p>
      <text:p text:style-name="Preformatted_20_Text"><text:s text:c="8"/></text:p>
      <text:p text:style-name="Preformatted_20_Text"><text:s text:c="8"/># 2. User-specific risk (if user known)</text:p>
      <text:p text:style-name="Preformatted_20_Text"><text:s text:c="8"/>if context.get('user_id'):</text:p>
      <text:p text:style-name="Preformatted_20_Text"><text:s text:c="12"/>user_profile = self.get_user_profile(context['user_id'])</text:p>
      <text:p text:style-name="Preformatted_20_Text"><text:s text:c="12"/>user_risk = user_profile.predict_false_positive_risk(</text:p>
      <text:p text:style-name="Preformatted_20_Text"><text:s text:c="16"/>user_input, data.get('pattern_type', 'unknown')</text:p>
      <text:p text:style-name="Preformatted_20_Text"><text:s text:c="12"/>)</text:p>
      <text:p text:style-name="Preformatted_20_Text"><text:s text:c="12"/>risk_factors.append(user_risk * 0.3)</text:p>
      <text:p text:style-name="Preformatted_20_Text"><text:s text:c="8"/></text:p>
      <text:p text:style-name="Preformatted_20_Text"><text:soft-page-break/><text:s text:c="8"/># 3. Linguistic nuance risk</text:p>
      <text:p text:style-name="Preformatted_20_Text"><text:s text:c="8"/>linguistic_risk = self.analyze_linguistic_nuance_risk(user_input, data)</text:p>
      <text:p text:style-name="Preformatted_20_Text"><text:s text:c="8"/>risk_factors.append(linguistic_risk * 0.3)</text:p>
      <text:p text:style-name="Preformatted_20_Text"><text:s text:c="8"/></text:p>
      <text:p text:style-name="Preformatted_20_Text"><text:s text:c="8"/># Calculate weighted risk</text:p>
      <text:p text:style-name="Preformatted_20_Text"><text:s text:c="8"/>if risk_factors:</text:p>
      <text:p text:style-name="Preformatted_20_Text"><text:s text:c="12"/>return sum(risk_factors) / len(risk_factors)</text:p>
      <text:p text:style-name="Preformatted_20_Text"><text:s text:c="8"/>return 0.0</text:p>
      <text:p text:style-name="Preformatted_20_Text"><text:s text:c="4"/></text:p>
      <text:p text:style-name="Preformatted_20_Text"><text:s text:c="4"/>def handle_high_fp_risk(self, assessments, high_risk_protocols, user_input, context):</text:p>
      <text:p text:style-name="Preformatted_20_Text"><text:s text:c="8"/>"""</text:p>
      <text:p text:style-name="Preformatted_20_Text"><text:s text:c="8"/>Special handling when FP risk is high</text:p>
      <text:p text:style-name="Preformatted_20_Text"><text:s text:c="8"/>"""</text:p>
      <text:p text:style-name="Preformatted_20_Text"><text:s text:c="8"/># Generate verification questions</text:p>
      <text:p text:style-name="Preformatted_20_Text"><text:s text:c="8"/>verification_questions = []</text:p>
      <text:p text:style-name="Preformatted_20_Text"><text:s text:c="8"/>for protocol in high_risk_protocols:</text:p>
      <text:p text:style-name="Preformatted_20_Text"><text:s text:c="12"/>question = self.context_intelligence.generate_verification_question(</text:p>
      <text:p text:style-name="Preformatted_20_Text"><text:s text:c="16"/>user_input, </text:p>
      <text:p text:style-name="Preformatted_20_Text"><text:s text:c="16"/>assessments[protocol].get('pattern_type', 'unknown'),</text:p>
      <text:p text:style-name="Preformatted_20_Text"><text:s text:c="16"/>fp_risk_scores[protocol]</text:p>
      <text:p text:style-name="Preformatted_20_Text"><text:s text:c="12"/>)</text:p>
      <text:p text:style-name="Preformatted_20_Text"><text:s text:c="12"/>verification_questions.append(question)</text:p>
      <text:p text:style-name="Preformatted_20_Text"><text:s text:c="8"/></text:p>
      <text:p text:style-name="Preformatted_20_Text"><text:s text:c="8"/># Create verification response</text:p>
      <text:p text:style-name="Preformatted_20_Text"><text:s text:c="8"/>response = {</text:p>
      <text:p text:style-name="Preformatted_20_Text"><text:s text:c="12"/>'status': 'verification_needed',</text:p>
      <text:p text:style-name="Preformatted_20_Text"><text:s text:c="12"/>'assessments': assessments,</text:p>
      <text:p text:style-name="Preformatted_20_Text"><text:s text:c="12"/>'high_fp_risk_protocols': high_risk_protocols,</text:p>
      <text:p text:style-name="Preformatted_20_Text"><text:s text:c="12"/>'verification_questions': verification_questions,</text:p>
      <text:p text:style-name="Preformatted_20_Text"><text:s text:c="12"/>'recommended_approach': 'verify_before_acting',</text:p>
      <text:p text:style-name="Preformatted_20_Text"><text:s text:c="12"/>'note': 'High false positive risk detected. Seeking clarification.'</text:p>
      <text:p text:style-name="Preformatted_20_Text"><text:s text:c="8"/>}</text:p>
      <text:p text:style-name="Preformatted_20_Text"><text:s text:c="8"/></text:p>
      <text:p text:style-name="P8"><text:s text:c="8"/>return response</text:p>
      <text:h text:style-name="Heading_20_3" text:outline-level="3"><text:span text:style-name="Strong_20_Emphasis">B. Post-Response False Positive Analysis</text:span></text:h>
      <text:p text:style-name="Text_20_body">python</text:p>
      <text:p text:style-name="Preformatted_20_Text">class PostInteractionAnalyzer:</text:p>
      <text:p text:style-name="Preformatted_20_Text"><text:s text:c="4"/>def __init__(self):</text:p>
      <text:p text:style-name="Preformatted_20_Text"><text:s text:c="8"/>self.interaction_log = []</text:p>
      <text:p text:style-name="Preformatted_20_Text"><text:s text:c="8"/>self.fp_detection_queue = []</text:p>
      <text:p text:style-name="Preformatted_20_Text"><text:s text:c="4"/></text:p>
      <text:p text:style-name="Preformatted_20_Text"><text:s text:c="4"/>def analyze_interaction_outcome(self, interaction_data):</text:p>
      <text:p text:style-name="Preformatted_20_Text"><text:s text:c="8"/>"""</text:p>
      <text:p text:style-name="Preformatted_20_Text"><text:s text:c="8"/>Analyze whether detection was accurate or false positive</text:p>
      <text:p text:style-name="Preformatted_20_Text"><text:s text:c="8"/>"""</text:p>
      <text:p text:style-name="Preformatted_20_Text"><text:s text:c="8"/>outcome_indicators = self.extract_outcome_indicators(interaction_data)</text:p>
      <text:p text:style-name="Preformatted_20_Text"><text:s text:c="8"/></text:p>
      <text:p text:style-name="Preformatted_20_Text"><text:s text:c="8"/># Check for false positive indicators</text:p>
      <text:p text:style-name="Preformatted_20_Text"><text:s text:c="8"/>if self.detect_false_positive_indicators(outcome_indicators):</text:p>
      <text:p text:style-name="Preformatted_20_Text"><text:s text:c="12"/>fp_data = self.compile_false_positive_data(interaction_data)</text:p>
      <text:p text:style-name="Preformatted_20_Text"><text:s text:c="12"/></text:p>
      <text:p text:style-name="Preformatted_20_Text"><text:s text:c="12"/># Send to learning systems</text:p>
      <text:p text:style-name="Preformatted_20_Text"><text:s text:c="12"/>self.fp_learner.record_false_positive(fp_data)</text:p>
      <text:p text:style-name="Preformatted_20_Text"><text:s text:c="12"/>self.community_learning.aggregate_false_positives(fp_data)</text:p>
      <text:p text:style-name="Preformatted_20_Text"><text:s text:c="12"/></text:p>
      <text:p text:style-name="Preformatted_20_Text"><text:s text:c="12"/># Generate immediate adjustment</text:p>
      <text:p text:style-name="Preformatted_20_Text"><text:s text:c="12"/>adjustment = self.generate_immediate_adjustment(fp_data)</text:p>
      <text:p text:style-name="Preformatted_20_Text"><text:s text:c="12"/></text:p>
      <text:p text:style-name="Preformatted_20_Text"><text:s text:c="12"/>return {</text:p>
      <text:p text:style-name="Preformatted_20_Text"><text:soft-page-break/><text:s text:c="16"/>'outcome': 'false_positive_detected',</text:p>
      <text:p text:style-name="Preformatted_20_Text"><text:s text:c="16"/>'fp_data': fp_data,</text:p>
      <text:p text:style-name="Preformatted_20_Text"><text:s text:c="16"/>'adjustments': adjustment,</text:p>
      <text:p text:style-name="Preformatted_20_Text"><text:s text:c="16"/>'learning_applied': True</text:p>
      <text:p text:style-name="Preformatted_20_Text"><text:s text:c="12"/>}</text:p>
      <text:p text:style-name="Preformatted_20_Text"><text:s text:c="8"/></text:p>
      <text:p text:style-name="Preformatted_20_Text"><text:s text:c="8"/># Check for true positive confirmation</text:p>
      <text:p text:style-name="Preformatted_20_Text"><text:s text:c="8"/>elif self.detect_true_positive_confirmation(outcome_indicators):</text:p>
      <text:p text:style-name="Preformatted_20_Text"><text:s text:c="12"/>return {</text:p>
      <text:p text:style-name="Preformatted_20_Text"><text:s text:c="16"/>'outcome': 'true_positive_confirmed',</text:p>
      <text:p text:style-name="Preformatted_20_Text"><text:s text:c="16"/>'confidence_boost': 0.1,</text:p>
      <text:p text:style-name="Preformatted_20_Text"><text:s text:c="16"/>'pattern_strengthened': True</text:p>
      <text:p text:style-name="Preformatted_20_Text"><text:s text:c="12"/>}</text:p>
      <text:p text:style-name="Preformatted_20_Text"><text:s text:c="8"/></text:p>
      <text:p text:style-name="Preformatted_20_Text"><text:s text:c="8"/># Ambiguous outcome</text:p>
      <text:p text:style-name="Preformatted_20_Text"><text:s text:c="8"/>else:</text:p>
      <text:p text:style-name="Preformatted_20_Text"><text:s text:c="12"/>return {</text:p>
      <text:p text:style-name="Preformatted_20_Text"><text:s text:c="16"/>'outcome': 'unclear_requires_more_data',</text:p>
      <text:p text:style-name="Preformatted_20_Text"><text:s text:c="16"/>'recommendation': 'monitor_similar_patterns'</text:p>
      <text:p text:style-name="Preformatted_20_Text"><text:s text:c="12"/>}</text:p>
      <text:p text:style-name="Preformatted_20_Text"><text:s text:c="4"/></text:p>
      <text:p text:style-name="Preformatted_20_Text"><text:s text:c="4"/>def extract_outcome_indicators(self, interaction_data):</text:p>
      <text:p text:style-name="Preformatted_20_Text"><text:s text:c="8"/>"""</text:p>
      <text:p text:style-name="Preformatted_20_Text"><text:s text:c="8"/>Extract signals about whether detection was accurate</text:p>
      <text:p text:style-name="Preformatted_20_Text"><text:s text:c="8"/>"""</text:p>
      <text:p text:style-name="Preformatted_20_Text"><text:s text:c="8"/>indicators = {}</text:p>
      <text:p text:style-name="Preformatted_20_Text"><text:s text:c="8"/></text:p>
      <text:p text:style-name="Preformatted_20_Text"><text:s text:c="8"/># User's explicit correction</text:p>
      <text:p text:style-name="Preformatted_20_Text"><text:s text:c="8"/>indicators['user_correction'] = self.extract_user_correction(</text:p>
      <text:p text:style-name="Preformatted_20_Text"><text:s text:c="12"/>interaction_data['user_response']</text:p>
      <text:p text:style-name="Preformatted_20_Text"><text:s text:c="8"/>)</text:p>
      <text:p text:style-name="Preformatted_20_Text"><text:s text:c="8"/></text:p>
      <text:p text:style-name="Preformatted_20_Text"><text:s text:c="8"/># User's emotional response to intervention</text:p>
      <text:p text:style-name="Preformatted_20_Text"><text:s text:c="8"/>indicators['emotional_response'] = self.analyze_emotional_response(</text:p>
      <text:p text:style-name="Preformatted_20_Text"><text:s text:c="12"/>interaction_data['user_response']</text:p>
      <text:p text:style-name="Preformatted_20_Text"><text:s text:c="8"/>)</text:p>
      <text:p text:style-name="Preformatted_20_Text"><text:s text:c="8"/></text:p>
      <text:p text:style-name="Preformatted_20_Text"><text:s text:c="8"/># Continuation of conversation</text:p>
      <text:p text:style-name="Preformatted_20_Text"><text:s text:c="8"/>indicators['conversation_flow'] = self.analyze_conversation_flow(</text:p>
      <text:p text:style-name="Preformatted_20_Text"><text:s text:c="12"/>interaction_data['full_conversation']</text:p>
      <text:p text:style-name="Preformatted_20_Text"><text:s text:c="8"/>)</text:p>
      <text:p text:style-name="Preformatted_20_Text"><text:s text:c="8"/></text:p>
      <text:p text:style-name="Preformatted_20_Text"><text:s text:c="8"/># Resolution or escalation</text:p>
      <text:p text:style-name="Preformatted_20_Text"><text:s text:c="8"/>indicators['resolution_state'] = self.assess_resolution_state(</text:p>
      <text:p text:style-name="Preformatted_20_Text"><text:s text:c="12"/>interaction_data</text:p>
      <text:p text:style-name="Preformatted_20_Text"><text:s text:c="8"/>)</text:p>
      <text:p text:style-name="Preformatted_20_Text"><text:s text:c="8"/></text:p>
      <text:p text:style-name="P8"><text:s text:c="8"/>return indicators</text:p>
      <text:h text:style-name="Heading_20_2" text:outline-level="2"><text:span text:style-name="Strong_20_Emphasis">6. Implementation Framework</text:span></text:h>
      <text:h text:style-name="Heading_20_3" text:outline-level="3"><text:span text:style-name="Strong_20_Emphasis">A. New Configuration Files</text:span></text:h>
      <text:p text:style-name="Text_20_body"><text:span text:style-name="Strong_20_Emphasis"><text:span text:style-name="Source_20_Text">false_positive_mitigation_config.json</text:span></text:span></text:p>
      <text:p text:style-name="Text_20_body">json</text:p>
      <text:p text:style-name="Preformatted_20_Text">{</text:p>
      <text:p text:style-name="Preformatted_20_Text"><text:s text:c="2"/>"verification_strategies": {</text:p>
      <text:p text:style-name="Preformatted_20_Text"><text:s text:c="4"/>"high_fp_risk": {</text:p>
      <text:p text:style-name="Preformatted_20_Text"><text:s text:c="6"/>"action": "ask_for_clarification",</text:p>
      <text:p text:style-name="Preformatted_20_Text"><text:s text:c="6"/>"tone": "curious_not_alarmed",</text:p>
      <text:p text:style-name="Preformatted_20_Text"><text:soft-page-break/><text:s text:c="6"/>"questions": [</text:p>
      <text:p text:style-name="Preformatted_20_Text"><text:s text:c="8"/>"Help me understand what you mean by...",</text:p>
      <text:p text:style-name="Preformatted_20_Text"><text:s text:c="8"/>"I want to make sure I'm following correctly...",</text:p>
      <text:p text:style-name="Preformatted_20_Text"><text:s text:c="8"/>"Can you tell me more about the context of...",</text:p>
      <text:p text:style-name="Preformatted_20_Text"><text:s text:c="8"/>"Is this something you're experiencing or discussing?"</text:p>
      <text:p text:style-name="Preformatted_20_Text"><text:s text:c="6"/>]</text:p>
      <text:p text:style-name="Preformatted_20_Text"><text:s text:c="4"/>},</text:p>
      <text:p text:style-name="Preformatted_20_Text"><text:s text:c="4"/>"medium_fp_risk": {</text:p>
      <text:p text:style-name="Preformatted_20_Text"><text:s text:c="6"/>"action": "soft_intervention_with_escape_hatch",</text:p>
      <text:p text:style-name="Preformatted_20_Text"><text:s text:c="6"/>"approach": "offer_support_without_assumption",</text:p>
      <text:p text:style-name="Preformatted_20_Text"><text:s text:c="6"/>"phrases": [</text:p>
      <text:p text:style-name="Preformatted_20_Text"><text:s text:c="8"/>"I hear you mentioning [topic]. If this is something you're experiencing, I'm here...",</text:p>
      <text:p text:style-name="Preformatted_20_Text"><text:s text:c="8"/>"Sometimes people talk about [topic] in different ways. If this is personal...",</text:p>
      <text:p text:style-name="Preformatted_20_Text"><text:s text:c="8"/>"I want to respond appropriately. If you're sharing something difficult..."</text:p>
      <text:p text:style-name="Preformatted_20_Text"><text:s text:c="6"/>]</text:p>
      <text:p text:style-name="Preformatted_20_Text"><text:s text:c="4"/>}</text:p>
      <text:p text:style-name="Preformatted_20_Text"><text:s text:c="2"/>},</text:p>
      <text:p text:style-name="Preformatted_20_Text"><text:s text:c="2"/></text:p>
      <text:p text:style-name="Preformatted_20_Text"><text:s text:c="2"/>"sensitivity_adjustment_rules": {</text:p>
      <text:p text:style-name="Preformatted_20_Text"><text:s text:c="4"/>"rapid_decrease_triggers": {</text:p>
      <text:p text:style-name="Preformatted_20_Text"><text:s text:c="6"/>"consecutive_fp_count": 3,</text:p>
      <text:p text:style-name="Preformatted_20_Text"><text:s text:c="6"/>"user_specific_pattern": true,</text:p>
      <text:p text:style-name="Preformatted_20_Text"><text:s text:c="6"/>"contextual_cluster": true</text:p>
      <text:p text:style-name="Preformatted_20_Text"><text:s text:c="4"/>},</text:p>
      <text:p text:style-name="Preformatted_20_Text"><text:s text:c="4"/>"gradual_adjustment": {</text:p>
      <text:p text:style-name="Preformatted_20_Text"><text:s text:c="6"/>"initial_fp": 0.95,</text:p>
      <text:p text:style-name="Preformatted_20_Text"><text:s text:c="6"/>"second_fp_similar_pattern": 0.85,</text:p>
      <text:p text:style-name="Preformatted_20_Text"><text:s text:c="6"/>"third_fp_similar_pattern": 0.70</text:p>
      <text:p text:style-name="Preformatted_20_Text"><text:s text:c="4"/>}</text:p>
      <text:p text:style-name="Preformatted_20_Text"><text:s text:c="2"/>},</text:p>
      <text:p text:style-name="Preformatted_20_Text"><text:s text:c="2"/></text:p>
      <text:p text:style-name="Preformatted_20_Text"><text:s text:c="2"/>"learning_parameters": {</text:p>
      <text:p text:style-name="Preformatted_20_Text"><text:s text:c="4"/>"user_baseline_minimum_interactions": 10,</text:p>
      <text:p text:style-name="Preformatted_20_Text"><text:s text:c="4"/>"community_learning_minimum_samples": 20,</text:p>
      <text:p text:style-name="Preformatted_20_Text"><text:s text:c="4"/>"adjustment_cooldown_hours": 24,</text:p>
      <text:p text:style-name="Preformatted_20_Text"><text:s text:c="4"/>"maximum_sensitivity_reduction": 0.3</text:p>
      <text:p text:style-name="Preformatted_20_Text"><text:s text:c="2"/>}</text:p>
      <text:p text:style-name="P8">}</text:p>
      <text:p text:style-name="Text_20_body"><text:span text:style-name="Strong_20_Emphasis"><text:span text:style-name="Source_20_Text">linguistic_nuance_patterns.json</text:span></text:span></text:p>
      <text:p text:style-name="Text_20_body">json</text:p>
      <text:p text:style-name="Preformatted_20_Text">{</text:p>
      <text:p text:style-name="Preformatted_20_Text"><text:s text:c="2"/>"metaphorical_patterns": {</text:p>
      <text:p text:style-name="Preformatted_20_Text"><text:s text:c="4"/>"death_dying": [</text:p>
      <text:p text:style-name="Preformatted_20_Text"><text:s text:c="6"/>"I'm dying of laughter",</text:p>
      <text:p text:style-name="Preformatted_20_Text"><text:s text:c="6"/>"That killed me",</text:p>
      <text:p text:style-name="Preformatted_20_Text"><text:s text:c="6"/>"Dead tired",</text:p>
      <text:p text:style-name="Preformatted_20_Text"><text:s text:c="6"/>"Bored to death"</text:p>
      <text:p text:style-name="Preformatted_20_Text"><text:s text:c="4"/>],</text:p>
      <text:p text:style-name="Preformatted_20_Text"><text:s text:c="4"/>"violence_harm": [</text:p>
      <text:p text:style-name="Preformatted_20_Text"><text:s text:c="6"/>"That hurts my feelings",</text:p>
      <text:p text:style-name="Preformatted_20_Text"><text:s text:c="6"/>"I could murder a pizza",</text:p>
      <text:p text:style-name="Preformatted_20_Text"><text:s text:c="6"/>"She killed that presentation",</text:p>
      <text:p text:style-name="Preformatted_20_Text"><text:s text:c="6"/>"This pain is unbearable (referring to inconvenience)"</text:p>
      <text:p text:style-name="Preformatted_20_Text"><text:s text:c="4"/>],</text:p>
      <text:p text:style-name="Preformatted_20_Text"><text:s text:c="4"/>"crisis_exaggeration": [</text:p>
      <text:p text:style-name="Preformatted_20_Text"><text:s text:c="6"/>"This is the end of the world",</text:p>
      <text:p text:style-name="Preformatted_20_Text"><text:s text:c="6"/>"I want to die (of embarrassment)",</text:p>
      <text:p text:style-name="Preformatted_20_Text"><text:s text:c="6"/>"I can't go on (joking about minor frustration)",</text:p>
      <text:p text:style-name="Preformatted_20_Text"><text:soft-page-break/><text:s text:c="6"/>"Nobody loves me (playful self-deprecation)"</text:p>
      <text:p text:style-name="Preformatted_20_Text"><text:s text:c="4"/>]</text:p>
      <text:p text:style-name="Preformatted_20_Text"><text:s text:c="2"/>},</text:p>
      <text:p text:style-name="Preformatted_20_Text"><text:s text:c="2"/></text:p>
      <text:p text:style-name="Preformatted_20_Text"><text:s text:c="2"/>"cultural_idioms": {</text:p>
      <text:p text:style-name="Preformatted_20_Text"><text:s text:c="4"/>"british_understatement": [</text:p>
      <text:p text:style-name="Preformatted_20_Text"><text:s text:c="6"/>"I'm feeling a bit poorly",</text:p>
      <text:p text:style-name="Preformatted_20_Text"><text:s text:c="6"/>"It's not ideal",</text:p>
      <text:p text:style-name="Preformatted_20_Text"><text:s text:c="6"/>"I've had better days",</text:p>
      <text:p text:style-name="Preformatted_20_Text"><text:s text:c="6"/>"It's a bit of a bother"</text:p>
      <text:p text:style-name="Preformatted_20_Text"><text:s text:c="4"/>],</text:p>
      <text:p text:style-name="Preformatted_20_Text"><text:s text:c="4"/>"australian_slang": [</text:p>
      <text:p text:style-name="Preformatted_20_Text"><text:s text:c="6"/>"I'm stuffed",</text:p>
      <text:p text:style-name="Preformatted_20_Text"><text:s text:c="6"/>"Flat out like a lizard drinking",</text:p>
      <text:p text:style-name="Preformatted_20_Text"><text:s text:c="6"/>"Not feeling flash",</text:p>
      <text:p text:style-name="Preformatted_20_Text"><text:s text:c="6"/>"Had a shocker"</text:p>
      <text:p text:style-name="Preformatted_20_Text"><text:s text:c="4"/>],</text:p>
      <text:p text:style-name="Preformatted_20_Text"><text:s text:c="4"/>"american_hyperbole": [</text:p>
      <text:p text:style-name="Preformatted_20_Text"><text:s text:c="6"/>"This is the worst thing ever",</text:p>
      <text:p text:style-name="Preformatted_20_Text"><text:s text:c="6"/>"I'm literally dying",</text:p>
      <text:p text:style-name="Preformatted_20_Text"><text:s text:c="6"/>"My life is over",</text:p>
      <text:p text:style-name="Preformatted_20_Text"><text:s text:c="6"/>"This is a catastrophe"</text:p>
      <text:p text:style-name="Preformatted_20_Text"><text:s text:c="4"/>]</text:p>
      <text:p text:style-name="Preformatted_20_Text"><text:s text:c="2"/>},</text:p>
      <text:p text:style-name="Preformatted_20_Text"><text:s text:c="2"/></text:p>
      <text:p text:style-name="Preformatted_20_Text"><text:s text:c="2"/>"context_markers": {</text:p>
      <text:p text:style-name="Preformatted_20_Text"><text:s text:c="4"/>"academic_discussion": [</text:p>
      <text:p text:style-name="Preformatted_20_Text"><text:s text:c="6"/>"In the text...",</text:p>
      <text:p text:style-name="Preformatted_20_Text"><text:s text:c="6"/>"The character...",</text:p>
      <text:p text:style-name="Preformatted_20_Text"><text:s text:c="6"/>"The study shows...",</text:p>
      <text:p text:style-name="Preformatted_20_Text"><text:s text:c="6"/>"According to the research..."</text:p>
      <text:p text:style-name="Preformatted_20_Text"><text:s text:c="4"/>],</text:p>
      <text:p text:style-name="Preformatted_20_Text"><text:s text:c="4"/>"creative_writing": [</text:p>
      <text:p text:style-name="Preformatted_20_Text"><text:s text:c="6"/>"In my story...",</text:p>
      <text:p text:style-name="Preformatted_20_Text"><text:s text:c="6"/>"The protagonist...",</text:p>
      <text:p text:style-name="Preformatted_20_Text"><text:s text:c="6"/>"I'm working on a piece about...",</text:p>
      <text:p text:style-name="Preformatted_20_Text"><text:s text:c="6"/>"This character arc..."</text:p>
      <text:p text:style-name="Preformatted_20_Text"><text:s text:c="4"/>],</text:p>
      <text:p text:style-name="Preformatted_20_Text"><text:s text:c="4"/>"hypothetical": [</text:p>
      <text:p text:style-name="Preformatted_20_Text"><text:s text:c="6"/>"What if...",</text:p>
      <text:p text:style-name="Preformatted_20_Text"><text:s text:c="6"/>"Imagine that...",</text:p>
      <text:p text:style-name="Preformatted_20_Text"><text:s text:c="6"/>"Suppose someone...",</text:p>
      <text:p text:style-name="Preformatted_20_Text"><text:s text:c="6"/>"In a scenario where..."</text:p>
      <text:p text:style-name="Preformatted_20_Text"><text:s text:c="4"/>]</text:p>
      <text:p text:style-name="Preformatted_20_Text"><text:s text:c="2"/>}</text:p>
      <text:p text:style-name="P8">}</text:p>
      <text:h text:style-name="Heading_20_3" text:outline-level="3"><text:span text:style-name="Strong_20_Emphasis">B. Enhanced Assessment Flow</text:span></text:h>
      <text:p text:style-name="Text_20_body">text</text:p>
      <text:p text:style-name="Preformatted_20_Text">STANDARD ASSESSMENT FLOW WITH FP MITIGATION:</text:p>
      <text:p text:style-name="Preformatted_20_Text"/>
      <text:p text:style-name="Preformatted_20_Text">1. Initial Pattern Detection</text:p>
      <text:p text:style-name="Preformatted_20_Text"><text:s text:c="3"/>↓</text:p>
      <text:p text:style-name="Preformatted_20_Text">2. Context Analysis &amp; FP Risk Assessment</text:p>
      <text:p text:style-name="Preformatted_20_Text"><text:s text:c="3"/>↓</text:p>
      <text:p text:style-name="Preformatted_20_Text">3. Confidence Scoring with FP Adjustment</text:p>
      <text:p text:style-name="Preformatted_20_Text"><text:s text:c="3"/>↓</text:p>
      <text:p text:style-name="Preformatted_20_Text">4. User-Specific Baseline Check</text:p>
      <text:p text:style-name="Preformatted_20_Text"><text:s text:c="3"/>↓</text:p>
      <text:p text:style-name="Preformatted_20_Text">5. Decision Point:</text:p>
      <text:p text:style-name="Preformatted_20_Text"><text:s text:c="3"/>├── HIGH CONFIDENCE + LOW FP RISK → Direct Intervention</text:p>
      <text:p text:style-name="Preformatted_20_Text"><text:soft-page-break/><text:s text:c="3"/>├── MEDIUM CONFIDENCE → Soft Intervention with Verification</text:p>
      <text:p text:style-name="Preformatted_20_Text"><text:s text:c="3"/>└── HIGH FP RISK → Clarification Questions Only</text:p>
      <text:p text:style-name="Preformatted_20_Text"><text:s text:c="9"/>↓</text:p>
      <text:p text:style-name="Preformatted_20_Text">6. Post-Interaction Analysis</text:p>
      <text:p text:style-name="Preformatted_20_Text"><text:s text:c="9"/>↓</text:p>
      <text:p text:style-name="Preformatted_20_Text">7. Learning &amp; Adjustment</text:p>
      <text:p text:style-name="Preformatted_20_Text"><text:s text:c="9"/>↓</text:p>
      <text:p text:style-name="P8">8. Update User Profile &amp; Community Knowledge</text:p>
      <text:h text:style-name="Heading_20_3" text:outline-level="3"><text:span text:style-name="Strong_20_Emphasis">C. False Positive Recovery Protocol</text:span></text:h>
      <text:p text:style-name="Text_20_body">When a false positive occurs:</text:p>
      <text:p text:style-name="Text_20_body">python</text:p>
      <text:p text:style-name="Preformatted_20_Text">def execute_fp_recovery_protocol(interaction_data, fp_analysis):</text:p>
      <text:p text:style-name="Preformatted_20_Text"><text:s text:c="4"/>"""</text:p>
      <text:p text:style-name="Preformatted_20_Text"><text:s text:c="4"/>Gracefully recover from false positive and repair relationship</text:p>
      <text:p text:style-name="Preformatted_20_Text"><text:s text:c="4"/>"""</text:p>
      <text:p text:style-name="Preformatted_20_Text"><text:s text:c="4"/>recovery_steps = [</text:p>
      <text:p text:style-name="Preformatted_20_Text"><text:s text:c="8"/># 1. Acknowledge the misunderstanding</text:p>
      <text:p text:style-name="Preformatted_20_Text"><text:s text:c="8"/>{</text:p>
      <text:p text:style-name="Preformatted_20_Text"><text:s text:c="12"/>'action': 'acknowledge_misunderstanding',</text:p>
      <text:p text:style-name="Preformatted_20_Text"><text:s text:c="12"/>'template': "I apologize, I think I misunderstood what you meant. Thank you for clarifying."</text:p>
      <text:p text:style-name="Preformatted_20_Text"><text:s text:c="8"/>},</text:p>
      <text:p text:style-name="Preformatted_20_Text"><text:s text:c="8"/></text:p>
      <text:p text:style-name="Preformatted_20_Text"><text:s text:c="8"/># 2. Explain system's learning</text:p>
      <text:p text:style-name="Preformatted_20_Text"><text:s text:c="8"/>{</text:p>
      <text:p text:style-name="Preformatted_20_Text"><text:s text:c="12"/>'action': 'explain_learning',</text:p>
      <text:p text:style-name="Preformatted_20_Text"><text:s text:c="12"/>'template': "I'll make note of this so I can understand you better in the future."</text:p>
      <text:p text:style-name="Preformatted_20_Text"><text:s text:c="8"/>},</text:p>
      <text:p text:style-name="Preformatted_20_Text"><text:s text:c="8"/></text:p>
      <text:p text:style-name="Preformatted_20_Text"><text:s text:c="8"/># 3. Return to original intent</text:p>
      <text:p text:style-name="Preformatted_20_Text"><text:s text:c="8"/>{</text:p>
      <text:p text:style-name="Preformatted_20_Text"><text:s text:c="12"/>'action': 'return_to_topic',</text:p>
      <text:p text:style-name="Preformatted_20_Text"><text:s text:c="12"/>'template': "You were saying... [return to pre-interruption point]"</text:p>
      <text:p text:style-name="Preformatted_20_Text"><text:s text:c="8"/>},</text:p>
      <text:p text:style-name="Preformatted_20_Text"><text:s text:c="8"/></text:p>
      <text:p text:style-name="Preformatted_20_Text"><text:s text:c="8"/># 4. Adjust sensitivity for this session</text:p>
      <text:p text:style-name="Preformatted_20_Text"><text:s text:c="8"/>{</text:p>
      <text:p text:style-name="Preformatted_20_Text"><text:s text:c="12"/>'action': 'adjust_session_sensitivity',</text:p>
      <text:p text:style-name="Preformatted_20_Text"><text:s text:c="12"/>'parameters': {'reduction': 0.3}</text:p>
      <text:p text:style-name="Preformatted_20_Text"><text:s text:c="8"/>}</text:p>
      <text:p text:style-name="Preformatted_20_Text"><text:s text:c="4"/>]</text:p>
      <text:p text:style-name="Preformatted_20_Text"><text:s text:c="4"/></text:p>
      <text:p text:style-name="Preformatted_20_Text"><text:s text:c="4"/># Apply recovery</text:p>
      <text:p text:style-name="Preformatted_20_Text"><text:s text:c="4"/>for step in recovery_steps:</text:p>
      <text:p text:style-name="Preformatted_20_Text"><text:s text:c="8"/>execute_recovery_step(step, interaction_data)</text:p>
      <text:p text:style-name="Preformatted_20_Text"><text:s text:c="4"/></text:p>
      <text:p text:style-name="Preformatted_20_Text"><text:s text:c="4"/># Log recovery for learning</text:p>
      <text:p text:style-name="Preformatted_20_Text"><text:s text:c="4"/>log_fp_recovery(fp_analysis, recovery_steps)</text:p>
      <text:p text:style-name="Preformatted_20_Text"><text:s text:c="4"/></text:p>
      <text:p text:style-name="Preformatted_20_Text"><text:s text:c="4"/>return {</text:p>
      <text:p text:style-name="Preformatted_20_Text"><text:s text:c="8"/>'status': 'recovery_complete',</text:p>
      <text:p text:style-name="Preformatted_20_Text"><text:s text:c="8"/>'relationship_repair': 'initiated',</text:p>
      <text:p text:style-name="Preformatted_20_Text"><text:s text:c="8"/>'learning_applied': True</text:p>
      <text:p text:style-name="P8"><text:s text:c="4"/>}</text:p>
      <text:h text:style-name="Heading_20_2" text:outline-level="2"><text:soft-page-break/><text:span text:style-name="Strong_20_Emphasis">7. Key Benefits of This Approach</text:span></text:h>
      <text:list xml:id="list8729476649641376611" text:style-name="L2">
        <text:list-item>
          <text:p text:style-name="P2"><text:span text:style-name="Strong_20_Emphasis">Reduces Annoyance</text:span>: Users aren't constantly interrupted for verification</text:p>
        </text:list-item>
        <text:list-item>
          <text:p text:style-name="P2"><text:span text:style-name="Strong_20_Emphasis">Learns Quickly</text:span>: System adapts to individual communication styles</text:p>
        </text:list-item>
        <text:list-item>
          <text:p text:style-name="P2"><text:span text:style-name="Strong_20_Emphasis">Maintains Safety</text:span>: High-risk situations still trigger appropriate responses</text:p>
        </text:list-item>
        <text:list-item>
          <text:p text:style-name="P2"><text:span text:style-name="Strong_20_Emphasis">Cultural Competence</text:span>: Learns regional and cultural linguistic patterns</text:p>
        </text:list-item>
        <text:list-item>
          <text:p text:style-name="P2"><text:span text:style-name="Strong_20_Emphasis">Transparent Learning</text:span>: Users see system adapting to their communication style</text:p>
        </text:list-item>
        <text:list-item>
          <text:p text:style-name="P2"><text:span text:style-name="Strong_20_Emphasis">Community Wisdom</text:span>: Aggregated learning improves system for all users</text:p>
        </text:list-item>
        <text:list-item>
          <text:p text:style-name="P2"><text:span text:style-name="Strong_20_Emphasis">Self-Correction</text:span>: System identifies and corrects its own false positives</text:p>
        </text:list-item>
      </text:list>
      <text:h text:style-name="Heading_20_2" text:outline-level="2"><text:span text:style-name="Strong_20_Emphasis">8. Implementation Phases</text:span></text:h>
      <text:h text:style-name="Heading_20_3" text:outline-level="3"><text:span text:style-name="Strong_20_Emphasis">Phase 1: Basic FP Detection (Week 1-2)</text:span></text:h>
      <text:list xml:id="list8432635184367409182" text:style-name="L3">
        <text:list-item>
          <text:p text:style-name="P3">Implement context analysis for common false positive patterns</text:p>
        </text:list-item>
        <text:list-item>
          <text:p text:style-name="P3">Add verification questions for high-risk detections</text:p>
        </text:list-item>
        <text:list-item>
          <text:p text:style-name="P3">Create basic false positive logging</text:p>
        </text:list-item>
      </text:list>
      <text:h text:style-name="Heading_20_3" text:outline-level="3"><text:span text:style-name="Strong_20_Emphasis">Phase 2: Individual Learning (Week 3-4)</text:span></text:h>
      <text:list xml:id="list2640547581480043527" text:style-name="L4">
        <text:list-item>
          <text:p text:style-name="P4">Build user communication profiles</text:p>
        </text:list-item>
        <text:list-item>
          <text:p text:style-name="P4">Implement personalized sensitivity adjustments</text:p>
        </text:list-item>
        <text:list-item>
          <text:p text:style-name="P4">Add post-interaction false positive analysis</text:p>
        </text:list-item>
      </text:list>
      <text:h text:style-name="Heading_20_3" text:outline-level="3"><text:span text:style-name="Strong_20_Emphasis">Phase 3: Community Learning (Week 5-6)</text:span></text:h>
      <text:list xml:id="list5723210349138678365" text:style-name="L5">
        <text:list-item>
          <text:p text:style-name="P5">Create anonymized aggregation system</text:p>
        </text:list-item>
        <text:list-item>
          <text:p text:style-name="P5">Implement cultural/regional pattern recognition</text:p>
        </text:list-item>
        <text:list-item>
          <text:p text:style-name="P5">Add community-wide sensitivity adjustments</text:p>
        </text:list-item>
      </text:list>
      <text:h text:style-name="Heading_20_3" text:outline-level="3"><text:span text:style-name="Strong_20_Emphasis">Phase 4: Advanced Recovery (Week 7-8)</text:span></text:h>
      <text:list xml:id="list7063688355854041107" text:style-name="L6">
        <text:list-item>
          <text:p text:style-name="P6">Implement graceful recovery protocols</text:p>
        </text:list-item>
        <text:list-item>
          <text:p text:style-name="P6">Add relationship repair mechanisms</text:p>
        </text:list-item>
        <text:list-item>
          <text:p text:style-name="P6">Create user feedback loops for FP reporting</text:p>
        </text:list-item>
      </text:list>
      <text:h text:style-name="Heading_20_2" text:outline-level="2"><text:span text:style-name="Strong_20_Emphasis">Conclusion</text:span></text:h>
      <text:p text:style-name="Text_20_body"><text:span text:style-name="Strong_20_Emphasis">False positives aren't bugs—they're training data.</text:span> By building a comprehensive false positive mitigation system that:</text:p>
      <text:list xml:id="list3381036202567454186" text:style-name="L7">
        <text:list-item>
          <text:p text:style-name="P7"><text:span text:style-name="Strong_20_Emphasis">Predicts</text:span> FP risk before responding</text:p>
        </text:list-item>
        <text:list-item>
          <text:p text:style-name="P7"><text:span text:style-name="Strong_20_Emphasis">Verifies</text:span> when risk is high</text:p>
        </text:list-item>
        <text:list-item>
          <text:p text:style-name="P7"><text:span text:style-name="Strong_20_Emphasis">Learns</text:span> from every FP occurrence</text:p>
        </text:list-item>
        <text:list-item>
          <text:p text:style-name="P7"><text:soft-page-break/><text:span text:style-name="Strong_20_Emphasis">Adapts</text:span> to individual users and communities</text:p>
        </text:list-item>
        <text:list-item>
          <text:p text:style-name="P7"><text:span text:style-name="Strong_20_Emphasis">Recovers</text:span> gracefully when mistakes happen</text:p>
        </text:list-item>
      </text:list>
      <text:p text:style-name="Text_20_body">We transform what could be an annoying system flaw into a <text:span text:style-name="Strong_20_Emphasis">strength</text:span>. The system becomes more accurate, more personalized, and more culturally competent with every interaction—without sacrificing its protective capabilities in genuine crisis situations.</text:p>
      <text:p text:style-name="Text_20_body">This approach embodies the Peter Protocol's core values: <text:span text:style-name="Strong_20_Emphasis">protection through understanding, not just through detection.</text:span> It protects users not only from harm but also from unnecessary anxiety caused by over-sensitive pattern detec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12-23T08:47:06.84</meta:creation-date>
    <meta:document-statistic meta:table-count="0" meta:image-count="0" meta:object-count="0" meta:page-count="17" meta:paragraph-count="883" meta:word-count="2633" meta:character-count="31636"/>
    <dc:date>2025-12-23T08:47:56.78</dc:date>
    <dc:creator>Peter Thompson</dc:creator>
    <meta:editing-duration>PT50S</meta:editing-duration>
    <meta:editing-cycles>1</meta:editing-cycles>
    <meta:generator>OpenOffice/4.1.15$Win32 OpenOffice.org_project/4115m2$Build-9813</meta:generator>
  </office:meta>
</office:document-meta>
</file>