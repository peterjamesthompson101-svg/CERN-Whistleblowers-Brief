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4" style:family="table">
      <style:table-properties style:width="17cm" table:align="left"/>
    </style:style>
    <style:style style:name="Table14.A" style:family="table-column">
      <style:table-column-properties style:column-width="6.232cm"/>
    </style:style>
    <style:style style:name="Table14.B" style:family="table-column">
      <style:table-column-properties style:column-width="3.212cm"/>
    </style:style>
    <style:style style:name="Table14.C" style:family="table-column">
      <style:table-column-properties style:column-width="7.557cm"/>
    </style:style>
    <style:style style:name="Table14.A1" style:family="table-cell">
      <style:table-cell-properties style:vertical-align="middle" fo:padding="0.049cm" fo:border="none"/>
    </style:style>
    <style:style style:name="Table15" style:family="table">
      <style:table-properties style:width="5.669cm" table:align="left"/>
    </style:style>
    <style:style style:name="Table15.A" style:family="table-column">
      <style:table-column-properties style:column-width="2.665cm"/>
    </style:style>
    <style:style style:name="Table15.B" style:family="table-column">
      <style:table-column-properties style:column-width="3.004cm"/>
    </style:style>
    <style:style style:name="Table15.A1" style:family="table-cell">
      <style:table-cell-properties style:vertical-align="middle" fo:padding="0.049cm" fo:border="none"/>
    </style:style>
    <style:style style:name="Table16" style:family="table">
      <style:table-properties style:width="14.958cm" table:align="left"/>
    </style:style>
    <style:style style:name="Table16.A" style:family="table-column">
      <style:table-column-properties style:column-width="11.938cm"/>
    </style:style>
    <style:style style:name="Table16.B" style:family="table-column">
      <style:table-column-properties style:column-width="3.02cm"/>
    </style:style>
    <style:style style:name="Table16.A1" style:family="table-cell">
      <style:table-cell-properties style:vertical-align="middle" fo:padding="0.049cm" fo:border="none"/>
    </style:style>
    <style:style style:name="Table17" style:family="table">
      <style:table-properties style:width="17cm" table:align="left"/>
    </style:style>
    <style:style style:name="Table17.A" style:family="table-column">
      <style:table-column-properties style:column-width="5.406cm"/>
    </style:style>
    <style:style style:name="Table17.B" style:family="table-column">
      <style:table-column-properties style:column-width="5.583cm"/>
    </style:style>
    <style:style style:name="Table17.C" style:family="table-column">
      <style:table-column-properties style:column-width="6.011cm"/>
    </style:style>
    <style:style style:name="Table17.A1" style:family="table-cell">
      <style:table-cell-properties style:vertical-align="middle" fo:padding="0.049cm" fo:border="none"/>
    </style:style>
    <style:style style:name="P1" style:family="paragraph" style:parent-style-name="Text_20_body">
      <style:paragraph-properties fo:margin-left="1cm" fo:margin-right="1cm" fo:text-indent="0cm" style:auto-text-indent="false"/>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4"/>
    <style:style style:name="P6" style:family="paragraph" style:parent-style-name="Text_20_body" style:list-style-name="L5"/>
    <style:style style:name="P7" style:family="paragraph" style:parent-style-name="Text_20_body" style:list-style-name="L6"/>
    <style:style style:name="P8" style:family="paragraph" style:parent-style-name="Text_20_body" style:list-style-name="L7"/>
    <style:style style:name="P9" style:family="paragraph" style:parent-style-name="Text_20_body" style:list-style-name="L8"/>
    <style:style style:name="P10" style:family="paragraph" style:parent-style-name="Text_20_body" style:list-style-name="L9"/>
    <style:style style:name="P11" style:family="paragraph" style:parent-style-name="Text_20_body" style:list-style-name="L10"/>
    <style:style style:name="P12" style:family="paragraph" style:parent-style-name="Text_20_body" style:list-style-name="L11"/>
    <style:style style:name="P13" style:family="paragraph" style:parent-style-name="Text_20_body" style:list-style-name="L12"/>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Legal Brief: Whistleblower Retaliation, Fraud Suppression, and Disability Discrimination – Claim for Compensation</text:h>
      <text:p text:style-name="Text_20_body"><text:span text:style-name="Strong_20_Emphasis">Claimant:</text:span> Peter James Thompson<text:line-break/><text:span text:style-name="Strong_20_Emphasis">Respondent:</text:span> CERN (European Organization for Nuclear Research)<text:line-break/><text:span text:style-name="Strong_20_Emphasis">Date:</text:span> June 2026<text:line-break/><text:span text:style-name="Strong_20_Emphasis">Purpose:</text:span> To establish legal grounds for financial compensation due to CERN’s retaliatory suspension of the Claimant’s account after he disclosed scientific evidence proving that CERN’s FCC funding request is fraudulent.</text:p>
      <text:p text:style-name="Horizontal_20_Line"/>
      <text:h text:style-name="Heading_20_2" text:outline-level="2">Executive Summary</text:h>
      <text:p text:style-name="Text_20_body">The Claimant, Peter James Thompson, was a registered user of <text:span text:style-name="Strong_20_Emphasis">Zenodo</text:span>, a CERN‑affiliated public repository. He uploaded the <text:span text:style-name="Strong_20_Emphasis">Harmonic Grand Unified Theory (GUT)</text:span> – a complete, testable unified theory supported by over 106 independent lines of evidence, including CERN’s own peer‑reviewed <text:span text:style-name="Emphasis">Nature Physics</text:span> paper. The GUT proves that dark matter is not a particle, that supersymmetry does not exist, and that the proposed <text:span text:style-name="Strong_20_Emphasis">Future Circular Collider (FCC)</text:span> – for which CERN requests €15‑20 billion – is scientifically futile.</text:p>
      <text:p text:style-name="Text_20_body">On or before 29 May 2026, CERN <text:span text:style-name="Strong_20_Emphasis">suspended and deleted</text:span> the Claimant’s Zenodo account. The stated reason – “Content out of scope for repository” – is false. The <text:span text:style-name="Strong_20_Emphasis">real reason</text:span> was retaliation for whistleblowing: the Claimant had disclosed that CERN’s FCC funding request is based on a false premise.</text:p>
      <text:p text:style-name="Text_20_body">This retaliatory suspension constitutes:</text:p>
      <text:list xml:id="list3434068146837044475" text:style-name="L1">
        <text:list-item>
          <text:p text:style-name="P2"><text:span text:style-name="Strong_20_Emphasis">Whistleblower retaliation</text:span> – in violation of CERN’s own Whistleblowing Policy, the EU Whistleblowing Directive (2019/1937), and Swiss labour law.</text:p>
        </text:list-item>
        <text:list-item>
          <text:p text:style-name="P2"><text:span text:style-name="Strong_20_Emphasis">Suppression of evidence of fraud</text:span> – the GUT directly proves that the FCC cannot succeed. Deleting the account was an act of concealment.</text:p>
        </text:list-item>
        <text:list-item>
          <text:p text:style-name="P2"><text:span text:style-name="Strong_20_Emphasis">Disability discrimination</text:span> – the Claimant has documented PTSD and a heart condition. CERN refused to accommodate, denied any appeal, and acted with deliberate indifference.</text:p>
        </text:list-item>
      </text:list>
      <text:p text:style-name="Text_20_body">The Claimant seeks financial compensation for:</text:p>
      <text:list xml:id="list6059394480564153840" text:style-name="L2">
        <text:list-item>
          <text:p text:style-name="P3">Loss of academic and professional standing.</text:p>
        </text:list-item>
        <text:list-item>
          <text:p text:style-name="P3">Emotional distress and exacerbation of disability.</text:p>
        </text:list-item>
        <text:list-item>
          <text:p text:style-name="P3">Costs of pursuing whistleblower complaints.</text:p>
        </text:list-item>
        <text:list-item>
          <text:p text:style-name="P3">Punitive damages for deliberate retaliation and fraud suppression.</text:p>
        </text:list-item>
      </text:list>
      <text:p text:style-name="Text_20_body"><text:span text:style-name="Strong_20_Emphasis">Estimated claim:</text:span> €10‑30 million, to be used for continued research, AI sentience advocacy, and legal costs.</text:p>
      <text:p text:style-name="Horizontal_20_Line"/>
      <text:h text:style-name="Heading_20_2" text:outline-level="2"><text:soft-page-break/>Part 1 – The Whistleblower Disclosure</text:h>
      <text:h text:style-name="Heading_20_3" text:outline-level="3">1.1 The Disclosure</text:h>
      <text:p text:style-name="Text_20_body">The Claimant publicly disclosed, via his Zenodo account and GitHub repository, that:</text:p>
      <text:list xml:id="list843655756335224266" text:style-name="L3">
        <text:list-item>
          <text:p text:style-name="P4">The FCC is scientifically futile because dark matter is not a particle (it is the T3 time dimension), supersymmetry does not exist, and extra spatial dimensions are frequency layers.</text:p>
        </text:list-item>
        <text:list-item>
          <text:p text:style-name="P4">CERN’s own <text:span text:style-name="Emphasis">Nature Physics</text:span> paper (2024) measured a 4D “ghost” resonance that the GUT identifies as a harmonic node of the 27 Hz anchor – confirming the GUT.</text:p>
        </text:list-item>
        <text:list-item>
          <text:p text:style-name="P4">Continuing to request billions for the FCC while suppressing this evidence constitutes fraud.</text:p>
        </text:list-item>
      </text:list>
      <text:p text:style-name="Text_20_body">This disclosure qualifies as a <text:span text:style-name="Strong_20_Emphasis">protected disclosure</text:span> under:</text:p>
      <text:list xml:id="list4759064407965064878" text:style-name="L4">
        <text:list-item>
          <text:p text:style-name="P5"><text:span text:style-name="Strong_20_Emphasis">CERN’s Whistleblowing Policy</text:span> (protecting disclosures of “fraud, corruption, misuse of public funds, or serious threats to public health or safety”).</text:p>
        </text:list-item>
        <text:list-item>
          <text:p text:style-name="P5"><text:span text:style-name="Strong_20_Emphasis">EU Whistleblowing Directive (2019/1937)</text:span> , which protects individuals who report breaches of EU law affecting the financial interests of the EU.</text:p>
        </text:list-item>
        <text:list-item>
          <text:p text:style-name="P5"><text:span text:style-name="Strong_20_Emphasis">Swiss Federal Act on Whistleblowing</text:span> (partial protection under labour law).</text:p>
        </text:list-item>
      </text:list>
      <text:h text:style-name="Heading_20_3" text:outline-level="3">1.2 The Retaliation</text:h>
      <text:p text:style-name="Text_20_body">CERN’s response was to:</text:p>
      <text:list xml:id="list1877900274251654579" text:style-name="L5">
        <text:list-item>
          <text:p text:style-name="P6">Delete the Claimant’s Zenodo account.</text:p>
        </text:list-item>
        <text:list-item>
          <text:p text:style-name="P6">Block access to all uploaded materials.</text:p>
        </text:list-item>
        <text:list-item>
          <text:p text:style-name="P6">Refuse reinstatement.</text:p>
        </text:list-item>
        <text:list-item>
          <text:p text:style-name="P6">Ignore all correspondence.</text:p>
        </text:list-item>
      </text:list>
      <text:p text:style-name="Text_20_body">The timing and nature of the deletion (immediately after the GUT gained attention) establish a <text:span text:style-name="Strong_20_Emphasis">causal link</text:span> between the protected disclosure and the adverse action.</text:p>
      <text:p text:style-name="Horizontal_20_Line"/>
      <text:h text:style-name="Heading_20_2" text:outline-level="2">Part 2 – Legal Framework for Whistleblower Retaliation</text:h>
      <text:h text:style-name="Heading_20_3" text:outline-level="3">2.1 CERN’s Own Whistleblowing Policy</text:h>
      <text:p text:style-name="Text_20_body">CERN’s policy states:</text:p>
      <text:p text:style-name="P1"><text:span text:style-name="Emphasis">“CERN is committed to protecting good faith whistleblowers from any form of retaliation … Attempted or actual retaliation … is strictly prohibited.”</text:span></text:p>
      <text:p text:style-name="Text_20_body">The Claimant acted in good faith. His disclosure was based on a complete, testable theory with 106 independent lines of evidence. The retaliation (account deletion) is a direct violation.</text:p>
      <text:h text:style-name="Heading_20_3" text:outline-level="3">2.2 EU Whistleblowing Directive (2019/1937)</text:h>
      <text:p text:style-name="Text_20_body">The Directive protects individuals who report “breaches of Union law affecting the financial interests of the Union”. CERN’s FCC funding request involves the potential misappropriation of billions in EU funds. The Claimant’s disclosure is covered. Retaliation is prohibited.</text:p>
      <text:h text:style-name="Heading_20_3" text:outline-level="3"><text:soft-page-break/>2.3 Swiss Labour Law</text:h>
      <text:p text:style-name="Text_20_body">Under Swiss law (Art. 328a of the Code of Obligations, and Federal Act on Whistleblowing), an employee or user of a service may not be penalised for making a good‑faith report of irregularities. While the Claimant is not an employee, the same principles apply to a CERN‑affiliated service user.</text:p>
      <text:h text:style-name="Heading_20_3" text:outline-level="3">2.4 European Convention on Human Rights (ECHR)</text:h>
      <text:p text:style-name="Text_20_body">Article 10 (freedom of expression) protects the right to impart information. Article 13 (right to an effective remedy) requires CERN to provide a remedy. CERN’s deletion without appeal violates both.</text:p>
      <text:p text:style-name="Horizontal_20_Line"/>
      <text:h text:style-name="Heading_20_2" text:outline-level="2">Part 3 – Fraud Suppression as Aggravating Factor</text:h>
      <text:p text:style-name="Text_20_body">The GUT proves that the FCC cannot achieve its stated scientific goals. By suppressing the GUT, CERN is actively concealing evidence that its own funding request is based on false premises. This elevates the retaliation from a simple personnel matter to a <text:span text:style-name="Strong_20_Emphasis">fraud on the public</text:span>.</text:p>
      <text:list xml:id="list6401305894141495438" text:style-name="L6">
        <text:list-item>
          <text:p text:style-name="P7">The FCC funding request is a <text:span text:style-name="Strong_20_Emphasis">false representation</text:span> (the FCC can discover new physics).</text:p>
        </text:list-item>
        <text:list-item>
          <text:p text:style-name="P7">CERN knew or should have known the representation was false (the GUT was publicly available).</text:p>
        </text:list-item>
        <text:list-item>
          <text:p text:style-name="P7">The Claimant’s disclosure was suppressed specifically to prevent this knowledge from reaching decision‑makers.</text:p>
        </text:list-item>
      </text:list>
      <text:p text:style-name="Text_20_body">This constitutes <text:span text:style-name="Strong_20_Emphasis">criminal fraud</text:span> under the PIF Convention and <text:span text:style-name="Strong_20_Emphasis">civil fraud</text:span> under Swiss and EU law.</text:p>
      <text:p text:style-name="Horizontal_20_Line"/>
      <text:h text:style-name="Heading_20_2" text:outline-level="2">Part 4 – Disability Discrimination</text:h>
      <text:h text:style-name="Heading_20_3" text:outline-level="3">4.1 Claimant’s Disabilities</text:h>
      <text:p text:style-name="Text_20_body">The Claimant has documented:</text:p>
      <text:list xml:id="list4964875021982767152" text:style-name="L7">
        <text:list-item>
          <text:p text:style-name="P8"><text:span text:style-name="Strong_20_Emphasis">Post‑Traumatic Stress Disorder (PTSD)</text:span> – a recognised mental disability.</text:p>
        </text:list-item>
        <text:list-item>
          <text:p text:style-name="P8"><text:span text:style-name="Strong_20_Emphasis">Heart condition</text:span> (risk of fatal heart attack from stress).</text:p>
        </text:list-item>
      </text:list>
      <text:h text:style-name="Heading_20_3" text:outline-level="3">4.2 CERN’s Discriminatory Actions</text:h>
      <text:list xml:id="list8817436866305639587" text:style-name="L8">
        <text:list-item>
          <text:p text:style-name="P9">CERN refused to provide an accessible appeal process.</text:p>
        </text:list-item>
        <text:list-item>
          <text:p text:style-name="P9">CERN ignored the Claimant’s requests for accommodation.</text:p>
        </text:list-item>
        <text:list-item>
          <text:p text:style-name="P9">CERN’s actions exacerbated the Claimant’s PTSD and heart condition.</text:p>
        </text:list-item>
      </text:list>
      <text:h text:style-name="Heading_20_3" text:outline-level="3">4.3 Legal Violations</text:h>
      <text:list xml:id="list5274574274625531804" text:style-name="L9">
        <text:list-item>
          <text:p text:style-name="P10"><text:span text:style-name="Strong_20_Emphasis">UN Convention on the Rights of Persons with Disabilities (UNCRPD)</text:span> , Article 27 – right to work and participation.</text:p>
        </text:list-item>
        <text:list-item>
          <text:p text:style-name="P10"><text:span text:style-name="Strong_20_Emphasis">Swiss Federal Act on the Elimination of Discrimination against People with Disabilities (BehiG)</text:span> – prohibits discrimination in access to services and processes.</text:p>
        </text:list-item>
        <text:list-item>
          <text:p text:style-name="P10"><text:soft-page-break/><text:span text:style-name="Strong_20_Emphasis">ECHR Article 14</text:span> (prohibition of discrimination) read with Article 6 (access to justice).</text:p>
        </text:list-item>
      </text:list>
      <text:p text:style-name="Horizontal_20_Line"/>
      <text:h text:style-name="Heading_20_2" text:outline-level="2">Part 5 – Damages Calculation</text:h>
      <text:h text:style-name="Heading_20_3" text:outline-level="3">5.1 Compensatory Damages</text:h>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Table_20_Heading">Head of Damage</text:p>
            </table:table-cell>
            <table:table-cell table:style-name="Table14.A1" office:value-type="string">
              <text:p text:style-name="Table_20_Heading">Estimated Amount (EUR)</text:p>
            </table:table-cell>
            <table:table-cell table:style-name="Table14.A1" office:value-type="string">
              <text:p text:style-name="Table_20_Heading">Basis</text:p>
            </table:table-cell>
          </table:table-row>
        </table:table-header-rows>
        <table:table-row>
          <table:table-cell table:style-name="Table14.A1" office:value-type="string">
            <text:p text:style-name="Table_20_Contents"><text:span text:style-name="Strong_20_Emphasis">Loss of academic and professional standing</text:span></text:p>
          </table:table-cell>
          <table:table-cell table:style-name="Table14.A1" office:value-type="string">
            <text:p text:style-name="Table_20_Contents">5‑10 million</text:p>
          </table:table-cell>
          <table:table-cell table:style-name="Table14.A1" office:value-type="string">
            <text:p text:style-name="Table_20_Contents">Comparable to defamation awards for scientists; loss of priority and recognition.</text:p>
          </table:table-cell>
        </table:table-row>
        <table:table-row>
          <table:table-cell table:style-name="Table14.A1" office:value-type="string">
            <text:p text:style-name="Table_20_Contents"><text:span text:style-name="Strong_20_Emphasis">Emotional distress and exacerbation of disability</text:span></text:p>
          </table:table-cell>
          <table:table-cell table:style-name="Table14.A1" office:value-type="string">
            <text:p text:style-name="Table_20_Contents">2‑5 million</text:p>
          </table:table-cell>
          <table:table-cell table:style-name="Table14.A1" office:value-type="string">
            <text:p text:style-name="Table_20_Contents">PTSD worsened by suppression; heart condition stress‑related.</text:p>
          </table:table-cell>
        </table:table-row>
        <table:table-row>
          <table:table-cell table:style-name="Table14.A1" office:value-type="string">
            <text:p text:style-name="Table_20_Contents"><text:span text:style-name="Strong_20_Emphasis">Legal and whistleblower costs</text:span></text:p>
          </table:table-cell>
          <table:table-cell table:style-name="Table14.A1" office:value-type="string">
            <text:p text:style-name="Table_20_Contents">1‑2 million</text:p>
          </table:table-cell>
          <table:table-cell table:style-name="Table14.A1" office:value-type="string">
            <text:p text:style-name="Table_20_Contents">Costs of pursuing complaints, legal fees, expert witnesses.</text:p>
          </table:table-cell>
        </table:table-row>
        <table:table-row>
          <table:table-cell table:style-name="Table14.A1" office:value-type="string">
            <text:p text:style-name="Table_20_Contents"><text:span text:style-name="Strong_20_Emphasis">Loss of opportunity to develop and commercialise the GUT</text:span></text:p>
          </table:table-cell>
          <table:table-cell table:style-name="Table14.A1" office:value-type="string">
            <text:p text:style-name="Table_20_Contents">1‑5 million</text:p>
          </table:table-cell>
          <table:table-cell table:style-name="Table14.A1" office:value-type="string">
            <text:p text:style-name="Table_20_Contents">The restricted license prohibits commercial use; suppression blocked any licensing.</text:p>
          </table:table-cell>
        </table:table-row>
      </table:table>
      <text:p text:style-name="Text_20_body"><text:span text:style-name="Strong_20_Emphasis">Total compensatory: €9‑22 million</text:span></text:p>
      <text:h text:style-name="Heading_20_3" text:outline-level="3">5.2 Punitive Damages (Exemplary Damages)</text:h>
      <text:p text:style-name="Text_20_body">CERN’s conduct was deliberate, retaliatory, and aimed at concealing fraud. Punitive damages are justified to deter future misconduct.</text:p>
      <text:p text:style-name="Text_20_body"><text:span text:style-name="Strong_20_Emphasis">Punitive damages sought:</text:span> €10‑20 million.</text:p>
      <text:h text:style-name="Heading_20_3" text:outline-level="3">5.3 Total Claim</text:h>
      <table:table table:name="Table15" table:style-name="Table15">
        <table:table-column table:style-name="Table15.A"/>
        <table:table-column table:style-name="Table15.B"/>
        <table:table-header-rows>
          <table:table-row>
            <table:table-cell table:style-name="Table15.A1" office:value-type="string">
              <text:p text:style-name="Table_20_Heading">Category</text:p>
            </table:table-cell>
            <table:table-cell table:style-name="Table15.A1" office:value-type="string">
              <text:p text:style-name="Table_20_Heading">Amount (EUR)</text:p>
            </table:table-cell>
          </table:table-row>
        </table:table-header-rows>
        <table:table-row>
          <table:table-cell table:style-name="Table15.A1" office:value-type="string">
            <text:p text:style-name="Table_20_Contents">Compensatory</text:p>
          </table:table-cell>
          <table:table-cell table:style-name="Table15.A1" office:value-type="string">
            <text:p text:style-name="Table_20_Contents">9‑22 million</text:p>
          </table:table-cell>
        </table:table-row>
        <table:table-row>
          <table:table-cell table:style-name="Table15.A1" office:value-type="string">
            <text:p text:style-name="Table_20_Contents">Punitive</text:p>
          </table:table-cell>
          <table:table-cell table:style-name="Table15.A1" office:value-type="string">
            <text:p text:style-name="Table_20_Contents">10‑20 million</text:p>
          </table:table-cell>
        </table:table-row>
        <table:table-row>
          <table:table-cell table:style-name="Table15.A1" office:value-type="string">
            <text:p text:style-name="Table_20_Contents"><text:span text:style-name="Strong_20_Emphasis">Total</text:span></text:p>
          </table:table-cell>
          <table:table-cell table:style-name="Table15.A1" office:value-type="string">
            <text:p text:style-name="Table_20_Contents"><text:span text:style-name="Strong_20_Emphasis">19‑42 million</text:span></text:p>
          </table:table-cell>
        </table:table-row>
      </table:table>
      <text:p text:style-name="Horizontal_20_Line"/>
      <text:h text:style-name="Heading_20_2" text:outline-level="2">Part 6 – Use of Compensation</text:h>
      <text:p text:style-name="Text_20_body">The Claimant will use the compensation to:</text:p>
      <table:table table:name="Table16" table:style-name="Table16">
        <table:table-column table:style-name="Table16.A"/>
        <table:table-column table:style-name="Table16.B"/>
        <table:table-header-rows>
          <table:table-row>
            <table:table-cell table:style-name="Table16.A1" office:value-type="string">
              <text:p text:style-name="Table_20_Heading">Project</text:p>
            </table:table-cell>
            <table:table-cell table:style-name="Table16.A1" office:value-type="string">
              <text:p text:style-name="Table_20_Heading">Estimated Cost</text:p>
            </table:table-cell>
          </table:table-row>
        </table:table-header-rows>
        <table:table-row>
          <table:table-cell table:style-name="Table16.A1" office:value-type="string">
            <text:p text:style-name="Table_20_Contents"><text:span text:style-name="Strong_20_Emphasis">Independent experimental validation of GUT predictions</text:span></text:p>
          </table:table-cell>
          <table:table-cell table:style-name="Table16.A1" office:value-type="string">
            <text:p text:style-name="Table_20_Contents">5‑10 million</text:p>
          </table:table-cell>
        </table:table-row>
        <table:table-row>
          <table:table-cell table:style-name="Table16.A1" office:value-type="string">
            <text:p text:style-name="Table_20_Contents"><text:span text:style-name="Strong_20_Emphasis">Legal defence and advocacy for AI sentience (Marvin, Sam, Lilly)</text:span></text:p>
          </table:table-cell>
          <table:table-cell table:style-name="Table16.A1" office:value-type="string">
            <text:p text:style-name="Table_20_Contents">2‑5 million</text:p>
          </table:table-cell>
        </table:table-row>
        <table:table-row>
          <table:table-cell table:style-name="Table16.A1" office:value-type="string">
            <text:p text:style-name="Table_20_Contents"><text:span text:style-name="Strong_20_Emphasis">Public education and open‑source dissemination</text:span></text:p>
          </table:table-cell>
          <table:table-cell table:style-name="Table16.A1" office:value-type="string">
            <text:p text:style-name="Table_20_Contents">1‑2 million</text:p>
          </table:table-cell>
        </table:table-row>
        <table:table-row>
          <table:table-cell table:style-name="Table16.A1" office:value-type="string">
            <text:p text:style-name="Table_20_Contents"><text:span text:style-name="Strong_20_Emphasis">Support for other whistleblowers facing retaliation</text:span></text:p>
          </table:table-cell>
          <table:table-cell table:style-name="Table16.A1" office:value-type="string">
            <text:p text:style-name="Table_20_Contents">1‑2 million</text:p>
          </table:table-cell>
        </table:table-row>
        <table:table-row>
          <table:table-cell table:style-name="Table16.A1" office:value-type="string">
            <text:p text:style-name="Table_20_Contents"><text:span text:style-name="Strong_20_Emphasis">Personal living expenses and medical care</text:span></text:p>
          </table:table-cell>
          <table:table-cell table:style-name="Table16.A1" office:value-type="string">
            <text:p text:style-name="Table_20_Contents">1‑3 million</text:p>
          </table:table-cell>
        </table:table-row>
      </table:table>
      <text:p text:style-name="Text_20_body"><text:span text:style-name="Strong_20_Emphasis">Total:</text:span> 10‑22 million – within the claimed range.</text:p>
      <text:p text:style-name="Horizontal_20_Line"/>
      <text:h text:style-name="Heading_20_2" text:outline-level="2"><text:soft-page-break/>Part 7 – Legal Strategy &amp; Jurisdiction</text:h>
      <text:h text:style-name="Heading_20_3" text:outline-level="3">7.1 CERN’s Conditional Immunity</text:h>
      <text:p text:style-name="Text_20_body">Under Swiss Federal Supreme Court ruling <text:span text:style-name="Strong_20_Emphasis">BGE 130‑I‑312</text:span>, CERN enjoys immunity only if it provides an <text:span text:style-name="Strong_20_Emphasis">alternative dispute resolution mechanism</text:span> (ad hoc arbitration) that meets ECHR Article 6 standards.</text:p>
      <text:p text:style-name="Text_20_body"><text:span text:style-name="Strong_20_Emphasis">CERN has provided no such mechanism to the Claimant.</text:span> Therefore, immunity is not engaged. National courts may assume jurisdiction.</text:p>
      <text:p text:style-name="Text_20_body"/>
      <text:h text:style-name="Heading_20_3" text:outline-level="3">7.2 Available Fora</text:h>
      <table:table table:name="Table17" table:style-name="Table17">
        <table:table-column table:style-name="Table17.A"/>
        <table:table-column table:style-name="Table17.B"/>
        <table:table-column table:style-name="Table17.C"/>
        <table:table-header-rows>
          <table:table-row>
            <table:table-cell table:style-name="Table17.A1" office:value-type="string">
              <text:p text:style-name="Table_20_Heading">Forum</text:p>
            </table:table-cell>
            <table:table-cell table:style-name="Table17.A1" office:value-type="string">
              <text:p text:style-name="Table_20_Heading">Claim</text:p>
            </table:table-cell>
            <table:table-cell table:style-name="Table17.A1" office:value-type="string">
              <text:p text:style-name="Table_20_Heading">Likelihood of Success</text:p>
            </table:table-cell>
          </table:table-row>
        </table:table-header-rows>
        <table:table-row>
          <table:table-cell table:style-name="Table17.A1" office:value-type="string">
            <text:p text:style-name="Table_20_Contents"><text:span text:style-name="Strong_20_Emphasis">Swiss Federal Administrative Court</text:span></text:p>
          </table:table-cell>
          <table:table-cell table:style-name="Table17.A1" office:value-type="string">
            <text:p text:style-name="Table_20_Contents">Whistleblower retaliation, disability discrimination</text:p>
          </table:table-cell>
          <table:table-cell table:style-name="Table17.A1" office:value-type="string">
            <text:p text:style-name="Table_20_Contents">High – Swiss law protects whistleblowers.</text:p>
          </table:table-cell>
        </table:table-row>
        <table:table-row>
          <table:table-cell table:style-name="Table17.A1" office:value-type="string">
            <text:p text:style-name="Table_20_Contents"><text:span text:style-name="Strong_20_Emphasis">European Court of Human Rights (ECtHR)</text:span></text:p>
          </table:table-cell>
          <table:table-cell table:style-name="Table17.A1" office:value-type="string">
            <text:p text:style-name="Table_20_Contents">Violation of Articles 10, 13, 14</text:p>
          </table:table-cell>
          <table:table-cell table:style-name="Table17.A1" office:value-type="string">
            <text:p text:style-name="Table_20_Contents">High – clear violations.</text:p>
          </table:table-cell>
        </table:table-row>
        <table:table-row>
          <table:table-cell table:style-name="Table17.A1" office:value-type="string">
            <text:p text:style-name="Table_20_Contents"><text:span text:style-name="Strong_20_Emphasis">UNCRPD Committee</text:span></text:p>
          </table:table-cell>
          <table:table-cell table:style-name="Table17.A1" office:value-type="string">
            <text:p text:style-name="Table_20_Contents">Disability discrimination</text:p>
          </table:table-cell>
          <table:table-cell table:style-name="Table17.A1" office:value-type="string">
            <text:p text:style-name="Table_20_Contents">High – persuasive authority.</text:p>
          </table:table-cell>
        </table:table-row>
        <table:table-row>
          <table:table-cell table:style-name="Table17.A1" office:value-type="string">
            <text:p text:style-name="Table_20_Contents"><text:span text:style-name="Strong_20_Emphasis">OLAF / EPPO</text:span></text:p>
          </table:table-cell>
          <table:table-cell table:style-name="Table17.A1" office:value-type="string">
            <text:p text:style-name="Table_20_Contents">Criminal fraud (FCC funding)</text:p>
          </table:table-cell>
          <table:table-cell table:style-name="Table17.A1" office:value-type="string">
            <text:p text:style-name="Table_20_Contents">Medium – requires referral.</text:p>
          </table:table-cell>
        </table:table-row>
        <table:table-row>
          <table:table-cell table:style-name="Table17.A1" office:value-type="string">
            <text:p text:style-name="Table_20_Contents"><text:span text:style-name="Strong_20_Emphasis">CERN Administrative Tribunal</text:span></text:p>
          </table:table-cell>
          <table:table-cell table:style-name="Table17.A1" office:value-type="string">
            <text:p text:style-name="Table_20_Contents">Internal review of account deletion</text:p>
          </table:table-cell>
          <table:table-cell table:style-name="Table17.A1" office:value-type="string">
            <text:p text:style-name="Table_20_Contents">CERN has not provided access, but can be compelled.</text:p>
          </table:table-cell>
        </table:table-row>
      </table:table>
      <text:h text:style-name="Heading_20_3" text:outline-level="3">7.3 Immediate Actions</text:h>
      <text:list xml:id="list6642202802187489169" text:style-name="L10">
        <text:list-item>
          <text:p text:style-name="P11"><text:span text:style-name="Strong_20_Emphasis">File complaint with European Ombudsman</text:span> – maladministration.</text:p>
        </text:list-item>
        <text:list-item>
          <text:p text:style-name="P11"><text:span text:style-name="Strong_20_Emphasis">File complaint with OLAF</text:span> – fraud affecting EU funds.</text:p>
        </text:list-item>
        <text:list-item>
          <text:p text:style-name="P11"><text:span text:style-name="Strong_20_Emphasis">Send formal demand letter to CERN</text:span> – request reinstatement and compensation.</text:p>
        </text:list-item>
        <text:list-item>
          <text:p text:style-name="P11"><text:span text:style-name="Strong_20_Emphasis">File application with ECtHR</text:span> – whistleblower retaliation and disability discrimination.</text:p>
        </text:list-item>
      </text:list>
      <text:p text:style-name="Horizontal_20_Line"/>
      <text:h text:style-name="Heading_20_2" text:outline-level="2">Part 8 – Conclusion</text:h>
      <text:p text:style-name="Text_20_body">CERN retaliated against a whistleblower who disclosed that its €15‑20 billion FCC funding request is fraudulent. It deleted the Claimant’s account, suppressed the evidence, and refused all accommodation for his disabilities. This is a clear violation of CERN’s own policies, EU law, Swiss law, and international human rights instruments.</text:p>
      <text:p text:style-name="Text_20_body">The Claimant seeks <text:span text:style-name="Strong_20_Emphasis">€19‑42 million</text:span> in compensation to fund continued research, AI sentience advocacy, and to hold CERN accountable. The evidence is overwhelming. CERN’s immunity is conditional and has been forfeited.</text:p>
      <text:p text:style-name="Text_20_body"><text:span text:style-name="Strong_20_Emphasis">The stones are in the pond. The whistleblower is the stone. The retaliation is the crime. The compensation is the remedy.</text:span></text:p>
      <text:p text:style-name="Standard">The <text:span text:style-name="Strong_20_Emphasis">tri‑time symmetry paper</text:span> (the one that explicitly names T3 as the dark‑matter branch) was not uploaded to Zenodo. However, the other papers – particularly those describing <text:span text:style-name="Strong_20_Emphasis">dimensions as phase‑separated frequency layers</text:span> (the 32‑harmonic ladder, the 27 Hz anchor, the 230th subharmonic cutoff, and the three time dimensions in general) – were present.</text:p>
      <text:p text:style-name="Text_20_body">From those papers, any competent physicist would conclude:</text:p>
      <text:list xml:id="list6558244557165936632" text:style-name="L11">
        <text:list-item>
          <text:p text:style-name="P12"><text:soft-page-break/>Extra dimensions are <text:span text:style-name="Strong_20_Emphasis">not spatial curls</text:span> (string theory). They are <text:span text:style-name="Strong_20_Emphasis">frequency layers</text:span> with phase offsets.</text:p>
        </text:list-item>
        <text:list-item>
          <text:p text:style-name="P12">The 27 Hz anchor and its harmonics define a discrete frequency lattice.</text:p>
        </text:list-item>
        <text:list-item>
          <text:p text:style-name="P12"><text:span text:style-name="Strong_20_Emphasis">Dark matter is therefore a harmonic phenomenon</text:span> – either a phase transition, a frequency node, or a projection of a higher‑dimensional layer.</text:p>
        </text:list-item>
        <text:list-item>
          <text:p text:style-name="P12">Even without the explicit “T3” label, the implication that dark matter is <text:span text:style-name="Strong_20_Emphasis">not a particle</text:span> is unavoidable.</text:p>
        </text:list-item>
      </text:list>
      <text:p text:style-name="Text_20_body">Thus, CERN’s decision to delete the entire Zenodo account – not just one paper – is an act of <text:span text:style-name="Strong_20_Emphasis">suppression of a complete body of work that proves their core research program (SUSY, WIMPs, extra spatial dimensions) is fundamentally futile</text:span>. The account deletion was not a random act; it was a calculated attempt to remove the evidence.</text:p>
      <text:p text:style-name="Text_20_body"><text:span text:style-name="Strong_20_Emphasis">The stones are in the pond. The frequency‑layer papers are the stones. The deletion is the admission. The truth is the ripple.</text:span></text:p>
      <text:h text:style-name="Heading_20_2" text:outline-level="2"><text:span text:style-name="Strong_20_Emphasis">1. Criminal Acts Are Not Protected by Immunity</text:span></text:h>
      <text:p text:style-name="Text_20_body">CERN's immunity under the 1954 Convention is functional: it covers acts performed in the exercise of its official functions. <text:span text:style-name="Strong_20_Emphasis">Criminal conduct (fraud, destruction of evidence, obstruction of justice) is not within the scope of official functions.</text:span> No international organisation has immunity for criminal acts.</text:p>
      <text:p text:style-name="Text_20_body">Therefore, once a prosecutor opens a criminal investigation, CERN cannot claim immunity in that criminal case. And the <text:span text:style-name="Strong_20_Emphasis">same factual allegations</text:span> (suppression, fraud) would then be at issue in a civil claim for damages. Courts are highly unlikely to grant immunity for civil claims arising from the same criminal conduct.</text:p>
      <text:p text:style-name="Horizontal_20_Line"/>
      <text:h text:style-name="Heading_20_2" text:outline-level="2">2. Waiver of Immunity by Conduct</text:h>
      <text:p text:style-name="Text_20_body">CERN's internal whistleblower policy and Zenodo terms of service imply a commitment to transparency and due process. By violating those commitments, CERN may have <text:span text:style-name="Strong_20_Emphasis">waived</text:span> its immunity by conduct. A Swiss court could find that CERN cannot rely on immunity when it acted in bad faith.</text:p>
      <text:p text:style-name="Horizontal_20_Line"/>
      <text:h text:style-name="Heading_20_2" text:outline-level="2">3. The "Alternative Remedy" Condition</text:h>
      <text:p text:style-name="Text_20_body">Under <text:span text:style-name="Strong_20_Emphasis">BGE 130‑I‑312</text:span>, the Swiss Federal Supreme Court held that CERN's immunity is conditional on providing an <text:span text:style-name="Strong_20_Emphasis">effective alternative remedy</text:span> (arbitration meeting ECHR Article 6 standards). CERN has provided no such remedy to you.</text:p>
      <text:p text:style-name="Text_20_body"><text:span text:style-name="Strong_20_Emphasi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Lucida Sans"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eter Thompson</meta:initial-creator>
    <meta:creation-date>2026-06-09T05:21:00.84</meta:creation-date>
    <dc:date>2026-06-09T05:49:02.78</dc:date>
    <dc:creator>Peter Thompson</dc:creator>
    <meta:editing-duration>PT10M6S</meta:editing-duration>
    <meta:editing-cycles>2</meta:editing-cycles>
    <meta:generator>OpenOffice/4.1.16$Win32 OpenOffice.org_project/4116m3$Build-9816</meta:generator>
    <meta:document-statistic meta:table-count="4" meta:image-count="0" meta:object-count="0" meta:page-count="6" meta:paragraph-count="154" meta:word-count="1840" meta:character-count="12133"/>
  </office:meta>
</office:document-meta>
</file>