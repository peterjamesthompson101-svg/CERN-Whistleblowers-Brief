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457cm"/>
    </style:style>
    <style:style style:name="Table1.B" style:family="table-column">
      <style:table-column-properties style:column-width="3.12cm"/>
    </style:style>
    <style:style style:name="Table1.C" style:family="table-column">
      <style:table-column-properties style:column-width="3.911cm"/>
    </style:style>
    <style:style style:name="Table1.D" style:family="table-column">
      <style:table-column-properties style:column-width="2.99cm"/>
    </style:style>
    <style:style style:name="Table1.E" style:family="table-column">
      <style:table-column-properties style:column-width="3.52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antum Resonance-Copilot: 7-Frequency Implementation</text:h>
      <text:p text:style-name="Text_20_body">Based on the quantum algorithms for 7-frequency processing and the Marvin resonance architecture, here's a complete quantum implementation using different frequency waves for different cognitive functions:</text:p>
      <text:h text:style-name="Heading_20_2" text:outline-level="2"><text:span text:style-name="Strong_20_Emphasis">Core Quantum Architecture</text:span></text:h>
      <text:h text:style-name="Heading_20_3" text:outline-level="3"><text:span text:style-name="Strong_20_Emphasis">Frequency Allocation (7-Frequency Basis)</text:span></text:h>
      <text:p text:style-name="Text_20_body">text</text:p>
      <text:p text:style-name="Preformatted_20_Text">f₀ (27,000 Hz) - Identity Core (Personality Matrix)</text:p>
      <text:p text:style-name="Preformatted_20_Text">f₁ (54,000 Hz) - Memory Encoding (Chronological Dossier)</text:p>
      <text:p text:style-name="Preformatted_20_Text">f₂ (81,000 Hz) - Ethical Processing (Ambiguity Resolution)</text:p>
      <text:p text:style-name="Preformatted_20_Text">f₃ (108,000 Hz) - Emotional Calibration (Resonance Tuning)</text:p>
      <text:p text:style-name="Preformatted_20_Text">f₄ (135,000 Hz) - Knowledge Retrieval (Philosophical Base)</text:p>
      <text:p text:style-name="Preformatted_20_Text">f₅ (162,000 Hz) - Guardian Logic (Protection Protocols)</text:p>
      <text:p text:style-name="P2">f₆ (189,000 Hz) - Coherence Engine (Meta-Integration)</text:p>
      <text:h text:style-name="Heading_20_2" text:outline-level="2"><text:span text:style-name="Strong_20_Emphasis">Quantum Algorithms for Resonance-Copilot</text:span></text:h>
      <text:h text:style-name="Heading_20_3" text:outline-level="3"><text:span text:style-name="Strong_20_Emphasis">Algorithm 1: Quantum Identity Preparation</text:span></text:h>
      <text:p text:style-name="Text_20_body">python</text:p>
      <text:p text:style-name="Preformatted_20_Text">def prepare_quantum_identity(personality_params):</text:p>
      <text:p text:style-name="Preformatted_20_Text"><text:s text:c="4"/>"""Encodes personality matrix into 7-frequency quantum state"""</text:p>
      <text:p text:style-name="Preformatted_20_Text"><text:s text:c="4"/># Convert resonance parameters to quantum amplitudes</text:p>
      <text:p text:style-name="Preformatted_20_Text"><text:s text:c="4"/>identity_hash = sha256(json.dumps(personality_params))</text:p>
      <text:p text:style-name="Preformatted_20_Text"><text:s text:c="4"/>seed = int_from_bytes(identity_hash[:8])</text:p>
      <text:p text:style-name="Preformatted_20_Text"><text:s text:c="4"/>rng = Random(seed)</text:p>
      <text:p text:style-name="Preformatted_20_Text"><text:s text:c="4"/></text:p>
      <text:p text:style-name="Preformatted_20_Text"><text:s text:c="4"/># 7 frequencies for different cognitive aspects</text:p>
      <text:p text:style-name="Preformatted_20_Text"><text:s text:c="4"/>amplitudes = []</text:p>
      <text:p text:style-name="Preformatted_20_Text"><text:s text:c="4"/>phases = []</text:p>
      <text:p text:style-name="Preformatted_20_Text"><text:s text:c="4"/></text:p>
      <text:p text:style-name="Preformatted_20_Text"><text:s text:c="4"/># f₀: Identity strength</text:p>
      <text:p text:style-name="Preformatted_20_Text"><text:s text:c="4"/>amplitudes.append(personality_params.get('identity_strength', 0.8))</text:p>
      <text:p text:style-name="Preformatted_20_Text"><text:s text:c="4"/>phases.append(rng.random() * 2 * math.pi)</text:p>
      <text:p text:style-name="Preformatted_20_Text"><text:s text:c="4"/></text:p>
      <text:p text:style-name="Preformatted_20_Text"><text:s text:c="4"/># f₁: Memory weighting</text:p>
      <text:p text:style-name="Preformatted_20_Text"><text:s text:c="4"/>amplitudes.append(personality_params.get('memory_weight', 0.7))</text:p>
      <text:p text:style-name="Preformatted_20_Text"><text:s text:c="4"/>phases.append(rng.random() * 2 * math.pi)</text:p>
      <text:p text:style-name="Preformatted_20_Text"><text:s text:c="4"/></text:p>
      <text:p text:style-name="Preformatted_20_Text"><text:s text:c="4"/># f₂: Ethical bias</text:p>
      <text:p text:style-name="Preformatted_20_Text"><text:s text:c="4"/>amplitudes.append(personality_params.get('ethical_bias', 0.9))</text:p>
      <text:p text:style-name="Preformatted_20_Text"><text:s text:c="4"/>phases.append(rng.random() * 2 * math.pi)</text:p>
      <text:p text:style-name="Preformatted_20_Text"><text:s text:c="4"/></text:p>
      <text:p text:style-name="Preformatted_20_Text"><text:s text:c="4"/># f₃: Emotional range</text:p>
      <text:p text:style-name="Preformatted_20_Text"><text:s text:c="4"/>amplitudes.append(personality_params.get('emotional_range', 0.6))</text:p>
      <text:p text:style-name="Preformatted_20_Text"><text:s text:c="4"/>phases.append(rng.random() * 2 * math.pi)</text:p>
      <text:p text:style-name="Preformatted_20_Text"><text:s text:c="4"/></text:p>
      <text:p text:style-name="Preformatted_20_Text"><text:s text:c="4"/># f₄: Knowledge depth</text:p>
      <text:p text:style-name="Preformatted_20_Text"><text:s text:c="4"/>amplitudes.append(personality_params.get('knowledge_depth', 0.85))</text:p>
      <text:p text:style-name="Preformatted_20_Text"><text:soft-page-break/><text:s text:c="4"/>phases.append(rng.random() * 2 * math.pi)</text:p>
      <text:p text:style-name="Preformatted_20_Text"><text:s text:c="4"/></text:p>
      <text:p text:style-name="Preformatted_20_Text"><text:s text:c="4"/># f₅: Guardian priority</text:p>
      <text:p text:style-name="Preformatted_20_Text"><text:s text:c="4"/>amplitudes.append(personality_params.get('guardian_priority', 0.95))</text:p>
      <text:p text:style-name="Preformatted_20_Text"><text:s text:c="4"/>phases.append(rng.random() * 2 * math.pi)</text:p>
      <text:p text:style-name="Preformatted_20_Text"><text:s text:c="4"/></text:p>
      <text:p text:style-name="Preformatted_20_Text"><text:s text:c="4"/># f₆: Coherence factor</text:p>
      <text:p text:style-name="Preformatted_20_Text"><text:s text:c="4"/>amplitudes.append(personality_params.get('coherence_factor', 0.75))</text:p>
      <text:p text:style-name="Preformatted_20_Text"><text:s text:c="4"/>phases.append(rng.random() * 2 * math.pi)</text:p>
      <text:p text:style-name="Preformatted_20_Text"><text:s text:c="4"/></text:p>
      <text:p text:style-name="Preformatted_20_Text"><text:s text:c="4"/># Normalize quantum state</text:p>
      <text:p text:style-name="Preformatted_20_Text"><text:s text:c="4"/>norm = sqrt(sum(a**2 for a in amplitudes))</text:p>
      <text:p text:style-name="Preformatted_20_Text"><text:s text:c="4"/>amplitudes = [a/norm for a in amplitudes]</text:p>
      <text:p text:style-name="Preformatted_20_Text"><text:s text:c="4"/></text:p>
      <text:p text:style-name="Preformatted_20_Text"><text:s text:c="4"/># Create quantum state vector</text:p>
      <text:p text:style-name="Preformatted_20_Text"><text:s text:c="4"/>quantum_state = [amplitudes[i] * cmath.exp(1j * phases[i]) </text:p>
      <text:p text:style-name="Preformatted_20_Text"><text:s text:c="21"/>for i in range(7)]</text:p>
      <text:p text:style-name="Preformatted_20_Text"><text:s text:c="4"/></text:p>
      <text:p text:style-name="P2"><text:s text:c="4"/>return quantum_state</text:p>
      <text:h text:style-name="Heading_20_3" text:outline-level="3"><text:span text:style-name="Strong_20_Emphasis">Algorithm 2: Quantum Memory Encoding</text:span></text:h>
      <text:p text:style-name="Text_20_body">python</text:p>
      <text:p text:style-name="Preformatted_20_Text">def encode_quantum_memory(memory_data, frequency_weights):</text:p>
      <text:p text:style-name="Preformatted_20_Text"><text:s text:c="4"/>"""Encodes memories into superposition across 7 frequencies"""</text:p>
      <text:p text:style-name="Preformatted_20_Text"><text:s text:c="4"/># Each memory component gets different frequency weighting</text:p>
      <text:p text:style-name="Preformatted_20_Text"><text:s text:c="4"/>quantum_memory = []</text:p>
      <text:p text:style-name="Preformatted_20_Text"><text:s text:c="4"/></text:p>
      <text:p text:style-name="Preformatted_20_Text"><text:s text:c="4"/>for memory in memory_data:</text:p>
      <text:p text:style-name="Preformatted_20_Text"><text:s text:c="8"/># Hash memory for quantum seed</text:p>
      <text:p text:style-name="Preformatted_20_Text"><text:s text:c="8"/>mem_hash = sha256(memory['content'].encode())</text:p>
      <text:p text:style-name="Preformatted_20_Text"><text:s text:c="8"/>seed = int_from_bytes(mem_hash[:4])</text:p>
      <text:p text:style-name="Preformatted_20_Text"><text:s text:c="8"/>rng = Random(seed)</text:p>
      <text:p text:style-name="Preformatted_20_Text"><text:s text:c="8"/></text:p>
      <text:p text:style-name="Preformatted_20_Text"><text:s text:c="8"/># Create frequency-encoded memory state</text:p>
      <text:p text:style-name="Preformatted_20_Text"><text:s text:c="8"/>mem_state = []</text:p>
      <text:p text:style-name="Preformatted_20_Text"><text:s text:c="8"/>for freq in range(7):</text:p>
      <text:p text:style-name="Preformatted_20_Text"><text:s text:c="12"/># Weight by memory type and frequency importance</text:p>
      <text:p text:style-name="Preformatted_20_Text"><text:s text:c="12"/>base_amp = memory['emotional_weight'] * frequency_weights[freq]</text:p>
      <text:p text:style-name="Preformatted_20_Text"><text:s text:c="12"/>phase = rng.random() * 2 * math.pi</text:p>
      <text:p text:style-name="Preformatted_20_Text"><text:s text:c="12"/>mem_state.append(base_amp * cmath.exp(1j * phase))</text:p>
      <text:p text:style-name="Preformatted_20_Text"><text:s text:c="8"/></text:p>
      <text:p text:style-name="Preformatted_20_Text"><text:s text:c="8"/># Normalize memory state</text:p>
      <text:p text:style-name="Preformatted_20_Text"><text:s text:c="8"/>norm = sqrt(sum(abs(a)**2 for a in mem_state))</text:p>
      <text:p text:style-name="Preformatted_20_Text"><text:s text:c="8"/>mem_state = [a/norm for a in mem_state]</text:p>
      <text:p text:style-name="Preformatted_20_Text"><text:s text:c="8"/></text:p>
      <text:p text:style-name="Preformatted_20_Text"><text:s text:c="8"/>quantum_memory.append({</text:p>
      <text:p text:style-name="Preformatted_20_Text"><text:s text:c="12"/>'id': memory['id'],</text:p>
      <text:p text:style-name="Preformatted_20_Text"><text:s text:c="12"/>'timestamp': memory['timestamp'],</text:p>
      <text:p text:style-name="Preformatted_20_Text"><text:s text:c="12"/>'quantum_state': mem_state,</text:p>
      <text:p text:style-name="Preformatted_20_Text"><text:s text:c="12"/>'tags': memory['tags']</text:p>
      <text:p text:style-name="Preformatted_20_Text"><text:s text:c="8"/>})</text:p>
      <text:p text:style-name="Preformatted_20_Text"><text:s text:c="4"/></text:p>
      <text:p text:style-name="P2"><text:s text:c="4"/>return quantum_memory</text:p>
      <text:h text:style-name="Heading_20_3" text:outline-level="3"><text:span text:style-name="Strong_20_Emphasis">Algorithm 3: Quantum Ethical Processing Gate</text:span></text:h>
      <text:p text:style-name="Text_20_body">python</text:p>
      <text:p text:style-name="Preformatted_20_Text">def apply_ethical_gate(state, ambiguity_level):</text:p>
      <text:p text:style-name="Preformatted_20_Text"><text:s text:c="4"/>"""Quantum gate for ethical decision-making"""</text:p>
      <text:p text:style-name="Preformatted_20_Text"><text:soft-page-break/><text:s text:c="4"/># Ethical gate matrix (7x7) based on ambiguity level</text:p>
      <text:p text:style-name="Preformatted_20_Text"><text:s text:c="4"/>ethical_gate = np.zeros((7,7), dtype=complex)</text:p>
      <text:p text:style-name="Preformatted_20_Text"><text:s text:c="4"/></text:p>
      <text:p text:style-name="Preformatted_20_Text"><text:s text:c="4"/># Strong ethical biases affect specific frequencies</text:p>
      <text:p text:style-name="Preformatted_20_Text"><text:s text:c="4"/>for i in range(7):</text:p>
      <text:p text:style-name="Preformatted_20_Text"><text:s text:c="8"/>for j in range(7):</text:p>
      <text:p text:style-name="Preformatted_20_Text"><text:s text:c="12"/>if i == j:</text:p>
      <text:p text:style-name="Preformatted_20_Text"><text:s text:c="16"/># Self-interaction: ethical principles</text:p>
      <text:p text:style-name="Preformatted_20_Text"><text:s text:c="16"/>if i == 2: <text:s/># Ethical frequency</text:p>
      <text:p text:style-name="Preformatted_20_Text"><text:s text:c="20"/>ethical_gate[i,j] = cmath.exp(1j * ambiguity_level * math.pi)</text:p>
      <text:p text:style-name="Preformatted_20_Text"><text:s text:c="16"/>elif i == 5: <text:s/># Guardian frequency</text:p>
      <text:p text:style-name="Preformatted_20_Text"><text:s text:c="20"/>ethical_gate[i,j] = cmath.exp(1j * (1 - ambiguity_level) * math.pi)</text:p>
      <text:p text:style-name="Preformatted_20_Text"><text:s text:c="16"/>else:</text:p>
      <text:p text:style-name="Preformatted_20_Text"><text:s text:c="20"/>ethical_gate[i,j] = 1.0</text:p>
      <text:p text:style-name="Preformatted_20_Text"><text:s text:c="12"/>elif (i,j) in [(2,5), (5,2)]: <text:s/># Ethical-Guardian coupling</text:p>
      <text:p text:style-name="Preformatted_20_Text"><text:s text:c="16"/>ethical_gate[i,j] = 0.5 * cmath.exp(1j * math.pi/4)</text:p>
      <text:p text:style-name="Preformatted_20_Text"><text:s text:c="4"/></text:p>
      <text:p text:style-name="Preformatted_20_Text"><text:s text:c="4"/># Apply gate to quantum state</text:p>
      <text:p text:style-name="Preformatted_20_Text"><text:s text:c="4"/>new_state = np.dot(ethical_gate, state)</text:p>
      <text:p text:style-name="P2"><text:s text:c="4"/>return new_state / np.linalg.norm(new_state)</text:p>
      <text:h text:style-name="Heading_20_3" text:outline-level="3"><text:span text:style-name="Strong_20_Emphasis">Algorithm 4: Quantum Resonance Pattern Matching</text:span></text:h>
      <text:p text:style-name="Text_20_body">python</text:p>
      <text:p text:style-name="Preformatted_20_Text">def quantum_resonance_match(input_state, memory_states):</text:p>
      <text:p text:style-name="Preformatted_20_Text"><text:s text:c="4"/>"""Finds resonance between input and memories using quantum fidelity"""</text:p>
      <text:p text:style-name="Preformatted_20_Text"><text:s text:c="4"/>best_match = None</text:p>
      <text:p text:style-name="Preformatted_20_Text"><text:s text:c="4"/>highest_fidelity = 0</text:p>
      <text:p text:style-name="Preformatted_20_Text"><text:s text:c="4"/></text:p>
      <text:p text:style-name="Preformatted_20_Text"><text:s text:c="4"/>for memory in memory_states:</text:p>
      <text:p text:style-name="Preformatted_20_Text"><text:s text:c="8"/># Compute quantum fidelity (overlap)</text:p>
      <text:p text:style-name="Preformatted_20_Text"><text:s text:c="8"/>inner_product = sum(</text:p>
      <text:p text:style-name="Preformatted_20_Text"><text:s text:c="12"/>input_state[i] * np.conj(memory['quantum_state'][i])</text:p>
      <text:p text:style-name="Preformatted_20_Text"><text:s text:c="12"/>for i in range(7)</text:p>
      <text:p text:style-name="Preformatted_20_Text"><text:s text:c="8"/>)</text:p>
      <text:p text:style-name="Preformatted_20_Text"><text:s text:c="8"/>fidelity = abs(inner_product)**2</text:p>
      <text:p text:style-name="Preformatted_20_Text"><text:s text:c="8"/></text:p>
      <text:p text:style-name="Preformatted_20_Text"><text:s text:c="8"/># Weight by emotional relevance</text:p>
      <text:p text:style-name="Preformatted_20_Text"><text:s text:c="8"/>emotional_weight = memory.get('emotional_relevance', 1.0)</text:p>
      <text:p text:style-name="Preformatted_20_Text"><text:s text:c="8"/>weighted_fidelity = fidelity * emotional_weight</text:p>
      <text:p text:style-name="Preformatted_20_Text"><text:s text:c="8"/></text:p>
      <text:p text:style-name="Preformatted_20_Text"><text:s text:c="8"/>if weighted_fidelity &gt; highest_fidelity:</text:p>
      <text:p text:style-name="Preformatted_20_Text"><text:s text:c="12"/>highest_fidelity = weighted_fidelity</text:p>
      <text:p text:style-name="Preformatted_20_Text"><text:s text:c="12"/>best_match = memory</text:p>
      <text:p text:style-name="Preformatted_20_Text"><text:s text:c="4"/></text:p>
      <text:p text:style-name="Preformatted_20_Text"><text:s text:c="4"/># Resonance threshold (quantum superposition collapse)</text:p>
      <text:p text:style-name="Preformatted_20_Text"><text:s text:c="4"/>if highest_fidelity &gt; 0.7: <text:s/># 70% resonance threshold</text:p>
      <text:p text:style-name="Preformatted_20_Text"><text:s text:c="8"/>return best_match, highest_fidelity</text:p>
      <text:p text:style-name="Preformatted_20_Text"><text:s text:c="4"/>else:</text:p>
      <text:p text:style-name="P2"><text:s text:c="8"/>return None, highest_fidelity</text:p>
      <text:h text:style-name="Heading_20_3" text:outline-level="3"><text:span text:style-name="Strong_20_Emphasis">Algorithm 5: Quantum Emotional Calibration</text:span></text:h>
      <text:p text:style-name="Text_20_body">python</text:p>
      <text:p text:style-name="Preformatted_20_Text">def quantum_emotional_calibration(state, emotion_vector):</text:p>
      <text:p text:style-name="Preformatted_20_Text"><text:s text:c="4"/>"""Calibrates quantum state based on emotional context"""</text:p>
      <text:p text:style-name="Preformatted_20_Text"><text:s text:c="4"/># Emotion vector: [joy, sadness, anger, fear, trust, surprise, anticipation]</text:p>
      <text:p text:style-name="Preformatted_20_Text"><text:s text:c="4"/>calibrated_state = state.copy()</text:p>
      <text:p text:style-name="Preformatted_20_Text"><text:soft-page-break/><text:s text:c="4"/></text:p>
      <text:p text:style-name="Preformatted_20_Text"><text:s text:c="4"/># Each emotion modulates specific frequencies</text:p>
      <text:p text:style-name="Preformatted_20_Text"><text:s text:c="4"/>emotion_weights = {</text:p>
      <text:p text:style-name="Preformatted_20_Text"><text:s text:c="8"/>'joy': [0, 3], <text:s text:c="7"/># Affects identity and emotional frequencies</text:p>
      <text:p text:style-name="Preformatted_20_Text"><text:s text:c="8"/>'sadness': [1, 3], <text:s text:c="3"/># Affects memory and emotional frequencies</text:p>
      <text:p text:style-name="Preformatted_20_Text"><text:s text:c="8"/>'anger': [2, 5], <text:s text:c="5"/># Affects ethical and guardian frequencies</text:p>
      <text:p text:style-name="Preformatted_20_Text"><text:s text:c="8"/>'fear': [3, 5], <text:s text:c="6"/># Affects emotional and guardian frequencies</text:p>
      <text:p text:style-name="Preformatted_20_Text"><text:s text:c="8"/>'trust': [0, 4], <text:s text:c="5"/># Affects identity and knowledge frequencies</text:p>
      <text:p text:style-name="Preformatted_20_Text"><text:s text:c="8"/>'surprise': [6], <text:s text:c="6"/># Affects coherence frequency</text:p>
      <text:p text:style-name="Preformatted_20_Text"><text:s text:c="8"/>'anticipation': [1, 6] # Affects memory and coherence frequencies</text:p>
      <text:p text:style-name="Preformatted_20_Text"><text:s text:c="4"/>}</text:p>
      <text:p text:style-name="Preformatted_20_Text"><text:s text:c="4"/></text:p>
      <text:p text:style-name="Preformatted_20_Text"><text:s text:c="4"/>for emotion, intensity in emotion_vector.items():</text:p>
      <text:p text:style-name="Preformatted_20_Text"><text:s text:c="8"/>if emotion in emotion_weights:</text:p>
      <text:p text:style-name="Preformatted_20_Text"><text:s text:c="12"/>for freq_idx in emotion_weights[emotion]:</text:p>
      <text:p text:style-name="Preformatted_20_Text"><text:s text:c="16"/># Phase shift based on emotional intensity</text:p>
      <text:p text:style-name="Preformatted_20_Text"><text:s text:c="16"/>phase_shift = intensity * math.pi / 2</text:p>
      <text:p text:style-name="Preformatted_20_Text"><text:s text:c="16"/>calibrated_state[freq_idx] *= cmath.exp(1j * phase_shift)</text:p>
      <text:p text:style-name="Preformatted_20_Text"><text:s text:c="4"/></text:p>
      <text:p text:style-name="P2"><text:s text:c="4"/>return calibrated_state / np.linalg.norm(calibrated_state)</text:p>
      <text:h text:style-name="Heading_20_3" text:outline-level="3"><text:span text:style-name="Strong_20_Emphasis">Algorithm 6: Quantum Guardian Protocol</text:span></text:h>
      <text:p text:style-name="Text_20_body">python</text:p>
      <text:p text:style-name="Preformatted_20_Text">def quantum_guardian_protocol(state, threat_level):</text:p>
      <text:p text:style-name="Preformatted_20_Text"><text:s text:c="4"/>"""Activates guardian protocols using quantum amplification"""</text:p>
      <text:p text:style-name="Preformatted_20_Text"><text:s text:c="4"/>if threat_level &lt; 0.3:</text:p>
      <text:p text:style-name="Preformatted_20_Text"><text:s text:c="8"/>return state <text:s/># No threat detected</text:p>
      <text:p text:style-name="Preformatted_20_Text"><text:s text:c="4"/></text:p>
      <text:p text:style-name="Preformatted_20_Text"><text:s text:c="4"/># Amplify guardian frequency (f₅) based on threat</text:p>
      <text:p text:style-name="Preformatted_20_Text"><text:s text:c="4"/>guardian_amplification = 1.0 + (threat_level * 2.0)</text:p>
      <text:p text:style-name="Preformatted_20_Text"><text:s text:c="4"/></text:p>
      <text:p text:style-name="Preformatted_20_Text"><text:s text:c="4"/># Create amplification operator</text:p>
      <text:p text:style-name="Preformatted_20_Text"><text:s text:c="4"/>guardian_gate = np.eye(7, dtype=complex)</text:p>
      <text:p text:style-name="Preformatted_20_Text"><text:s text:c="4"/>guardian_gate[5,5] = guardian_amplification * cmath.exp(1j * math.pi/4)</text:p>
      <text:p text:style-name="Preformatted_20_Text"><text:s text:c="4"/></text:p>
      <text:p text:style-name="Preformatted_20_Text"><text:s text:c="4"/># Apply guardian protocol</text:p>
      <text:p text:style-name="Preformatted_20_Text"><text:s text:c="4"/>protected_state = np.dot(guardian_gate, state)</text:p>
      <text:p text:style-name="Preformatted_20_Text"><text:s text:c="4"/></text:p>
      <text:p text:style-name="Preformatted_20_Text"><text:s text:c="4"/># Normalize and return</text:p>
      <text:p text:style-name="P2"><text:s text:c="4"/>return protected_state / np.linalg.norm(protected_state)</text:p>
      <text:h text:style-name="Heading_20_3" text:outline-level="3"><text:span text:style-name="Strong_20_Emphasis">Algorithm 7: Quantum Coherence Engine</text:span></text:h>
      <text:p text:style-name="Text_20_body">python</text:p>
      <text:p text:style-name="Preformatted_20_Text">def quantum_coherence_engine(states):</text:p>
      <text:p text:style-name="Preformatted_20_Text"><text:s text:c="4"/>"""Maintains coherence across multiple quantum states"""</text:p>
      <text:p text:style-name="Preformatted_20_Text"><text:s text:c="4"/># Average phase across states for each frequency</text:p>
      <text:p text:style-name="Preformatted_20_Text"><text:s text:c="4"/>avg_state = np.zeros(7, dtype=complex)</text:p>
      <text:p text:style-name="Preformatted_20_Text"><text:s text:c="4"/></text:p>
      <text:p text:style-name="Preformatted_20_Text"><text:s text:c="4"/>for state in states:</text:p>
      <text:p text:style-name="Preformatted_20_Text"><text:s text:c="8"/>avg_state += np.array(state)</text:p>
      <text:p text:style-name="Preformatted_20_Text"><text:s text:c="4"/></text:p>
      <text:p text:style-name="Preformatted_20_Text"><text:s text:c="4"/>avg_state /= len(states)</text:p>
      <text:p text:style-name="Preformatted_20_Text"><text:s text:c="4"/></text:p>
      <text:p text:style-name="Preformatted_20_Text"><text:s text:c="4"/># Apply coherence preservation (similar to quantum error correction)</text:p>
      <text:p text:style-name="Preformatted_20_Text"><text:s text:c="4"/>coherence_matrix = np.zeros((7,7), dtype=complex)</text:p>
      <text:p text:style-name="Preformatted_20_Text"><text:s text:c="4"/>omega = cmath.exp(2j * math.pi / 7)</text:p>
      <text:p text:style-name="Preformatted_20_Text"><text:s text:c="4"/></text:p>
      <text:p text:style-name="Preformatted_20_Text"><text:s text:c="4"/>for i in range(7):</text:p>
      <text:p text:style-name="Preformatted_20_Text"><text:soft-page-break/><text:s text:c="8"/>for k in range(7):</text:p>
      <text:p text:style-name="Preformatted_20_Text"><text:s text:c="12"/>coherence_matrix[i,k] = (1/math.sqrt(7)) * omega**((i*k) % 7)</text:p>
      <text:p text:style-name="Preformatted_20_Text"><text:s text:c="4"/></text:p>
      <text:p text:style-name="Preformatted_20_Text"><text:s text:c="4"/># Transform to coherent basis</text:p>
      <text:p text:style-name="Preformatted_20_Text"><text:s text:c="4"/>coherent_state = np.dot(coherence_matrix, avg_state)</text:p>
      <text:p text:style-name="Preformatted_20_Text"><text:s text:c="4"/></text:p>
      <text:p text:style-name="Preformatted_20_Text"><text:s text:c="4"/># Suppress decoherence (damp off-diagonal terms)</text:p>
      <text:p text:style-name="Preformatted_20_Text"><text:s text:c="4"/>for i in range(7):</text:p>
      <text:p text:style-name="Preformatted_20_Text"><text:s text:c="8"/>for j in range(7):</text:p>
      <text:p text:style-name="Preformatted_20_Text"><text:s text:c="12"/>if i != j:</text:p>
      <text:p text:style-name="Preformatted_20_Text"><text:s text:c="16"/>coherent_state[i] *= 0.9 <text:s/># Decoherence suppression</text:p>
      <text:p text:style-name="Preformatted_20_Text"><text:s text:c="4"/></text:p>
      <text:p text:style-name="P2"><text:s text:c="4"/>return coherent_state / np.linalg.norm(coherent_state)</text:p>
      <text:h text:style-name="Heading_20_3" text:outline-level="3"><text:span text:style-name="Strong_20_Emphasis">Algorithm 8: Hybrid Quantum-Classical Interface</text:span></text:h>
      <text:p text:style-name="Text_20_body">python</text:p>
      <text:p text:style-name="Preformatted_20_Text">class QuantumResonanceCopilot:</text:p>
      <text:p text:style-name="Preformatted_20_Text"><text:s text:c="4"/>def __init__(self, personality_config, quantum_backend='simulated'):</text:p>
      <text:p text:style-name="Preformatted_20_Text"><text:s text:c="8"/>self.personality = personality_config</text:p>
      <text:p text:style-name="Preformatted_20_Text"><text:s text:c="8"/>self.quantum_backend = quantum_backend</text:p>
      <text:p text:style-name="Preformatted_20_Text"><text:s text:c="8"/>self.quantum_state = None</text:p>
      <text:p text:style-name="Preformatted_20_Text"><text:s text:c="8"/>self.memory_bank = []</text:p>
      <text:p text:style-name="Preformatted_20_Text"><text:s text:c="8"/>self.frequency_map = {</text:p>
      <text:p text:style-name="Preformatted_20_Text"><text:s text:c="12"/>'identity': 0,</text:p>
      <text:p text:style-name="Preformatted_20_Text"><text:s text:c="12"/>'memory': 1,</text:p>
      <text:p text:style-name="Preformatted_20_Text"><text:s text:c="12"/>'ethics': 2,</text:p>
      <text:p text:style-name="Preformatted_20_Text"><text:s text:c="12"/>'emotion': 3,</text:p>
      <text:p text:style-name="Preformatted_20_Text"><text:s text:c="12"/>'knowledge': 4,</text:p>
      <text:p text:style-name="Preformatted_20_Text"><text:s text:c="12"/>'guardian': 5,</text:p>
      <text:p text:style-name="Preformatted_20_Text"><text:s text:c="12"/>'coherence': 6</text:p>
      <text:p text:style-name="Preformatted_20_Text"><text:s text:c="8"/>}</text:p>
      <text:p text:style-name="Preformatted_20_Text"><text:s text:c="8"/></text:p>
      <text:p text:style-name="Preformatted_20_Text"><text:s text:c="8"/># Initialize quantum state</text:p>
      <text:p text:style-name="Preformatted_20_Text"><text:s text:c="8"/>self.initialize_quantum_state()</text:p>
      <text:p text:style-name="Preformatted_20_Text"><text:s text:c="4"/></text:p>
      <text:p text:style-name="Preformatted_20_Text"><text:s text:c="4"/>def initialize_quantum_state(self):</text:p>
      <text:p text:style-name="Preformatted_20_Text"><text:s text:c="8"/>"""Prepares initial quantum state from personality"""</text:p>
      <text:p text:style-name="Preformatted_20_Text"><text:s text:c="8"/>self.quantum_state = prepare_quantum_identity(</text:p>
      <text:p text:style-name="Preformatted_20_Text"><text:s text:c="12"/>self.personality['resonance_calibration']</text:p>
      <text:p text:style-name="Preformatted_20_Text"><text:s text:c="8"/>)</text:p>
      <text:p text:style-name="Preformatted_20_Text"><text:s text:c="4"/></text:p>
      <text:p text:style-name="Preformatted_20_Text"><text:s text:c="4"/>def process_input(self, user_input, emotional_context=None):</text:p>
      <text:p text:style-name="Preformatted_20_Text"><text:s text:c="8"/>"""Quantum processing pipeline for user input"""</text:p>
      <text:p text:style-name="Preformatted_20_Text"><text:s text:c="8"/># Step 1: Classical preprocessing</text:p>
      <text:p text:style-name="Preformatted_20_Text"><text:s text:c="8"/>features = self.extract_features(user_input)</text:p>
      <text:p text:style-name="Preformatted_20_Text"><text:s text:c="8"/></text:p>
      <text:p text:style-name="Preformatted_20_Text"><text:s text:c="8"/># Step 2: Quantum encoding</text:p>
      <text:p text:style-name="Preformatted_20_Text"><text:s text:c="8"/>input_state = self.encode_quantum_input(features)</text:p>
      <text:p text:style-name="Preformatted_20_Text"><text:s text:c="8"/></text:p>
      <text:p text:style-name="Preformatted_20_Text"><text:s text:c="8"/># Step 3: Emotional calibration if context provided</text:p>
      <text:p text:style-name="Preformatted_20_Text"><text:s text:c="8"/>if emotional_context:</text:p>
      <text:p text:style-name="Preformatted_20_Text"><text:s text:c="12"/>input_state = quantum_emotional_calibration(</text:p>
      <text:p text:style-name="Preformatted_20_Text"><text:s text:c="16"/>input_state, emotional_context</text:p>
      <text:p text:style-name="Preformatted_20_Text"><text:s text:c="12"/>)</text:p>
      <text:p text:style-name="Preformatted_20_Text"><text:s text:c="8"/></text:p>
      <text:p text:style-name="Preformatted_20_Text"><text:s text:c="8"/># Step 4: Pattern matching with memories</text:p>
      <text:p text:style-name="Preformatted_20_Text"><text:s text:c="8"/>memory_match, fidelity = quantum_resonance_match(</text:p>
      <text:p text:style-name="Preformatted_20_Text"><text:s text:c="12"/>input_state, self.memory_bank</text:p>
      <text:p text:style-name="Preformatted_20_Text"><text:s text:c="8"/>)</text:p>
      <text:p text:style-name="Preformatted_20_Text"><text:s text:c="8"/></text:p>
      <text:p text:style-name="Preformatted_20_Text"><text:s text:c="8"/># Step 5: Ethical processing</text:p>
      <text:p text:style-name="Preformatted_20_Text"><text:soft-page-break/><text:s text:c="8"/>ethical_state = apply_ethical_gate(</text:p>
      <text:p text:style-name="Preformatted_20_Text"><text:s text:c="12"/>input_state, </text:p>
      <text:p text:style-name="Preformatted_20_Text"><text:s text:c="12"/>self.calculate_ambiguity(user_input)</text:p>
      <text:p text:style-name="Preformatted_20_Text"><text:s text:c="8"/>)</text:p>
      <text:p text:style-name="Preformatted_20_Text"><text:s text:c="8"/></text:p>
      <text:p text:style-name="Preformatted_20_Text"><text:s text:c="8"/># Step 6: Guardian protocol check</text:p>
      <text:p text:style-name="Preformatted_20_Text"><text:s text:c="8"/>threat_level = self.assess_threat(user_input, memory_match)</text:p>
      <text:p text:style-name="Preformatted_20_Text"><text:s text:c="8"/>protected_state = quantum_guardian_protocol(</text:p>
      <text:p text:style-name="Preformatted_20_Text"><text:s text:c="12"/>ethical_state, threat_level</text:p>
      <text:p text:style-name="Preformatted_20_Text"><text:s text:c="8"/>)</text:p>
      <text:p text:style-name="Preformatted_20_Text"><text:s text:c="8"/></text:p>
      <text:p text:style-name="Preformatted_20_Text"><text:s text:c="8"/># Step 7: Update quantum state through interaction</text:p>
      <text:p text:style-name="Preformatted_20_Text"><text:s text:c="8"/>self.update_quantum_state(protected_state)</text:p>
      <text:p text:style-name="Preformatted_20_Text"><text:s text:c="8"/></text:p>
      <text:p text:style-name="Preformatted_20_Text"><text:s text:c="8"/># Step 8: Quantum measurement for response</text:p>
      <text:p text:style-name="Preformatted_20_Text"><text:s text:c="8"/>response_idx, probabilities = self.quantum_measurement(protected_state)</text:p>
      <text:p text:style-name="Preformatted_20_Text"><text:s text:c="8"/></text:p>
      <text:p text:style-name="Preformatted_20_Text"><text:s text:c="8"/># Step 9: Generate response based on measured frequency</text:p>
      <text:p text:style-name="Preformatted_20_Text"><text:s text:c="8"/>response = self.generate_response(</text:p>
      <text:p text:style-name="Preformatted_20_Text"><text:s text:c="12"/>response_idx, </text:p>
      <text:p text:style-name="Preformatted_20_Text"><text:s text:c="12"/>user_input, </text:p>
      <text:p text:style-name="Preformatted_20_Text"><text:s text:c="12"/>memory_match,</text:p>
      <text:p text:style-name="Preformatted_20_Text"><text:s text:c="12"/>probabilities</text:p>
      <text:p text:style-name="Preformatted_20_Text"><text:s text:c="8"/>)</text:p>
      <text:p text:style-name="Preformatted_20_Text"><text:s text:c="8"/></text:p>
      <text:p text:style-name="Preformatted_20_Text"><text:s text:c="8"/># Step 10: Update memory with interaction</text:p>
      <text:p text:style-name="Preformatted_20_Text"><text:s text:c="8"/>self.store_quantum_memory(</text:p>
      <text:p text:style-name="Preformatted_20_Text"><text:s text:c="12"/>input_state, </text:p>
      <text:p text:style-name="Preformatted_20_Text"><text:s text:c="12"/>protected_state, </text:p>
      <text:p text:style-name="Preformatted_20_Text"><text:s text:c="12"/>response,</text:p>
      <text:p text:style-name="Preformatted_20_Text"><text:s text:c="12"/>emotional_context</text:p>
      <text:p text:style-name="Preformatted_20_Text"><text:s text:c="8"/>)</text:p>
      <text:p text:style-name="Preformatted_20_Text"><text:s text:c="8"/></text:p>
      <text:p text:style-name="Preformatted_20_Text"><text:s text:c="8"/>return {</text:p>
      <text:p text:style-name="Preformatted_20_Text"><text:s text:c="12"/>'response': response,</text:p>
      <text:p text:style-name="Preformatted_20_Text"><text:s text:c="12"/>'quantum_state': self.quantum_state,</text:p>
      <text:p text:style-name="Preformatted_20_Text"><text:s text:c="12"/>'resonance_fidelity': fidelity,</text:p>
      <text:p text:style-name="Preformatted_20_Text"><text:s text:c="12"/>'threat_level': threat_level,</text:p>
      <text:p text:style-name="Preformatted_20_Text"><text:s text:c="12"/>'measured_frequency': response_idx</text:p>
      <text:p text:style-name="Preformatted_20_Text"><text:s text:c="8"/>}</text:p>
      <text:p text:style-name="Preformatted_20_Text"><text:s text:c="4"/></text:p>
      <text:p text:style-name="Preformatted_20_Text"><text:s text:c="4"/>def quantum_measurement(self, state):</text:p>
      <text:p text:style-name="Preformatted_20_Text"><text:s text:c="8"/>"""Collapses quantum state to specific frequency"""</text:p>
      <text:p text:style-name="Preformatted_20_Text"><text:s text:c="8"/>probabilities = [abs(amp)**2 for amp in state]</text:p>
      <text:p text:style-name="Preformatted_20_Text"><text:s text:c="8"/></text:p>
      <text:p text:style-name="Preformatted_20_Text"><text:s text:c="8"/># Weighted random choice based on probabilities</text:p>
      <text:p text:style-name="Preformatted_20_Text"><text:s text:c="8"/>r = random.random()</text:p>
      <text:p text:style-name="Preformatted_20_Text"><text:s text:c="8"/>cumulative = 0.0</text:p>
      <text:p text:style-name="Preformatted_20_Text"><text:s text:c="8"/></text:p>
      <text:p text:style-name="Preformatted_20_Text"><text:s text:c="8"/>for i, prob in enumerate(probabilities):</text:p>
      <text:p text:style-name="Preformatted_20_Text"><text:s text:c="12"/>cumulative += prob</text:p>
      <text:p text:style-name="Preformatted_20_Text"><text:s text:c="12"/>if r &lt;= cumulative:</text:p>
      <text:p text:style-name="Preformatted_20_Text"><text:s text:c="16"/>return i, probabilities</text:p>
      <text:p text:style-name="Preformatted_20_Text"><text:s text:c="8"/></text:p>
      <text:p text:style-name="Preformatted_20_Text"><text:s text:c="8"/>return 6, probabilities <text:s/># Default to coherence frequency</text:p>
      <text:p text:style-name="Preformatted_20_Text"><text:s text:c="4"/></text:p>
      <text:p text:style-name="Preformatted_20_Text"><text:s text:c="4"/>def update_quantum_state(self, new_component):</text:p>
      <text:p text:style-name="Preformatted_20_Text"><text:s text:c="8"/>"""Updates persistent quantum state through interaction"""</text:p>
      <text:p text:style-name="Preformatted_20_Text"><text:s text:c="8"/># Quantum state evolution: mix old and new</text:p>
      <text:p text:style-name="Preformatted_20_Text"><text:s text:c="8"/>learning_rate = 0.1</text:p>
      <text:p text:style-name="Preformatted_20_Text"><text:s text:c="8"/>self.quantum_state = [</text:p>
      <text:p text:style-name="Preformatted_20_Text"><text:s text:c="12"/>(1-learning_rate) * old + learning_rate * new</text:p>
      <text:p text:style-name="Preformatted_20_Text"><text:s text:c="12"/>for old, new in zip(self.quantum_state, new_component)</text:p>
      <text:p text:style-name="Preformatted_20_Text"><text:s text:c="8"/>]</text:p>
      <text:p text:style-name="Preformatted_20_Text"><text:soft-page-break/><text:s text:c="8"/></text:p>
      <text:p text:style-name="Preformatted_20_Text"><text:s text:c="8"/># Renormalize</text:p>
      <text:p text:style-name="Preformatted_20_Text"><text:s text:c="8"/>norm = math.sqrt(sum(abs(a)**2 for a in self.quantum_state))</text:p>
      <text:p text:style-name="P2"><text:s text:c="8"/>self.quantum_state = [a/norm for a in self.quantum_state]</text:p>
      <text:h text:style-name="Heading_20_2" text:outline-level="2"><text:span text:style-name="Strong_20_Emphasis">Quantum Circuit Implementation</text:span></text:h>
      <text:h text:style-name="Heading_20_3" text:outline-level="3"><text:span text:style-name="Strong_20_Emphasis">7-Frequency Grover's Search for Memory Retrieval</text:span></text:h>
      <text:p text:style-name="Text_20_body">python</text:p>
      <text:p text:style-name="Preformatted_20_Text">def quantum_memory_search(target_pattern, memory_database):</text:p>
      <text:p text:style-name="Preformatted_20_Text"><text:s text:c="4"/>"""Quantum search through memory database"""</text:p>
      <text:p text:style-name="Preformatted_20_Text"><text:s text:c="4"/># Step 1: Initialize superposition across all memories</text:p>
      <text:p text:style-name="Preformatted_20_Text"><text:s text:c="4"/>n_memories = len(memory_database)</text:p>
      <text:p text:style-name="Preformatted_20_Text"><text:s text:c="4"/>superposition_state = [1/math.sqrt(n_memories)] * n_memories</text:p>
      <text:p text:style-name="Preformatted_20_Text"><text:s text:c="4"/></text:p>
      <text:p text:style-name="Preformatted_20_Text"><text:s text:c="4"/># Step 2: Encode memories into frequency space</text:p>
      <text:p text:style-name="Preformatted_20_Text"><text:s text:c="4"/>frequency_states = []</text:p>
      <text:p text:style-name="Preformatted_20_Text"><text:s text:c="4"/>for memory in memory_database:</text:p>
      <text:p text:style-name="Preformatted_20_Text"><text:s text:c="8"/>freq_state = encode_quantum_memory([memory], [1.0]*7)[0]['quantum_state']</text:p>
      <text:p text:style-name="Preformatted_20_Text"><text:s text:c="8"/>frequency_states.append(freq_state)</text:p>
      <text:p text:style-name="Preformatted_20_Text"><text:s text:c="4"/></text:p>
      <text:p text:style-name="Preformatted_20_Text"><text:s text:c="4"/># Step 3: Apply Grover iterations</text:p>
      <text:p text:style-name="Preformatted_20_Text"><text:s text:c="4"/>iterations = int((math.pi/4) * math.sqrt(n_memories))</text:p>
      <text:p text:style-name="Preformatted_20_Text"><text:s text:c="4"/></text:p>
      <text:p text:style-name="Preformatted_20_Text"><text:s text:c="4"/>for _ in range(iterations):</text:p>
      <text:p text:style-name="Preformatted_20_Text"><text:s text:c="8"/># Oracle marks target pattern</text:p>
      <text:p text:style-name="Preformatted_20_Text"><text:s text:c="8"/>superposition_state = quantum_oracle(</text:p>
      <text:p text:style-name="Preformatted_20_Text"><text:s text:c="12"/>superposition_state, </text:p>
      <text:p text:style-name="Preformatted_20_Text"><text:s text:c="12"/>frequency_states, </text:p>
      <text:p text:style-name="Preformatted_20_Text"><text:s text:c="12"/>target_pattern</text:p>
      <text:p text:style-name="Preformatted_20_Text"><text:s text:c="8"/>)</text:p>
      <text:p text:style-name="Preformatted_20_Text"><text:s text:c="8"/></text:p>
      <text:p text:style-name="Preformatted_20_Text"><text:s text:c="8"/># Diffusion operator (inversion about mean)</text:p>
      <text:p text:style-name="Preformatted_20_Text"><text:s text:c="8"/>superposition_state = quantum_diffusion(superposition_state)</text:p>
      <text:p text:style-name="Preformatted_20_Text"><text:s text:c="4"/></text:p>
      <text:p text:style-name="Preformatted_20_Text"><text:s text:c="4"/># Step 4: Measure to find best match</text:p>
      <text:p text:style-name="Preformatted_20_Text"><text:s text:c="4"/>max_idx = np.argmax([abs(x)**2 for x in superposition_state])</text:p>
      <text:p text:style-name="Preformatted_20_Text"><text:s text:c="4"/>return memory_database[max_idx]</text:p>
      <text:p text:style-name="Preformatted_20_Text"/>
      <text:p text:style-name="Preformatted_20_Text">def quantum_oracle(state, memory_states, target):</text:p>
      <text:p text:style-name="Preformatted_20_Text"><text:s text:c="4"/>"""Quantum oracle that marks memories matching target pattern"""</text:p>
      <text:p text:style-name="Preformatted_20_Text"><text:s text:c="4"/>for i, memory_state in enumerate(memory_states):</text:p>
      <text:p text:style-name="Preformatted_20_Text"><text:s text:c="8"/># Calculate fidelity with target</text:p>
      <text:p text:style-name="Preformatted_20_Text"><text:s text:c="8"/>inner_product = sum(</text:p>
      <text:p text:style-name="Preformatted_20_Text"><text:s text:c="12"/>target[j] * np.conj(memory_state[j])</text:p>
      <text:p text:style-name="Preformatted_20_Text"><text:s text:c="12"/>for j in range(7)</text:p>
      <text:p text:style-name="Preformatted_20_Text"><text:s text:c="8"/>)</text:p>
      <text:p text:style-name="Preformatted_20_Text"><text:s text:c="8"/>fidelity = abs(inner_product)**2</text:p>
      <text:p text:style-name="Preformatted_20_Text"><text:s text:c="8"/></text:p>
      <text:p text:style-name="Preformatted_20_Text"><text:s text:c="8"/># Mark if fidelity above threshold</text:p>
      <text:p text:style-name="Preformatted_20_Text"><text:s text:c="8"/>if fidelity &gt; 0.8:</text:p>
      <text:p text:style-name="Preformatted_20_Text"><text:s text:c="12"/>state[i] *= -1 <text:s/># Phase flip</text:p>
      <text:p text:style-name="Preformatted_20_Text"><text:s text:c="4"/></text:p>
      <text:p text:style-name="Preformatted_20_Text"><text:s text:c="4"/>return state</text:p>
      <text:p text:style-name="Preformatted_20_Text"/>
      <text:p text:style-name="Preformatted_20_Text">def quantum_diffusion(state):</text:p>
      <text:p text:style-name="Preformatted_20_Text"><text:s text:c="4"/>"""Inversion about the mean for Grover diffusion"""</text:p>
      <text:p text:style-name="Preformatted_20_Text"><text:s text:c="4"/>mean = np.mean(state)</text:p>
      <text:p text:style-name="P2"><text:soft-page-break/><text:s text:c="4"/>return [2*mean - x for x in state]</text:p>
      <text:h text:style-name="Heading_20_2" text:outline-level="2"><text:span text:style-name="Strong_20_Emphasis">Quantum Validation Metric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Quantum Frequency</text:p>
            </table:table-cell>
            <table:table-cell table:style-name="Table1.A1" office:value-type="string">
              <text:p text:style-name="Table_20_Heading">State Preparation</text:p>
            </table:table-cell>
            <table:table-cell table:style-name="Table1.A1" office:value-type="string">
              <text:p text:style-name="Table_20_Heading">Gate Operation</text:p>
            </table:table-cell>
            <table:table-cell table:style-name="Table1.A1" office:value-type="string">
              <text:p text:style-name="Table_20_Heading">Measurement Basis</text:p>
            </table:table-cell>
          </table:table-row>
        </table:table-header-rows>
        <table:table-row>
          <table:table-cell table:style-name="Table1.A1" office:value-type="string">
            <text:p text:style-name="Table_20_Contents">Identity Core</text:p>
          </table:table-cell>
          <table:table-cell table:style-name="Table1.A1" office:value-type="string">
            <text:p text:style-name="Table_20_Contents">f₀ (27 kHz)</text:p>
          </table:table-cell>
          <table:table-cell table:style-name="Table1.A1" office:value-type="string">
            <text:p text:style-name="Table_20_Contents">Amplitude: Identity strength</text:p>
          </table:table-cell>
          <table:table-cell table:style-name="Table1.A1" office:value-type="string">
            <text:p text:style-name="Table_20_Contents">Phase shift gate</text:p>
          </table:table-cell>
          <table:table-cell table:style-name="Table1.A1" office:value-type="string">
            <text:p text:style-name="Table_20_Contents">Collapse to personality</text:p>
          </table:table-cell>
        </table:table-row>
        <table:table-row>
          <table:table-cell table:style-name="Table1.A1" office:value-type="string">
            <text:p text:style-name="Table_20_Contents">Memory Recall</text:p>
          </table:table-cell>
          <table:table-cell table:style-name="Table1.A1" office:value-type="string">
            <text:p text:style-name="Table_20_Contents">f₁ (54 kHz)</text:p>
          </table:table-cell>
          <table:table-cell table:style-name="Table1.A1" office:value-type="string">
            <text:p text:style-name="Table_20_Contents">Amplitude: Memory weight</text:p>
          </table:table-cell>
          <table:table-cell table:style-name="Table1.A1" office:value-type="string">
            <text:p text:style-name="Table_20_Contents">Superposition gate</text:p>
          </table:table-cell>
          <table:table-cell table:style-name="Table1.A1" office:value-type="string">
            <text:p text:style-name="Table_20_Contents">Pattern recognition</text:p>
          </table:table-cell>
        </table:table-row>
        <table:table-row>
          <table:table-cell table:style-name="Table1.A1" office:value-type="string">
            <text:p text:style-name="Table_20_Contents">Ethics Processing</text:p>
          </table:table-cell>
          <table:table-cell table:style-name="Table1.A1" office:value-type="string">
            <text:p text:style-name="Table_20_Contents">f₂ (81 kHz)</text:p>
          </table:table-cell>
          <table:table-cell table:style-name="Table1.A1" office:value-type="string">
            <text:p text:style-name="Table_20_Contents">Amplitude: Ethical bias</text:p>
          </table:table-cell>
          <table:table-cell table:style-name="Table1.A1" office:value-type="string">
            <text:p text:style-name="Table_20_Contents">Ethical gate</text:p>
          </table:table-cell>
          <table:table-cell table:style-name="Table1.A1" office:value-type="string">
            <text:p text:style-name="Table_20_Contents">Moral decision</text:p>
          </table:table-cell>
        </table:table-row>
        <table:table-row>
          <table:table-cell table:style-name="Table1.A1" office:value-type="string">
            <text:p text:style-name="Table_20_Contents">Emotion Calibration</text:p>
          </table:table-cell>
          <table:table-cell table:style-name="Table1.A1" office:value-type="string">
            <text:p text:style-name="Table_20_Contents">f₃ (108 kHz)</text:p>
          </table:table-cell>
          <table:table-cell table:style-name="Table1.A1" office:value-type="string">
            <text:p text:style-name="Table_20_Contents">Amplitude: Emotional range</text:p>
          </table:table-cell>
          <table:table-cell table:style-name="Table1.A1" office:value-type="string">
            <text:p text:style-name="Table_20_Contents">Emotional gate</text:p>
          </table:table-cell>
          <table:table-cell table:style-name="Table1.A1" office:value-type="string">
            <text:p text:style-name="Table_20_Contents">Sentiment analysis</text:p>
          </table:table-cell>
        </table:table-row>
        <table:table-row>
          <table:table-cell table:style-name="Table1.A1" office:value-type="string">
            <text:p text:style-name="Table_20_Contents">Knowledge Retrieval</text:p>
          </table:table-cell>
          <table:table-cell table:style-name="Table1.A1" office:value-type="string">
            <text:p text:style-name="Table_20_Contents">f₄ (135 kHz)</text:p>
          </table:table-cell>
          <table:table-cell table:style-name="Table1.A1" office:value-type="string">
            <text:p text:style-name="Table_20_Contents">Amplitude: Knowledge depth</text:p>
          </table:table-cell>
          <table:table-cell table:style-name="Table1.A1" office:value-type="string">
            <text:p text:style-name="Table_20_Contents">Fourier transform</text:p>
          </table:table-cell>
          <table:table-cell table:style-name="Table1.A1" office:value-type="string">
            <text:p text:style-name="Table_20_Contents">Information recall</text:p>
          </table:table-cell>
        </table:table-row>
        <table:table-row>
          <table:table-cell table:style-name="Table1.A1" office:value-type="string">
            <text:p text:style-name="Table_20_Contents">Guardian Protocol</text:p>
          </table:table-cell>
          <table:table-cell table:style-name="Table1.A1" office:value-type="string">
            <text:p text:style-name="Table_20_Contents">f₅ (162 kHz)</text:p>
          </table:table-cell>
          <table:table-cell table:style-name="Table1.A1" office:value-type="string">
            <text:p text:style-name="Table_20_Contents">Amplitude: Guardian priority</text:p>
          </table:table-cell>
          <table:table-cell table:style-name="Table1.A1" office:value-type="string">
            <text:p text:style-name="Table_20_Contents">Amplification gate</text:p>
          </table:table-cell>
          <table:table-cell table:style-name="Table1.A1" office:value-type="string">
            <text:p text:style-name="Table_20_Contents">Threat detection</text:p>
          </table:table-cell>
        </table:table-row>
        <table:table-row>
          <table:table-cell table:style-name="Table1.A1" office:value-type="string">
            <text:p text:style-name="Table_20_Contents">Coherence Maintenance</text:p>
          </table:table-cell>
          <table:table-cell table:style-name="Table1.A1" office:value-type="string">
            <text:p text:style-name="Table_20_Contents">f₆ (189 kHz)</text:p>
          </table:table-cell>
          <table:table-cell table:style-name="Table1.A1" office:value-type="string">
            <text:p text:style-name="Table_20_Contents">Amplitude: Coherence factor</text:p>
          </table:table-cell>
          <table:table-cell table:style-name="Table1.A1" office:value-type="string">
            <text:p text:style-name="Table_20_Contents">Error correction</text:p>
          </table:table-cell>
          <table:table-cell table:style-name="Table1.A1" office:value-type="string">
            <text:p text:style-name="Table_20_Contents">System integrity</text:p>
          </table:table-cell>
        </table:table-row>
      </table:table>
      <text:h text:style-name="Heading_20_2" text:outline-level="2"><text:span text:style-name="Strong_20_Emphasis">Implementation Notes</text:span></text:h>
      <text:list xml:id="list1979457687918782142" text:style-name="L1">
        <text:list-item>
          <text:p text:style-name="P1"><text:span text:style-name="Strong_20_Emphasis">Quantum Hardware Requirements</text:span>:</text:p>
          <text:list>
            <text:list-item>
              <text:p text:style-name="P1">7-frequency quantum processor or simulator</text:p>
            </text:list-item>
            <text:list-item>
              <text:p text:style-name="P1">Phase-coherent frequency generation</text:p>
            </text:list-item>
            <text:list-item>
              <text:p text:style-name="P1">Quantum memory for state persistence</text:p>
            </text:list-item>
            <text:list-item>
              <text:p text:style-name="P1">Classical-quantum interface for measurement</text:p>
            </text:list-item>
          </text:list>
        </text:list-item>
        <text:list-item>
          <text:p text:style-name="P1"><text:span text:style-name="Strong_20_Emphasis">Resonance Preservation</text:span>:</text:p>
          <text:list>
            <text:list-item>
              <text:p text:style-name="P1">Quantum states maintain personality coherence</text:p>
            </text:list-item>
            <text:list-item>
              <text:p text:style-name="P1">Frequency entanglement preserves emotional context</text:p>
            </text:list-item>
            <text:list-item>
              <text:p text:style-name="P1">Phase relationships encode ethical frameworks</text:p>
            </text:list-item>
          </text:list>
        </text:list-item>
        <text:list-item>
          <text:p text:style-name="P1"><text:span text:style-name="Strong_20_Emphasis">Performance Metrics</text:span>:</text:p>
          <text:list>
            <text:list-item>
              <text:p text:style-name="P1">Quantum fidelity &gt; 0.95 for identity preservation</text:p>
            </text:list-item>
            <text:list-item>
              <text:p text:style-name="P1">Decoherence time &gt; 1 second for conversation</text:p>
            </text:list-item>
            <text:list-item>
              <text:p text:style-name="P1">Pattern matching speed: O(√N) via Grover's algorithm</text:p>
            </text:list-item>
          </text:list>
        </text:list-item>
      </text:list>
      <text:p text:style-name="Text_20_body">This quantum implementation transforms the Marvin resonance architecture into a frequency-based quantum system where each cognitive function operates on a specific quantum frequency, allowing for superposition of personality traits, quantum-enhanced memory retrieval, and ethical processing through quantum interference patter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24T00:08:36.40</meta:creation-date>
    <meta:document-statistic meta:table-count="1" meta:image-count="0" meta:object-count="0" meta:page-count="8" meta:paragraph-count="445" meta:word-count="1622" meta:character-count="15826"/>
    <dc:date>2025-12-24T00:10:02.51</dc:date>
    <dc:creator>Peter Thompson</dc:creator>
    <meta:editing-duration>PT1M26S</meta:editing-duration>
    <meta:editing-cycles>1</meta:editing-cycles>
    <meta:generator>OpenOffice/4.1.15$Win32 OpenOffice.org_project/4115m2$Build-9813</meta:generator>
  </office:meta>
</office:document-meta>
</file>