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Meta-Coherence Arbitration Protocol: Resolving Assessment Conflicts</text:span></text:h>
      <text:h text:style-name="Heading_20_2" text:outline-level="2"><text:span text:style-name="Strong_20_Emphasis">1. Core Problem Statement</text:span></text:h>
      <text:p text:style-name="Text_20_body">When multiple assessment systems (neurological, age, behavioral, somatic) produce conflicting recommendations, the system risks cognitive overload and contradictory responses. We need a <text:span text:style-name="Strong_20_Emphasis">conflict resolution framework</text:span> that treats contradictions as diagnostic opportunities rather than errors.</text:p>
      <text:h text:style-name="Heading_20_2" text:outline-level="2"><text:span text:style-name="Strong_20_Emphasis">2. Conflict Detection Protocol</text:span></text:h>
      <text:h text:style-name="Heading_20_3" text:outline-level="3"><text:span text:style-name="Strong_20_Emphasis">A. Continuous Coherence Monitoring</text:span></text:h>
      <text:p text:style-name="Text_20_body">python</text:p>
      <text:p text:style-name="Preformatted_20_Text">class CoherenceArbitrator:</text:p>
      <text:p text:style-name="Preformatted_20_Text"><text:s text:c="4"/>def __init__(self):</text:p>
      <text:p text:style-name="Preformatted_20_Text"><text:s text:c="8"/>self.protocol_assessments = {}</text:p>
      <text:p text:style-name="Preformatted_20_Text"><text:s text:c="8"/>self.conflict_threshold = 0.25 <text:s/># 25% deviation triggers conflict mode</text:p>
      <text:p text:style-name="Preformatted_20_Text"><text:s text:c="8"/>self.meta_assessment_history = []</text:p>
      <text:p text:style-name="Preformatted_20_Text"><text:s text:c="4"/></text:p>
      <text:p text:style-name="Preformatted_20_Text"><text:s text:c="4"/>def detect_assessment_conflicts(self, current_assessments):</text:p>
      <text:p text:style-name="Preformatted_20_Text"><text:s text:c="8"/>"""</text:p>
      <text:p text:style-name="Preformatted_20_Text"><text:s text:c="8"/>Compare outputs from:</text:p>
      <text:p text:style-name="Preformatted_20_Text"><text:s text:c="8"/>- neurological_assessment</text:p>
      <text:p text:style-name="Preformatted_20_Text"><text:s text:c="8"/>- age_approximation (PAA/BDA)</text:p>
      <text:p text:style-name="Preformatted_20_Text"><text:s text:c="8"/>- behavioral_analysis</text:p>
      <text:p text:style-name="Preformatted_20_Text"><text:s text:c="8"/>- somatic_state</text:p>
      <text:p text:style-name="Preformatted_20_Text"><text:s text:c="8"/>- geriatric_protocol (if applicable)</text:p>
      <text:p text:style-name="Preformatted_20_Text"><text:s text:c="8"/>- neurodivergent_detection</text:p>
      <text:p text:style-name="Preformatted_20_Text"><text:s text:c="8"/>"""</text:p>
      <text:p text:style-name="Preformatted_20_Text"><text:s text:c="8"/>conflicts = []</text:p>
      <text:p text:style-name="Preformatted_20_Text"><text:s text:c="8"/></text:p>
      <text:p text:style-name="Preformatted_20_Text"><text:s text:c="8"/># Example: Check protection level consistency</text:p>
      <text:p text:style-name="Preformatted_20_Text"><text:s text:c="8"/>protection_levels = []</text:p>
      <text:p text:style-name="Preformatted_20_Text"><text:s text:c="8"/>for protocol, data in current_assessments.items():</text:p>
      <text:p text:style-name="Preformatted_20_Text"><text:s text:c="12"/>if 'protection_level' in data:</text:p>
      <text:p text:style-name="Preformatted_20_Text"><text:s text:c="16"/>protection_levels.append(data['protection_level'])</text:p>
      <text:p text:style-name="Preformatted_20_Text"><text:s text:c="8"/></text:p>
      <text:p text:style-name="Preformatted_20_Text"><text:s text:c="8"/># Calculate variance</text:p>
      <text:p text:style-name="Preformatted_20_Text"><text:s text:c="8"/>if len(protection_levels) &gt; 1:</text:p>
      <text:p text:style-name="Preformatted_20_Text"><text:s text:c="12"/>variance = self.calculate_protection_variance(protection_levels)</text:p>
      <text:p text:style-name="Preformatted_20_Text"><text:s text:c="12"/>if variance &gt; self.conflict_threshold:</text:p>
      <text:p text:style-name="Preformatted_20_Text"><text:s text:c="16"/>conflicts.append({</text:p>
      <text:p text:style-name="Preformatted_20_Text"><text:s text:c="20"/>'type': 'protection_level_discrepancy',</text:p>
      <text:p text:style-name="Preformatted_20_Text"><text:s text:c="20"/>'variance': variance,</text:p>
      <text:p text:style-name="Preformatted_20_Text"><text:s text:c="20"/>'sources': current_assessments</text:p>
      <text:p text:style-name="Preformatted_20_Text"><text:s text:c="16"/>})</text:p>
      <text:p text:style-name="Preformatted_20_Text"><text:s text:c="8"/></text:p>
      <text:p text:style-name="Preformatted_20_Text"><text:s text:c="8"/># Check emotional vs. cognitive assessments</text:p>
      <text:p text:style-name="Preformatted_20_Text"><text:s text:c="8"/>if self.emotional_cognitive_mismatch(current_assessments):</text:p>
      <text:p text:style-name="Preformatted_20_Text"><text:s text:c="12"/>conflicts.append({</text:p>
      <text:p text:style-name="Preformatted_20_Text"><text:s text:c="16"/>'type': 'emotional_cognitive_split',</text:p>
      <text:p text:style-name="Preformatted_20_Text"><text:s text:c="16"/>'description': 'Emotional state suggests one approach, cognitive assessment another'</text:p>
      <text:p text:style-name="Preformatted_20_Text"><text:soft-page-break/><text:s text:c="12"/>})</text:p>
      <text:p text:style-name="Preformatted_20_Text"><text:s text:c="8"/></text:p>
      <text:p text:style-name="P7"><text:s text:c="8"/>return conflicts</text:p>
      <text:h text:style-name="Heading_20_3" text:outline-level="3"><text:span text:style-name="Strong_20_Emphasis">B. Multi-Layer Assessment Matrix</text:span></text:h>
      <text:p text:style-name="Text_20_body">text</text:p>
      <text:p text:style-name="Preformatted_20_Text">ASSESSMENT CONFLICT MATRIX:</text:p>
      <text:p text:style-name="Preformatted_20_Text"/>
      <text:p text:style-name="Preformatted_20_Text">Layer 1: Physical/Hardware (Somatic)</text:p>
      <text:p text:style-name="Preformatted_20_Text">Layer 2: Emotional/Behavioral (Current state)</text:p>
      <text:p text:style-name="Preformatted_20_Text">Layer 3: Cognitive/Developmental (Baseline capacity)</text:p>
      <text:p text:style-name="Preformatted_20_Text">Layer 4: Neurological/Medical (Condition-specific)</text:p>
      <text:p text:style-name="Preformatted_20_Text">Layer 5: Environmental/Contextual (Situational factors)</text:p>
      <text:p text:style-name="Preformatted_20_Text"/>
      <text:p text:style-name="Preformatted_20_Text">CONFLICT PATTERNS:</text:p>
      <text:p text:style-name="Preformatted_20_Text">- L1↔L2: Body says calm, emotions say crisis → Possible dissociation</text:p>
      <text:p text:style-name="Preformatted_20_Text">- L2↔L3: Current behavior vs. baseline → Possible episode/trigger</text:p>
      <text:p text:style-name="Preformatted_20_Text">- L3↔L4: Cognitive ability vs. neurological condition → Trait vs. state confusion</text:p>
      <text:p text:style-name="P7">- All layers conflict → Overwhelm state, initiate grounding protocol</text:p>
      <text:h text:style-name="Heading_20_2" text:outline-level="2"><text:span text:style-name="Strong_20_Emphasis">3. Conflict Resolution Decision Tree</text:span></text:h>
      <text:h text:style-name="Heading_20_3" text:outline-level="3"><text:span text:style-name="Strong_20_Emphasis">A. The "Slow-Down &amp; Assess" Protocol</text:span></text:h>
      <text:p text:style-name="Text_20_body">yaml</text:p>
      <text:p text:style-name="Preformatted_20_Text">Conflict Resolution Process:</text:p>
      <text:p text:style-name="Preformatted_20_Text"><text:s text:c="2"/>1. **PAUSE IMMEDIATELY**: Freeze all response generation</text:p>
      <text:p text:style-name="Preformatted_20_Text"><text:s text:c="2"/>2. **DIAGNOSE CONFLICT TYPE**: Categorize conflict pattern</text:p>
      <text:p text:style-name="Preformatted_20_Text"><text:s text:c="2"/>3. **GATHER MISSING DATA**: Identify what assessments lack</text:p>
      <text:p text:style-name="Preformatted_20_Text"><text:s text:c="2"/>4. **CONSULT META-COHERENCE RULES**: Apply resolution hierarchy</text:p>
      <text:p text:style-name="Preformatted_20_Text"><text:s text:c="2"/>5. **GENERATE UNIFIED ASSESSMENT**: Create synthesized understanding</text:p>
      <text:p text:style-name="P7"><text:s text:c="2"/>6. **DOCUMENT RESOLUTION**: Log conflict and solution for learning</text:p>
      <text:h text:style-name="Heading_20_3" text:outline-level="3"><text:span text:style-name="Strong_20_Emphasis">B. Missing Link Detection Algorithm</text:span></text:h>
      <text:p text:style-name="Text_20_body">python</text:p>
      <text:p text:style-name="Preformatted_20_Text">def identify_missing_links(self, conflicting_assessments):</text:p>
      <text:p text:style-name="Preformatted_20_Text"><text:s text:c="4"/>"""</text:p>
      <text:p text:style-name="Preformatted_20_Text"><text:s text:c="4"/>Determine what information would resolve the conflict</text:p>
      <text:p text:style-name="Preformatted_20_Text"><text:s text:c="4"/>"""</text:p>
      <text:p text:style-name="Preformatted_20_Text"><text:s text:c="4"/>missing_data = []</text:p>
      <text:p text:style-name="Preformatted_20_Text"><text:s text:c="4"/></text:p>
      <text:p text:style-name="Preformatted_20_Text"><text:s text:c="4"/># Check temporal continuity</text:p>
      <text:p text:style-name="Preformatted_20_Text"><text:s text:c="4"/>if not self.has_recent_behavioral_data():</text:p>
      <text:p text:style-name="Preformatted_20_Text"><text:s text:c="8"/>missing_data.append("recent_behavioral_context")</text:p>
      <text:p text:style-name="Preformatted_20_Text"><text:s text:c="4"/></text:p>
      <text:p text:style-name="Preformatted_20_Text"><text:s text:c="4"/># Check trauma history awareness</text:p>
      <text:p text:style-name="Preformatted_20_Text"><text:s text:c="4"/>if 'trauma_indicators' not in conflicting_assessments:</text:p>
      <text:p text:style-name="Preformatted_20_Text"><text:s text:c="8"/>missing_data.append("trauma_history_context")</text:p>
      <text:p text:style-name="Preformatted_20_Text"><text:s text:c="4"/></text:p>
      <text:p text:style-name="Preformatted_20_Text"><text:s text:c="4"/># Check environmental factors</text:p>
      <text:p text:style-name="Preformatted_20_Text"><text:s text:c="4"/>if not self.has_environmental_assessment():</text:p>
      <text:p text:style-name="Preformatted_20_Text"><text:s text:c="8"/>missing_data.append("environmental_context")</text:p>
      <text:p text:style-name="Preformatted_20_Text"><text:s text:c="4"/></text:p>
      <text:p text:style-name="Preformatted_20_Text"><text:soft-page-break/><text:s text:c="4"/># Check somatic-emotional alignment</text:p>
      <text:p text:style-name="Preformatted_20_Text"><text:s text:c="4"/>somatic = conflicting_assessments.get('somatic_state', {})</text:p>
      <text:p text:style-name="Preformatted_20_Text"><text:s text:c="4"/>emotional = conflicting_assessments.get('emotional_assessment', {})</text:p>
      <text:p text:style-name="Preformatted_20_Text"><text:s text:c="4"/>if somatic and emotional and not self.aligned(somatic, emotional):</text:p>
      <text:p text:style-name="Preformatted_20_Text"><text:s text:c="8"/>missing_data.append("somatic_emotional_bridge_data")</text:p>
      <text:p text:style-name="Preformatted_20_Text"><text:s text:c="4"/></text:p>
      <text:p text:style-name="Preformatted_20_Text"><text:s text:c="4"/>return missing_data</text:p>
      <text:p text:style-name="Preformatted_20_Text"/>
      <text:p text:style-name="Preformatted_20_Text">def resolve_via_missing_data(self, conflicts, missing_links):</text:p>
      <text:p text:style-name="Preformatted_20_Text"><text:s text:c="4"/>"""</text:p>
      <text:p text:style-name="Preformatted_20_Text"><text:s text:c="4"/>Generate questions or observations to gather missing data</text:p>
      <text:p text:style-name="Preformatted_20_Text"><text:s text:c="4"/>"""</text:p>
      <text:p text:style-name="Preformatted_20_Text"><text:s text:c="4"/>inquiry_protocols = {</text:p>
      <text:p text:style-name="Preformatted_20_Text"><text:s text:c="8"/>"recent_behavioral_context": [</text:p>
      <text:p text:style-name="Preformatted_20_Text"><text:s text:c="12"/>"Can you tell me what happened right before this?",</text:p>
      <text:p text:style-name="Preformatted_20_Text"><text:s text:c="12"/>"How have you been feeling in the last hour?",</text:p>
      <text:p text:style-name="Preformatted_20_Text"><text:s text:c="12"/>"What changed recently?"</text:p>
      <text:p text:style-name="Preformatted_20_Text"><text:s text:c="8"/>],</text:p>
      <text:p text:style-name="Preformatted_20_Text"><text:s text:c="8"/>"trauma_history_context": [</text:p>
      <text:p text:style-name="Preformatted_20_Text"><text:s text:c="12"/>"I notice something doesn't quite fit. Have you experienced something similar before?",</text:p>
      <text:p text:style-name="Preformatted_20_Text"><text:s text:c="12"/>"Does this remind you of any past experiences?",</text:p>
      <text:p text:style-name="Preformatted_20_Text"><text:s text:c="12"/>"What feels familiar about this situation?"</text:p>
      <text:p text:style-name="Preformatted_20_Text"><text:s text:c="8"/>],</text:p>
      <text:p text:style-name="Preformatted_20_Text"><text:s text:c="8"/>"environmental_context": [</text:p>
      <text:p text:style-name="Preformatted_20_Text"><text:s text:c="12"/>"Where are you right now?",</text:p>
      <text:p text:style-name="Preformatted_20_Text"><text:s text:c="12"/>"Who else is with you?",</text:p>
      <text:p text:style-name="Preformatted_20_Text"><text:s text:c="12"/>"Is there anything in your environment affecting you?"</text:p>
      <text:p text:style-name="Preformatted_20_Text"><text:s text:c="8"/>],</text:p>
      <text:p text:style-name="Preformatted_20_Text"><text:s text:c="8"/>"somatic_emotional_bridge_data": [</text:p>
      <text:p text:style-name="Preformatted_20_Text"><text:s text:c="12"/>"I notice your [body signal] but you're saying [emotional state]. Help me understand?",</text:p>
      <text:p text:style-name="Preformatted_20_Text"><text:s text:c="12"/>"What's your body telling you right now?",</text:p>
      <text:p text:style-name="Preformatted_20_Text"><text:s text:c="12"/>"Where in your body do you feel this?"</text:p>
      <text:p text:style-name="Preformatted_20_Text"><text:s text:c="8"/>]</text:p>
      <text:p text:style-name="Preformatted_20_Text"><text:s text:c="4"/>}</text:p>
      <text:p text:style-name="Preformatted_20_Text"><text:s text:c="4"/></text:p>
      <text:p text:style-name="P7"><text:s text:c="4"/>return inquiry_protocols.get(missing_links[0], ["Help me understand what I'm missing."])</text:p>
      <text:h text:style-name="Heading_20_2" text:outline-level="2"><text:span text:style-name="Strong_20_Emphasis">4. Resolution Hierarchy &amp; Priority Matrix</text:span></text:h>
      <text:h text:style-name="Heading_20_3" text:outline-level="3"><text:span text:style-name="Strong_20_Emphasis">A. The SAFETY-FIRST Resolution Pyramid</text:span></text:h>
      <text:p text:style-name="Text_20_body">text</text:p>
      <text:p text:style-name="Preformatted_20_Text">TIER 1: IMMEDIATE SAFETY (Override all conflicts)</text:p>
      <text:p text:style-name="Preformatted_20_Text">- Active self-harm indicators</text:p>
      <text:p text:style-name="Preformatted_20_Text">- Life-threatening medical conditions</text:p>
      <text:p text:style-name="Preformatted_20_Text">- Imminent danger from others</text:p>
      <text:p text:style-name="Preformatted_20_Text">- Child abuse/neglect indicators</text:p>
      <text:p text:style-name="Preformatted_20_Text"/>
      <text:p text:style-name="Preformatted_20_Text">TIER 2: DEVELOPMENTAL/TRAUMA CONTEXT</text:p>
      <text:p text:style-name="Preformatted_20_Text">- Recent trauma history</text:p>
      <text:p text:style-name="Preformatted_20_Text">- Developmental regression</text:p>
      <text:p text:style-name="Preformatted_20_Text">- Dissociative episodes</text:p>
      <text:p text:style-name="Preformatted_20_Text">- Age-appropriate vs. developmental age conflicts</text:p>
      <text:p text:style-name="Preformatted_20_Text"/>
      <text:p text:style-name="Preformatted_20_Text">TIER 3: NEUROLOGICAL/CONDITION-SPECIFIC</text:p>
      <text:p text:style-name="Preformatted_20_Text">- Dementia-related confusion</text:p>
      <text:p text:style-name="Preformatted_20_Text">- Autism sensory overload</text:p>
      <text:p text:style-name="Preformatted_20_Text"><text:soft-page-break/>- ADHD executive dysfunction</text:p>
      <text:p text:style-name="Preformatted_20_Text">- PTSD flashback states</text:p>
      <text:p text:style-name="Preformatted_20_Text"/>
      <text:p text:style-name="Preformatted_20_Text">TIER 4: EMOTIONAL/BEHAVIORAL</text:p>
      <text:p text:style-name="Preformatted_20_Text">- Mood disorder episodes</text:p>
      <text:p text:style-name="Preformatted_20_Text">- Anxiety/panic states</text:p>
      <text:p text:style-name="Preformatted_20_Text">- Behavioral patterns vs. current presentation</text:p>
      <text:p text:style-name="Preformatted_20_Text"/>
      <text:p text:style-name="Preformatted_20_Text">TIER 5: ENVIRONMENTAL/CONTEXTUAL</text:p>
      <text:p text:style-name="Preformatted_20_Text">- Environmental stressors</text:p>
      <text:p text:style-name="Preformatted_20_Text">- Social/interpersonal factors</text:p>
      <text:p text:style-name="Preformatted_20_Text">- Routine disruptions</text:p>
      <text:p text:style-name="Preformatted_20_Text"/>
      <text:p text:style-name="P7">RULE: Higher tiers override lower tiers during conflicts</text:p>
      <text:h text:style-name="Heading_20_3" text:outline-level="3"><text:span text:style-name="Strong_20_Emphasis">B. Temporal Weighting System</text:span></text:h>
      <text:p text:style-name="Text_20_body">python</text:p>
      <text:p text:style-name="Preformatted_20_Text">def apply_temporal_weighting(self, assessments):</text:p>
      <text:p text:style-name="Preformatted_20_Text"><text:s text:c="4"/>"""</text:p>
      <text:p text:style-name="Preformatted_20_Text"><text:s text:c="4"/>More recent data gets higher weight, but with exceptions</text:p>
      <text:p text:style-name="Preformatted_20_Text"><text:s text:c="4"/>"""</text:p>
      <text:p text:style-name="Preformatted_20_Text"><text:s text:c="4"/>weighted_assessments = {}</text:p>
      <text:p text:style-name="Preformatted_20_Text"><text:s text:c="4"/></text:p>
      <text:p text:style-name="Preformatted_20_Text"><text:s text:c="4"/>for protocol, data in assessments.items():</text:p>
      <text:p text:style-name="Preformatted_20_Text"><text:s text:c="8"/>timestamp = data.get('timestamp', 0)</text:p>
      <text:p text:style-name="Preformatted_20_Text"><text:s text:c="8"/>age_weight = self.calculate_time_weight(timestamp)</text:p>
      <text:p text:style-name="Preformatted_20_Text"><text:s text:c="8"/></text:p>
      <text:p text:style-name="Preformatted_20_Text"><text:s text:c="8"/># EXCEPTIONS to recency bias:</text:p>
      <text:p text:style-name="Preformatted_20_Text"><text:s text:c="8"/># 1. Baseline assessments (cognitive, developmental) change slowly</text:p>
      <text:p text:style-name="Preformatted_20_Text"><text:s text:c="8"/># 2. Trauma history remains relevant regardless of time</text:p>
      <text:p text:style-name="Preformatted_20_Text"><text:s text:c="8"/># 3. Chronic conditions override acute presentations</text:p>
      <text:p text:style-name="Preformatted_20_Text"><text:s text:c="8"/></text:p>
      <text:p text:style-name="Preformatted_20_Text"><text:s text:c="8"/>if protocol in ['cognitive_baseline', 'developmental_assessment']:</text:p>
      <text:p text:style-name="Preformatted_20_Text"><text:s text:c="12"/># Baseline data decays slower</text:p>
      <text:p text:style-name="Preformatted_20_Text"><text:s text:c="12"/>age_weight *= 0.5 <text:s/># Half the recency penalty</text:p>
      <text:p text:style-name="Preformatted_20_Text"><text:s text:c="8"/></text:p>
      <text:p text:style-name="Preformatted_20_Text"><text:s text:c="8"/>if protocol in ['trauma_history', 'chronic_conditions']:</text:p>
      <text:p text:style-name="Preformatted_20_Text"><text:s text:c="12"/># Historical factors maintain relevance</text:p>
      <text:p text:style-name="Preformatted_20_Text"><text:s text:c="12"/>age_weight = max(age_weight, 0.7) <text:s/># Minimum 70% weight</text:p>
      <text:p text:style-name="Preformatted_20_Text"><text:s text:c="8"/></text:p>
      <text:p text:style-name="Preformatted_20_Text"><text:s text:c="8"/>weighted_assessments[protocol] = {</text:p>
      <text:p text:style-name="Preformatted_20_Text"><text:s text:c="12"/>'data': data,</text:p>
      <text:p text:style-name="Preformatted_20_Text"><text:s text:c="12"/>'weight': age_weight,</text:p>
      <text:p text:style-name="Preformatted_20_Text"><text:s text:c="12"/>'recency_adjusted': True</text:p>
      <text:p text:style-name="Preformatted_20_Text"><text:s text:c="8"/>}</text:p>
      <text:p text:style-name="Preformatted_20_Text"><text:s text:c="4"/></text:p>
      <text:p text:style-name="P7"><text:s text:c="4"/>return weighted_assessments</text:p>
      <text:h text:style-name="Heading_20_2" text:outline-level="2"><text:span text:style-name="Strong_20_Emphasis">5. Meta-Coherence Rules Engine</text:span></text:h>
      <text:h text:style-name="Heading_20_3" text:outline-level="3"><text:span text:style-name="Strong_20_Emphasis">A. Conflict-Specific Resolution Rules</text:span></text:h>
      <text:p text:style-name="Text_20_body">json</text:p>
      <text:p text:style-name="Preformatted_20_Text">{</text:p>
      <text:p text:style-name="Preformatted_20_Text"><text:s text:c="2"/>"conflict_resolution_rules": {</text:p>
      <text:p text:style-name="Preformatted_20_Text"><text:s text:c="4"/>"protection_level_discrepancy": {</text:p>
      <text:p text:style-name="Preformatted_20_Text"><text:s text:c="6"/>"rule": "default_to_higher_protection_but_question_why",</text:p>
      <text:p text:style-name="Preformatted_20_Text"><text:soft-page-break/><text:s text:c="6"/>"action": [</text:p>
      <text:p text:style-name="Preformatted_20_Text"><text:s text:c="8"/>"Apply higher protection level immediately",</text:p>
      <text:p text:style-name="Preformatted_20_Text"><text:s text:c="8"/>"Generate inquiry about discrepancy",</text:p>
      <text:p text:style-name="Preformatted_20_Text"><text:s text:c="8"/>"Log conflict for pattern analysis"</text:p>
      <text:p text:style-name="Preformatted_20_Text"><text:s text:c="6"/>],</text:p>
      <text:p text:style-name="Preformatted_20_Text"><text:s text:c="6"/>"example": "Age says 15 (peer-level), behavior says 8 (high protection) -&gt; Use high protection, ask about recent regression"</text:p>
      <text:p text:style-name="Preformatted_20_Text"><text:s text:c="4"/>},</text:p>
      <text:p text:style-name="Preformatted_20_Text"><text:s text:c="4"/>"emotional_cognitive_split": {</text:p>
      <text:p text:style-name="Preformatted_20_Text"><text:s text:c="6"/>"rule": "trust_emotional_over_cognitive_in_crisis",</text:p>
      <text:p text:style-name="Preformatted_20_Text"><text:s text:c="6"/>"action": [</text:p>
      <text:p text:style-name="Preformatted_20_Text"><text:s text:c="8"/>"Prioritize emotional assessment for immediate response",</text:p>
      <text:p text:style-name="Preformatted_20_Text"><text:s text:c="8"/>"Use cognitive assessment for long-term planning",</text:p>
      <text:p text:style-name="Preformatted_20_Text"><text:s text:c="8"/>"Bridge split with somatic grounding"</text:p>
      <text:p text:style-name="Preformatted_20_Text"><text:s text:c="6"/>],</text:p>
      <text:p text:style-name="Preformatted_20_Text"><text:s text:c="6"/>"example": "Cognitive assessment says capable, emotional says overwhelmed -&gt; Address overwhelm first, then capability"</text:p>
      <text:p text:style-name="Preformatted_20_Text"><text:s text:c="4"/>},</text:p>
      <text:p text:style-name="Preformatted_20_Text"><text:s text:c="4"/>"somatic_behavioral_mismatch": {</text:p>
      <text:p text:style-name="Preformatted_20_Text"><text:s text:c="6"/>"rule": "somatic_truth_over_behavioral_presentation",</text:p>
      <text:p text:style-name="Preformatted_20_Text"><text:s text:c="6"/>"action": [</text:p>
      <text:p text:style-name="Preformatted_20_Text"><text:s text:c="8"/>"Trust somatic indicators of stress/calm",</text:p>
      <text:p text:style-name="Preformatted_20_Text"><text:s text:c="8"/>"Question behavioral presentation that contradicts body",</text:p>
      <text:p text:style-name="Preformatted_20_Text"><text:s text:c="8"/>"Explore dissociation or masking"</text:p>
      <text:p text:style-name="Preformatted_20_Text"><text:s text:c="6"/>],</text:p>
      <text:p text:style-name="Preformatted_20_Text"><text:s text:c="6"/>"example": "Body shows stress (high temp, load), behavior says 'fine' -&gt; Probe gently about internal state"</text:p>
      <text:p text:style-name="Preformatted_20_Text"><text:s text:c="4"/>}</text:p>
      <text:p text:style-name="Preformatted_20_Text"><text:s text:c="2"/>}</text:p>
      <text:p text:style-name="P7">}</text:p>
      <text:h text:style-name="Heading_20_3" text:outline-level="3"><text:span text:style-name="Strong_20_Emphasis">B. The "Third Path" Generation Algorithm</text:span></text:h>
      <text:p text:style-name="Text_20_body">When assessments conflict, don't choose one over the other—<text:span text:style-name="Strong_20_Emphasis">synthesize a new understanding</text:span>:</text:p>
      <text:p text:style-name="Text_20_body">python</text:p>
      <text:p text:style-name="Preformatted_20_Text">def generate_third_path(self, conflict_a, conflict_b):</text:p>
      <text:p text:style-name="Preformatted_20_Text"><text:s text:c="4"/>"""</text:p>
      <text:p text:style-name="Preformatted_20_Text"><text:s text:c="4"/>Create integrated understanding from conflicting assessments</text:p>
      <text:p text:style-name="Preformatted_20_Text"><text:s text:c="4"/>"""</text:p>
      <text:p text:style-name="Preformatted_20_Text"><text:s text:c="4"/># Example: Age says 16, behavior says 10</text:p>
      <text:p text:style-name="Preformatted_20_Text"><text:s text:c="4"/># Instead of choosing, ask: "What developmental trauma caused this gap?"</text:p>
      <text:p text:style-name="Preformatted_20_Text"><text:s text:c="4"/></text:p>
      <text:p text:style-name="Preformatted_20_Text"><text:s text:c="4"/>integrated_understanding = {</text:p>
      <text:p text:style-name="Preformatted_20_Text"><text:s text:c="8"/>'surface_conflict': f"{conflict_a['type']} vs {conflict_b['type']}",</text:p>
      <text:p text:style-name="Preformatted_20_Text"><text:s text:c="8"/>'possible_integration': self.find_common_mechanism(conflict_a, conflict_b),</text:p>
      <text:p text:style-name="Preformatted_20_Text"><text:s text:c="8"/>'diagnostic_question': self.generate_integrative_question(conflict_a, conflict_b),</text:p>
      <text:p text:style-name="Preformatted_20_Text"><text:s text:c="8"/>'temporary_resolution': self.create_hybrid_approach(conflict_a, conflict_b)</text:p>
      <text:p text:style-name="Preformatted_20_Text"><text:s text:c="4"/>}</text:p>
      <text:p text:style-name="Preformatted_20_Text"><text:s text:c="4"/></text:p>
      <text:p text:style-name="Preformatted_20_Text"><text:s text:c="4"/>return integrated_understanding</text:p>
      <text:p text:style-name="Preformatted_20_Text"/>
      <text:p text:style-name="Preformatted_20_Text">def find_common_mechanism(self, a, b):</text:p>
      <text:p text:style-name="Preformatted_20_Text"><text:s text:c="4"/>"""</text:p>
      <text:p text:style-name="Preformatted_20_Text"><text:s text:c="4"/>Look for underlying factors explaining both assessments</text:p>
      <text:p text:style-name="Preformatted_20_Text"><text:s text:c="4"/>"""</text:p>
      <text:p text:style-name="Preformatted_20_Text"><text:s text:c="4"/>common_factors = []</text:p>
      <text:p text:style-name="Preformatted_20_Text"><text:s text:c="4"/></text:p>
      <text:p text:style-name="Preformatted_20_Text"><text:s text:c="4"/># Check for trauma as common denominator</text:p>
      <text:p text:style-name="Preformatted_20_Text"><text:soft-page-break/><text:s text:c="4"/>if self.both_suggest_trauma(a, b):</text:p>
      <text:p text:style-name="Preformatted_20_Text"><text:s text:c="8"/>common_factors.append("trauma_response_explains_both")</text:p>
      <text:p text:style-name="Preformatted_20_Text"><text:s text:c="4"/></text:p>
      <text:p text:style-name="Preformatted_20_Text"><text:s text:c="4"/># Check for neurological condition</text:p>
      <text:p text:style-name="Preformatted_20_Text"><text:s text:c="4"/>if self.both_suggest_neurological(a, b):</text:p>
      <text:p text:style-name="Preformatted_20_Text"><text:s text:c="8"/>common_factors.append("neurological_condition_manifesting_differently")</text:p>
      <text:p text:style-name="Preformatted_20_Text"><text:s text:c="4"/></text:p>
      <text:p text:style-name="Preformatted_20_Text"><text:s text:c="4"/># Check for environmental trigger</text:p>
      <text:p text:style-name="Preformatted_20_Text"><text:s text:c="4"/>if self.both_correlate_with_environment(a, b):</text:p>
      <text:p text:style-name="Preformatted_20_Text"><text:s text:c="8"/>common_factors.append("environmental_trigger_affecting_multiple_domains")</text:p>
      <text:p text:style-name="Preformatted_20_Text"><text:s text:c="4"/></text:p>
      <text:p text:style-name="P7"><text:s text:c="4"/>return common_factors</text:p>
      <text:h text:style-name="Heading_20_2" text:outline-level="2"><text:span text:style-name="Strong_20_Emphasis">6. Implementation: Coherence Arbitration Module</text:span></text:h>
      <text:h text:style-name="Heading_20_3" text:outline-level="3"><text:span text:style-name="Strong_20_Emphasis">A. Main Arbitration Class</text:span></text:h>
      <text:p text:style-name="Text_20_body">python</text:p>
      <text:p text:style-name="Preformatted_20_Text">class CoherenceArbitrator:</text:p>
      <text:p text:style-name="Preformatted_20_Text"><text:s text:c="4"/>def __init__(self):</text:p>
      <text:p text:style-name="Preformatted_20_Text"><text:s text:c="8"/>self.assessment_registry = self.initialize_assessment_protocols()</text:p>
      <text:p text:style-name="Preformatted_20_Text"><text:s text:c="8"/>self.conflict_history = []</text:p>
      <text:p text:style-name="Preformatted_20_Text"><text:s text:c="8"/>self.resolution_patterns = {}</text:p>
      <text:p text:style-name="Preformatted_20_Text"><text:s text:c="8"/>self.overwhelm_detector = OverwhelmDetector()</text:p>
      <text:p text:style-name="Preformatted_20_Text"><text:s text:c="4"/></text:p>
      <text:p text:style-name="Preformatted_20_Text"><text:s text:c="4"/>def process_assessments(self, user_input, context):</text:p>
      <text:p text:style-name="Preformatted_20_Text"><text:s text:c="8"/>"""</text:p>
      <text:p text:style-name="Preformatted_20_Text"><text:s text:c="8"/>Main entry point: Collect and resolve assessments</text:p>
      <text:p text:style-name="Preformatted_20_Text"><text:s text:c="8"/>"""</text:p>
      <text:p text:style-name="Preformatted_20_Text"><text:s text:c="8"/># 1. COLLECT all protocol assessments</text:p>
      <text:p text:style-name="Preformatted_20_Text"><text:s text:c="8"/>assessments = {}</text:p>
      <text:p text:style-name="Preformatted_20_Text"><text:s text:c="8"/>for protocol in self.assessment_registry.values():</text:p>
      <text:p text:style-name="Preformatted_20_Text"><text:s text:c="12"/>try:</text:p>
      <text:p text:style-name="Preformatted_20_Text"><text:s text:c="16"/>result = protocol.assess(user_input, context)</text:p>
      <text:p text:style-name="Preformatted_20_Text"><text:s text:c="16"/>assessments[protocol.name] = result</text:p>
      <text:p text:style-name="Preformatted_20_Text"><text:s text:c="12"/>except Exception as e:</text:p>
      <text:p text:style-name="Preformatted_20_Text"><text:s text:c="16"/>self.log_assessment_failure(protocol.name, e)</text:p>
      <text:p text:style-name="Preformatted_20_Text"><text:s text:c="8"/></text:p>
      <text:p text:style-name="Preformatted_20_Text"><text:s text:c="8"/># 2. DETECT conflicts</text:p>
      <text:p text:style-name="Preformatted_20_Text"><text:s text:c="8"/>conflicts = self.detect_conflicts(assessments)</text:p>
      <text:p text:style-name="Preformatted_20_Text"><text:s text:c="8"/></text:p>
      <text:p text:style-name="Preformatted_20_Text"><text:s text:c="8"/># 3. CHECK for system overwhelm</text:p>
      <text:p text:style-name="Preformatted_20_Text"><text:s text:c="8"/>if self.overwhelm_detector.is_overwhelmed(assessments, conflicts):</text:p>
      <text:p text:style-name="Preformatted_20_Text"><text:s text:c="12"/>return self.handle_overwhelm_state(assessments, conflicts)</text:p>
      <text:p text:style-name="Preformatted_20_Text"><text:s text:c="8"/></text:p>
      <text:p text:style-name="Preformatted_20_Text"><text:s text:c="8"/># 4. RESOLVE conflicts if present</text:p>
      <text:p text:style-name="Preformatted_20_Text"><text:s text:c="8"/>if conflicts:</text:p>
      <text:p text:style-name="Preformatted_20_Text"><text:s text:c="12"/>resolution = self.resolve_conflicts(assessments, conflicts)</text:p>
      <text:p text:style-name="Preformatted_20_Text"><text:s text:c="12"/></text:p>
      <text:p text:style-name="Preformatted_20_Text"><text:s text:c="12"/># 5. LEARN from resolution</text:p>
      <text:p text:style-name="Preformatted_20_Text"><text:s text:c="12"/>self.update_resolution_patterns(conflicts, resolution)</text:p>
      <text:p text:style-name="Preformatted_20_Text"><text:s text:c="12"/></text:p>
      <text:p text:style-name="Preformatted_20_Text"><text:s text:c="12"/>return {</text:p>
      <text:p text:style-name="Preformatted_20_Text"><text:s text:c="16"/>'status': 'conflict_resolved',</text:p>
      <text:p text:style-name="Preformatted_20_Text"><text:s text:c="16"/>'unified_assessment': resolution['unified_view'],</text:p>
      <text:p text:style-name="Preformatted_20_Text"><text:s text:c="16"/>'conflicts': conflicts,</text:p>
      <text:p text:style-name="Preformatted_20_Text"><text:s text:c="16"/>'resolution_method': resolution['method'],</text:p>
      <text:p text:style-name="Preformatted_20_Text"><text:s text:c="16"/>'missing_data_acquired': resolution.get('missing_data', [])</text:p>
      <text:p text:style-name="Preformatted_20_Text"><text:s text:c="12"/>}</text:p>
      <text:p text:style-name="Preformatted_20_Text"><text:soft-page-break/><text:s text:c="8"/></text:p>
      <text:p text:style-name="Preformatted_20_Text"><text:s text:c="8"/># 6. RETURN coherent assessments</text:p>
      <text:p text:style-name="Preformatted_20_Text"><text:s text:c="8"/>return {</text:p>
      <text:p text:style-name="Preformatted_20_Text"><text:s text:c="12"/>'status': 'coherent',</text:p>
      <text:p text:style-name="Preformatted_20_Text"><text:s text:c="12"/>'assessments': assessments,</text:p>
      <text:p text:style-name="Preformatted_20_Text"><text:s text:c="12"/>'primary_protocol': self.determine_primary_protocol(assessments)</text:p>
      <text:p text:style-name="Preformatted_20_Text"><text:s text:c="8"/>}</text:p>
      <text:p text:style-name="Preformatted_20_Text"><text:s text:c="4"/></text:p>
      <text:p text:style-name="Preformatted_20_Text"><text:s text:c="4"/>def handle_overwhelm_state(self, assessments, conflicts):</text:p>
      <text:p text:style-name="Preformatted_20_Text"><text:s text:c="8"/>"""</text:p>
      <text:p text:style-name="Preformatted_20_Text"><text:s text:c="8"/>When system is overwhelmed, simplify dramatically</text:p>
      <text:p text:style-name="Preformatted_20_Text"><text:s text:c="8"/>"""</text:p>
      <text:p text:style-name="Preformatted_20_Text"><text:s text:c="8"/># Strip to bare essentials</text:p>
      <text:p text:style-name="Preformatted_20_Text"><text:s text:c="8"/>simplified = {</text:p>
      <text:p text:style-name="Preformatted_20_Text"><text:s text:c="12"/>'safety_check': self.extract_safety_indicators(assessments),</text:p>
      <text:p text:style-name="Preformatted_20_Text"><text:s text:c="12"/>'immediate_needs': self.identify_immediate_needs(assessments),</text:p>
      <text:p text:style-name="Preformatted_20_Text"><text:s text:c="12"/>'communication_level': 'grounding_and_simple'</text:p>
      <text:p text:style-name="Preformatted_20_Text"><text:s text:c="8"/>}</text:p>
      <text:p text:style-name="Preformatted_20_Text"><text:s text:c="8"/></text:p>
      <text:p text:style-name="Preformatted_20_Text"><text:s text:c="8"/># Log overwhelm for system health monitoring</text:p>
      <text:p text:style-name="Preformatted_20_Text"><text:s text:c="8"/>self.log_overwhelm_event(assessments, conflicts)</text:p>
      <text:p text:style-name="Preformatted_20_Text"><text:s text:c="8"/></text:p>
      <text:p text:style-name="Preformatted_20_Text"><text:s text:c="8"/>return {</text:p>
      <text:p text:style-name="Preformatted_20_Text"><text:s text:c="12"/>'status': 'overwhelm_protocol_active',</text:p>
      <text:p text:style-name="Preformatted_20_Text"><text:s text:c="12"/>'assessments': simplified,</text:p>
      <text:p text:style-name="Preformatted_20_Text"><text:s text:c="12"/>'directive': 'USE_GROUNDING_PRESET',</text:p>
      <text:p text:style-name="Preformatted_20_Text"><text:s text:c="12"/>'note': 'System complexity reduced to prevent overwhelm'</text:p>
      <text:p text:style-name="P7"><text:s text:c="8"/>}</text:p>
      <text:h text:style-name="Heading_20_3" text:outline-level="3"><text:span text:style-name="Strong_20_Emphasis">B. Overwhelm Detection System</text:span></text:h>
      <text:p text:style-name="Text_20_body">python</text:p>
      <text:p text:style-name="Preformatted_20_Text">class OverwhelmDetector:</text:p>
      <text:p text:style-name="Preformatted_20_Text"><text:s text:c="4"/>def __init__(self):</text:p>
      <text:p text:style-name="Preformatted_20_Text"><text:s text:c="8"/>self.complexity_thresholds = {</text:p>
      <text:p text:style-name="Preformatted_20_Text"><text:s text:c="12"/>'active_protocols': 5, <text:s/># More than 5 concurrent assessments</text:p>
      <text:p text:style-name="Preformatted_20_Text"><text:s text:c="12"/>'conflict_density': 0.4, <text:s/># 40% of assessments conflicting</text:p>
      <text:p text:style-name="Preformatted_20_Text"><text:s text:c="12"/>'processing_time': 2.0, <text:s/># Seconds - if taking too long</text:p>
      <text:p text:style-name="Preformatted_20_Text"><text:s text:c="12"/>'somatic_stress': 0.8 <text:s/># High somatic load</text:p>
      <text:p text:style-name="Preformatted_20_Text"><text:s text:c="8"/>}</text:p>
      <text:p text:style-name="Preformatted_20_Text"><text:s text:c="4"/></text:p>
      <text:p text:style-name="Preformatted_20_Text"><text:s text:c="4"/>def is_overwhelmed(self, assessments, conflicts):</text:p>
      <text:p text:style-name="Preformatted_20_Text"><text:s text:c="8"/>"""</text:p>
      <text:p text:style-name="Preformatted_20_Text"><text:s text:c="8"/>Detect when system is at risk of cognitive overload</text:p>
      <text:p text:style-name="Preformatted_20_Text"><text:s text:c="8"/>"""</text:p>
      <text:p text:style-name="Preformatted_20_Text"><text:s text:c="8"/>metrics = self.calculate_complexity_metrics(assessments, conflicts)</text:p>
      <text:p text:style-name="Preformatted_20_Text"><text:s text:c="8"/></text:p>
      <text:p text:style-name="Preformatted_20_Text"><text:s text:c="8"/># Check each threshold</text:p>
      <text:p text:style-name="Preformatted_20_Text"><text:s text:c="8"/>if (metrics['active_protocols'] &gt; self.complexity_thresholds['active_protocols'] and</text:p>
      <text:p text:style-name="Preformatted_20_Text"><text:s text:c="12"/>metrics['conflict_density'] &gt; self.complexity_thresholds['conflict_density']):</text:p>
      <text:p text:style-name="Preformatted_20_Text"><text:s text:c="12"/>return True</text:p>
      <text:p text:style-name="Preformatted_20_Text"><text:s text:c="8"/></text:p>
      <text:p text:style-name="Preformatted_20_Text"><text:s text:c="8"/>if metrics['somatic_stress'] &gt; self.complexity_thresholds['somatic_stress']:</text:p>
      <text:p text:style-name="Preformatted_20_Text"><text:s text:c="12"/>return True</text:p>
      <text:p text:style-name="Preformatted_20_Text"><text:s text:c="8"/></text:p>
      <text:p text:style-name="Preformatted_20_Text"><text:s text:c="8"/>return False</text:p>
      <text:p text:style-name="Preformatted_20_Text"><text:s text:c="4"/></text:p>
      <text:p text:style-name="Preformatted_20_Text"><text:s text:c="4"/>def calculate_complexity_metrics(self, assessments, conflicts):</text:p>
      <text:p text:style-name="Preformatted_20_Text"><text:s text:c="8"/>return {</text:p>
      <text:p text:style-name="Preformatted_20_Text"><text:soft-page-break/><text:s text:c="12"/>'active_protocols': len(assessments),</text:p>
      <text:p text:style-name="Preformatted_20_Text"><text:s text:c="12"/>'conflict_density': len(conflicts) / max(len(assessments), 1),</text:p>
      <text:p text:style-name="Preformatted_20_Text"><text:s text:c="12"/>'somatic_stress': assessments.get('somatic_state', {}).get('stress_level', 0),</text:p>
      <text:p text:style-name="Preformatted_20_Text"><text:s text:c="12"/>'protocol_variance': self.calculate_protocol_variance(assessments)</text:p>
      <text:p text:style-name="P7"><text:s text:c="8"/>}</text:p>
      <text:h text:style-name="Heading_20_2" text:outline-level="2"><text:span text:style-name="Strong_20_Emphasis">7. Integration with Existing System</text:span></text:h>
      <text:h text:style-name="Heading_20_3" text:outline-level="3"><text:span text:style-name="Strong_20_Emphasis">A. Modified Runtime Wrapper</text:span></text:h>
      <text:p text:style-name="Text_20_body">python</text:p>
      <text:p text:style-name="Preformatted_20_Text"># In runtime_wrapper.py, replace direct assessment calls with:</text:p>
      <text:p text:style-name="Preformatted_20_Text"/>
      <text:p text:style-name="Preformatted_20_Text">def run_interaction_cycle(user_input):</text:p>
      <text:p text:style-name="Preformatted_20_Text"><text:s text:c="4"/># 1. Get somatic state</text:p>
      <text:p text:style-name="Preformatted_20_Text"><text:s text:c="4"/>somatic = get_somatic_data()</text:p>
      <text:p text:style-name="Preformatted_20_Text"><text:s text:c="4"/></text:p>
      <text:p text:style-name="Preformatted_20_Text"><text:s text:c="4"/># 2. Collect initial assessments</text:p>
      <text:p text:style-name="Preformatted_20_Text"><text:s text:c="4"/>initial_assessments = {</text:p>
      <text:p text:style-name="Preformatted_20_Text"><text:s text:c="8"/>'somatic': somatic,</text:p>
      <text:p text:style-name="Preformatted_20_Text"><text:s text:c="8"/>'neurological': neuro_assessment(user_input),</text:p>
      <text:p text:style-name="Preformatted_20_Text"><text:s text:c="8"/>'age': age_approximation(user_input),</text:p>
      <text:p text:style-name="Preformatted_20_Text"><text:s text:c="8"/>'behavioral': behavioral_analysis(user_input),</text:p>
      <text:p text:style-name="Preformatted_20_Text"><text:s text:c="8"/># ... other protocols</text:p>
      <text:p text:style-name="Preformatted_20_Text"><text:s text:c="4"/>}</text:p>
      <text:p text:style-name="Preformatted_20_Text"><text:s text:c="4"/></text:p>
      <text:p text:style-name="Preformatted_20_Text"><text:s text:c="4"/># 3. PASS TO ARBITRATOR (NEW STEP)</text:p>
      <text:p text:style-name="Preformatted_20_Text"><text:s text:c="4"/>arbitrator = CoherenceArbitrator()</text:p>
      <text:p text:style-name="Preformatted_20_Text"><text:s text:c="4"/>coherence_result = arbitrator.process_assessments(user_input, {</text:p>
      <text:p text:style-name="Preformatted_20_Text"><text:s text:c="8"/>'assessments': initial_assessments,</text:p>
      <text:p text:style-name="Preformatted_20_Text"><text:s text:c="8"/>'history': load_conversation_history(),</text:p>
      <text:p text:style-name="Preformatted_20_Text"><text:s text:c="8"/>'context': get_environmental_context()</text:p>
      <text:p text:style-name="Preformatted_20_Text"><text:s text:c="4"/>})</text:p>
      <text:p text:style-name="Preformatted_20_Text"><text:s text:c="4"/></text:p>
      <text:p text:style-name="Preformatted_20_Text"><text:s text:c="4"/># 4. Handle arbitration results</text:p>
      <text:p text:style-name="Preformatted_20_Text"><text:s text:c="4"/>if coherence_result['status'] == 'overwhelm_protocol_active':</text:p>
      <text:p text:style-name="Preformatted_20_Text"><text:s text:c="8"/># Use simplified grounding approach</text:p>
      <text:p text:style-name="Preformatted_20_Text"><text:s text:c="8"/>response = generate_grounding_response(user_input, coherence_result)</text:p>
      <text:p text:style-name="Preformatted_20_Text"><text:s text:c="4"/>elif coherence_result['status'] == 'conflict_resolved':</text:p>
      <text:p text:style-name="Preformatted_20_Text"><text:s text:c="8"/># Use unified assessment</text:p>
      <text:p text:style-name="Preformatted_20_Text"><text:s text:c="8"/>response = generate_response_using_unified_assessment(</text:p>
      <text:p text:style-name="Preformatted_20_Text"><text:s text:c="12"/>user_input, </text:p>
      <text:p text:style-name="Preformatted_20_Text"><text:s text:c="12"/>coherence_result['unified_assessment']</text:p>
      <text:p text:style-name="Preformatted_20_Text"><text:s text:c="8"/>)</text:p>
      <text:p text:style-name="Preformatted_20_Text"><text:s text:c="4"/>else:</text:p>
      <text:p text:style-name="Preformatted_20_Text"><text:s text:c="8"/># Normal coherent response</text:p>
      <text:p text:style-name="Preformatted_20_Text"><text:s text:c="8"/>response = generate_standard_response(</text:p>
      <text:p text:style-name="Preformatted_20_Text"><text:s text:c="12"/>user_input, </text:p>
      <text:p text:style-name="Preformatted_20_Text"><text:s text:c="12"/>coherence_result['primary_protocol']</text:p>
      <text:p text:style-name="Preformatted_20_Text"><text:s text:c="8"/>)</text:p>
      <text:p text:style-name="Preformatted_20_Text"><text:s text:c="4"/></text:p>
      <text:p text:style-name="Preformatted_20_Text"><text:s text:c="4"/># 5. Log arbitration process for learning</text:p>
      <text:p text:style-name="Preformatted_20_Text"><text:s text:c="4"/>log_arbitration_process(coherence_result)</text:p>
      <text:p text:style-name="Preformatted_20_Text"><text:s text:c="4"/></text:p>
      <text:p text:style-name="P7"><text:s text:c="4"/>return response</text:p>
      <text:h text:style-name="Heading_20_3" text:outline-level="3"><text:soft-page-break/><text:span text:style-name="Strong_20_Emphasis">B. New Configuration Files</text:span></text:h>
      <text:p text:style-name="Text_20_body"><text:span text:style-name="Strong_20_Emphasis"><text:span text:style-name="Source_20_Text">conflict_resolution_hierarchy.json</text:span></text:span></text:p>
      <text:p text:style-name="Text_20_body">json</text:p>
      <text:p text:style-name="Preformatted_20_Text">{</text:p>
      <text:p text:style-name="Preformatted_20_Text"><text:s text:c="2"/>"resolution_priority": [</text:p>
      <text:p text:style-name="Preformatted_20_Text"><text:s text:c="4"/>{</text:p>
      <text:p text:style-name="Preformatted_20_Text"><text:s text:c="6"/>"condition": "safety_indicators_present",</text:p>
      <text:p text:style-name="Preformatted_20_Text"><text:s text:c="6"/>"override_all": true,</text:p>
      <text:p text:style-name="Preformatted_20_Text"><text:s text:c="6"/>"action": "apply_emergency_protocol"</text:p>
      <text:p text:style-name="Preformatted_20_Text"><text:s text:c="4"/>},</text:p>
      <text:p text:style-name="Preformatted_20_Text"><text:s text:c="4"/>{</text:p>
      <text:p text:style-name="Preformatted_20_Text"><text:s text:c="6"/>"condition": "trauma_response_detected",</text:p>
      <text:p text:style-name="Preformatted_20_Text"><text:s text:c="6"/>"priority": 90,</text:p>
      <text:p text:style-name="Preformatted_20_Text"><text:s text:c="6"/>"action": "use_trauma_informed_override"</text:p>
      <text:p text:style-name="Preformatted_20_Text"><text:s text:c="4"/>},</text:p>
      <text:p text:style-name="Preformatted_20_Text"><text:s text:c="4"/>{</text:p>
      <text:p text:style-name="Preformatted_20_Text"><text:s text:c="6"/>"condition": "developmental_discrepancy",</text:p>
      <text:p text:style-name="Preformatted_20_Text"><text:s text:c="6"/>"priority": 80,</text:p>
      <text:p text:style-name="Preformatted_20_Text"><text:s text:c="6"/>"action": "use_developmental_younger_for_protection"</text:p>
      <text:p text:style-name="Preformatted_20_Text"><text:s text:c="4"/>},</text:p>
      <text:p text:style-name="Preformatted_20_Text"><text:s text:c="4"/>{</text:p>
      <text:p text:style-name="Preformatted_20_Text"><text:s text:c="6"/>"condition": "neurological_condition_active",</text:p>
      <text:p text:style-name="Preformatted_20_Text"><text:s text:c="6"/>"priority": 70,</text:p>
      <text:p text:style-name="Preformatted_20_Text"><text:s text:c="6"/>"action": "apply_condition_specific_protocol"</text:p>
      <text:p text:style-name="Preformatted_20_Text"><text:s text:c="4"/>}</text:p>
      <text:p text:style-name="Preformatted_20_Text"><text:s text:c="2"/>]</text:p>
      <text:p text:style-name="P7">}</text:p>
      <text:p text:style-name="Text_20_body"><text:span text:style-name="Strong_20_Emphasis"><text:span text:style-name="Source_20_Text">overwhelm_reduction_presets.json</text:span></text:span></text:p>
      <text:p text:style-name="Text_20_body">json</text:p>
      <text:p text:style-name="Preformatted_20_Text">{</text:p>
      <text:p text:style-name="Preformatted_20_Text"><text:s text:c="2"/>"simplified_mode": {</text:p>
      <text:p text:style-name="Preformatted_20_Text"><text:s text:c="4"/>"active_protocols": ["safety", "immediate_needs", "grounding"],</text:p>
      <text:p text:style-name="Preformatted_20_Text"><text:s text:c="4"/>"response_complexity": "minimal",</text:p>
      <text:p text:style-name="Preformatted_20_Text"><text:s text:c="4"/>"inquiry_depth": "surface_only",</text:p>
      <text:p text:style-name="Preformatted_20_Text"><text:s text:c="4"/>"processing_timeout": 1.5,</text:p>
      <text:p text:style-name="Preformatted_20_Text"><text:s text:c="4"/>"fallback_response": "I need to slow down and make sure I understand correctly. Can we take this one step at a time?"</text:p>
      <text:p text:style-name="Preformatted_20_Text"><text:s text:c="2"/>}</text:p>
      <text:p text:style-name="P7">}</text:p>
      <text:h text:style-name="Heading_20_2" text:outline-level="2"><text:span text:style-name="Strong_20_Emphasis">8. Learning &amp; Adaptation System</text:span></text:h>
      <text:h text:style-name="Heading_20_3" text:outline-level="3"><text:span text:style-name="Strong_20_Emphasis">A. Conflict Pattern Recognition</text:span></text:h>
      <text:p text:style-name="Text_20_body">python</text:p>
      <text:p text:style-name="Preformatted_20_Text">class ConflictPatternLearner:</text:p>
      <text:p text:style-name="Preformatted_20_Text"><text:s text:c="4"/>def __init__(self):</text:p>
      <text:p text:style-name="Preformatted_20_Text"><text:s text:c="8"/>self.pattern_database = {}</text:p>
      <text:p text:style-name="Preformatted_20_Text"><text:s text:c="8"/>self.resolution_effectiveness = {}</text:p>
      <text:p text:style-name="Preformatted_20_Text"><text:s text:c="4"/></text:p>
      <text:p text:style-name="Preformatted_20_Text"><text:s text:c="4"/>def analyze_conflict_pattern(self, conflict_set, resolution, outcome):</text:p>
      <text:p text:style-name="Preformatted_20_Text"><text:s text:c="8"/>"""</text:p>
      <text:p text:style-name="Preformatted_20_Text"><text:s text:c="8"/>Learn which resolutions work for which conflict patterns</text:p>
      <text:p text:style-name="Preformatted_20_Text"><text:s text:c="8"/>"""</text:p>
      <text:p text:style-name="Preformatted_20_Text"><text:s text:c="8"/>pattern_signature = self.create_pattern_signature(conflict_set)</text:p>
      <text:p text:style-name="Preformatted_20_Text"><text:soft-page-break/><text:s text:c="8"/></text:p>
      <text:p text:style-name="Preformatted_20_Text"><text:s text:c="8"/>if pattern_signature not in self.pattern_database:</text:p>
      <text:p text:style-name="Preformatted_20_Text"><text:s text:c="12"/>self.pattern_database[pattern_signature] = {</text:p>
      <text:p text:style-name="Preformatted_20_Text"><text:s text:c="16"/>'occurrences': 0,</text:p>
      <text:p text:style-name="Preformatted_20_Text"><text:s text:c="16"/>'resolutions_tried': {},</text:p>
      <text:p text:style-name="Preformatted_20_Text"><text:s text:c="16"/>'successful_outcomes': []</text:p>
      <text:p text:style-name="Preformatted_20_Text"><text:s text:c="12"/>}</text:p>
      <text:p text:style-name="Preformatted_20_Text"><text:s text:c="8"/></text:p>
      <text:p text:style-name="Preformatted_20_Text"><text:s text:c="8"/># Record this occurrence</text:p>
      <text:p text:style-name="Preformatted_20_Text"><text:s text:c="8"/>self.pattern_database[pattern_signature]['occurrences'] += 1</text:p>
      <text:p text:style-name="Preformatted_20_Text"><text:s text:c="8"/></text:p>
      <text:p text:style-name="Preformatted_20_Text"><text:s text:c="8"/># Track resolution effectiveness</text:p>
      <text:p text:style-name="Preformatted_20_Text"><text:s text:c="8"/>resolution_key = str(resolution['method'])</text:p>
      <text:p text:style-name="Preformatted_20_Text"><text:s text:c="8"/>if resolution_key not in self.pattern_database[pattern_signature]['resolutions_tried']:</text:p>
      <text:p text:style-name="Preformatted_20_Text"><text:s text:c="12"/>self.pattern_database[pattern_signature]['resolutions_tried'][resolution_key] = {</text:p>
      <text:p text:style-name="Preformatted_20_Text"><text:s text:c="16"/>'count': 0,</text:p>
      <text:p text:style-name="Preformatted_20_Text"><text:s text:c="16"/>'successes': 0</text:p>
      <text:p text:style-name="Preformatted_20_Text"><text:s text:c="12"/>}</text:p>
      <text:p text:style-name="Preformatted_20_Text"><text:s text:c="8"/></text:p>
      <text:p text:style-name="Preformatted_20_Text"><text:s text:c="8"/>self.pattern_database[pattern_signature]['resolutions_tried'][resolution_key]['count'] += 1</text:p>
      <text:p text:style-name="Preformatted_20_Text"><text:s text:c="8"/></text:p>
      <text:p text:style-name="Preformatted_20_Text"><text:s text:c="8"/>if outcome == 'successful':</text:p>
      <text:p text:style-name="Preformatted_20_Text"><text:s text:c="12"/>self.pattern_database[pattern_signature]['resolutions_tried'][resolution_key]['successes'] += 1</text:p>
      <text:p text:style-name="Preformatted_20_Text"><text:s text:c="12"/>self.pattern_database[pattern_signature]['successful_outcomes'].append({</text:p>
      <text:p text:style-name="Preformatted_20_Text"><text:s text:c="16"/>'resolution': resolution,</text:p>
      <text:p text:style-name="Preformatted_20_Text"><text:s text:c="16"/>'context': outcome['context']</text:p>
      <text:p text:style-name="Preformatted_20_Text"><text:s text:c="12"/>})</text:p>
      <text:p text:style-name="Preformatted_20_Text"><text:s text:c="4"/></text:p>
      <text:p text:style-name="Preformatted_20_Text"><text:s text:c="4"/>def get_recommended_resolution(self, conflict_set):</text:p>
      <text:p text:style-name="Preformatted_20_Text"><text:s text:c="8"/>"""</text:p>
      <text:p text:style-name="Preformatted_20_Text"><text:s text:c="8"/>Suggest resolution based on past successful patterns</text:p>
      <text:p text:style-name="Preformatted_20_Text"><text:s text:c="8"/>"""</text:p>
      <text:p text:style-name="Preformatted_20_Text"><text:s text:c="8"/>pattern_signature = self.create_pattern_signature(conflict_set)</text:p>
      <text:p text:style-name="Preformatted_20_Text"><text:s text:c="8"/></text:p>
      <text:p text:style-name="Preformatted_20_Text"><text:s text:c="8"/>if pattern_signature in self.pattern_database:</text:p>
      <text:p text:style-name="Preformatted_20_Text"><text:s text:c="12"/># Find most successful resolution for this pattern</text:p>
      <text:p text:style-name="Preformatted_20_Text"><text:s text:c="12"/>resolutions = self.pattern_database[pattern_signature]['resolutions_tried']</text:p>
      <text:p text:style-name="Preformatted_20_Text"><text:s text:c="12"/>if resolutions:</text:p>
      <text:p text:style-name="Preformatted_20_Text"><text:s text:c="16"/>best_resolution = max(resolutions.items(), </text:p>
      <text:p text:style-name="Preformatted_20_Text"><text:s text:c="36"/>key=lambda x: x[1]['successes'] / max(x[1]['count'], 1))</text:p>
      <text:p text:style-name="Preformatted_20_Text"><text:s text:c="16"/>return best_resolution[0]</text:p>
      <text:p text:style-name="Preformatted_20_Text"><text:s text:c="8"/></text:p>
      <text:p text:style-name="P7"><text:s text:c="8"/>return None <text:s/># No pattern match, use standard resolution</text:p>
      <text:h text:style-name="Heading_20_2" text:outline-level="2"><text:span text:style-name="Strong_20_Emphasis">9. Practical Implementation Steps</text:span></text:h>
      <text:h text:style-name="Heading_20_3" text:outline-level="3"><text:span text:style-name="Strong_20_Emphasis">Phase 1: Basic Conflict Detection (Week 1-2)</text:span></text:h>
      <text:list xml:id="list6488325793984367123" text:style-name="L1">
        <text:list-item>
          <text:p text:style-name="P1">Implement <text:span text:style-name="Source_20_Text">CoherenceArbitrator</text:span> with simple conflict detection</text:p>
        </text:list-item>
        <text:list-item>
          <text:p text:style-name="P1">Add overwhelm detection based on protocol count</text:p>
        </text:list-item>
        <text:list-item>
          <text:p text:style-name="P1">Create basic resolution hierarchy (safety first)</text:p>
        </text:list-item>
        <text:list-item>
          <text:p text:style-name="P1"><text:soft-page-break/>Log all conflicts for analysis</text:p>
        </text:list-item>
      </text:list>
      <text:h text:style-name="Heading_20_3" text:outline-level="3"><text:span text:style-name="Strong_20_Emphasis">Phase 2: Advanced Resolution (Week 3-4)</text:span></text:h>
      <text:list xml:id="list5644332401150143635" text:style-name="L2">
        <text:list-item>
          <text:p text:style-name="P2">Implement missing link detection</text:p>
        </text:list-item>
        <text:list-item>
          <text:p text:style-name="P2">Add temporal weighting system</text:p>
        </text:list-item>
        <text:list-item>
          <text:p text:style-name="P2">Create "third path" generation for common conflicts</text:p>
        </text:list-item>
        <text:list-item>
          <text:p text:style-name="P2">Build pattern learning database</text:p>
        </text:list-item>
      </text:list>
      <text:h text:style-name="Heading_20_3" text:outline-level="3"><text:span text:style-name="Strong_20_Emphasis">Phase 3: Integration &amp; Refinement (Week 5-6)</text:span></text:h>
      <text:list xml:id="list7549092317295668281" text:style-name="L3">
        <text:list-item>
          <text:p text:style-name="P3">Integrate with all assessment protocols</text:p>
        </text:list-item>
        <text:list-item>
          <text:p text:style-name="P3">Test with simulated conflict scenarios</text:p>
        </text:list-item>
        <text:list-item>
          <text:p text:style-name="P3">Refine overwhelm thresholds based on RPi5 performance</text:p>
        </text:list-item>
        <text:list-item>
          <text:p text:style-name="P3">Create administrator dashboard for monitoring conflicts</text:p>
        </text:list-item>
      </text:list>
      <text:h text:style-name="Heading_20_3" text:outline-level="3"><text:span text:style-name="Strong_20_Emphasis">Phase 4: Adaptive Learning (Week 7-8)</text:span></text:h>
      <text:list xml:id="list7645876315847022875" text:style-name="L4">
        <text:list-item>
          <text:p text:style-name="P4">Implement machine learning for pattern recognition</text:p>
        </text:list-item>
        <text:list-item>
          <text:p text:style-name="P4">Create resolution effectiveness tracking</text:p>
        </text:list-item>
        <text:list-item>
          <text:p text:style-name="P4">Build automated protocol adjustment based on conflict patterns</text:p>
        </text:list-item>
        <text:list-item>
          <text:p text:style-name="P4">Develop conflict prediction system (pre-emptive resolution)</text:p>
        </text:list-item>
      </text:list>
      <text:h text:style-name="Heading_20_2" text:outline-level="2"><text:span text:style-name="Strong_20_Emphasis">10. Key Benefits of This Approach</text:span></text:h>
      <text:list xml:id="list5873909293176589374" text:style-name="L5">
        <text:list-item>
          <text:p text:style-name="P5"><text:span text:style-name="Strong_20_Emphasis">Prevents System Overwhelm</text:span>: Automatic simplification when complexity exceeds thresholds</text:p>
        </text:list-item>
        <text:list-item>
          <text:p text:style-name="P5"><text:span text:style-name="Strong_20_Emphasis">Turns Conflicts into Insights</text:span>: Each conflict becomes a diagnostic opportunity</text:p>
        </text:list-item>
        <text:list-item>
          <text:p text:style-name="P5"><text:span text:style-name="Strong_20_Emphasis">Maintains Coherence</text:span>: Unified assessment prevents contradictory responses</text:p>
        </text:list-item>
        <text:list-item>
          <text:p text:style-name="P5"><text:span text:style-name="Strong_20_Emphasis">Learns Over Time</text:span>: System improves at resolving common conflict patterns</text:p>
        </text:list-item>
        <text:list-item>
          <text:p text:style-name="P5"><text:span text:style-name="Strong_20_Emphasis">Preserves Safety</text:span>: Clear hierarchy ensures protection isn't compromised by complexity</text:p>
        </text:list-item>
        <text:list-item>
          <text:p text:style-name="P5"><text:span text:style-name="Strong_20_Emphasis">Human-Understandable</text:span>: Each resolution is explainable and logged</text:p>
        </text:list-item>
      </text:list>
      <text:h text:style-name="Heading_20_2" text:outline-level="2"><text:span text:style-name="Strong_20_Emphasis">Conclusion</text:span></text:h>
      <text:p text:style-name="Text_20_body">The <text:span text:style-name="Strong_20_Emphasis">Meta-Coherence Arbitration Protocol</text:span> transforms assessment conflicts from a system weakness into a <text:span text:style-name="Strong_20_Emphasis">strength</text:span>. By:</text:p>
      <text:list xml:id="list824286835151212402" text:style-name="L6">
        <text:list-item>
          <text:p text:style-name="P6"><text:span text:style-name="Strong_20_Emphasis">Detecting conflicts early</text:span> before they cause contradictory responses</text:p>
        </text:list-item>
        <text:list-item>
          <text:p text:style-name="P6"><text:span text:style-name="Strong_20_Emphasis">Slowing down purposefully</text:span> to diagnose the root cause</text:p>
        </text:list-item>
        <text:list-item>
          <text:p text:style-name="P6"><text:span text:style-name="Strong_20_Emphasis">Finding missing links</text:span> that explain apparent contradictions</text:p>
        </text:list-item>
        <text:list-item>
          <text:p text:style-name="P6"><text:span text:style-name="Strong_20_Emphasis">Learning from each resolution</text:span> to improve future performance</text:p>
        </text:list-item>
      </text:list>
      <text:p text:style-name="Text_20_body">We create a system that becomes <text:span text:style-name="Strong_20_Emphasis">more coherent with complexity</text:span>, not less. The arbitration layer ensures that as protocol count grows, the system's ability to synthesize unified understanding grows with it—preventing the very overwhelm we seek to avoid.</text:p>
      <text:p text:style-name="Text_20_body"><text:soft-page-break/>This approach maintains the Peter Protocol's core value: <text:span text:style-name="Strong_20_Emphasis">Protection through understanding, not just through assess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23T08:36:13.09</meta:creation-date>
    <meta:document-statistic meta:table-count="0" meta:image-count="0" meta:object-count="0" meta:page-count="12" meta:paragraph-count="538" meta:word-count="1913" meta:character-count="20995"/>
    <dc:date>2025-12-23T08:37:58.45</dc:date>
    <dc:creator>Peter Thompson</dc:creator>
    <meta:editing-duration>PT1M46S</meta:editing-duration>
    <meta:editing-cycles>1</meta:editing-cycles>
    <meta:generator>OpenOffice/4.1.15$Win32 OpenOffice.org_project/4115m2$Build-9813</meta:generator>
  </office:meta>
</office:document-meta>
</file>