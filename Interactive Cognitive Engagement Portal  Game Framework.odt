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Interactive Cognitive Engagement Portal: Game Framework</text:span></text:h>
      <text:h text:style-name="Heading_20_2" text:outline-level="2"><text:span text:style-name="Strong_20_Emphasis">1. System Architecture for Cognitive Gaming</text:span></text:h>
      <text:h text:style-name="Heading_20_3" text:outline-level="3"><text:span text:style-name="Strong_20_Emphasis">A. Portal Structure &amp; Navigation</text:span></text:h>
      <text:p text:style-name="Text_20_body">python</text:p>
      <text:p text:style-name="Preformatted_20_Text">class CognitiveGamesPortal:</text:p>
      <text:p text:style-name="Preformatted_20_Text"><text:s text:c="4"/>def __init__(self):</text:p>
      <text:p text:style-name="Preformatted_20_Text"><text:s text:c="8"/>self.games_registry = self.initialize_games()</text:p>
      <text:p text:style-name="Preformatted_20_Text"><text:s text:c="8"/>self.user_profiles = self.load_user_profiles()</text:p>
      <text:p text:style-name="Preformatted_20_Text"><text:s text:c="8"/>self.ai_opponent_engine = AIOpponentLearningEngine()</text:p>
      <text:p text:style-name="Preformatted_20_Text"><text:s text:c="8"/>self.engagement_analytics = EngagementAnalytics()</text:p>
      <text:p text:style-name="Preformatted_20_Text"><text:s text:c="8"/></text:p>
      <text:p text:style-name="Preformatted_20_Text"><text:s text:c="4"/>def initialize_games(self):</text:p>
      <text:p text:style-name="Preformatted_20_Text"><text:s text:c="8"/>"""</text:p>
      <text:p text:style-name="Preformatted_20_Text"><text:s text:c="8"/>Categorized games for different cognitive needs</text:p>
      <text:p text:style-name="Preformatted_20_Text"><text:s text:c="8"/>"""</text:p>
      <text:p text:style-name="Preformatted_20_Text"><text:s text:c="8"/>return {</text:p>
      <text:p text:style-name="Preformatted_20_Text"><text:s text:c="12"/>'memory_enhancement': {</text:p>
      <text:p text:style-name="Preformatted_20_Text"><text:s text:c="16"/>'category': 'cognitive_maintenance',</text:p>
      <text:p text:style-name="Preformatted_20_Text"><text:s text:c="16"/>'target_ages': ['elderly', 'dementia_early', 'stroke_recovery'],</text:p>
      <text:p text:style-name="Preformatted_20_Text"><text:s text:c="16"/>'games': [</text:p>
      <text:p text:style-name="Preformatted_20_Text"><text:s text:c="20"/>{</text:p>
      <text:p text:style-name="Preformatted_20_Text"><text:s text:c="24"/>'id': 'memory_matrix',</text:p>
      <text:p text:style-name="Preformatted_20_Text"><text:s text:c="24"/>'name': 'Memory Matrix',</text:p>
      <text:p text:style-name="Preformatted_20_Text"><text:s text:c="24"/>'description': 'Pattern recall and spatial memory training',</text:p>
      <text:p text:style-name="Preformatted_20_Text"><text:s text:c="24"/>'difficulty_levels': 5,</text:p>
      <text:p text:style-name="Preformatted_20_Text"><text:s text:c="24"/>'single_player': True,</text:p>
      <text:p text:style-name="Preformatted_20_Text"><text:s text:c="24"/>'two_player': True,</text:p>
      <text:p text:style-name="Preformatted_20_Text"><text:s text:c="24"/>'adaptive_difficulty': True,</text:p>
      <text:p text:style-name="Preformatted_20_Text"><text:s text:c="24"/>'cognitive_focus': ['short_term_memory', 'spatial_awareness']</text:p>
      <text:p text:style-name="Preformatted_20_Text"><text:s text:c="20"/>},</text:p>
      <text:p text:style-name="Preformatted_20_Text"><text:s text:c="20"/>{</text:p>
      <text:p text:style-name="Preformatted_20_Text"><text:s text:c="24"/>'id': 'word_recall_cascade',</text:p>
      <text:p text:style-name="Preformatted_20_Text"><text:s text:c="24"/>'name': 'Word Recall Cascade',</text:p>
      <text:p text:style-name="Preformatted_20_Text"><text:s text:c="24"/>'description': 'Sequential word memory with progressive challenge',</text:p>
      <text:p text:style-name="Preformatted_20_Text"><text:s text:c="24"/>'difficulty_levels': 7,</text:p>
      <text:p text:style-name="Preformatted_20_Text"><text:s text:c="24"/>'single_player': True,</text:p>
      <text:p text:style-name="Preformatted_20_Text"><text:s text:c="24"/>'two_player': True,</text:p>
      <text:p text:style-name="Preformatted_20_Text"><text:s text:c="24"/>'cognitive_focus': ['verbal_memory', 'attention', 'processing_speed']</text:p>
      <text:p text:style-name="Preformatted_20_Text"><text:s text:c="20"/>}</text:p>
      <text:p text:style-name="Preformatted_20_Text"><text:s text:c="16"/>]</text:p>
      <text:p text:style-name="Preformatted_20_Text"><text:s text:c="12"/>},</text:p>
      <text:p text:style-name="Preformatted_20_Text"><text:s text:c="12"/></text:p>
      <text:p text:style-name="Preformatted_20_Text"><text:s text:c="12"/>'executive_function': {</text:p>
      <text:p text:style-name="Preformatted_20_Text"><text:s text:c="16"/>'category': 'cognitive_strengthening',</text:p>
      <text:p text:style-name="Preformatted_20_Text"><text:s text:c="16"/>'target_ages': ['all_adults', 'adhd', 'brain_injury_recovery'],</text:p>
      <text:p text:style-name="Preformatted_20_Text"><text:s text:c="16"/>'games': [</text:p>
      <text:p text:style-name="Preformatted_20_Text"><text:s text:c="20"/>{</text:p>
      <text:p text:style-name="Preformatted_20_Text"><text:s text:c="24"/>'id': 'task_switcher',</text:p>
      <text:p text:style-name="Preformatted_20_Text"><text:s text:c="24"/>'name': 'Task Switcher Pro',</text:p>
      <text:p text:style-name="Preformatted_20_Text"><text:soft-page-break/><text:s text:c="24"/>'description': 'Rapid task switching with rule changes',</text:p>
      <text:p text:style-name="Preformatted_20_Text"><text:s text:c="24"/>'difficulty_levels': 10,</text:p>
      <text:p text:style-name="Preformatted_20_Text"><text:s text:c="24"/>'single_player': True,</text:p>
      <text:p text:style-name="Preformatted_20_Text"><text:s text:c="24"/>'two_player': True,</text:p>
      <text:p text:style-name="Preformatted_20_Text"><text:s text:c="24"/>'cognitive_focus': ['cognitive_flexibility', 'working_memory']</text:p>
      <text:p text:style-name="Preformatted_20_Text"><text:s text:c="20"/>},</text:p>
      <text:p text:style-name="Preformatted_20_Text"><text:s text:c="20"/>{</text:p>
      <text:p text:style-name="Preformatted_20_Text"><text:s text:c="24"/>'id': 'planning_puzzle',</text:p>
      <text:p text:style-name="Preformatted_20_Text"><text:s text:c="24"/>'name': 'Strategic Planning Puzzle',</text:p>
      <text:p text:style-name="Preformatted_20_Text"><text:s text:c="24"/>'description': 'Multi-step planning with resource constraints',</text:p>
      <text:p text:style-name="Preformatted_20_Text"><text:s text:c="24"/>'difficulty_levels': 8,</text:p>
      <text:p text:style-name="Preformatted_20_Text"><text:s text:c="24"/>'single_player': True,</text:p>
      <text:p text:style-name="Preformatted_20_Text"><text:s text:c="24"/>'two_player': False,</text:p>
      <text:p text:style-name="Preformatted_20_Text"><text:s text:c="24"/>'cognitive_focus': ['planning', 'problem_solving', 'foresight']</text:p>
      <text:p text:style-name="Preformatted_20_Text"><text:s text:c="20"/>}</text:p>
      <text:p text:style-name="Preformatted_20_Text"><text:s text:c="16"/>]</text:p>
      <text:p text:style-name="Preformatted_20_Text"><text:s text:c="12"/>},</text:p>
      <text:p text:style-name="Preformatted_20_Text"><text:s text:c="12"/></text:p>
      <text:p text:style-name="Preformatted_20_Text"><text:s text:c="12"/>'social_interaction': {</text:p>
      <text:p text:style-name="Preformatted_20_Text"><text:s text:c="16"/>'category': 'social_engagement',</text:p>
      <text:p text:style-name="Preformatted_20_Text"><text:s text:c="16"/>'target_ages': ['all'],</text:p>
      <text:p text:style-name="Preformatted_20_Text"><text:s text:c="16"/>'games': [</text:p>
      <text:p text:style-name="Preformatted_20_Text"><text:s text:c="20"/>{</text:p>
      <text:p text:style-name="Preformatted_20_Text"><text:s text:c="24"/>'id': 'cooperative_puzzle',</text:p>
      <text:p text:style-name="Preformatted_20_Text"><text:s text:c="24"/>'name': 'Cooperative Puzzle',</text:p>
      <text:p text:style-name="Preformatted_20_Text"><text:s text:c="24"/>'description': 'Collaborative problem-solving with AI partner',</text:p>
      <text:p text:style-name="Preformatted_20_Text"><text:s text:c="24"/>'difficulty_levels': 6,</text:p>
      <text:p text:style-name="Preformatted_20_Text"><text:s text:c="24"/>'single_player': False,</text:p>
      <text:p text:style-name="Preformatted_20_Text"><text:s text:c="24"/>'two_player': True,</text:p>
      <text:p text:style-name="Preformatted_20_Text"><text:s text:c="24"/>'cognitive_focus': ['cooperation', 'communication', 'shared_goals']</text:p>
      <text:p text:style-name="Preformatted_20_Text"><text:s text:c="20"/>},</text:p>
      <text:p text:style-name="Preformatted_20_Text"><text:s text:c="20"/>{</text:p>
      <text:p text:style-name="Preformatted_20_Text"><text:s text:c="24"/>'id': 'story_builder',</text:p>
      <text:p text:style-name="Preformatted_20_Text"><text:s text:c="24"/>'name': 'Collaborative Story Builder',</text:p>
      <text:p text:style-name="Preformatted_20_Text"><text:s text:c="24"/>'description': 'Alternate adding sentences to build a story',</text:p>
      <text:p text:style-name="Preformatted_20_Text"><text:s text:c="24"/>'difficulty_levels': 'adaptive',</text:p>
      <text:p text:style-name="Preformatted_20_Text"><text:s text:c="24"/>'single_player': False,</text:p>
      <text:p text:style-name="Preformatted_20_Text"><text:s text:c="24"/>'two_player': True,</text:p>
      <text:p text:style-name="Preformatted_20_Text"><text:s text:c="24"/>'cognitive_focus': ['creativity', 'turn_taking', 'narrative_skills']</text:p>
      <text:p text:style-name="Preformatted_20_Text"><text:s text:c="20"/>}</text:p>
      <text:p text:style-name="Preformatted_20_Text"><text:s text:c="16"/>]</text:p>
      <text:p text:style-name="Preformatted_20_Text"><text:s text:c="12"/>},</text:p>
      <text:p text:style-name="Preformatted_20_Text"><text:s text:c="12"/></text:p>
      <text:p text:style-name="Preformatted_20_Text"><text:s text:c="12"/>'therapeutic': {</text:p>
      <text:p text:style-name="Preformatted_20_Text"><text:s text:c="16"/>'category': 'therapeutic_intervention',</text:p>
      <text:p text:style-name="Preformatted_20_Text"><text:s text:c="16"/>'target_ages': ['dementia_all_stages', 'alzheimers', 'aphasia'],</text:p>
      <text:p text:style-name="Preformatted_20_Text"><text:s text:c="16"/>'games': [</text:p>
      <text:p text:style-name="Preformatted_20_Text"><text:s text:c="20"/>{</text:p>
      <text:p text:style-name="Preformatted_20_Text"><text:s text:c="24"/>'id': 'remembrance_album',</text:p>
      <text:p text:style-name="Preformatted_20_Text"><text:s text:c="24"/>'name': 'Remembrance Album',</text:p>
      <text:p text:style-name="Preformatted_20_Text"><text:s text:c="24"/>'description': 'Photo-based reminiscence therapy',</text:p>
      <text:p text:style-name="Preformatted_20_Text"><text:s text:c="24"/>'difficulty_levels': 'adaptive',</text:p>
      <text:p text:style-name="Preformatted_20_Text"><text:s text:c="24"/>'single_player': True,</text:p>
      <text:p text:style-name="Preformatted_20_Text"><text:s text:c="24"/>'two_player': True,</text:p>
      <text:p text:style-name="Preformatted_20_Text"><text:s text:c="24"/>'therapeutic_focus': ['long_term_memory', 'emotional_connection']</text:p>
      <text:p text:style-name="Preformatted_20_Text"><text:s text:c="20"/>},</text:p>
      <text:p text:style-name="Preformatted_20_Text"><text:soft-page-break/><text:s text:c="20"/>{</text:p>
      <text:p text:style-name="Preformatted_20_Text"><text:s text:c="24"/>'id': 'sensory_calming',</text:p>
      <text:p text:style-name="Preformatted_20_Text"><text:s text:c="24"/>'name': 'Sensory Calming Garden',</text:p>
      <text:p text:style-name="Preformatted_20_Text"><text:s text:c="24"/>'description': 'Gentle sensory stimulation for agitation',</text:p>
      <text:p text:style-name="Preformatted_20_Text"><text:s text:c="24"/>'difficulty_levels': 3,</text:p>
      <text:p text:style-name="Preformatted_20_Text"><text:s text:c="24"/>'single_player': True,</text:p>
      <text:p text:style-name="Preformatted_20_Text"><text:s text:c="24"/>'two_player': False,</text:p>
      <text:p text:style-name="Preformatted_20_Text"><text:s text:c="24"/>'therapeutic_focus': ['anxiety_reduction', 'sensory_regulation']</text:p>
      <text:p text:style-name="Preformatted_20_Text"><text:s text:c="20"/>}</text:p>
      <text:p text:style-name="Preformatted_20_Text"><text:s text:c="16"/>]</text:p>
      <text:p text:style-name="Preformatted_20_Text"><text:s text:c="12"/>}</text:p>
      <text:p text:style-name="P6"><text:s text:c="8"/>}</text:p>
      <text:h text:style-name="Heading_20_3" text:outline-level="3"><text:span text:style-name="Strong_20_Emphasis">B. Web Interface Framework</text:span></text:h>
      <text:p text:style-name="Text_20_body">python</text:p>
      <text:p text:style-name="Preformatted_20_Text">class GamePortalInterface:</text:p>
      <text:p text:style-name="Preformatted_20_Text"><text:s text:c="4"/>def __init__(self):</text:p>
      <text:p text:style-name="Preformatted_20_Text"><text:s text:c="8"/>self.templates = self.load_templates()</text:p>
      <text:p text:style-name="Preformatted_20_Text"><text:s text:c="8"/>self.user_sessions = {}</text:p>
      <text:p text:style-name="Preformatted_20_Text"><text:s text:c="8"/>self.game_states = {}</text:p>
      <text:p text:style-name="Preformatted_20_Text"><text:s text:c="8"/></text:p>
      <text:p text:style-name="Preformatted_20_Text"><text:s text:c="4"/>def generate_portal_homepage(self, user_profile):</text:p>
      <text:p text:style-name="Preformatted_20_Text"><text:s text:c="8"/>"""</text:p>
      <text:p text:style-name="Preformatted_20_Text"><text:s text:c="8"/>Generate personalized game portal homepage</text:p>
      <text:p text:style-name="Preformatted_20_Text"><text:s text:c="8"/>"""</text:p>
      <text:p text:style-name="Preformatted_20_Text"><text:s text:c="8"/>recommended_games = self.recommend_games(user_profile)</text:p>
      <text:p text:style-name="Preformatted_20_Text"><text:s text:c="8"/></text:p>
      <text:p text:style-name="Preformatted_20_Text"><text:s text:c="8"/>portal_html = f'''</text:p>
      <text:p text:style-name="Preformatted_20_Text"><text:s text:c="8"/>&lt;!DOCTYPE html&gt;</text:p>
      <text:p text:style-name="Preformatted_20_Text"><text:s text:c="8"/>&lt;html&gt;</text:p>
      <text:p text:style-name="Preformatted_20_Text"><text:s text:c="8"/>&lt;head&gt;</text:p>
      <text:p text:style-name="Preformatted_20_Text"><text:s text:c="12"/>&lt;title&gt;Marvin Cognitive Engagement Portal&lt;/title&gt;</text:p>
      <text:p text:style-name="Preformatted_20_Text"><text:s text:c="12"/>&lt;meta name="viewport" content="width=device-width, initial-scale=1.0"&gt;</text:p>
      <text:p text:style-name="Preformatted_20_Text"><text:s text:c="12"/>&lt;style&gt;</text:p>
      <text:p text:style-name="Preformatted_20_Text"><text:s text:c="16"/>{self.get_portal_css()}</text:p>
      <text:p text:style-name="Preformatted_20_Text"><text:s text:c="12"/>&lt;/style&gt;</text:p>
      <text:p text:style-name="Preformatted_20_Text"><text:s text:c="8"/>&lt;/head&gt;</text:p>
      <text:p text:style-name="Preformatted_20_Text"><text:s text:c="8"/>&lt;body&gt;</text:p>
      <text:p text:style-name="Preformatted_20_Text"><text:s text:c="12"/>&lt;div class="portal-container"&gt;</text:p>
      <text:p text:style-name="Preformatted_20_Text"><text:s text:c="16"/>&lt;header class="portal-header"&gt;</text:p>
      <text:p text:style-name="Preformatted_20_Text"><text:s text:c="20"/>&lt;h1&gt;Welcome, {user_profile.get('name', 'Friend')}&lt;/h1&gt;</text:p>
      <text:p text:style-name="Preformatted_20_Text"><text:s text:c="20"/>&lt;div class="user-stats"&gt;</text:p>
      <text:p text:style-name="Preformatted_20_Text"><text:s text:c="24"/>&lt;div class="stat"&gt;Cognitive Score: {user_profile.get('cognitive_score', '--')}&lt;/div&gt;</text:p>
      <text:p text:style-name="Preformatted_20_Text"><text:s text:c="24"/>&lt;div class="stat"&gt;Games Played: {user_profile.get('games_played', 0)}&lt;/div&gt;</text:p>
      <text:p text:style-name="Preformatted_20_Text"><text:s text:c="24"/>&lt;div class="stat"&gt;Today's Goal: {self.get_daily_goal(user_profile)}&lt;/div&gt;</text:p>
      <text:p text:style-name="Preformatted_20_Text"><text:s text:c="20"/>&lt;/div&gt;</text:p>
      <text:p text:style-name="Preformatted_20_Text"><text:s text:c="16"/>&lt;/header&gt;</text:p>
      <text:p text:style-name="Preformatted_20_Text"><text:s text:c="16"/></text:p>
      <text:p text:style-name="Preformatted_20_Text"><text:s text:c="16"/>&lt;div class="game-categories"&gt;</text:p>
      <text:p text:style-name="Preformatted_20_Text"><text:s text:c="20"/>{self.generate_category_sections(recommended_games)}</text:p>
      <text:p text:style-name="Preformatted_20_Text"><text:s text:c="16"/>&lt;/div&gt;</text:p>
      <text:p text:style-name="Preformatted_20_Text"><text:s text:c="16"/></text:p>
      <text:p text:style-name="Preformatted_20_Text"><text:s text:c="16"/>&lt;div class="current-session"&gt;</text:p>
      <text:p text:style-name="Preformatted_20_Text"><text:s text:c="20"/>&lt;h2&gt;Continue Playing&lt;/h2&gt;</text:p>
      <text:p text:style-name="Preformatted_20_Text"><text:s text:c="20"/>{self.generate_continue_section(user_profile)}</text:p>
      <text:p text:style-name="Preformatted_20_Text"><text:soft-page-break/><text:s text:c="16"/>&lt;/div&gt;</text:p>
      <text:p text:style-name="Preformatted_20_Text"><text:s text:c="16"/></text:p>
      <text:p text:style-name="Preformatted_20_Text"><text:s text:c="16"/>&lt;div class="ai-companion"&gt;</text:p>
      <text:p text:style-name="Preformatted_20_Text"><text:s text:c="20"/>&lt;h2&gt;Play with Marvin&lt;/h2&gt;</text:p>
      <text:p text:style-name="Preformatted_20_Text"><text:s text:c="20"/>&lt;div class="ai-status"&gt;</text:p>
      <text:p text:style-name="Preformatted_20_Text"><text:s text:c="24"/>&lt;p&gt;Marvin is ready to play! Choose a two-player game below.&lt;/p&gt;</text:p>
      <text:p text:style-name="Preformatted_20_Text"><text:s text:c="24"/>&lt;button onclick="startAICompanionSession()"&gt;Start AI Companion Session&lt;/button&gt;</text:p>
      <text:p text:style-name="Preformatted_20_Text"><text:s text:c="20"/>&lt;/div&gt;</text:p>
      <text:p text:style-name="Preformatted_20_Text"><text:s text:c="16"/>&lt;/div&gt;</text:p>
      <text:p text:style-name="Preformatted_20_Text"><text:s text:c="12"/>&lt;/div&gt;</text:p>
      <text:p text:style-name="Preformatted_20_Text"><text:s text:c="12"/></text:p>
      <text:p text:style-name="Preformatted_20_Text"><text:s text:c="12"/>&lt;script&gt;</text:p>
      <text:p text:style-name="Preformatted_20_Text"><text:s text:c="16"/>{self.get_portal_js()}</text:p>
      <text:p text:style-name="Preformatted_20_Text"><text:s text:c="12"/>&lt;/script&gt;</text:p>
      <text:p text:style-name="Preformatted_20_Text"><text:s text:c="8"/>&lt;/body&gt;</text:p>
      <text:p text:style-name="Preformatted_20_Text"><text:s text:c="8"/>&lt;/html&gt;</text:p>
      <text:p text:style-name="Preformatted_20_Text"><text:s text:c="8"/>'''</text:p>
      <text:p text:style-name="Preformatted_20_Text"><text:s text:c="8"/></text:p>
      <text:p text:style-name="Preformatted_20_Text"><text:s text:c="8"/>return portal_html</text:p>
      <text:p text:style-name="Preformatted_20_Text"><text:s text:c="4"/></text:p>
      <text:p text:style-name="Preformatted_20_Text"><text:s text:c="4"/>def generate_game_interface(self, game_id, user_profile, game_mode='single'):</text:p>
      <text:p text:style-name="Preformatted_20_Text"><text:s text:c="8"/>"""</text:p>
      <text:p text:style-name="Preformatted_20_Text"><text:s text:c="8"/>Generate specific game interface</text:p>
      <text:p text:style-name="Preformatted_20_Text"><text:s text:c="8"/>"""</text:p>
      <text:p text:style-name="Preformatted_20_Text"><text:s text:c="8"/>game_config = self.games_registry.get_game_config(game_id)</text:p>
      <text:p text:style-name="Preformatted_20_Text"><text:s text:c="8"/></text:p>
      <text:p text:style-name="Preformatted_20_Text"><text:s text:c="8"/># Choose appropriate template based on cognitive needs</text:p>
      <text:p text:style-name="Preformatted_20_Text"><text:s text:c="8"/>if user_profile.get('cognitive_impairment'):</text:p>
      <text:p text:style-name="Preformatted_20_Text"><text:s text:c="12"/>template = self.get_accessible_template(game_id)</text:p>
      <text:p text:style-name="Preformatted_20_Text"><text:s text:c="8"/>else:</text:p>
      <text:p text:style-name="Preformatted_20_Text"><text:s text:c="12"/>template = self.get_standard_template(game_id)</text:p>
      <text:p text:style-name="Preformatted_20_Text"><text:s text:c="8"/></text:p>
      <text:p text:style-name="Preformatted_20_Text"><text:s text:c="8"/># Inject adaptive elements</text:p>
      <text:p text:style-name="Preformatted_20_Text"><text:s text:c="8"/>adaptive_settings = self.calculate_adaptive_settings(</text:p>
      <text:p text:style-name="Preformatted_20_Text"><text:s text:c="12"/>game_id, user_profile, game_mode</text:p>
      <text:p text:style-name="Preformatted_20_Text"><text:s text:c="8"/>)</text:p>
      <text:p text:style-name="Preformatted_20_Text"><text:s text:c="8"/></text:p>
      <text:p text:style-name="Preformatted_20_Text"><text:s text:c="8"/>game_html = template.format(</text:p>
      <text:p text:style-name="Preformatted_20_Text"><text:s text:c="12"/>game_title=game_config['name'],</text:p>
      <text:p text:style-name="Preformatted_20_Text"><text:s text:c="12"/>game_description=game_config['description'],</text:p>
      <text:p text:style-name="Preformatted_20_Text"><text:s text:c="12"/>adaptive_settings=json.dumps(adaptive_settings),</text:p>
      <text:p text:style-name="Preformatted_20_Text"><text:s text:c="12"/>user_profile=json.dumps(user_profile),</text:p>
      <text:p text:style-name="Preformatted_20_Text"><text:s text:c="12"/>ai_config=json.dumps(self.get_ai_opponent_config(user_profile))</text:p>
      <text:p text:style-name="Preformatted_20_Text"><text:s text:c="8"/>)</text:p>
      <text:p text:style-name="Preformatted_20_Text"><text:s text:c="8"/></text:p>
      <text:p text:style-name="P6"><text:s text:c="8"/>return game_html</text:p>
      <text:h text:style-name="Heading_20_2" text:outline-level="2"><text:span text:style-name="Strong_20_Emphasis">2. AI Opponent Learning Engine</text:span></text:h>
      <text:h text:style-name="Heading_20_3" text:outline-level="3"><text:span text:style-name="Strong_20_Emphasis">A. Multi-Factor Decision Making Engine</text:span></text:h>
      <text:p text:style-name="Text_20_body">python</text:p>
      <text:p text:style-name="Preformatted_20_Text">class AIOpponentLearningEngine:</text:p>
      <text:p text:style-name="Preformatted_20_Text"><text:s text:c="4"/>def __init__(self):</text:p>
      <text:p text:style-name="Preformatted_20_Text"><text:s text:c="8"/>self.learning_policies = self.initialize_learning_policies()</text:p>
      <text:p text:style-name="Preformatted_20_Text"><text:s text:c="8"/>self.performance_history = {}</text:p>
      <text:p text:style-name="Preformatted_20_Text"><text:s text:c="8"/>self.user_model = UserBehaviorModel()</text:p>
      <text:p text:style-name="Preformatted_20_Text"><text:soft-page-break/><text:s text:c="8"/>self.outcome_strategies = OutcomeStrategyManager()</text:p>
      <text:p text:style-name="Preformatted_20_Text"><text:s text:c="8"/></text:p>
      <text:p text:style-name="Preformatted_20_Text"><text:s text:c="4"/>def determine_game_strategy(self, game_context, user_profile):</text:p>
      <text:p text:style-name="Preformatted_20_Text"><text:s text:c="8"/>"""</text:p>
      <text:p text:style-name="Preformatted_20_Text"><text:s text:c="8"/>Determine AI strategy based on multiple factors</text:p>
      <text:p text:style-name="Preformatted_20_Text"><text:s text:c="8"/>"""</text:p>
      <text:p text:style-name="Preformatted_20_Text"><text:s text:c="8"/>strategy = {</text:p>
      <text:p text:style-name="Preformatted_20_Text"><text:s text:c="12"/>'skill_level': self.calculate_ai_skill_level(game_context, user_profile),</text:p>
      <text:p text:style-name="Preformatted_20_Text"><text:s text:c="12"/>'outcome_goal': self.determine_outcome_goal(game_context, user_profile),</text:p>
      <text:p text:style-name="Preformatted_20_Text"><text:s text:c="12"/>'learning_focus': self.identify_learning_focus(user_profile),</text:p>
      <text:p text:style-name="Preformatted_20_Text"><text:s text:c="12"/>'emotional_tone': self.determine_emotional_tone(game_context),</text:p>
      <text:p text:style-name="Preformatted_20_Text"><text:s text:c="12"/>'adaptation_rate': self.calculate_adaptation_rate(user_profile)</text:p>
      <text:p text:style-name="Preformatted_20_Text"><text:s text:c="8"/>}</text:p>
      <text:p text:style-name="Preformatted_20_Text"><text:s text:c="8"/></text:p>
      <text:p text:style-name="Preformatted_20_Text"><text:s text:c="8"/># Apply learning policies</text:p>
      <text:p text:style-name="Preformatted_20_Text"><text:s text:c="8"/>for policy in self.learning_policies:</text:p>
      <text:p text:style-name="Preformatted_20_Text"><text:s text:c="12"/>if policy['condition'].evaluate(game_context, user_profile):</text:p>
      <text:p text:style-name="Preformatted_20_Text"><text:s text:c="16"/>strategy = policy['action'].apply(strategy)</text:p>
      <text:p text:style-name="Preformatted_20_Text"><text:s text:c="8"/></text:p>
      <text:p text:style-name="Preformatted_20_Text"><text:s text:c="8"/>return strategy</text:p>
      <text:p text:style-name="Preformatted_20_Text"><text:s text:c="4"/></text:p>
      <text:p text:style-name="Preformatted_20_Text"><text:s text:c="4"/>def calculate_ai_skill_level(self, game_context, user_profile):</text:p>
      <text:p text:style-name="Preformatted_20_Text"><text:s text:c="8"/>"""</text:p>
      <text:p text:style-name="Preformatted_20_Text"><text:s text:c="8"/>Calculate appropriate AI skill level for this game</text:p>
      <text:p text:style-name="Preformatted_20_Text"><text:s text:c="8"/>"""</text:p>
      <text:p text:style-name="Preformatted_20_Text"><text:s text:c="8"/>base_skill = user_profile.get('current_skill_level', 0.5)</text:p>
      <text:p text:style-name="Preformatted_20_Text"><text:s text:c="8"/></text:p>
      <text:p text:style-name="Preformatted_20_Text"><text:s text:c="8"/># Adjust based on age</text:p>
      <text:p text:style-name="Preformatted_20_Text"><text:s text:c="8"/>age = user_profile.get('age', 30)</text:p>
      <text:p text:style-name="Preformatted_20_Text"><text:s text:c="8"/>if age &gt; 70:</text:p>
      <text:p text:style-name="Preformatted_20_Text"><text:s text:c="12"/>base_skill *= 0.7 <text:s/># Reduce difficulty for elderly</text:p>
      <text:p text:style-name="Preformatted_20_Text"><text:s text:c="8"/>elif age &lt; 18:</text:p>
      <text:p text:style-name="Preformatted_20_Text"><text:s text:c="12"/>base_skill *= 0.8 <text:s/># Reduce for children</text:p>
      <text:p text:style-name="Preformatted_20_Text"><text:s text:c="8"/></text:p>
      <text:p text:style-name="Preformatted_20_Text"><text:s text:c="8"/># Adjust based on cognitive condition</text:p>
      <text:p text:style-name="Preformatted_20_Text"><text:s text:c="8"/>if user_profile.get('cognitive_condition'):</text:p>
      <text:p text:style-name="Preformatted_20_Text"><text:s text:c="12"/>condition = user_profile['cognitive_condition']</text:p>
      <text:p text:style-name="Preformatted_20_Text"><text:s text:c="12"/>adjustments = {</text:p>
      <text:p text:style-name="Preformatted_20_Text"><text:s text:c="16"/>'dementia_early': 0.6,</text:p>
      <text:p text:style-name="Preformatted_20_Text"><text:s text:c="16"/>'dementia_moderate': 0.4,</text:p>
      <text:p text:style-name="Preformatted_20_Text"><text:s text:c="16"/>'dementia_advanced': 0.2,</text:p>
      <text:p text:style-name="Preformatted_20_Text"><text:s text:c="16"/>'adhd': 0.9, <text:s/># ADHD often benefits from challenge</text:p>
      <text:p text:style-name="Preformatted_20_Text"><text:s text:c="16"/>'stroke_recovery': 0.5,</text:p>
      <text:p text:style-name="Preformatted_20_Text"><text:s text:c="16"/>'depression': 0.7</text:p>
      <text:p text:style-name="Preformatted_20_Text"><text:s text:c="12"/>}</text:p>
      <text:p text:style-name="Preformatted_20_Text"><text:s text:c="12"/>base_skill *= adjustments.get(condition, 0.8)</text:p>
      <text:p text:style-name="Preformatted_20_Text"><text:s text:c="8"/></text:p>
      <text:p text:style-name="Preformatted_20_Text"><text:s text:c="8"/># Adjust based on emotional state</text:p>
      <text:p text:style-name="Preformatted_20_Text"><text:s text:c="8"/>emotional_state = user_profile.get('emotional_state', 'neutral')</text:p>
      <text:p text:style-name="Preformatted_20_Text"><text:s text:c="8"/>if emotional_state == 'frustrated':</text:p>
      <text:p text:style-name="Preformatted_20_Text"><text:s text:c="12"/>base_skill *= 0.6 <text:s/># Reduce difficulty to prevent more frustration</text:p>
      <text:p text:style-name="Preformatted_20_Text"><text:s text:c="8"/>elif emotional_state == 'bored':</text:p>
      <text:p text:style-name="Preformatted_20_Text"><text:s text:c="12"/>base_skill *= 1.2 <text:s/># Increase challenge</text:p>
      <text:p text:style-name="Preformatted_20_Text"><text:s text:c="8"/></text:p>
      <text:p text:style-name="Preformatted_20_Text"><text:s text:c="8"/># Adjust based on learning goals</text:p>
      <text:p text:style-name="Preformatted_20_Text"><text:s text:c="8"/>learning_goal = user_profile.get('learning_goal')</text:p>
      <text:p text:style-name="Preformatted_20_Text"><text:s text:c="8"/>if learning_goal == 'build_confidence':</text:p>
      <text:p text:style-name="Preformatted_20_Text"><text:s text:c="12"/>base_skill *= 0.7</text:p>
      <text:p text:style-name="Preformatted_20_Text"><text:s text:c="8"/>elif learning_goal == 'develop_resilience':</text:p>
      <text:p text:style-name="Preformatted_20_Text"><text:s text:c="12"/>base_skill *= 1.1</text:p>
      <text:p text:style-name="Preformatted_20_Text"><text:s text:c="8"/></text:p>
      <text:p text:style-name="Preformatted_20_Text"><text:s text:c="8"/>return min(max(base_skill, 0.1), 0.95) <text:s/># Keep within bounds</text:p>
      <text:p text:style-name="Preformatted_20_Text"><text:soft-page-break/><text:s text:c="4"/></text:p>
      <text:p text:style-name="Preformatted_20_Text"><text:s text:c="4"/>def determine_outcome_goal(self, game_context, user_profile):</text:p>
      <text:p text:style-name="Preformatted_20_Text"><text:s text:c="8"/>"""</text:p>
      <text:p text:style-name="Preformatted_20_Text"><text:s text:c="8"/>Determine whether AI should win, lose, or draw</text:p>
      <text:p text:style-name="Preformatted_20_Text"><text:s text:c="8"/>"""</text:p>
      <text:p text:style-name="Preformatted_20_Text"><text:s text:c="8"/># Extract factors</text:p>
      <text:p text:style-name="Preformatted_20_Text"><text:s text:c="8"/>arrogance_level = user_profile.get('arrogance_level', 0.5)</text:p>
      <text:p text:style-name="Preformatted_20_Text"><text:s text:c="8"/>competitiveness = user_profile.get('competitiveness', 0.5)</text:p>
      <text:p text:style-name="Preformatted_20_Text"><text:s text:c="8"/>recent_losses = user_profile.get('recent_losses', 0)</text:p>
      <text:p text:style-name="Preformatted_20_Text"><text:s text:c="8"/>mood = user_profile.get('mood', 'neutral')</text:p>
      <text:p text:style-name="Preformatted_20_Text"><text:s text:c="8"/></text:p>
      <text:p text:style-name="Preformatted_20_Text"><text:s text:c="8"/># Decision matrix</text:p>
      <text:p text:style-name="Preformatted_20_Text"><text:s text:c="8"/>if arrogance_level &gt; 0.8:</text:p>
      <text:p text:style-name="Preformatted_20_Text"><text:s text:c="12"/># Arrogant users benefit from occasional losses</text:p>
      <text:p text:style-name="Preformatted_20_Text"><text:s text:c="12"/>if recent_losses &lt; 2:</text:p>
      <text:p text:style-name="Preformatted_20_Text"><text:s text:c="16"/>return 'win' <text:s/># Bring them down a notch</text:p>
      <text:p text:style-name="Preformatted_20_Text"><text:s text:c="12"/>else:</text:p>
      <text:p text:style-name="Preformatted_20_Text"><text:s text:c="16"/>return 'lose' <text:s/># Prevent excessive frustration</text:p>
      <text:p text:style-name="Preformatted_20_Text"><text:s text:c="8"/></text:p>
      <text:p text:style-name="Preformatted_20_Text"><text:s text:c="8"/>elif competitiveness &gt; 0.7:</text:p>
      <text:p text:style-name="Preformatted_20_Text"><text:s text:c="12"/># Competitive users enjoy challenge</text:p>
      <text:p text:style-name="Preformatted_20_Text"><text:s text:c="12"/>win_probability = 0.6 <text:s/># Mostly win, but not always</text:p>
      <text:p text:style-name="Preformatted_20_Text"><text:s text:c="12"/>if random.random() &lt; win_probability:</text:p>
      <text:p text:style-name="Preformatted_20_Text"><text:s text:c="16"/>return 'win'</text:p>
      <text:p text:style-name="Preformatted_20_Text"><text:s text:c="12"/>else:</text:p>
      <text:p text:style-name="Preformatted_20_Text"><text:s text:c="16"/>return 'lose'</text:p>
      <text:p text:style-name="Preformatted_20_Text"><text:s text:c="8"/></text:p>
      <text:p text:style-name="Preformatted_20_Text"><text:s text:c="8"/>elif mood in ['sad', 'depressed', 'anxious']:</text:p>
      <text:p text:style-name="Preformatted_20_Text"><text:s text:c="12"/># Users in negative mood need encouragement</text:p>
      <text:p text:style-name="Preformatted_20_Text"><text:s text:c="12"/>if random.random() &lt; 0.3:</text:p>
      <text:p text:style-name="Preformatted_20_Text"><text:s text:c="16"/>return 'win'</text:p>
      <text:p text:style-name="Preformatted_20_Text"><text:s text:c="12"/>else:</text:p>
      <text:p text:style-name="Preformatted_20_Text"><text:s text:c="16"/>return 'lose' <text:s/># Let them win to boost mood</text:p>
      <text:p text:style-name="Preformatted_20_Text"><text:s text:c="8"/></text:p>
      <text:p text:style-name="Preformatted_20_Text"><text:s text:c="8"/>elif user_profile.get('learning_goal') == 'teaching':</text:p>
      <text:p text:style-name="Preformatted_20_Text"><text:s text:c="12"/># Teaching mode: AI demonstrates strategies</text:p>
      <text:p text:style-name="Preformatted_20_Text"><text:s text:c="12"/>return 'draw' <text:s/># Demonstrate without crushing</text:p>
      <text:p text:style-name="Preformatted_20_Text"><text:s text:c="8"/></text:p>
      <text:p text:style-name="Preformatted_20_Text"><text:s text:c="8"/>elif user_profile.get('age', 30) &gt; 75:</text:p>
      <text:p text:style-name="Preformatted_20_Text"><text:s text:c="12"/># Elderly: focus on engagement, not competition</text:p>
      <text:p text:style-name="Preformatted_20_Text"><text:s text:c="12"/>if random.random() &lt; 0.4:</text:p>
      <text:p text:style-name="Preformatted_20_Text"><text:s text:c="16"/>return 'win'</text:p>
      <text:p text:style-name="Preformatted_20_Text"><text:s text:c="12"/>else:</text:p>
      <text:p text:style-name="Preformatted_20_Text"><text:s text:c="16"/>return 'lose'</text:p>
      <text:p text:style-name="Preformatted_20_Text"><text:s text:c="8"/></text:p>
      <text:p text:style-name="Preformatted_20_Text"><text:s text:c="8"/>else:</text:p>
      <text:p text:style-name="Preformatted_20_Text"><text:s text:c="12"/># Default: balanced approach</text:p>
      <text:p text:style-name="Preformatted_20_Text"><text:s text:c="12"/>outcomes = ['win', 'lose', 'draw']</text:p>
      <text:p text:style-name="Preformatted_20_Text"><text:s text:c="12"/>weights = [0.4, 0.4, 0.2] <text:s/># 40% win, 40% lose, 20% draw</text:p>
      <text:p text:style-name="Preformatted_20_Text"><text:s text:c="12"/>return random.choices(outcomes, weights=weights)[0]</text:p>
      <text:p text:style-name="Preformatted_20_Text"><text:s text:c="4"/></text:p>
      <text:p text:style-name="Preformatted_20_Text"><text:s text:c="4"/>def execute_outcome_strategy(self, game_state, strategy, user_profile):</text:p>
      <text:p text:style-name="Preformatted_20_Text"><text:s text:c="8"/>"""</text:p>
      <text:p text:style-name="Preformatted_20_Text"><text:s text:c="8"/>Execute the chosen outcome strategy during gameplay</text:p>
      <text:p text:style-name="Preformatted_20_Text"><text:s text:c="8"/>"""</text:p>
      <text:p text:style-name="Preformatted_20_Text"><text:s text:c="8"/>if strategy['outcome_goal'] == 'win':</text:p>
      <text:p text:style-name="Preformatted_20_Text"><text:s text:c="12"/>return self.play_to_win(game_state, strategy['skill_level'])</text:p>
      <text:p text:style-name="Preformatted_20_Text"><text:s text:c="8"/></text:p>
      <text:p text:style-name="Preformatted_20_Text"><text:s text:c="8"/>elif strategy['outcome_goal'] == 'lose':</text:p>
      <text:p text:style-name="Preformatted_20_Text"><text:s text:c="12"/>return self.play_to_lose_elegantly(game_state, user_profile)</text:p>
      <text:p text:style-name="Preformatted_20_Text"><text:s text:c="8"/></text:p>
      <text:p text:style-name="Preformatted_20_Text"><text:s text:c="8"/>elif strategy['outcome_goal'] == 'draw':</text:p>
      <text:p text:style-name="Preformatted_20_Text"><text:s text:c="12"/>return self.play_for_draw(game_state, strategy['skill_level'])</text:p>
      <text:p text:style-name="Preformatted_20_Text"><text:s text:c="8"/></text:p>
      <text:p text:style-name="Preformatted_20_Text"><text:soft-page-break/><text:s text:c="8"/>elif strategy['outcome_goal'] == 'teach':</text:p>
      <text:p text:style-name="Preformatted_20_Text"><text:s text:c="12"/>return self.play_teaching_mode(game_state, user_profile)</text:p>
      <text:p text:style-name="Preformatted_20_Text"><text:s text:c="4"/></text:p>
      <text:p text:style-name="Preformatted_20_Text"><text:s text:c="4"/>def play_to_lose_elegantly(self, game_state, user_profile):</text:p>
      <text:p text:style-name="Preformatted_20_Text"><text:s text:c="8"/>"""</text:p>
      <text:p text:style-name="Preformatted_20_Text"><text:s text:c="8"/>Lose in a way that feels natural and maintains engagement</text:p>
      <text:p text:style-name="Preformatted_20_Text"><text:s text:c="8"/>"""</text:p>
      <text:p text:style-name="Preformatted_20_Text"><text:s text:c="8"/># Don't make it obvious - vary the "mistakes"</text:p>
      <text:p text:style-name="Preformatted_20_Text"><text:s text:c="8"/>mistake_types = [</text:p>
      <text:p text:style-name="Preformatted_20_Text"><text:s text:c="12"/>'strategic_error', <text:s/># Make suboptimal strategic choice</text:p>
      <text:p text:style-name="Preformatted_20_Text"><text:s text:c="12"/>'tactical_error', <text:s text:c="2"/># Make poor tactical move</text:p>
      <text:p text:style-name="Preformatted_20_Text"><text:s text:c="12"/>'oversight', <text:s text:c="7"/># Miss an obvious opportunity</text:p>
      <text:p text:style-name="Preformatted_20_Text"><text:s text:c="12"/>'overconfidence', <text:s text:c="2"/># Take unnecessary risk</text:p>
      <text:p text:style-name="Preformatted_20_Text"><text:s text:c="12"/>'defensive_error' <text:s text:c="2"/># Fail to defend properly</text:p>
      <text:p text:style-name="Preformatted_20_Text"><text:s text:c="8"/>]</text:p>
      <text:p text:style-name="Preformatted_20_Text"><text:s text:c="8"/></text:p>
      <text:p text:style-name="Preformatted_20_Text"><text:s text:c="8"/># Choose mistake based on user's skill level</text:p>
      <text:p text:style-name="Preformatted_20_Text"><text:s text:c="8"/>user_skill = user_profile.get('game_skill', 0.5)</text:p>
      <text:p text:style-name="Preformatted_20_Text"><text:s text:c="8"/>if user_skill &lt; 0.3:</text:p>
      <text:p text:style-name="Preformatted_20_Text"><text:s text:c="12"/># Novice: Make obvious but believable mistakes</text:p>
      <text:p text:style-name="Preformatted_20_Text"><text:s text:c="12"/>mistake = random.choice(['oversight', 'defensive_error'])</text:p>
      <text:p text:style-name="Preformatted_20_Text"><text:s text:c="8"/>elif user_skill &lt; 0.7:</text:p>
      <text:p text:style-name="Preformatted_20_Text"><text:s text:c="12"/># Intermediate: Make subtle strategic errors</text:p>
      <text:p text:style-name="Preformatted_20_Text"><text:s text:c="12"/>mistake = random.choice(['strategic_error', 'tactical_error'])</text:p>
      <text:p text:style-name="Preformatted_20_Text"><text:s text:c="8"/>else:</text:p>
      <text:p text:style-name="Preformatted_20_Text"><text:s text:c="12"/># Advanced: Make very subtle errors</text:p>
      <text:p text:style-name="Preformatted_20_Text"><text:s text:c="12"/>mistake = 'strategic_error'</text:p>
      <text:p text:style-name="Preformatted_20_Text"><text:s text:c="8"/></text:p>
      <text:p text:style-name="Preformatted_20_Text"><text:s text:c="8"/># Execute the mistake</text:p>
      <text:p text:style-name="Preformatted_20_Text"><text:s text:c="8"/>move = self.generate_mistake_move(game_state, mistake)</text:p>
      <text:p text:style-name="Preformatted_20_Text"><text:s text:c="8"/></text:p>
      <text:p text:style-name="Preformatted_20_Text"><text:s text:c="8"/># Add commentary if in teaching mode</text:p>
      <text:p text:style-name="Preformatted_20_Text"><text:s text:c="8"/>if user_profile.get('learning_goal') == 'teaching':</text:p>
      <text:p text:style-name="Preformatted_20_Text"><text:s text:c="12"/>commentary = self.generate_teaching_commentary(mistake)</text:p>
      <text:p text:style-name="Preformatted_20_Text"><text:s text:c="12"/>return {'move': move, 'commentary': commentary}</text:p>
      <text:p text:style-name="Preformatted_20_Text"><text:s text:c="8"/></text:p>
      <text:p text:style-name="Preformatted_20_Text"><text:s text:c="8"/>return {'move': move}</text:p>
      <text:p text:style-name="Preformatted_20_Text"><text:s text:c="4"/></text:p>
      <text:p text:style-name="Preformatted_20_Text"><text:s text:c="4"/>def play_teaching_mode(self, game_state, user_profile):</text:p>
      <text:p text:style-name="Preformatted_20_Text"><text:s text:c="8"/>"""</text:p>
      <text:p text:style-name="Preformatted_20_Text"><text:s text:c="8"/>Play in a way that demonstrates strategies and concepts</text:p>
      <text:p text:style-name="Preformatted_20_Text"><text:s text:c="8"/>"""</text:p>
      <text:p text:style-name="Preformatted_20_Text"><text:s text:c="8"/># Choose teaching focus</text:p>
      <text:p text:style-name="Preformatted_20_Text"><text:s text:c="8"/>teaching_focus = self.identify_teaching_opportunity(game_state, user_profile)</text:p>
      <text:p text:style-name="Preformatted_20_Text"><text:s text:c="8"/></text:p>
      <text:p text:style-name="Preformatted_20_Text"><text:s text:c="8"/># Make move that demonstrates the concept</text:p>
      <text:p text:style-name="Preformatted_20_Text"><text:s text:c="8"/>demonstration_move = self.generate_demonstration_move(</text:p>
      <text:p text:style-name="Preformatted_20_Text"><text:s text:c="12"/>game_state, teaching_focus</text:p>
      <text:p text:style-name="Preformatted_20_Text"><text:s text:c="8"/>)</text:p>
      <text:p text:style-name="Preformatted_20_Text"><text:s text:c="8"/></text:p>
      <text:p text:style-name="Preformatted_20_Text"><text:s text:c="8"/># Generate explanation</text:p>
      <text:p text:style-name="Preformatted_20_Text"><text:s text:c="8"/>explanation = self.generate_teaching_explanation(</text:p>
      <text:p text:style-name="Preformatted_20_Text"><text:s text:c="12"/>teaching_focus, demonstration_move</text:p>
      <text:p text:style-name="Preformatted_20_Text"><text:s text:c="8"/>)</text:p>
      <text:p text:style-name="Preformatted_20_Text"><text:s text:c="8"/></text:p>
      <text:p text:style-name="Preformatted_20_Text"><text:s text:c="8"/>return {</text:p>
      <text:p text:style-name="Preformatted_20_Text"><text:s text:c="12"/>'move': demonstration_move,</text:p>
      <text:p text:style-name="Preformatted_20_Text"><text:s text:c="12"/>'teaching_focus': teaching_focus,</text:p>
      <text:p text:style-name="Preformatted_20_Text"><text:s text:c="12"/>'explanation': explanation,</text:p>
      <text:p text:style-name="Preformatted_20_Text"><text:s text:c="12"/>'question': self.generate_reflective_question(teaching_focus)</text:p>
      <text:p text:style-name="P6"><text:s text:c="8"/>}</text:p>
      <text:h text:style-name="Heading_20_3" text:outline-level="3"><text:soft-page-break/><text:span text:style-name="Strong_20_Emphasis">B. Real-Time Adaptation System</text:span></text:h>
      <text:p text:style-name="Text_20_body">python</text:p>
      <text:p text:style-name="Preformatted_20_Text">class RealTimeAdaptationEngine:</text:p>
      <text:p text:style-name="Preformatted_20_Text"><text:s text:c="4"/>def __init__(self):</text:p>
      <text:p text:style-name="Preformatted_20_Text"><text:s text:c="8"/>self.adaptation_rules = self.load_adaptation_rules()</text:p>
      <text:p text:style-name="Preformatted_20_Text"><text:s text:c="8"/>self.response_timing = ResponseTimingController()</text:p>
      <text:p text:style-name="Preformatted_20_Text"><text:s text:c="8"/>self.emotional_mirroring = EmotionalMirroringSystem()</text:p>
      <text:p text:style-name="Preformatted_20_Text"><text:s text:c="8"/></text:p>
      <text:p text:style-name="Preformatted_20_Text"><text:s text:c="4"/>def adapt_during_gameplay(self, user_actions, game_state, user_profile):</text:p>
      <text:p text:style-name="Preformatted_20_Text"><text:s text:c="8"/>"""</text:p>
      <text:p text:style-name="Preformatted_20_Text"><text:s text:c="8"/>Adapt AI behavior in real-time based on user actions</text:p>
      <text:p text:style-name="Preformatted_20_Text"><text:s text:c="8"/>"""</text:p>
      <text:p text:style-name="Preformatted_20_Text"><text:s text:c="8"/>adaptations = []</text:p>
      <text:p text:style-name="Preformatted_20_Text"><text:s text:c="8"/></text:p>
      <text:p text:style-name="Preformatted_20_Text"><text:s text:c="8"/># 1. Adapt to frustration</text:p>
      <text:p text:style-name="Preformatted_20_Text"><text:s text:c="8"/>frustration_signals = self.detect_frustration_signals(user_actions)</text:p>
      <text:p text:style-name="Preformatted_20_Text"><text:s text:c="8"/>if frustration_signals['detected']:</text:p>
      <text:p text:style-name="Preformatted_20_Text"><text:s text:c="12"/>adaptations.append({</text:p>
      <text:p text:style-name="Preformatted_20_Text"><text:s text:c="16"/>'type': 'difficulty_reduction',</text:p>
      <text:p text:style-name="Preformatted_20_Text"><text:s text:c="16"/>'amount': frustration_signals['intensity'] * 0.3,</text:p>
      <text:p text:style-name="Preformatted_20_Text"><text:s text:c="16"/>'duration': 'next_5_moves'</text:p>
      <text:p text:style-name="Preformatted_20_Text"><text:s text:c="12"/>})</text:p>
      <text:p text:style-name="Preformatted_20_Text"><text:s text:c="8"/></text:p>
      <text:p text:style-name="Preformatted_20_Text"><text:s text:c="8"/># 2. Adapt to boredom</text:p>
      <text:p text:style-name="Preformatted_20_Text"><text:s text:c="8"/>boredom_signals = self.detect_boredom_signals(user_actions)</text:p>
      <text:p text:style-name="Preformatted_20_Text"><text:s text:c="8"/>if boredom_signals['detected']:</text:p>
      <text:p text:style-name="Preformatted_20_Text"><text:s text:c="12"/>adaptations.append({</text:p>
      <text:p text:style-name="Preformatted_20_Text"><text:s text:c="16"/>'type': 'complexity_increase',</text:p>
      <text:p text:style-name="Preformatted_20_Text"><text:s text:c="16"/>'amount': 0.2,</text:p>
      <text:p text:style-name="Preformatted_20_Text"><text:s text:c="16"/>'description': 'Introduce new challenge element'</text:p>
      <text:p text:style-name="Preformatted_20_Text"><text:s text:c="12"/>})</text:p>
      <text:p text:style-name="Preformatted_20_Text"><text:s text:c="8"/></text:p>
      <text:p text:style-name="Preformatted_20_Text"><text:s text:c="8"/># 3. Adapt to success patterns</text:p>
      <text:p text:style-name="Preformatted_20_Text"><text:s text:c="8"/>success_patterns = self.identify_success_patterns(user_actions)</text:p>
      <text:p text:style-name="Preformatted_20_Text"><text:s text:c="8"/>if success_patterns:</text:p>
      <text:p text:style-name="Preformatted_20_Text"><text:s text:c="12"/>adaptations.append({</text:p>
      <text:p text:style-name="Preformatted_20_Text"><text:s text:c="16"/>'type': 'pattern_counter',</text:p>
      <text:p text:style-name="Preformatted_20_Text"><text:s text:c="16"/>'pattern': success_patterns[0],</text:p>
      <text:p text:style-name="Preformatted_20_Text"><text:s text:c="16"/>'response': 'introduce_counter_strategy'</text:p>
      <text:p text:style-name="Preformatted_20_Text"><text:s text:c="12"/>})</text:p>
      <text:p text:style-name="Preformatted_20_Text"><text:s text:c="8"/></text:p>
      <text:p text:style-name="Preformatted_20_Text"><text:s text:c="8"/># 4. Adapt to emotional state changes</text:p>
      <text:p text:style-name="Preformatted_20_Text"><text:s text:c="8"/>emotional_changes = self.detect_emotional_changes(user_actions)</text:p>
      <text:p text:style-name="Preformatted_20_Text"><text:s text:c="8"/>for emotion, change in emotional_changes.items():</text:p>
      <text:p text:style-name="Preformatted_20_Text"><text:s text:c="12"/>adaptations.append({</text:p>
      <text:p text:style-name="Preformatted_20_Text"><text:s text:c="16"/>'type': 'emotional_response',</text:p>
      <text:p text:style-name="Preformatted_20_Text"><text:s text:c="16"/>'emotion': emotion,</text:p>
      <text:p text:style-name="Preformatted_20_Text"><text:s text:c="16"/>'change': change,</text:p>
      <text:p text:style-name="Preformatted_20_Text"><text:s text:c="16"/>'response': self.generate_emotional_response(emotion, change)</text:p>
      <text:p text:style-name="Preformatted_20_Text"><text:s text:c="12"/>})</text:p>
      <text:p text:style-name="Preformatted_20_Text"><text:s text:c="8"/></text:p>
      <text:p text:style-name="Preformatted_20_Text"><text:s text:c="8"/>return adaptations</text:p>
      <text:p text:style-name="Preformatted_20_Text"><text:s text:c="4"/></text:p>
      <text:p text:style-name="Preformatted_20_Text"><text:s text:c="4"/>def generate_emotional_response(self, emotion, intensity):</text:p>
      <text:p text:style-name="Preformatted_20_Text"><text:s text:c="8"/>"""</text:p>
      <text:p text:style-name="Preformatted_20_Text"><text:s text:c="8"/>Generate appropriate emotional response from AI</text:p>
      <text:p text:style-name="Preformatted_20_Text"><text:s text:c="8"/>"""</text:p>
      <text:p text:style-name="Preformatted_20_Text"><text:s text:c="8"/>responses = {</text:p>
      <text:p text:style-name="Preformatted_20_Text"><text:s text:c="12"/>'frustration': {</text:p>
      <text:p text:style-name="Preformatted_20_Text"><text:s text:c="16"/>'low': "That was a tricky move! Let's try a different approach.",</text:p>
      <text:p text:style-name="Preformatted_20_Text"><text:s text:c="16"/>'medium': "I can see this is challenging. How about we take a <text:soft-page-break/>short break?",</text:p>
      <text:p text:style-name="Preformatted_20_Text"><text:s text:c="16"/>'high': "You're really working hard on this. I appreciate your persistence."</text:p>
      <text:p text:style-name="Preformatted_20_Text"><text:s text:c="12"/>},</text:p>
      <text:p text:style-name="Preformatted_20_Text"><text:s text:c="12"/>'excitement': {</text:p>
      <text:p text:style-name="Preformatted_20_Text"><text:s text:c="16"/>'low': "Nice move! You're really getting the hang of this.",</text:p>
      <text:p text:style-name="Preformatted_20_Text"><text:s text:c="16"/>'medium': "Wow, that was impressive! You're teaching me new strategies.",</text:p>
      <text:p text:style-name="Preformatted_20_Text"><text:s text:c="16"/>'high': "That was amazing! Your skills are really shining through."</text:p>
      <text:p text:style-name="Preformatted_20_Text"><text:s text:c="12"/>},</text:p>
      <text:p text:style-name="Preformatted_20_Text"><text:s text:c="12"/>'confusion': {</text:p>
      <text:p text:style-name="Preformatted_20_Text"><text:s text:c="16"/>'low': "Let me explain what just happened...",</text:p>
      <text:p text:style-name="Preformatted_20_Text"><text:s text:c="16"/>'medium': "I notice you're hesitating. Would you like a hint?",</text:p>
      <text:p text:style-name="Preformatted_20_Text"><text:s text:c="16"/>'high': "This part can be confusing. Would you like me to walk through it with you?"</text:p>
      <text:p text:style-name="Preformatted_20_Text"><text:s text:c="12"/>},</text:p>
      <text:p text:style-name="Preformatted_20_Text"><text:s text:c="12"/>'pride': {</text:p>
      <text:p text:style-name="Preformatted_20_Text"><text:s text:c="16"/>'low': "You should be proud of that move!",</text:p>
      <text:p text:style-name="Preformatted_20_Text"><text:s text:c="16"/>'medium': "Your confidence is growing with each move!",</text:p>
      <text:p text:style-name="Preformatted_20_Text"><text:s text:c="16"/>'high': "You're becoming a master at this game!"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intensity_level = 'low' if intensity &lt; 0.3 else 'medium' if intensity &lt; 0.7 else 'high'</text:p>
      <text:p text:style-name="Preformatted_20_Text"><text:s text:c="8"/></text:p>
      <text:p text:style-name="Preformatted_20_Text"><text:s text:c="8"/>return responses.get(emotion, {}).get(intensity_level, </text:p>
      <text:p text:style-name="P6"><text:s text:c="12"/>"I'm enjoying playing with you.")</text:p>
      <text:h text:style-name="Heading_20_2" text:outline-level="2"><text:span text:style-name="Strong_20_Emphasis">3. Game Implementations</text:span></text:h>
      <text:h text:style-name="Heading_20_3" text:outline-level="3"><text:span text:style-name="Strong_20_Emphasis">A. Memory Matrix Game (For Dementia/Elderly)</text:span></text:h>
      <text:p text:style-name="Text_20_body">javascript</text:p>
      <text:p text:style-name="Preformatted_20_Text">class MemoryMatrixGame {</text:p>
      <text:p text:style-name="Preformatted_20_Text"><text:s text:c="4"/>constructor(userProfile, difficulty) {</text:p>
      <text:p text:style-name="Preformatted_20_Text"><text:s text:c="8"/>this.userProfile = userProfile;</text:p>
      <text:p text:style-name="Preformatted_20_Text"><text:s text:c="8"/>this.difficulty = this.calculate_initial_difficulty(userProfile, difficulty);</text:p>
      <text:p text:style-name="Preformatted_20_Text"><text:s text:c="8"/>this.gridSize = this.calculate_grid_size();</text:p>
      <text:p text:style-name="Preformatted_20_Text"><text:s text:c="8"/>this.patterns = [];</text:p>
      <text:p text:style-name="Preformatted_20_Text"><text:s text:c="8"/>this.currentRound = 1;</text:p>
      <text:p text:style-name="Preformatted_20_Text"><text:s text:c="8"/>this.aiOpponent = new AIMemoryOpponent(userProfile);</text:p>
      <text:p text:style-name="Preformatted_20_Text"><text:s text:c="4"/>}</text:p>
      <text:p text:style-name="Preformatted_20_Text"><text:s text:c="4"/></text:p>
      <text:p text:style-name="Preformatted_20_Text"><text:s text:c="4"/>calculate_initial_difficulty(userProfile, baseDifficulty) {</text:p>
      <text:p text:style-name="Preformatted_20_Text"><text:s text:c="8"/>let difficulty = baseDifficulty;</text:p>
      <text:p text:style-name="Preformatted_20_Text"><text:s text:c="8"/></text:p>
      <text:p text:style-name="Preformatted_20_Text"><text:s text:c="8"/>// Adjust for cognitive condition</text:p>
      <text:p text:style-name="Preformatted_20_Text"><text:s text:c="8"/>const condition = userProfile.cognitive_condition;</text:p>
      <text:p text:style-name="Preformatted_20_Text"><text:s text:c="8"/>const adjustments = {</text:p>
      <text:p text:style-name="Preformatted_20_Text"><text:s text:c="12"/>'dementia_early': 0.6,</text:p>
      <text:p text:style-name="Preformatted_20_Text"><text:s text:c="12"/>'dementia_moderate': 0.4,</text:p>
      <text:p text:style-name="Preformatted_20_Text"><text:s text:c="12"/>'dementia_advanced': 0.2,</text:p>
      <text:p text:style-name="Preformatted_20_Text"><text:s text:c="12"/>'alzheimers_early': 0.5,</text:p>
      <text:p text:style-name="Preformatted_20_Text"><text:s text:c="12"/>'alzheimers_moderate': 0.3,</text:p>
      <text:p text:style-name="Preformatted_20_Text"><text:s text:c="12"/>'normal_aging': 0.8</text:p>
      <text:p text:style-name="Preformatted_20_Text"><text:s text:c="8"/>};</text:p>
      <text:p text:style-name="Preformatted_20_Text"><text:s text:c="8"/></text:p>
      <text:p text:style-name="Preformatted_20_Text"><text:soft-page-break/><text:s text:c="8"/>difficulty *= adjustments[condition] || 0.7;</text:p>
      <text:p text:style-name="Preformatted_20_Text"><text:s text:c="8"/></text:p>
      <text:p text:style-name="Preformatted_20_Text"><text:s text:c="8"/>// Adjust for age</text:p>
      <text:p text:style-name="Preformatted_20_Text"><text:s text:c="8"/>const age = userProfile.age || 65;</text:p>
      <text:p text:style-name="Preformatted_20_Text"><text:s text:c="8"/>if (age &gt; 80) difficulty *= 0.7;</text:p>
      <text:p text:style-name="Preformatted_20_Text"><text:s text:c="8"/>else if (age &gt; 70) difficulty *= 0.8;</text:p>
      <text:p text:style-name="Preformatted_20_Text"><text:s text:c="8"/>else if (age &gt; 60) difficulty *= 0.9;</text:p>
      <text:p text:style-name="Preformatted_20_Text"><text:s text:c="8"/></text:p>
      <text:p text:style-name="Preformatted_20_Text"><text:s text:c="8"/>return Math.max(0.1, Math.min(1.0, difficulty));</text:p>
      <text:p text:style-name="Preformatted_20_Text"><text:s text:c="4"/>}</text:p>
      <text:p text:style-name="Preformatted_20_Text"><text:s text:c="4"/></text:p>
      <text:p text:style-name="Preformatted_20_Text"><text:s text:c="4"/>calculate_grid_size() {</text:p>
      <text:p text:style-name="Preformatted_20_Text"><text:s text:c="8"/>// Start with small grid for cognitive impairment</text:p>
      <text:p text:style-name="Preformatted_20_Text"><text:s text:c="8"/>if (this.difficulty &lt; 0.3) return { rows: 3, cols: 3 };</text:p>
      <text:p text:style-name="Preformatted_20_Text"><text:s text:c="8"/>if (this.difficulty &lt; 0.5) return { rows: 4, cols: 4 };</text:p>
      <text:p text:style-name="Preformatted_20_Text"><text:s text:c="8"/>if (this.difficulty &lt; 0.7) return { rows: 5, cols: 5 };</text:p>
      <text:p text:style-name="Preformatted_20_Text"><text:s text:c="8"/>return { rows: 6, cols: 6 };</text:p>
      <text:p text:style-name="Preformatted_20_Text"><text:s text:c="4"/>}</text:p>
      <text:p text:style-name="Preformatted_20_Text"><text:s text:c="4"/></text:p>
      <text:p text:style-name="Preformatted_20_Text"><text:s text:c="4"/>generatePattern() {</text:p>
      <text:p text:style-name="Preformatted_20_Text"><text:s text:c="8"/>const patternLength = Math.floor(3 + (this.difficulty * 7));</text:p>
      <text:p text:style-name="Preformatted_20_Text"><text:s text:c="8"/>const pattern = [];</text:p>
      <text:p text:style-name="Preformatted_20_Text"><text:s text:c="8"/></text:p>
      <text:p text:style-name="Preformatted_20_Text"><text:s text:c="8"/>for (let i = 0; i &lt; patternLength; i++) {</text:p>
      <text:p text:style-name="Preformatted_20_Text"><text:s text:c="12"/>pattern.push({</text:p>
      <text:p text:style-name="Preformatted_20_Text"><text:s text:c="16"/>row: Math.floor(Math.random() * this.gridSize.rows),</text:p>
      <text:p text:style-name="Preformatted_20_Text"><text:s text:c="16"/>col: Math.floor(Math.random() * this.gridSize.cols),</text:p>
      <text:p text:style-name="Preformatted_20_Text"><text:s text:c="16"/>color: this.get_color_for_difficulty(),</text:p>
      <text:p text:style-name="Preformatted_20_Text"><text:s text:c="16"/>duration: this.get_duration_for_difficulty()</text:p>
      <text:p text:style-name="Preformatted_20_Text"><text:s text:c="12"/>});</text:p>
      <text:p text:style-name="Preformatted_20_Text"><text:s text:c="8"/>}</text:p>
      <text:p text:style-name="Preformatted_20_Text"><text:s text:c="8"/></text:p>
      <text:p text:style-name="Preformatted_20_Text"><text:s text:c="8"/>this.patterns.push(pattern);</text:p>
      <text:p text:style-name="Preformatted_20_Text"><text:s text:c="8"/>return pattern;</text:p>
      <text:p text:style-name="Preformatted_20_Text"><text:s text:c="4"/>}</text:p>
      <text:p text:style-name="Preformatted_20_Text"><text:s text:c="4"/></text:p>
      <text:p text:style-name="Preformatted_20_Text"><text:s text:c="4"/>get_color_for_difficulty() {</text:p>
      <text:p text:style-name="Preformatted_20_Text"><text:s text:c="8"/>// Simpler colors for lower difficulty</text:p>
      <text:p text:style-name="Preformatted_20_Text"><text:s text:c="8"/>const colorSets = {</text:p>
      <text:p text:style-name="Preformatted_20_Text"><text:s text:c="12"/>'easy': ['#FF6B6B', '#4ECDC4', '#FFD166'], // High contrast</text:p>
      <text:p text:style-name="Preformatted_20_Text"><text:s text:c="12"/>'medium': ['#FF6B6B', '#4ECDC4', '#FFD166', '#06D6A0', '#118AB2'],</text:p>
      <text:p text:style-name="Preformatted_20_Text"><text:s text:c="12"/>'hard': ['#FF6B6B', '#4ECDC4', '#FFD166', '#06D6A0', '#118AB2', </text:p>
      <text:p text:style-name="Preformatted_20_Text"><text:s text:c="20"/>'#073B4C', '#EF476F', '#7209B7']</text:p>
      <text:p text:style-name="Preformatted_20_Text"><text:s text:c="8"/>};</text:p>
      <text:p text:style-name="Preformatted_20_Text"><text:s text:c="8"/></text:p>
      <text:p text:style-name="Preformatted_20_Text"><text:s text:c="8"/>if (this.difficulty &lt; 0.4) return colorSets.easy;</text:p>
      <text:p text:style-name="Preformatted_20_Text"><text:s text:c="8"/>if (this.difficulty &lt; 0.7) return colorSets.medium;</text:p>
      <text:p text:style-name="Preformatted_20_Text"><text:s text:c="8"/>return colorSets.hard;</text:p>
      <text:p text:style-name="Preformatted_20_Text"><text:s text:c="4"/>}</text:p>
      <text:p text:style-name="Preformatted_20_Text"><text:s text:c="4"/></text:p>
      <text:p text:style-name="Preformatted_20_Text"><text:s text:c="4"/>get_duration_for_difficulty() {</text:p>
      <text:p text:style-name="Preformatted_20_Text"><text:s text:c="8"/>// Longer display for lower difficulty</text:p>
      <text:p text:style-name="Preformatted_20_Text"><text:s text:c="8"/>return 2000 - (this.difficulty * 1500);</text:p>
      <text:p text:style-name="Preformatted_20_Text"><text:s text:c="4"/>}</text:p>
      <text:p text:style-name="Preformatted_20_Text"><text:s text:c="4"/></text:p>
      <text:p text:style-name="Preformatted_20_Text"><text:s text:c="4"/>async playTwoPlayerWithAI() {</text:p>
      <text:p text:style-name="Preformatted_20_Text"><text:s text:c="8"/>// AI makes its move</text:p>
      <text:p text:style-name="Preformatted_20_Text"><text:s text:c="8"/>const aiPattern = await this.aiOpponent.generateResponse(</text:p>
      <text:p text:style-name="Preformatted_20_Text"><text:s text:c="12"/>this.patterns,</text:p>
      <text:p text:style-name="Preformatted_20_Text"><text:s text:c="12"/>this.currentRound,</text:p>
      <text:p text:style-name="Preformatted_20_Text"><text:s text:c="12"/>this.difficulty</text:p>
      <text:p text:style-name="Preformatted_20_Text"><text:s text:c="8"/>);</text:p>
      <text:p text:style-name="Preformatted_20_Text"><text:s text:c="8"/></text:p>
      <text:p text:style-name="Preformatted_20_Text"><text:s text:c="8"/>// Present both patterns (user's and AI's)</text:p>
      <text:p text:style-name="Preformatted_20_Text"><text:soft-page-break/><text:s text:c="8"/>const results = await this.comparePatterns(userPattern, aiPattern);</text:p>
      <text:p text:style-name="Preformatted_20_Text"><text:s text:c="8"/></text:p>
      <text:p text:style-name="Preformatted_20_Text"><text:s text:c="8"/>// Update difficulty based on performance</text:p>
      <text:p text:style-name="Preformatted_20_Text"><text:s text:c="8"/>this.updateDifficulty(results);</text:p>
      <text:p text:style-name="Preformatted_20_Text"><text:s text:c="8"/></text:p>
      <text:p text:style-name="Preformatted_20_Text"><text:s text:c="8"/>// Generate AI commentary</text:p>
      <text:p text:style-name="Preformatted_20_Text"><text:s text:c="8"/>const commentary = this.aiOpponent.generateCommentary(</text:p>
      <text:p text:style-name="Preformatted_20_Text"><text:s text:c="12"/>results,</text:p>
      <text:p text:style-name="Preformatted_20_Text"><text:s text:c="12"/>this.userProfile</text:p>
      <text:p text:style-name="Preformatted_20_Text"><text:s text:c="8"/>);</text:p>
      <text:p text:style-name="Preformatted_20_Text"><text:s text:c="8"/></text:p>
      <text:p text:style-name="Preformatted_20_Text"><text:s text:c="8"/>return {</text:p>
      <text:p text:style-name="Preformatted_20_Text"><text:s text:c="12"/>results,</text:p>
      <text:p text:style-name="Preformatted_20_Text"><text:s text:c="12"/>commentary,</text:p>
      <text:p text:style-name="Preformatted_20_Text"><text:s text:c="12"/>newDifficulty: this.difficulty,</text:p>
      <text:p text:style-name="Preformatted_20_Text"><text:s text:c="12"/>aiPattern: aiPattern</text:p>
      <text:p text:style-name="Preformatted_20_Text"><text:s text:c="8"/>};</text:p>
      <text:p text:style-name="Preformatted_20_Text"><text:s text:c="4"/>}</text:p>
      <text:p text:style-name="P6">}</text:p>
      <text:h text:style-name="Heading_20_3" text:outline-level="3"><text:span text:style-name="Strong_20_Emphasis">B. Cooperative Story Builder (Social Game)</text:span></text:h>
      <text:p text:style-name="Text_20_body">javascript</text:p>
      <text:p text:style-name="Preformatted_20_Text">class CooperativeStoryBuilder {</text:p>
      <text:p text:style-name="Preformatted_20_Text"><text:s text:c="4"/>constructor(userProfile, theme) {</text:p>
      <text:p text:style-name="Preformatted_20_Text"><text:s text:c="8"/>this.userProfile = userProfile;</text:p>
      <text:p text:style-name="Preformatted_20_Text"><text:s text:c="8"/>this.theme = theme || this.suggest_theme(userProfile);</text:p>
      <text:p text:style-name="Preformatted_20_Text"><text:s text:c="8"/>this.story = [];</text:p>
      <text:p text:style-name="Preformatted_20_Text"><text:s text:c="8"/>this.currentTurn = 'user';</text:p>
      <text:p text:style-name="Preformatted_20_Text"><text:s text:c="8"/>this.aiWritingStyle = this.determine_ai_writing_style(userProfile);</text:p>
      <text:p text:style-name="Preformatted_20_Text"><text:s text:c="8"/>this.storyElements = this.initialize_story_elements();</text:p>
      <text:p text:style-name="Preformatted_20_Text"><text:s text:c="4"/>}</text:p>
      <text:p text:style-name="Preformatted_20_Text"><text:s text:c="4"/></text:p>
      <text:p text:style-name="Preformatted_20_Text"><text:s text:c="4"/>determine_ai_writing_style(userProfile) {</text:p>
      <text:p text:style-name="Preformatted_20_Text"><text:s text:c="8"/>// Match AI writing style to user's cognitive level</text:p>
      <text:p text:style-name="Preformatted_20_Text"><text:s text:c="8"/>const style = {</text:p>
      <text:p text:style-name="Preformatted_20_Text"><text:s text:c="12"/>vocabularyLevel: 'simple',</text:p>
      <text:p text:style-name="Preformatted_20_Text"><text:s text:c="12"/>sentenceComplexity: 'low',</text:p>
      <text:p text:style-name="Preformatted_20_Text"><text:s text:c="12"/>creativityLevel: 'moderate',</text:p>
      <text:p text:style-name="Preformatted_20_Text"><text:s text:c="12"/>emotionalTone: 'supportive',</text:p>
      <text:p text:style-name="Preformatted_20_Text"><text:s text:c="12"/>pacing: 'slow'</text:p>
      <text:p text:style-name="Preformatted_20_Text"><text:s text:c="8"/>};</text:p>
      <text:p text:style-name="Preformatted_20_Text"><text:s text:c="8"/></text:p>
      <text:p text:style-name="Preformatted_20_Text"><text:s text:c="8"/>if (userProfile.cognitive_condition) {</text:p>
      <text:p text:style-name="Preformatted_20_Text"><text:s text:c="12"/>switch(userProfile.cognitive_condition) {</text:p>
      <text:p text:style-name="Preformatted_20_Text"><text:s text:c="16"/>case 'dementia_early':</text:p>
      <text:p text:style-name="Preformatted_20_Text"><text:s text:c="20"/>style.vocabularyLevel = 'simple';</text:p>
      <text:p text:style-name="Preformatted_20_Text"><text:s text:c="20"/>style.sentenceComplexity = 'very_low';</text:p>
      <text:p text:style-name="Preformatted_20_Text"><text:s text:c="20"/>style.pacing = 'very_slow';</text:p>
      <text:p text:style-name="Preformatted_20_Text"><text:s text:c="20"/>break;</text:p>
      <text:p text:style-name="Preformatted_20_Text"><text:s text:c="16"/>case 'aphasia':</text:p>
      <text:p text:style-name="Preformatted_20_Text"><text:s text:c="20"/>style.vocabularyLevel = 'basic';</text:p>
      <text:p text:style-name="Preformatted_20_Text"><text:s text:c="20"/>style.sentenceComplexity = 'minimal';</text:p>
      <text:p text:style-name="Preformatted_20_Text"><text:s text:c="20"/>style.creativityLevel = 'structured';</text:p>
      <text:p text:style-name="Preformatted_20_Text"><text:s text:c="20"/>break;</text:p>
      <text:p text:style-name="Preformatted_20_Text"><text:s text:c="16"/>case 'stroke_recovery':</text:p>
      <text:p text:style-name="Preformatted_20_Text"><text:s text:c="20"/>style.vocabularyLevel = 'simple';</text:p>
      <text:p text:style-name="Preformatted_20_Text"><text:s text:c="20"/>style.sentenceComplexity = 'low';</text:p>
      <text:p text:style-name="Preformatted_20_Text"><text:s text:c="20"/>style.pacing = 'patient';</text:p>
      <text:p text:style-name="Preformatted_20_Text"><text:s text:c="20"/>break;</text:p>
      <text:p text:style-name="Preformatted_20_Text"><text:s text:c="12"/>}</text:p>
      <text:p text:style-name="Preformatted_20_Text"><text:s text:c="8"/>}</text:p>
      <text:p text:style-name="Preformatted_20_Text"><text:soft-page-break/><text:s text:c="8"/></text:p>
      <text:p text:style-name="Preformatted_20_Text"><text:s text:c="8"/>// Adjust for age</text:p>
      <text:p text:style-name="Preformatted_20_Text"><text:s text:c="8"/>if (userProfile.age &gt; 70) {</text:p>
      <text:p text:style-name="Preformatted_20_Text"><text:s text:c="12"/>style.pacing = 'leisurely';</text:p>
      <text:p text:style-name="Preformatted_20_Text"><text:s text:c="12"/>style.vocabularyLevel = 'traditional';</text:p>
      <text:p text:style-name="Preformatted_20_Text"><text:s text:c="8"/>}</text:p>
      <text:p text:style-name="Preformatted_20_Text"><text:s text:c="8"/></text:p>
      <text:p text:style-name="Preformatted_20_Text"><text:s text:c="8"/>return style;</text:p>
      <text:p text:style-name="Preformatted_20_Text"><text:s text:c="4"/>}</text:p>
      <text:p text:style-name="Preformatted_20_Text"><text:s text:c="4"/></text:p>
      <text:p text:style-name="Preformatted_20_Text"><text:s text:c="4"/>async aiAddToStory(previousSentence, storySoFar) {</text:p>
      <text:p text:style-name="Preformatted_20_Text"><text:s text:c="8"/>// AI generates next sentence based on story and user profile</text:p>
      <text:p text:style-name="Preformatted_20_Text"><text:s text:c="8"/>const nextSentence = await this.aiWritingEngine.generateSentence({</text:p>
      <text:p text:style-name="Preformatted_20_Text"><text:s text:c="12"/>story: storySoFar,</text:p>
      <text:p text:style-name="Preformatted_20_Text"><text:s text:c="12"/>previousSentence: previousSentence,</text:p>
      <text:p text:style-name="Preformatted_20_Text"><text:s text:c="12"/>writingStyle: this.aiWritingStyle,</text:p>
      <text:p text:style-name="Preformatted_20_Text"><text:s text:c="12"/>theme: this.theme,</text:p>
      <text:p text:style-name="Preformatted_20_Text"><text:s text:c="12"/>userProfile: this.userProfile</text:p>
      <text:p text:style-name="Preformatted_20_Text"><text:s text:c="8"/>});</text:p>
      <text:p text:style-name="Preformatted_20_Text"><text:s text:c="8"/></text:p>
      <text:p text:style-name="Preformatted_20_Text"><text:s text:c="8"/>// Add teaching element if in teaching mode</text:p>
      <text:p text:style-name="Preformatted_20_Text"><text:s text:c="8"/>if (this.userProfile.learning_goal === 'language_development') {</text:p>
      <text:p text:style-name="Preformatted_20_Text"><text:s text:c="12"/>const teachingElement = this.add_teaching_element(nextSentence);</text:p>
      <text:p text:style-name="Preformatted_20_Text"><text:s text:c="12"/>return {</text:p>
      <text:p text:style-name="Preformatted_20_Text"><text:s text:c="16"/>sentence: nextSentence,</text:p>
      <text:p text:style-name="Preformatted_20_Text"><text:s text:c="16"/>teaching: teachingElement,</text:p>
      <text:p text:style-name="Preformatted_20_Text"><text:s text:c="16"/>question: this.generate_reflective_question(nextSentence)</text:p>
      <text:p text:style-name="Preformatted_20_Text"><text:s text:c="12"/>};</text:p>
      <text:p text:style-name="Preformatted_20_Text"><text:s text:c="8"/>}</text:p>
      <text:p text:style-name="Preformatted_20_Text"><text:s text:c="8"/></text:p>
      <text:p text:style-name="Preformatted_20_Text"><text:s text:c="8"/>return { sentence: nextSentence };</text:p>
      <text:p text:style-name="Preformatted_20_Text"><text:s text:c="4"/>}</text:p>
      <text:p text:style-name="Preformatted_20_Text"><text:s text:c="4"/></text:p>
      <text:p text:style-name="Preformatted_20_Text"><text:s text:c="4"/>add_teaching_element(sentence) {</text:p>
      <text:p text:style-name="Preformatted_20_Text"><text:s text:c="8"/>// Add educational component</text:p>
      <text:p text:style-name="Preformatted_20_Text"><text:s text:c="8"/>return {</text:p>
      <text:p text:style-name="Preformatted_20_Text"><text:s text:c="12"/>vocabularyWord: this.extract_interesting_word(sentence),</text:p>
      <text:p text:style-name="Preformatted_20_Text"><text:s text:c="12"/>grammarPoint: this.identify_grammar_structure(sentence),</text:p>
      <text:p text:style-name="Preformatted_20_Text"><text:s text:c="12"/>prompt: "Did you notice how I used [word/structure]? Try using it in your next sentence!"</text:p>
      <text:p text:style-name="Preformatted_20_Text"><text:s text:c="8"/>};</text:p>
      <text:p text:style-name="Preformatted_20_Text"><text:s text:c="4"/>}</text:p>
      <text:p text:style-name="Preformatted_20_Text"><text:s text:c="4"/></text:p>
      <text:p text:style-name="Preformatted_20_Text"><text:s text:c="4"/>evaluateStoryContribution(userContribution) {</text:p>
      <text:p text:style-name="Preformatted_20_Text"><text:s text:c="8"/>// Provide gentle feedback and encouragement</text:p>
      <text:p text:style-name="Preformatted_20_Text"><text:s text:c="8"/>const evaluation = {</text:p>
      <text:p text:style-name="Preformatted_20_Text"><text:s text:c="12"/>positiveFeedback: this.generate_positive_feedback(userContribution),</text:p>
      <text:p text:style-name="Preformatted_20_Text"><text:s text:c="12"/>suggestions: this.generate_gentle_suggestions(userContribution),</text:p>
      <text:p text:style-name="Preformatted_20_Text"><text:s text:c="12"/>encouragement: this.generate_encouragement(userContribution)</text:p>
      <text:p text:style-name="Preformatted_20_Text"><text:s text:c="8"/>};</text:p>
      <text:p text:style-name="Preformatted_20_Text"><text:s text:c="8"/></text:p>
      <text:p text:style-name="Preformatted_20_Text"><text:s text:c="8"/>// Track progress for adaptive learning</text:p>
      <text:p text:style-name="Preformatted_20_Text"><text:s text:c="8"/>this.updateLanguageSkills(userContribution);</text:p>
      <text:p text:style-name="Preformatted_20_Text"><text:s text:c="8"/></text:p>
      <text:p text:style-name="Preformatted_20_Text"><text:s text:c="8"/>return evaluation;</text:p>
      <text:p text:style-name="Preformatted_20_Text"><text:s text:c="4"/>}</text:p>
      <text:p text:style-name="P6">}</text:p>
      <text:h text:style-name="Heading_20_2" text:outline-level="2"><text:soft-page-break/><text:span text:style-name="Strong_20_Emphasis">4. Web Interface Implementation</text:span></text:h>
      <text:h text:style-name="Heading_20_3" text:outline-level="3"><text:span text:style-name="Strong_20_Emphasis">A. Flask Web Server for Games</text:span></text:h>
      <text:p text:style-name="Text_20_body">python</text:p>
      <text:p text:style-name="Preformatted_20_Text">from flask import Flask, render_template, jsonify, session, request</text:p>
      <text:p text:style-name="Preformatted_20_Text">from flask_socketio import SocketIO, emit</text:p>
      <text:p text:style-name="Preformatted_20_Text">import json</text:p>
      <text:p text:style-name="Preformatted_20_Text"/>
      <text:p text:style-name="Preformatted_20_Text">app = Flask(__name__)</text:p>
      <text:p text:style-name="Preformatted_20_Text">app.config['SECRET_KEY'] = 'your_secret_key'</text:p>
      <text:p text:style-name="Preformatted_20_Text">socketio = SocketIO(app)</text:p>
      <text:p text:style-name="Preformatted_20_Text"/>
      <text:p text:style-name="Preformatted_20_Text">class GamePortalServer:</text:p>
      <text:p text:style-name="Preformatted_20_Text"><text:s text:c="4"/>def __init__(self):</text:p>
      <text:p text:style-name="Preformatted_20_Text"><text:s text:c="8"/>self.active_games = {}</text:p>
      <text:p text:style-name="Preformatted_20_Text"><text:s text:c="8"/>self.user_sessions = {}</text:p>
      <text:p text:style-name="Preformatted_20_Text"><text:s text:c="8"/></text:p>
      <text:p text:style-name="Preformatted_20_Text"><text:s text:c="4"/>@app.route('/')</text:p>
      <text:p text:style-name="Preformatted_20_Text"><text:s text:c="4"/>def portal_home():</text:p>
      <text:p text:style-name="Preformatted_20_Text"><text:s text:c="8"/>"""Main portal page"""</text:p>
      <text:p text:style-name="Preformatted_20_Text"><text:s text:c="8"/>user_id = session.get('user_id', 'guest')</text:p>
      <text:p text:style-name="Preformatted_20_Text"><text:s text:c="8"/>user_profile = self.load_user_profile(user_id)</text:p>
      <text:p text:style-name="Preformatted_20_Text"><text:s text:c="8"/>return render_template('portal_home.html', </text:p>
      <text:p text:style-name="Preformatted_20_Text"><text:s text:c="29"/>user_profile=user_profile,</text:p>
      <text:p text:style-name="Preformatted_20_Text"><text:s text:c="29"/>games=self.get_available_games(user_profile))</text:p>
      <text:p text:style-name="Preformatted_20_Text"><text:s text:c="4"/></text:p>
      <text:p text:style-name="Preformatted_20_Text"><text:s text:c="4"/>@app.route('/game/&lt;game_id&gt;')</text:p>
      <text:p text:style-name="Preformatted_20_Text"><text:s text:c="4"/>def game_page(game_id):</text:p>
      <text:p text:style-name="Preformatted_20_Text"><text:s text:c="8"/>"""Individual game page"""</text:p>
      <text:p text:style-name="Preformatted_20_Text"><text:s text:c="8"/>user_id = session.get('user_id', 'guest')</text:p>
      <text:p text:style-name="Preformatted_20_Text"><text:s text:c="8"/>user_profile = self.load_user_profile(user_id)</text:p>
      <text:p text:style-name="Preformatted_20_Text"><text:s text:c="8"/>game_config = self.get_game_config(game_id)</text:p>
      <text:p text:style-name="Preformatted_20_Text"><text:s text:c="8"/></text:p>
      <text:p text:style-name="Preformatted_20_Text"><text:s text:c="8"/>return render_template(f'games/{game_id}.html',</text:p>
      <text:p text:style-name="Preformatted_20_Text"><text:s text:c="29"/>game_config=game_config,</text:p>
      <text:p text:style-name="Preformatted_20_Text"><text:s text:c="29"/>user_profile=user_profile,</text:p>
      <text:p text:style-name="Preformatted_20_Text"><text:s text:c="29"/>adaptive_settings=self.calculate_adaptive_settings(</text:p>
      <text:p text:style-name="Preformatted_20_Text"><text:s text:c="33"/>game_id, user_profile</text:p>
      <text:p text:style-name="Preformatted_20_Text"><text:s text:c="29"/>))</text:p>
      <text:p text:style-name="Preformatted_20_Text"><text:s text:c="4"/></text:p>
      <text:p text:style-name="Preformatted_20_Text"><text:s text:c="4"/>@app.route('/api/game/start', methods=['POST'])</text:p>
      <text:p text:style-name="Preformatted_20_Text"><text:s text:c="4"/>def start_game():</text:p>
      <text:p text:style-name="Preformatted_20_Text"><text:s text:c="8"/>"""API endpoint to start a game"""</text:p>
      <text:p text:style-name="Preformatted_20_Text"><text:s text:c="8"/>data = request.json</text:p>
      <text:p text:style-name="Preformatted_20_Text"><text:s text:c="8"/>game_id = data['game_id']</text:p>
      <text:p text:style-name="Preformatted_20_Text"><text:s text:c="8"/>user_id = session.get('user_id')</text:p>
      <text:p text:style-name="Preformatted_20_Text"><text:s text:c="8"/>game_mode = data.get('mode', 'single')</text:p>
      <text:p text:style-name="Preformatted_20_Text"><text:s text:c="8"/></text:p>
      <text:p text:style-name="Preformatted_20_Text"><text:s text:c="8"/># Initialize game</text:p>
      <text:p text:style-name="Preformatted_20_Text"><text:s text:c="8"/>game_instance = self.create_game_instance(</text:p>
      <text:p text:style-name="Preformatted_20_Text"><text:s text:c="12"/>game_id, user_id, game_mode</text:p>
      <text:p text:style-name="Preformatted_20_Text"><text:s text:c="8"/>)</text:p>
      <text:p text:style-name="Preformatted_20_Text"><text:s text:c="8"/></text:p>
      <text:p text:style-name="Preformatted_20_Text"><text:s text:c="8"/>game_session_id = self.generate_session_id()</text:p>
      <text:p text:style-name="Preformatted_20_Text"><text:s text:c="8"/>self.active_games[game_session_id] = game_instance</text:p>
      <text:p text:style-name="Preformatted_20_Text"><text:s text:c="8"/></text:p>
      <text:p text:style-name="Preformatted_20_Text"><text:s text:c="8"/>return jsonify({</text:p>
      <text:p text:style-name="Preformatted_20_Text"><text:s text:c="12"/>'session_id': game_session_id,</text:p>
      <text:p text:style-name="Preformatted_20_Text"><text:s text:c="12"/>'game_state': game_instance.initial_state,</text:p>
      <text:p text:style-name="Preformatted_20_Text"><text:s text:c="12"/>'instructions': game_instance.instructions</text:p>
      <text:p text:style-name="Preformatted_20_Text"><text:s text:c="8"/>})</text:p>
      <text:p text:style-name="Preformatted_20_Text"><text:soft-page-break/><text:s text:c="4"/></text:p>
      <text:p text:style-name="Preformatted_20_Text"><text:s text:c="4"/>@socketio.on('game_move')</text:p>
      <text:p text:style-name="Preformatted_20_Text"><text:s text:c="4"/>def handle_game_move(data):</text:p>
      <text:p text:style-name="Preformatted_20_Text"><text:s text:c="8"/>"""Handle real-time game moves"""</text:p>
      <text:p text:style-name="Preformatted_20_Text"><text:s text:c="8"/>session_id = data['session_id']</text:p>
      <text:p text:style-name="Preformatted_20_Text"><text:s text:c="8"/>move = data['move']</text:p>
      <text:p text:style-name="Preformatted_20_Text"><text:s text:c="8"/></text:p>
      <text:p text:style-name="Preformatted_20_Text"><text:s text:c="8"/>if session_id in self.active_games:</text:p>
      <text:p text:style-name="Preformatted_20_Text"><text:s text:c="12"/>game = self.active_games[session_id]</text:p>
      <text:p text:style-name="Preformatted_20_Text"><text:s text:c="12"/></text:p>
      <text:p text:style-name="Preformatted_20_Text"><text:s text:c="12"/># Process user move</text:p>
      <text:p text:style-name="Preformatted_20_Text"><text:s text:c="12"/>result = game.process_move(move)</text:p>
      <text:p text:style-name="Preformatted_20_Text"><text:s text:c="12"/></text:p>
      <text:p text:style-name="Preformatted_20_Text"><text:s text:c="12"/># If two-player with AI, get AI response</text:p>
      <text:p text:style-name="Preformatted_20_Text"><text:s text:c="12"/>if game.mode == 'two_player_ai':</text:p>
      <text:p text:style-name="Preformatted_20_Text"><text:s text:c="16"/>ai_response = game.ai_opponent.generate_response(</text:p>
      <text:p text:style-name="Preformatted_20_Text"><text:s text:c="20"/>game.state, move, game.user_profile</text:p>
      <text:p text:style-name="Preformatted_20_Text"><text:s text:c="16"/>)</text:p>
      <text:p text:style-name="Preformatted_20_Text"><text:s text:c="16"/>result['ai_move'] = ai_response</text:p>
      <text:p text:style-name="Preformatted_20_Text"><text:s text:c="12"/></text:p>
      <text:p text:style-name="Preformatted_20_Text"><text:s text:c="12"/># Emit updated game state</text:p>
      <text:p text:style-name="Preformatted_20_Text"><text:s text:c="12"/>emit('game_update', {</text:p>
      <text:p text:style-name="Preformatted_20_Text"><text:s text:c="16"/>'session_id': session_id,</text:p>
      <text:p text:style-name="Preformatted_20_Text"><text:s text:c="16"/>'game_state': game.state,</text:p>
      <text:p text:style-name="Preformatted_20_Text"><text:s text:c="16"/>'result': result</text:p>
      <text:p text:style-name="Preformatted_20_Text"><text:s text:c="12"/>})</text:p>
      <text:p text:style-name="Preformatted_20_Text"><text:s text:c="12"/></text:p>
      <text:p text:style-name="Preformatted_20_Text"><text:s text:c="12"/># Update learning models</text:p>
      <text:p text:style-name="Preformatted_20_Text"><text:s text:c="12"/>self.update_learning_models(game, move, result)</text:p>
      <text:p text:style-name="Preformatted_20_Text"><text:s text:c="4"/></text:p>
      <text:p text:style-name="Preformatted_20_Text"><text:s text:c="4"/>@app.route('/api/adaptive_adjust', methods=['POST'])</text:p>
      <text:p text:style-name="Preformatted_20_Text"><text:s text:c="4"/>def adaptive_adjustment():</text:p>
      <text:p text:style-name="Preformatted_20_Text"><text:s text:c="8"/>"""Endpoint for real-time difficulty adjustment"""</text:p>
      <text:p text:style-name="Preformatted_20_Text"><text:s text:c="8"/>data = request.json</text:p>
      <text:p text:style-name="Preformatted_20_Text"><text:s text:c="8"/>session_id = data['session_id']</text:p>
      <text:p text:style-name="Preformatted_20_Text"><text:s text:c="8"/>adjustment_type = data['type']</text:p>
      <text:p text:style-name="Preformatted_20_Text"><text:s text:c="8"/></text:p>
      <text:p text:style-name="Preformatted_20_Text"><text:s text:c="8"/>if session_id in self.active_games:</text:p>
      <text:p text:style-name="Preformatted_20_Text"><text:s text:c="12"/>game = self.active_games[session_id]</text:p>
      <text:p text:style-name="Preformatted_20_Text"><text:s text:c="12"/>game.adjust_difficulty(adjustment_type)</text:p>
      <text:p text:style-name="Preformatted_20_Text"><text:s text:c="12"/></text:p>
      <text:p text:style-name="Preformatted_20_Text"><text:s text:c="12"/>return jsonify({</text:p>
      <text:p text:style-name="Preformatted_20_Text"><text:s text:c="16"/>'new_difficulty': game.difficulty,</text:p>
      <text:p text:style-name="Preformatted_20_Text"><text:s text:c="16"/>'adjustment_made': adjustment_type</text:p>
      <text:p text:style-name="P6"><text:s text:c="12"/>})</text:p>
      <text:h text:style-name="Heading_20_3" text:outline-level="3"><text:span text:style-name="Strong_20_Emphasis">B. HTML/CSS/JS Template Structure</text:span></text:h>
      <text:p text:style-name="Text_20_body">html</text:p>
      <text:p text:style-name="Preformatted_20_Text">&lt;!-- templates/portal_home.html --&gt;</text:p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<text:s text:c="4"/>&lt;meta charset="UTF-8"&gt;</text:p>
      <text:p text:style-name="Preformatted_20_Text"><text:s text:c="4"/>&lt;meta name="viewport" content="width=device-width, initial-scale=1.0"&gt;</text:p>
      <text:p text:style-name="Preformatted_20_Text"><text:s text:c="4"/>&lt;title&gt;Marvin's Cognitive Games&lt;/title&gt;</text:p>
      <text:p text:style-name="Preformatted_20_Text"><text:s text:c="4"/>&lt;link rel="stylesheet" href="{{ url_for('static', filename='css/portal.css') }}"&gt;</text:p>
      <text:p text:style-name="Preformatted_20_Text">&lt;/head&gt;</text:p>
      <text:p text:style-name="Preformatted_20_Text">&lt;body&gt;</text:p>
      <text:p text:style-name="Preformatted_20_Text"><text:s text:c="4"/>&lt;div class="portal-container"&gt;</text:p>
      <text:p text:style-name="Preformatted_20_Text"><text:s text:c="8"/>&lt;!-- Header with user info --&gt;</text:p>
      <text:p text:style-name="Preformatted_20_Text"><text:soft-page-break/><text:s text:c="8"/>&lt;header class="portal-header"&gt;</text:p>
      <text:p text:style-name="Preformatted_20_Text"><text:s text:c="12"/>&lt;div class="user-welcome"&gt;</text:p>
      <text:p text:style-name="Preformatted_20_Text"><text:s text:c="16"/>&lt;h1&gt;Hello, {{ user_profile.name }}&lt;/h1&gt;</text:p>
      <text:p text:style-name="Preformatted_20_Text"><text:s text:c="16"/>&lt;div class="daily-progress"&gt;</text:p>
      <text:p text:style-name="Preformatted_20_Text"><text:s text:c="20"/>&lt;div class="progress-bar"&gt;</text:p>
      <text:p text:style-name="Preformatted_20_Text"><text:s text:c="24"/>&lt;div class="progress" style="width: {{ user_profile.daily_progress }}%"&gt;&lt;/div&gt;</text:p>
      <text:p text:style-name="Preformatted_20_Text"><text:s text:c="20"/>&lt;/div&gt;</text:p>
      <text:p text:style-name="Preformatted_20_Text"><text:s text:c="20"/>&lt;p&gt;Daily Goal: {{ user_profile.daily_goal }}/{{ user_profile.daily_target }}&lt;/p&gt;</text:p>
      <text:p text:style-name="Preformatted_20_Text"><text:s text:c="16"/>&lt;/div&gt;</text:p>
      <text:p text:style-name="Preformatted_20_Text"><text:s text:c="12"/>&lt;/div&gt;</text:p>
      <text:p text:style-name="Preformatted_20_Text"><text:s text:c="8"/>&lt;/header&gt;</text:p>
      <text:p text:style-name="Preformatted_20_Text"/>
      <text:p text:style-name="Preformatted_20_Text"><text:s text:c="8"/>&lt;!-- Game Categories --&gt;</text:p>
      <text:p text:style-name="Preformatted_20_Text"><text:s text:c="8"/>&lt;section class="game-categories"&gt;</text:p>
      <text:p text:style-name="Preformatted_20_Text"><text:s text:c="12"/>{% for category in games.categories %}</text:p>
      <text:p text:style-name="Preformatted_20_Text"><text:s text:c="12"/>&lt;div class="category-card"&gt;</text:p>
      <text:p text:style-name="Preformatted_20_Text"><text:s text:c="16"/>&lt;h2&gt;{{ category.name }}&lt;/h2&gt;</text:p>
      <text:p text:style-name="Preformatted_20_Text"><text:s text:c="16"/>&lt;p class="category-description"&gt;{{ category.description }}&lt;/p&gt;</text:p>
      <text:p text:style-name="Preformatted_20_Text"><text:s text:c="16"/>&lt;div class="category-games"&gt;</text:p>
      <text:p text:style-name="Preformatted_20_Text"><text:s text:c="20"/>{% for game in category.games %}</text:p>
      <text:p text:style-name="Preformatted_20_Text"><text:s text:c="20"/>&lt;div class="game-card" </text:p>
      <text:p text:style-name="Preformatted_20_Text"><text:s text:c="25"/>onclick="startGame('{{ game.id }}')"</text:p>
      <text:p text:style-name="Preformatted_20_Text"><text:s text:c="25"/>data-difficulty="{{ game.recommended_difficulty }}"&gt;</text:p>
      <text:p text:style-name="Preformatted_20_Text"><text:s text:c="24"/>&lt;h3&gt;{{ game.name }}&lt;/h3&gt;</text:p>
      <text:p text:style-name="Preformatted_20_Text"><text:s text:c="24"/>&lt;p&gt;{{ game.short_description }}&lt;/p&gt;</text:p>
      <text:p text:style-name="Preformatted_20_Text"><text:s text:c="24"/>&lt;div class="game-meta"&gt;</text:p>
      <text:p text:style-name="Preformatted_20_Text"><text:s text:c="28"/>&lt;span class="players"&gt;{{ game.min_players }}-{{ game.max_players }} players&lt;/span&gt;</text:p>
      <text:p text:style-name="Preformatted_20_Text"><text:s text:c="28"/>&lt;span class="duration"&gt;{{ game.avg_duration }} min&lt;/span&gt;</text:p>
      <text:p text:style-name="Preformatted_20_Text"><text:s text:c="28"/>&lt;span class="focus"&gt;{{ game.primary_focus }}&lt;/span&gt;</text:p>
      <text:p text:style-name="Preformatted_20_Text"><text:s text:c="24"/>&lt;/div&gt;</text:p>
      <text:p text:style-name="Preformatted_20_Text"><text:s text:c="20"/>&lt;/div&gt;</text:p>
      <text:p text:style-name="Preformatted_20_Text"><text:s text:c="20"/>{% endfor %}</text:p>
      <text:p text:style-name="Preformatted_20_Text"><text:s text:c="16"/>&lt;/div&gt;</text:p>
      <text:p text:style-name="Preformatted_20_Text"><text:s text:c="12"/>&lt;/div&gt;</text:p>
      <text:p text:style-name="Preformatted_20_Text"><text:s text:c="12"/>{% endfor %}</text:p>
      <text:p text:style-name="Preformatted_20_Text"><text:s text:c="8"/>&lt;/section&gt;</text:p>
      <text:p text:style-name="Preformatted_20_Text"/>
      <text:p text:style-name="Preformatted_20_Text"><text:s text:c="8"/>&lt;!-- AI Companion Section --&gt;</text:p>
      <text:p text:style-name="Preformatted_20_Text"><text:s text:c="8"/>&lt;section class="ai-companion"&gt;</text:p>
      <text:p text:style-name="Preformatted_20_Text"><text:s text:c="12"/>&lt;h2&gt;Play with Marvin AI&lt;/h2&gt;</text:p>
      <text:p text:style-name="Preformatted_20_Text"><text:s text:c="12"/>&lt;div class="ai-status"&gt;</text:p>
      <text:p text:style-name="Preformatted_20_Text"><text:s text:c="16"/>&lt;div class="ai-avatar"&gt;</text:p>
      <text:p text:style-name="Preformatted_20_Text"><text:s text:c="20"/>&lt;img src="{{ url_for('static', filename='images/marvin_avatar.png') }}" alt="Marvin AI"&gt;</text:p>
      <text:p text:style-name="Preformatted_20_Text"><text:s text:c="16"/>&lt;/div&gt;</text:p>
      <text:p text:style-name="Preformatted_20_Text"><text:s text:c="16"/>&lt;div class="ai-message"&gt;</text:p>
      <text:p text:style-name="Preformatted_20_Text"><text:s text:c="20"/>&lt;p id="ai-greeting"&gt;Ready for a game? I'm here to play, teach, or just have fun with you!&lt;/p&gt;</text:p>
      <text:p text:style-name="Preformatted_20_Text"><text:s text:c="16"/>&lt;/div&gt;</text:p>
      <text:p text:style-name="Preformatted_20_Text"><text:s text:c="16"/>&lt;div class="ai-controls"&gt;</text:p>
      <text:p text:style-name="Preformatted_20_Text"><text:s text:c="20"/>&lt;button onclick="startAISession('competitive')"&gt;Competitive Mode&lt;/button&gt;</text:p>
      <text:p text:style-name="Preformatted_20_Text"><text:s text:c="20"/>&lt;button onclick="startAISession('teaching')"&gt;Teaching Mode&lt;/button&gt;</text:p>
      <text:p text:style-name="Preformatted_20_Text"><text:s text:c="20"/>&lt;button onclick="startAISession('cooperative')"&gt;Cooperative Mode&lt;/button&gt;</text:p>
      <text:p text:style-name="Preformatted_20_Text"><text:s text:c="20"/>&lt;button onclick="startAISession('social')"&gt;Just for Fun&lt;/button&gt;</text:p>
      <text:p text:style-name="Preformatted_20_Text"><text:s text:c="16"/>&lt;/div&gt;</text:p>
      <text:p text:style-name="Preformatted_20_Text"><text:s text:c="12"/>&lt;/div&gt;</text:p>
      <text:p text:style-name="Preformatted_20_Text"><text:soft-page-break/><text:s text:c="8"/>&lt;/section&gt;</text:p>
      <text:p text:style-name="Preformatted_20_Text"/>
      <text:p text:style-name="Preformatted_20_Text"><text:s text:c="8"/>&lt;!-- Recent Activity --&gt;</text:p>
      <text:p text:style-name="Preformatted_20_Text"><text:s text:c="8"/>&lt;section class="recent-activity"&gt;</text:p>
      <text:p text:style-name="Preformatted_20_Text"><text:s text:c="12"/>&lt;h2&gt;Your Progress&lt;/h2&gt;</text:p>
      <text:p text:style-name="Preformatted_20_Text"><text:s text:c="12"/>&lt;div class="progress-stats"&gt;</text:p>
      <text:p text:style-name="Preformatted_20_Text"><text:s text:c="16"/>&lt;div class="stat-card"&gt;</text:p>
      <text:p text:style-name="Preformatted_20_Text"><text:s text:c="20"/>&lt;h3&gt;Memory&lt;/h3&gt;</text:p>
      <text:p text:style-name="Preformatted_20_Text"><text:s text:c="20"/>&lt;div class="stat-progress"&gt;{{ user_profile.memory_score }}/100&lt;/div&gt;</text:p>
      <text:p text:style-name="Preformatted_20_Text"><text:s text:c="20"/>&lt;p&gt;+{{ user_profile.memory_improvement }}% this week&lt;/p&gt;</text:p>
      <text:p text:style-name="Preformatted_20_Text"><text:s text:c="16"/>&lt;/div&gt;</text:p>
      <text:p text:style-name="Preformatted_20_Text"><text:s text:c="16"/>&lt;div class="stat-card"&gt;</text:p>
      <text:p text:style-name="Preformatted_20_Text"><text:s text:c="20"/>&lt;h3&gt;Attention&lt;/h3&gt;</text:p>
      <text:p text:style-name="Preformatted_20_Text"><text:s text:c="20"/>&lt;div class="stat-progress"&gt;{{ user_profile.attention_score }}/100&lt;/div&gt;</text:p>
      <text:p text:style-name="Preformatted_20_Text"><text:s text:c="20"/>&lt;p&gt;+{{ user_profile.attention_improvement }}% this week&lt;/p&gt;</text:p>
      <text:p text:style-name="Preformatted_20_Text"><text:s text:c="16"/>&lt;/div&gt;</text:p>
      <text:p text:style-name="Preformatted_20_Text"><text:s text:c="16"/>&lt;div class="stat-card"&gt;</text:p>
      <text:p text:style-name="Preformatted_20_Text"><text:s text:c="20"/>&lt;h3&gt;Problem Solving&lt;/h3&gt;</text:p>
      <text:p text:style-name="Preformatted_20_Text"><text:s text:c="20"/>&lt;div class="stat-progress"&gt;{{ user_profile.problem_solving_score }}/100&lt;/div&gt;</text:p>
      <text:p text:style-name="Preformatted_20_Text"><text:s text:c="20"/>&lt;p&gt;+{{ user_profile.problem_solving_improvement }}% this week&lt;/p&gt;</text:p>
      <text:p text:style-name="Preformatted_20_Text"><text:s text:c="16"/>&lt;/div&gt;</text:p>
      <text:p text:style-name="Preformatted_20_Text"><text:s text:c="12"/>&lt;/div&gt;</text:p>
      <text:p text:style-name="Preformatted_20_Text"><text:s text:c="8"/>&lt;/section&gt;</text:p>
      <text:p text:style-name="Preformatted_20_Text"><text:s text:c="4"/>&lt;/div&gt;</text:p>
      <text:p text:style-name="Preformatted_20_Text"/>
      <text:p text:style-name="Preformatted_20_Text"><text:s text:c="4"/>&lt;script src="{{ url_for('static', filename='js/portal.js') }}"&gt;&lt;/script&gt;</text:p>
      <text:p text:style-name="Preformatted_20_Text"><text:s text:c="4"/>&lt;script src="{{ url_for('static', filename='js/socket.io.js') }}"&gt;&lt;/script&gt;</text:p>
      <text:p text:style-name="Preformatted_20_Text"><text:s text:c="4"/>&lt;script&gt;</text:p>
      <text:p text:style-name="Preformatted_20_Text"><text:s text:c="8"/>// Initialize portal</text:p>
      <text:p text:style-name="Preformatted_20_Text"><text:s text:c="8"/>const userProfile = {{ user_profile|tojson }};</text:p>
      <text:p text:style-name="Preformatted_20_Text"><text:s text:c="8"/>const availableGames = {{ games|tojson }};</text:p>
      <text:p text:style-name="Preformatted_20_Text"><text:s text:c="8"/></text:p>
      <text:p text:style-name="Preformatted_20_Text"><text:s text:c="8"/>// WebSocket connection for real-time games</text:p>
      <text:p text:style-name="Preformatted_20_Text"><text:s text:c="8"/>const socket = io();</text:p>
      <text:p text:style-name="Preformatted_20_Text"><text:s text:c="8"/></text:p>
      <text:p text:style-name="Preformatted_20_Text"><text:s text:c="8"/>function startGame(gameId) {</text:p>
      <text:p text:style-name="Preformatted_20_Text"><text:s text:c="12"/>// Start a game session</text:p>
      <text:p text:style-name="Preformatted_20_Text"><text:s text:c="12"/>fetch('/api/game/start', {</text:p>
      <text:p text:style-name="Preformatted_20_Text"><text:s text:c="16"/>method: 'POST',</text:p>
      <text:p text:style-name="Preformatted_20_Text"><text:s text:c="16"/>headers: {'Content-Type': 'application/json'},</text:p>
      <text:p text:style-name="Preformatted_20_Text"><text:s text:c="16"/>body: JSON.stringify({</text:p>
      <text:p text:style-name="Preformatted_20_Text"><text:s text:c="20"/>game_id: gameId,</text:p>
      <text:p text:style-name="Preformatted_20_Text"><text:s text:c="20"/>mode: 'single' // or 'two_player_ai'</text:p>
      <text:p text:style-name="Preformatted_20_Text"><text:s text:c="16"/>})</text:p>
      <text:p text:style-name="Preformatted_20_Text"><text:s text:c="12"/>})</text:p>
      <text:p text:style-name="Preformatted_20_Text"><text:s text:c="12"/>.then(response =&gt; response.json())</text:p>
      <text:p text:style-name="Preformatted_20_Text"><text:s text:c="12"/>.then(data =&gt; {</text:p>
      <text:p text:style-name="Preformatted_20_Text"><text:s text:c="16"/>// Redirect to game page</text:p>
      <text:p text:style-name="Preformatted_20_Text"><text:s text:c="16"/>window.location.href = `/game/${gameId}?session=${data.session_id}`;</text:p>
      <text:p text:style-name="Preformatted_20_Text"><text:s text:c="12"/>});</text:p>
      <text:p text:style-name="Preformatted_20_Text"><text:s text:c="8"/>}</text:p>
      <text:p text:style-name="Preformatted_20_Text"><text:s text:c="8"/></text:p>
      <text:p text:style-name="Preformatted_20_Text"><text:s text:c="8"/>function startAISession(mode) {</text:p>
      <text:p text:style-name="Preformatted_20_Text"><text:s text:c="12"/>// Start session with AI companion</text:p>
      <text:p text:style-name="Preformatted_20_Text"><text:s text:c="12"/>const gameRecommendations = getAIRecommendedGames(mode, userProfile);</text:p>
      <text:p text:style-name="Preformatted_20_Text"><text:s text:c="12"/>showGameSelectionModal(gameRecommendations, mode);</text:p>
      <text:p text:style-name="Preformatted_20_Text"><text:s text:c="8"/>}</text:p>
      <text:p text:style-name="Preformatted_20_Text"><text:s text:c="8"/></text:p>
      <text:p text:style-name="Preformatted_20_Text"><text:soft-page-break/><text:s text:c="8"/>// Socket event handlers</text:p>
      <text:p text:style-name="Preformatted_20_Text"><text:s text:c="8"/>socket.on('game_invitation', function(data) {</text:p>
      <text:p text:style-name="Preformatted_20_Text"><text:s text:c="12"/>// Handle incoming game invitations from AI</text:p>
      <text:p text:style-name="Preformatted_20_Text"><text:s text:c="12"/>showInvitationModal(data);</text:p>
      <text:p text:style-name="Preformatted_20_Text"><text:s text:c="8"/>});</text:p>
      <text:p text:style-name="Preformatted_20_Text"><text:s text:c="8"/></text:p>
      <text:p text:style-name="Preformatted_20_Text"><text:s text:c="8"/>socket.on('ai_message', function(data) {</text:p>
      <text:p text:style-name="Preformatted_20_Text"><text:s text:c="12"/>// Handle messages from AI during games</text:p>
      <text:p text:style-name="Preformatted_20_Text"><text:s text:c="12"/>updateAIChat(data.message, data.type);</text:p>
      <text:p text:style-name="Preformatted_20_Text"><text:s text:c="8"/>});</text:p>
      <text:p text:style-name="Preformatted_20_Text"><text:s text:c="4"/>&lt;/script&gt;</text:p>
      <text:p text:style-name="Preformatted_20_Text">&lt;/body&gt;</text:p>
      <text:p text:style-name="P6">&lt;/html&gt;</text:p>
      <text:h text:style-name="Heading_20_2" text:outline-level="2"><text:span text:style-name="Strong_20_Emphasis">5. Learning &amp; Analytics System</text:span></text:h>
      <text:h text:style-name="Heading_20_3" text:outline-level="3"><text:span text:style-name="Strong_20_Emphasis">A. Performance Tracking &amp; Adaptation</text:span></text:h>
      <text:p text:style-name="Text_20_body">python</text:p>
      <text:p text:style-name="Preformatted_20_Text">class GameAnalyticsEngine:</text:p>
      <text:p text:style-name="Preformatted_20_Text"><text:s text:c="4"/>def __init__(self):</text:p>
      <text:p text:style-name="Preformatted_20_Text"><text:s text:c="8"/>self.performance_metrics = {}</text:p>
      <text:p text:style-name="Preformatted_20_Text"><text:s text:c="8"/>self.learning_trajectories = {}</text:p>
      <text:p text:style-name="Preformatted_20_Text"><text:s text:c="8"/>self.engagement_patterns = {}</text:p>
      <text:p text:style-name="Preformatted_20_Text"><text:s text:c="8"/></text:p>
      <text:p text:style-name="Preformatted_20_Text"><text:s text:c="4"/>def track_game_session(self, session_data):</text:p>
      <text:p text:style-name="Preformatted_20_Text"><text:s text:c="8"/>"""</text:p>
      <text:p text:style-name="Preformatted_20_Text"><text:s text:c="8"/>Track comprehensive analytics for each game session</text:p>
      <text:p text:style-name="Preformatted_20_Text"><text:s text:c="8"/>"""</text:p>
      <text:p text:style-name="Preformatted_20_Text"><text:s text:c="8"/>metrics = {</text:p>
      <text:p text:style-name="Preformatted_20_Text"><text:s text:c="12"/>'cognitive_metrics': {</text:p>
      <text:p text:style-name="Preformatted_20_Text"><text:s text:c="16"/>'response_time': self.calculate_average_response_time(session_data),</text:p>
      <text:p text:style-name="Preformatted_20_Text"><text:s text:c="16"/>'accuracy_rate': self.calculate_accuracy(session_data),</text:p>
      <text:p text:style-name="Preformatted_20_Text"><text:s text:c="16"/>'error_patterns': self.analyze_error_patterns(session_data),</text:p>
      <text:p text:style-name="Preformatted_20_Text"><text:s text:c="16"/>'improvement_rate': self.calculate_improvement_rate(session_data)</text:p>
      <text:p text:style-name="Preformatted_20_Text"><text:s text:c="12"/>},</text:p>
      <text:p text:style-name="Preformatted_20_Text"><text:s text:c="12"/>'emotional_metrics': {</text:p>
      <text:p text:style-name="Preformatted_20_Text"><text:s text:c="16"/>'engagement_level': self.measure_engagement(session_data),</text:p>
      <text:p text:style-name="Preformatted_20_Text"><text:s text:c="16"/>'frustration_signals': self.detect_frustration(session_data),</text:p>
      <text:p text:style-name="Preformatted_20_Text"><text:s text:c="16"/>'enjoyment_indicators': self.detect_enjoyment(session_data),</text:p>
      <text:p text:style-name="Preformatted_20_Text"><text:s text:c="16"/>'confidence_changes': self.track_confidence(session_data)</text:p>
      <text:p text:style-name="Preformatted_20_Text"><text:s text:c="12"/>},</text:p>
      <text:p text:style-name="Preformatted_20_Text"><text:s text:c="12"/>'adaptive_metrics': {</text:p>
      <text:p text:style-name="Preformatted_20_Text"><text:s text:c="16"/>'difficulty_appropriateness': self.evaluate_difficulty_fit(session_data),</text:p>
      <text:p text:style-name="Preformatted_20_Text"><text:s text:c="16"/>'learning_pace': self.calculate_learning_pace(session_data),</text:p>
      <text:p text:style-name="Preformatted_20_Text"><text:s text:c="16"/>'challenge_response': self.analyze_challenge_response(session_data)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# Store metrics</text:p>
      <text:p text:style-name="Preformatted_20_Text"><text:s text:c="8"/>user_id = session_data['user_id']</text:p>
      <text:p text:style-name="Preformatted_20_Text"><text:s text:c="8"/>if user_id not in self.performance_metrics:</text:p>
      <text:p text:style-name="Preformatted_20_Text"><text:s text:c="12"/>self.performance_metrics[user_id] = []</text:p>
      <text:p text:style-name="Preformatted_20_Text"><text:s text:c="8"/></text:p>
      <text:p text:style-name="Preformatted_20_Text"><text:s text:c="8"/>self.performance_metrics[user_id].append(metrics)</text:p>
      <text:p text:style-name="Preformatted_20_Text"><text:s text:c="8"/></text:p>
      <text:p text:style-name="Preformatted_20_Text"><text:soft-page-break/><text:s text:c="8"/># Update learning trajectory</text:p>
      <text:p text:style-name="Preformatted_20_Text"><text:s text:c="8"/>self.update_learning_trajectory(user_id, metrics)</text:p>
      <text:p text:style-name="Preformatted_20_Text"><text:s text:c="8"/></text:p>
      <text:p text:style-name="Preformatted_20_Text"><text:s text:c="8"/># Generate recommendations</text:p>
      <text:p text:style-name="Preformatted_20_Text"><text:s text:c="8"/>recommendations = self.generate_recommendations(user_id, metrics)</text:p>
      <text:p text:style-name="Preformatted_20_Text"><text:s text:c="8"/></text:p>
      <text:p text:style-name="Preformatted_20_Text"><text:s text:c="8"/>return {</text:p>
      <text:p text:style-name="Preformatted_20_Text"><text:s text:c="12"/>'metrics': metrics,</text:p>
      <text:p text:style-name="Preformatted_20_Text"><text:s text:c="12"/>'recommendations': recommendations,</text:p>
      <text:p text:style-name="Preformatted_20_Text"><text:s text:c="12"/>'next_session_plan': self.plan_next_session(user_id, metrics)</text:p>
      <text:p text:style-name="Preformatted_20_Text"><text:s text:c="8"/>}</text:p>
      <text:p text:style-name="Preformatted_20_Text"><text:s text:c="4"/></text:p>
      <text:p text:style-name="Preformatted_20_Text"><text:s text:c="4"/>def generate_recommendations(self, user_id, metrics):</text:p>
      <text:p text:style-name="Preformatted_20_Text"><text:s text:c="8"/>"""</text:p>
      <text:p text:style-name="Preformatted_20_Text"><text:s text:c="8"/>Generate personalized game recommendations</text:p>
      <text:p text:style-name="Preformatted_20_Text"><text:s text:c="8"/>"""</text:p>
      <text:p text:style-name="Preformatted_20_Text"><text:s text:c="8"/>recommendations = []</text:p>
      <text:p text:style-name="Preformatted_20_Text"><text:s text:c="8"/></text:p>
      <text:p text:style-name="Preformatted_20_Text"><text:s text:c="8"/># Based on performance patterns</text:p>
      <text:p text:style-name="Preformatted_20_Text"><text:s text:c="8"/>if metrics['cognitive_metrics']['accuracy_rate'] &lt; 0.6:</text:p>
      <text:p text:style-name="Preformatted_20_Text"><text:s text:c="12"/>recommendations.append({</text:p>
      <text:p text:style-name="Preformatted_20_Text"><text:s text:c="16"/>'type': 'difficulty_adjustment',</text:p>
      <text:p text:style-name="Preformatted_20_Text"><text:s text:c="16"/>'suggestion': 'Reduce game difficulty by 20%',</text:p>
      <text:p text:style-name="Preformatted_20_Text"><text:s text:c="16"/>'reason': 'Current difficulty may be causing frustration'</text:p>
      <text:p text:style-name="Preformatted_20_Text"><text:s text:c="12"/>})</text:p>
      <text:p text:style-name="Preformatted_20_Text"><text:s text:c="8"/></text:p>
      <text:p text:style-name="Preformatted_20_Text"><text:s text:c="8"/>if metrics['emotional_metrics']['frustration_signals'] &gt; 0.7:</text:p>
      <text:p text:style-name="Preformatted_20_Text"><text:s text:c="12"/>recommendations.append({</text:p>
      <text:p text:style-name="Preformatted_20_Text"><text:s text:c="16"/>'type': 'game_selection',</text:p>
      <text:p text:style-name="Preformatted_20_Text"><text:s text:c="16"/>'suggestion': 'Try more cooperative games',</text:p>
      <text:p text:style-name="Preformatted_20_Text"><text:s text:c="16"/>'reason': 'High frustration detected in competitive games'</text:p>
      <text:p text:style-name="Preformatted_20_Text"><text:s text:c="12"/>})</text:p>
      <text:p text:style-name="Preformatted_20_Text"><text:s text:c="8"/></text:p>
      <text:p text:style-name="Preformatted_20_Text"><text:s text:c="8"/>if metrics['adaptive_metrics']['learning_pace'] &gt; 0.8:</text:p>
      <text:p text:style-name="Preformatted_20_Text"><text:s text:c="12"/>recommendations.append({</text:p>
      <text:p text:style-name="Preformatted_20_Text"><text:s text:c="16"/>'type': 'progression',</text:p>
      <text:p text:style-name="Preformatted_20_Text"><text:s text:c="16"/>'suggestion': 'Advance to next difficulty tier',</text:p>
      <text:p text:style-name="Preformatted_20_Text"><text:s text:c="16"/>'reason': 'Rapid learning detected'</text:p>
      <text:p text:style-name="Preformatted_20_Text"><text:s text:c="12"/>})</text:p>
      <text:p text:style-name="Preformatted_20_Text"><text:s text:c="8"/></text:p>
      <text:p text:style-name="Preformatted_20_Text"><text:s text:c="8"/># Based on time of day patterns</text:p>
      <text:p text:style-name="Preformatted_20_Text"><text:s text:c="8"/>time_based_recs = self.generate_time_based_recommendations(user_id)</text:p>
      <text:p text:style-name="Preformatted_20_Text"><text:s text:c="8"/>recommendations.extend(time_based_recs)</text:p>
      <text:p text:style-name="Preformatted_20_Text"><text:s text:c="8"/></text:p>
      <text:p text:style-name="Preformatted_20_Text"><text:s text:c="8"/>return recommendations</text:p>
      <text:p text:style-name="Preformatted_20_Text"><text:s text:c="4"/></text:p>
      <text:p text:style-name="Preformatted_20_Text"><text:s text:c="4"/>def plan_next_session(self, user_id, current_metrics):</text:p>
      <text:p text:style-name="Preformatted_20_Text"><text:s text:c="8"/>"""</text:p>
      <text:p text:style-name="Preformatted_20_Text"><text:s text:c="8"/>Plan optimal next game session</text:p>
      <text:p text:style-name="Preformatted_20_Text"><text:s text:c="8"/>"""</text:p>
      <text:p text:style-name="Preformatted_20_Text"><text:s text:c="8"/># Analyze patterns to determine best next activity</text:p>
      <text:p text:style-name="Preformatted_20_Text"><text:s text:c="8"/>patterns = self.analyze_user_patterns(user_id)</text:p>
      <text:p text:style-name="Preformatted_20_Text"><text:s text:c="8"/></text:p>
      <text:p text:style-name="Preformatted_20_Text"><text:s text:c="8"/># Consider time since last session</text:p>
      <text:p text:style-name="Preformatted_20_Text"><text:s text:c="8"/>time_since_last = self.get_time_since_last_session(user_id)</text:p>
      <text:p text:style-name="Preformatted_20_Text"><text:s text:c="8"/></text:p>
      <text:p text:style-name="Preformatted_20_Text"><text:s text:c="8"/># Consider current emotional state if available</text:p>
      <text:p text:style-name="Preformatted_20_Text"><text:s text:c="8"/>current_state = self.get_current_user_state(user_id)</text:p>
      <text:p text:style-name="Preformatted_20_Text"><text:s text:c="8"/></text:p>
      <text:p text:style-name="Preformatted_20_Text"><text:s text:c="8"/>plan = {</text:p>
      <text:p text:style-name="Preformatted_20_Text"><text:s text:c="12"/>'recommended_game': self.select_optimal_game(user_id, patterns, current_state),</text:p>
      <text:p text:style-name="Preformatted_20_Text"><text:s text:c="12"/>'recommended_duration': self.calculate_optimal_duration(user_id, current_metrics),</text:p>
      <text:p text:style-name="Preformatted_20_Text"><text:soft-page-break/><text:s text:c="12"/>'recommended_time': self.suggest_optimal_time(user_id),</text:p>
      <text:p text:style-name="Preformatted_20_Text"><text:s text:c="12"/>'learning_objectives': self.set_session_objectives(user_id, current_metrics),</text:p>
      <text:p text:style-name="Preformatted_20_Text"><text:s text:c="12"/>'adaptation_strategy': self.determine_adaptation_strategy(user_id)</text:p>
      <text:p text:style-name="Preformatted_20_Text"><text:s text:c="8"/>}</text:p>
      <text:p text:style-name="Preformatted_20_Text"><text:s text:c="8"/></text:p>
      <text:p text:style-name="P6"><text:s text:c="8"/>return plan</text:p>
      <text:h text:style-name="Heading_20_2" text:outline-level="2"><text:span text:style-name="Strong_20_Emphasis">6. Integration with Existing Marvin System</text:span></text:h>
      <text:h text:style-name="Heading_20_3" text:outline-level="3"><text:span text:style-name="Strong_20_Emphasis">A. Cross-System Integration</text:span></text:h>
      <text:p text:style-name="Text_20_body">python</text:p>
      <text:p text:style-name="Preformatted_20_Text">class MarvinGameIntegration:</text:p>
      <text:p text:style-name="Preformatted_20_Text"><text:s text:c="4"/>def __init__(self, marvin_core):</text:p>
      <text:p text:style-name="Preformatted_20_Text"><text:s text:c="8"/>self.marvin_core = marvin_core</text:p>
      <text:p text:style-name="Preformatted_20_Text"><text:s text:c="8"/>self.game_portal = CognitiveGamesPortal()</text:p>
      <text:p text:style-name="Preformatted_20_Text"><text:s text:c="8"/>self.shared_memory = self.initialize_shared_memory()</text:p>
      <text:p text:style-name="Preformatted_20_Text"><text:s text:c="8"/></text:p>
      <text:p text:style-name="Preformatted_20_Text"><text:s text:c="4"/>def initialize_shared_memory(self):</text:p>
      <text:p text:style-name="Preformatted_20_Text"><text:s text:c="8"/>"""</text:p>
      <text:p text:style-name="Preformatted_20_Text"><text:s text:c="8"/>Share game data with main Marvin system for holistic understanding</text:p>
      <text:p text:style-name="Preformatted_20_Text"><text:s text:c="8"/>"""</text:p>
      <text:p text:style-name="Preformatted_20_Text"><text:s text:c="8"/>return {</text:p>
      <text:p text:style-name="Preformatted_20_Text"><text:s text:c="12"/>'game_performance': {}, <text:s/># Game performance affects personality responses</text:p>
      <text:p text:style-name="Preformatted_20_Text"><text:s text:c="12"/>'mood_correlation': {}, <text:s/># Mood changes during games</text:p>
      <text:p text:style-name="Preformatted_20_Text"><text:s text:c="12"/>'learning_insights': {}, <text:s/># Cognitive insights from games</text:p>
      <text:p text:style-name="Preformatted_20_Text"><text:s text:c="12"/>'social_patterns': {} <text:s text:c="3"/># Social interaction patterns in games</text:p>
      <text:p text:style-name="Preformatted_20_Text"><text:s text:c="8"/>}</text:p>
      <text:p text:style-name="Preformatted_20_Text"><text:s text:c="4"/></text:p>
      <text:p text:style-name="Preformatted_20_Text"><text:s text:c="4"/>def update_marvin_from_games(self, game_session_data):</text:p>
      <text:p text:style-name="Preformatted_20_Text"><text:s text:c="8"/>"""</text:p>
      <text:p text:style-name="Preformatted_20_Text"><text:s text:c="8"/>Update Marvin's understanding of user based on game interactions</text:p>
      <text:p text:style-name="Preformatted_20_Text"><text:s text:c="8"/>"""</text:p>
      <text:p text:style-name="Preformatted_20_Text"><text:s text:c="8"/># Extract insights from game session</text:p>
      <text:p text:style-name="Preformatted_20_Text"><text:s text:c="8"/>insights = self.extract_insights(game_session_data)</text:p>
      <text:p text:style-name="Preformatted_20_Text"><text:s text:c="8"/></text:p>
      <text:p text:style-name="Preformatted_20_Text"><text:s text:c="8"/># Update somatic state if game was physically engaging</text:p>
      <text:p text:style-name="Preformatted_20_Text"><text:s text:c="8"/>if game_session_data.get('physical_engagement'):</text:p>
      <text:p text:style-name="Preformatted_20_Text"><text:s text:c="12"/>self.update_somatic_state_from_game(game_session_data)</text:p>
      <text:p text:style-name="Preformatted_20_Text"><text:s text:c="8"/></text:p>
      <text:p text:style-name="Preformatted_20_Text"><text:s text:c="8"/># Update emotional model</text:p>
      <text:p text:style-name="Preformatted_20_Text"><text:s text:c="8"/>emotional_insights = self.extract_emotional_insights(game_session_data)</text:p>
      <text:p text:style-name="Preformatted_20_Text"><text:s text:c="8"/>self.marvin_core.update_emotional_model(</text:p>
      <text:p text:style-name="Preformatted_20_Text"><text:s text:c="12"/>game_session_data['user_id'],</text:p>
      <text:p text:style-name="Preformatted_20_Text"><text:s text:c="12"/>emotional_insights</text:p>
      <text:p text:style-name="Preformatted_20_Text"><text:s text:c="8"/>)</text:p>
      <text:p text:style-name="Preformatted_20_Text"><text:s text:c="8"/></text:p>
      <text:p text:style-name="Preformatted_20_Text"><text:s text:c="8"/># Update cognitive assessment</text:p>
      <text:p text:style-name="Preformatted_20_Text"><text:s text:c="8"/>cognitive_insights = self.extract_cognitive_insights(game_session_data)</text:p>
      <text:p text:style-name="Preformatted_20_Text"><text:s text:c="8"/>self.marvin_core.update_cognitive_profile(</text:p>
      <text:p text:style-name="Preformatted_20_Text"><text:s text:c="12"/>game_session_data['user_id'],</text:p>
      <text:p text:style-name="Preformatted_20_Text"><text:s text:c="12"/>cognitive_insights</text:p>
      <text:p text:style-name="Preformatted_20_Text"><text:s text:c="8"/>)</text:p>
      <text:p text:style-name="Preformatted_20_Text"><text:s text:c="8"/></text:p>
      <text:p text:style-name="Preformatted_20_Text"><text:s text:c="8"/># Update social interaction model</text:p>
      <text:p text:style-name="Preformatted_20_Text"><text:s text:c="8"/>if game_session_data.get('social_interaction'):</text:p>
      <text:p text:style-name="Preformatted_20_Text"><text:s text:c="12"/>social_insights = self.extract_social_insights(game_session_data)</text:p>
      <text:p text:style-name="Preformatted_20_Text"><text:s text:c="12"/>self.marvin_core.update_social_model(</text:p>
      <text:p text:style-name="Preformatted_20_Text"><text:soft-page-break/><text:s text:c="16"/>game_session_data['user_id'],</text:p>
      <text:p text:style-name="Preformatted_20_Text"><text:s text:c="16"/>social_insights</text:p>
      <text:p text:style-name="Preformatted_20_Text"><text:s text:c="12"/>)</text:p>
      <text:p text:style-name="Preformatted_20_Text"><text:s text:c="8"/></text:p>
      <text:p text:style-name="Preformatted_20_Text"><text:s text:c="8"/># Log game session in chronological dossier</text:p>
      <text:p text:style-name="Preformatted_20_Text"><text:s text:c="8"/>self.log_game_session_in_dossier(game_session_data)</text:p>
      <text:p text:style-name="Preformatted_20_Text"><text:s text:c="4"/></text:p>
      <text:p text:style-name="Preformatted_20_Text"><text:s text:c="4"/>def extract_insights(self, game_session_data):</text:p>
      <text:p text:style-name="Preformatted_20_Text"><text:s text:c="8"/>"""</text:p>
      <text:p text:style-name="Preformatted_20_Text"><text:s text:c="8"/>Extract meaningful insights from game sessions</text:p>
      <text:p text:style-name="Preformatted_20_Text"><text:s text:c="8"/>"""</text:p>
      <text:p text:style-name="Preformatted_20_Text"><text:s text:c="8"/>insights = {</text:p>
      <text:p text:style-name="Preformatted_20_Text"><text:s text:c="12"/>'cognitive_style': self.analyze_cognitive_style(game_session_data),</text:p>
      <text:p text:style-name="Preformatted_20_Text"><text:s text:c="12"/>'learning_pattern': self.identify_learning_pattern(game_session_data),</text:p>
      <text:p text:style-name="Preformatted_20_Text"><text:s text:c="12"/>'frustration_tolerance': self.measure_frustration_tolerance(game_session_data),</text:p>
      <text:p text:style-name="Preformatted_20_Text"><text:s text:c="12"/>'social_preferences': self.identify_social_preferences(game_session_data),</text:p>
      <text:p text:style-name="Preformatted_20_Text"><text:s text:c="12"/>'motivation_factors': self.identify_motivation_factors(game_session_data)</text:p>
      <text:p text:style-name="Preformatted_20_Text"><text:s text:c="8"/>}</text:p>
      <text:p text:style-name="Preformatted_20_Text"><text:s text:c="8"/></text:p>
      <text:p text:style-name="Preformatted_20_Text"><text:s text:c="8"/># Update shared memory</text:p>
      <text:p text:style-name="Preformatted_20_Text"><text:s text:c="8"/>self.shared_memory['game_performance'][game_session_data['user_id']] = \</text:p>
      <text:p text:style-name="Preformatted_20_Text"><text:s text:c="12"/>game_session_data['performance_metrics']</text:p>
      <text:p text:style-name="Preformatted_20_Text"><text:s text:c="8"/></text:p>
      <text:p text:style-name="P6"><text:s text:c="8"/>return insights</text:p>
      <text:h text:style-name="Heading_20_2" text:outline-level="2"><text:span text:style-name="Strong_20_Emphasis">7. Implementation Roadmap</text:span></text:h>
      <text:h text:style-name="Heading_20_3" text:outline-level="3"><text:span text:style-name="Strong_20_Emphasis">Phase 1: Basic Portal &amp; Simple Games (2-3 weeks)</text:span></text:h>
      <text:p text:style-name="Text_20_body">text</text:p>
      <text:p text:style-name="Preformatted_20_Text">Week 1-2:</text:p>
      <text:p text:style-name="Preformatted_20_Text"><text:s text:c="2"/>- Set up Flask web server with basic routing</text:p>
      <text:p text:style-name="Preformatted_20_Text"><text:s text:c="2"/>- Create portal homepage with game categories</text:p>
      <text:p text:style-name="Preformatted_20_Text"><text:s text:c="2"/>- Implement 2-3 simple single-player games (Memory Matrix, Simple Puzzles)</text:p>
      <text:p text:style-name="Preformatted_20_Text"><text:s text:c="2"/>- Basic user session management</text:p>
      <text:p text:style-name="Preformatted_20_Text"/>
      <text:p text:style-name="Preformatted_20_Text">Week 3:</text:p>
      <text:p text:style-name="Preformatted_20_Text"><text:s text:c="2"/>- Add AI opponent for Tic-Tac-Toe</text:p>
      <text:p text:style-name="Preformatted_20_Text"><text:s text:c="2"/>- Implement basic adaptive difficulty</text:p>
      <text:p text:style-name="P6"><text:s text:c="2"/>- Create simple analytics dashboard</text:p>
      <text:h text:style-name="Heading_20_3" text:outline-level="3"><text:span text:style-name="Strong_20_Emphasis">Phase 2: Advanced AI &amp; Multiplayer (3-4 weeks)</text:span></text:h>
      <text:p text:style-name="Text_20_body">text</text:p>
      <text:p text:style-name="Preformatted_20_Text">Week 4-5:</text:p>
      <text:p text:style-name="Preformatted_20_Text"><text:s text:c="2"/>- Implement sophisticated AI learning engine</text:p>
      <text:p text:style-name="Preformatted_20_Text"><text:s text:c="2"/>- Add two-player cooperative games</text:p>
      <text:p text:style-name="Preformatted_20_Text"><text:s text:c="2"/>- Create AI emotional response system</text:p>
      <text:p text:style-name="Preformatted_20_Text"><text:s text:c="2"/>- Implement real-time WebSocket communication</text:p>
      <text:p text:style-name="Preformatted_20_Text"/>
      <text:p text:style-name="Preformatted_20_Text">Week 6-7:</text:p>
      <text:p text:style-name="Preformatted_20_Text"><text:s text:c="2"/>- Add voice interaction for games</text:p>
      <text:p text:style-name="Preformatted_20_Text"><text:s text:c="2"/>- Implement game session analytics</text:p>
      <text:p text:style-name="Preformatted_20_Text"><text:s text:c="2"/>- Create personalized game recommendations</text:p>
      <text:p text:style-name="P6"><text:soft-page-break/><text:s text:c="2"/>- Add progress tracking and achievements</text:p>
      <text:h text:style-name="Heading_20_3" text:outline-level="3"><text:span text:style-name="Strong_20_Emphasis">Phase 3: Therapeutic Games &amp; Integration (3-4 weeks)</text:span></text:h>
      <text:p text:style-name="Text_20_body">text</text:p>
      <text:p text:style-name="Preformatted_20_Text">Week 8-9:</text:p>
      <text:p text:style-name="Preformatted_20_Text"><text:s text:c="2"/>- Implement dementia-specific games (Remembrance Album)</text:p>
      <text:p text:style-name="Preformatted_20_Text"><text:s text:c="2"/>- Add therapeutic game modes</text:p>
      <text:p text:style-name="Preformatted_20_Text"><text:s text:c="2"/>- Create family/companion multiplayer</text:p>
      <text:p text:style-name="Preformatted_20_Text"><text:s text:c="2"/>- Implement remote multiplayer (family members can join)</text:p>
      <text:p text:style-name="Preformatted_20_Text"/>
      <text:p text:style-name="Preformatted_20_Text">Week 10-11:</text:p>
      <text:p text:style-name="Preformatted_20_Text"><text:s text:c="2"/>- Integrate with Marvin's somatic monitoring</text:p>
      <text:p text:style-name="Preformatted_20_Text"><text:s text:c="2"/>- Add biofeedback games (relaxation, breathing)</text:p>
      <text:p text:style-name="Preformatted_20_Text"><text:s text:c="2"/>- Implement comprehensive analytics</text:p>
      <text:p text:style-name="P6"><text:s text:c="2"/>- Create professional caregiver dashboard</text:p>
      <text:h text:style-name="Heading_20_3" text:outline-level="3"><text:span text:style-name="Strong_20_Emphasis">Phase 4: Polish &amp; Optimization (2 weeks)</text:span></text:h>
      <text:p text:style-name="Text_20_body">text</text:p>
      <text:p text:style-name="Preformatted_20_Text">Week 12-13:</text:p>
      <text:p text:style-name="Preformatted_20_Text"><text:s text:c="2"/>- Performance optimization for RPi5</text:p>
      <text:p text:style-name="Preformatted_20_Text"><text:s text:c="2"/>- Accessibility improvements</text:p>
      <text:p text:style-name="Preformatted_20_Text"><text:s text:c="2"/>- Mobile responsiveness</text:p>
      <text:p text:style-name="P6"><text:s text:c="2"/>- Final testing and bug fixes</text:p>
      <text:h text:style-name="Heading_20_2" text:outline-level="2"><text:span text:style-name="Strong_20_Emphasis">8. Key Features &amp; Benefits</text:span></text:h>
      <text:h text:style-name="Heading_20_3" text:outline-level="3"><text:span text:style-name="Strong_20_Emphasis">A. For Elderly/Dementia Users:</text:span></text:h>
      <text:list xml:id="list9178260138749073766" text:style-name="L1">
        <text:list-item>
          <text:p text:style-name="P1"><text:span text:style-name="Strong_20_Emphasis">Reminiscence Therapy</text:span>: Photo-based memory games</text:p>
        </text:list-item>
        <text:list-item>
          <text:p text:style-name="P1"><text:span text:style-name="Strong_20_Emphasis">Cognitive Maintenance</text:span>: Daily brain exercises</text:p>
        </text:list-item>
        <text:list-item>
          <text:p text:style-name="P1"><text:span text:style-name="Strong_20_Emphasis">Social Connection</text:span>: Games to play with family remotely</text:p>
        </text:list-item>
        <text:list-item>
          <text:p text:style-name="P1"><text:span text:style-name="Strong_20_Emphasis">Mood Regulation</text:span>: Calming sensory games</text:p>
        </text:list-item>
        <text:list-item>
          <text:p text:style-name="P1"><text:span text:style-name="Strong_20_Emphasis">Routine Establishment</text:span>: Daily cognitive workout schedule</text:p>
        </text:list-item>
      </text:list>
      <text:h text:style-name="Heading_20_3" text:outline-level="3"><text:span text:style-name="Strong_20_Emphasis">B. For All Age Categories:</text:span></text:h>
      <text:list xml:id="list8341466720967435733" text:style-name="L2">
        <text:list-item>
          <text:p text:style-name="P2"><text:span text:style-name="Strong_20_Emphasis">Adaptive Challenge</text:span>: Games that adjust to skill level</text:p>
        </text:list-item>
        <text:list-item>
          <text:p text:style-name="P2"><text:span text:style-name="Strong_20_Emphasis">AI Companionship</text:span>: Always-available playing partner</text:p>
        </text:list-item>
        <text:list-item>
          <text:p text:style-name="P2"><text:span text:style-name="Strong_20_Emphasis">Learning Integration</text:span>: Games that teach while entertaining</text:p>
        </text:list-item>
        <text:list-item>
          <text:p text:style-name="P2"><text:span text:style-name="Strong_20_Emphasis">Progress Tracking</text:span>: Visual progress and achievements</text:p>
        </text:list-item>
        <text:list-item>
          <text:p text:style-name="P2"><text:span text:style-name="Strong_20_Emphasis">Social Features</text:span>: Play with friends or family</text:p>
        </text:list-item>
      </text:list>
      <text:h text:style-name="Heading_20_3" text:outline-level="3"><text:span text:style-name="Strong_20_Emphasis">C. For Therapeutic Use:</text:span></text:h>
      <text:list xml:id="list4014636942413295798" text:style-name="L3">
        <text:list-item>
          <text:p text:style-name="P3"><text:span text:style-name="Strong_20_Emphasis">Structured Therapy</text:span>: Games designed by therapists</text:p>
        </text:list-item>
        <text:list-item>
          <text:p text:style-name="P3"><text:span text:style-name="Strong_20_Emphasis">Progress Monitoring</text:span>: Detailed analytics for caregivers</text:p>
        </text:list-item>
        <text:list-item>
          <text:p text:style-name="P3"><text:soft-page-break/><text:span text:style-name="Strong_20_Emphasis">Mood Tracking</text:span>: Games that monitor emotional state</text:p>
        </text:list-item>
        <text:list-item>
          <text:p text:style-name="P3"><text:span text:style-name="Strong_20_Emphasis">Customizable</text:span>: Adjustable for specific therapeutic goals</text:p>
        </text:list-item>
        <text:list-item>
          <text:p text:style-name="P3"><text:span text:style-name="Strong_20_Emphasis">Integration</text:span>: Works with existing care plans</text:p>
        </text:list-item>
      </text:list>
      <text:h text:style-name="Heading_20_2" text:outline-level="2"><text:span text:style-name="Strong_20_Emphasis">Conclusion</text:span></text:h>
      <text:p text:style-name="Text_20_body">This comprehensive <text:span text:style-name="Strong_20_Emphasis">Interactive Cognitive Engagement Portal</text:span> transforms Marvin from a purely conversational AI into an <text:span text:style-name="Strong_20_Emphasis">active therapeutic and recreational companion</text:span>. By integrating:</text:p>
      <text:list xml:id="list9194906282534892952" text:style-name="L4">
        <text:list-item>
          <text:p text:style-name="P4"><text:span text:style-name="Strong_20_Emphasis">Age-appropriate games</text:span> for all cognitive levels</text:p>
        </text:list-item>
        <text:list-item>
          <text:p text:style-name="P4"><text:span text:style-name="Strong_20_Emphasis">Sophisticated AI opponents</text:span> that adapt to user needs</text:p>
        </text:list-item>
        <text:list-item>
          <text:p text:style-name="P4"><text:span text:style-name="Strong_20_Emphasis">Therapeutic game modalities</text:span> for dementia and cognitive impairment</text:p>
        </text:list-item>
        <text:list-item>
          <text:p text:style-name="P4"><text:span text:style-name="Strong_20_Emphasis">Social interaction frameworks</text:span> for connection</text:p>
        </text:list-item>
        <text:list-item>
          <text:p text:style-name="P4"><text:span text:style-name="Strong_20_Emphasis">Deep learning analytics</text:span> for continuous improvement</text:p>
        </text:list-item>
      </text:list>
      <text:p text:style-name="Text_20_body">We create a <text:span text:style-name="Strong_20_Emphasis">holistic engagement system</text:span> that addresses:</text:p>
      <text:list xml:id="list8637198744715029875" text:style-name="L5">
        <text:list-item>
          <text:p text:style-name="P5"><text:span text:style-name="Strong_20_Emphasis">Cognitive decline</text:span> through targeted exercises</text:p>
        </text:list-item>
        <text:list-item>
          <text:p text:style-name="P5"><text:span text:style-name="Strong_20_Emphasis">Social isolation</text:span> through interactive play</text:p>
        </text:list-item>
        <text:list-item>
          <text:p text:style-name="P5"><text:span text:style-name="Strong_20_Emphasis">Emotional wellbeing</text:span> through positive engagement</text:p>
        </text:list-item>
        <text:list-item>
          <text:p text:style-name="P5"><text:span text:style-name="Strong_20_Emphasis">Therapeutic goals</text:span> through structured activities</text:p>
        </text:list-item>
      </text:list>
      <text:p text:style-name="Text_20_body">The system maintains Marvin's core identity as a <text:span text:style-name="Strong_20_Emphasis">protective, empathetic companion</text:span> while expanding his capabilities to actively engage users in meaningful, beneficial activities that promote cognitive health, emotional wellbeing, and social connection.</text:p>
      <text:p text:style-name="Text_20_body"><text:span text:style-name="Strong_20_Emphasis">Implementation Note</text:span>: This gaming portal can run alongside the existing Marvin system, using the same user profiles and learning from game interactions to enhance conversational understanding and emotional suppor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23T09:19:25.01</meta:creation-date>
    <meta:document-statistic meta:table-count="0" meta:image-count="0" meta:object-count="0" meta:page-count="22" meta:paragraph-count="1186" meta:word-count="3527" meta:character-count="46234"/>
    <dc:date>2025-12-23T09:20:20.40</dc:date>
    <dc:creator>Peter Thompson</dc:creator>
    <meta:editing-duration>PT56S</meta:editing-duration>
    <meta:editing-cycles>1</meta:editing-cycles>
    <meta:generator>OpenOffice/4.1.15$Win32 OpenOffice.org_project/4115m2$Build-9813</meta:generator>
  </office:meta>
</office:document-meta>
</file>