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Dynamic Protocol Priority Learning Engine (DPPLE)</text:span></text:h>
      <text:h text:style-name="Heading_20_2" text:outline-level="2"><text:span text:style-name="Strong_20_Emphasis">1. Core Architecture: Adaptive Resource-Aware Protocol Management</text:span></text:h>
      <text:h text:style-name="Heading_20_3" text:outline-level="3"><text:span text:style-name="Strong_20_Emphasis">A. Hardware-Aware Protocol Scheduler</text:span></text:h>
      <text:p text:style-name="Text_20_body">python</text:p>
      <text:p text:style-name="Preformatted_20_Text">class ProtocolResourceManager:</text:p>
      <text:p text:style-name="Preformatted_20_Text"><text:s text:c="4"/>def __init__(self):</text:p>
      <text:p text:style-name="Preformatted_20_Text"><text:s text:c="8"/>self.protocol_registry = {}</text:p>
      <text:p text:style-name="Preformatted_20_Text"><text:s text:c="8"/>self.resource_models = {}</text:p>
      <text:p text:style-name="Preformatted_20_Text"><text:s text:c="8"/>self.performance_history = []</text:p>
      <text:p text:style-name="Preformatted_20_Text"><text:s text:c="8"/>self.active_mode = "normal" <text:s/># crisis, efficiency, diagnostic</text:p>
      <text:p text:style-name="Preformatted_20_Text"><text:s text:c="8"/></text:p>
      <text:p text:style-name="Preformatted_20_Text"><text:s text:c="4"/>def register_protocol(self, protocol):</text:p>
      <text:p text:style-name="Preformatted_20_Text"><text:s text:c="8"/>"""Register a protocol with its resource profile"""</text:p>
      <text:p text:style-name="Preformatted_20_Text"><text:s text:c="8"/>self.protocol_registry[protocol['name']] = {</text:p>
      <text:p text:style-name="Preformatted_20_Text"><text:s text:c="12"/>'base_priority': protocol.get('base_priority', 50),</text:p>
      <text:p text:style-name="Preformatted_20_Text"><text:s text:c="12"/>'resource_profile': self.measure_resource_profile(protocol),</text:p>
      <text:p text:style-name="Preformatted_20_Text"><text:s text:c="12"/>'minimum_requirements': protocol.get('minimum_requirements', {}),</text:p>
      <text:p text:style-name="Preformatted_20_Text"><text:s text:c="12"/>'can_defer': protocol.get('can_defer', True),</text:p>
      <text:p text:style-name="Preformatted_20_Text"><text:s text:c="12"/>'can_scale_down': protocol.get('can_scale_down', True),</text:p>
      <text:p text:style-name="Preformatted_20_Text"><text:s text:c="12"/>'scaling_options': protocol.get('scaling_options', {}),</text:p>
      <text:p text:style-name="Preformatted_20_Text"><text:s text:c="12"/>'performance_metrics': {</text:p>
      <text:p text:style-name="Preformatted_20_Text"><text:s text:c="16"/>'avg_cpu_usage': 0,</text:p>
      <text:p text:style-name="Preformatted_20_Text"><text:s text:c="16"/>'avg_memory_mb': 0,</text:p>
      <text:p text:style-name="Preformatted_20_Text"><text:s text:c="16"/>'avg_processing_ms': 0,</text:p>
      <text:p text:style-name="Preformatted_20_Text"><text:s text:c="16"/>'completion_rate': 1.0</text:p>
      <text:p text:style-name="Preformatted_20_Text"><text:s text:c="12"/>},</text:p>
      <text:p text:style-name="Preformatted_20_Text"><text:s text:c="12"/>'criticality_contexts': protocol.get('criticality_contexts', {})</text:p>
      <text:p text:style-name="Preformatted_20_Text"><text:s text:c="8"/>}</text:p>
      <text:p text:style-name="Preformatted_20_Text"><text:s text:c="4"/></text:p>
      <text:p text:style-name="Preformatted_20_Text"><text:s text:c="4"/>def measure_resource_profile(self, protocol):</text:p>
      <text:p text:style-name="Preformatted_20_Text"><text:s text:c="8"/>"""</text:p>
      <text:p text:style-name="Preformatted_20_Text"><text:s text:c="8"/>Dynamically measure protocol resource consumption</text:p>
      <text:p text:style-name="Preformatted_20_Text"><text:s text:c="8"/>"""</text:p>
      <text:p text:style-name="Preformatted_20_Text"><text:s text:c="8"/>return {</text:p>
      <text:p text:style-name="Preformatted_20_Text"><text:s text:c="12"/>'cpu_percent': self.benchmark_cpu_usage(protocol),</text:p>
      <text:p text:style-name="Preformatted_20_Text"><text:s text:c="12"/>'memory_mb': self.benchmark_memory_usage(protocol),</text:p>
      <text:p text:style-name="Preformatted_20_Text"><text:s text:c="12"/>'disk_io_kb': self.benchmark_disk_usage(protocol),</text:p>
      <text:p text:style-name="Preformatted_20_Text"><text:s text:c="12"/>'npu_utilization': self.benchmark_npu_usage(protocol),</text:p>
      <text:p text:style-name="Preformatted_20_Text"><text:s text:c="12"/>'thermal_impact': self.estimate_thermal_impact(protocol),</text:p>
      <text:p text:style-name="Preformatted_20_Text"><text:s text:c="12"/>'energy_joules': self.estimate_energy_consumption(protocol)</text:p>
      <text:p text:style-name="P5"><text:s text:c="8"/>}</text:p>
      <text:h text:style-name="Heading_20_3" text:outline-level="3"><text:span text:style-name="Strong_20_Emphasis">B. Real-Time Hardware State Monitor</text:span></text:h>
      <text:p text:style-name="Text_20_body">python</text:p>
      <text:p text:style-name="Preformatted_20_Text">class RPi5HardwareMonitor:</text:p>
      <text:p text:style-name="Preformatted_20_Text"><text:s text:c="4"/>def __init__(self):</text:p>
      <text:p text:style-name="Preformatted_20_Text"><text:s text:c="8"/>self.metrics = {</text:p>
      <text:p text:style-name="Preformatted_20_Text"><text:s text:c="12"/>'cpu': {'usage': 0, 'temp': 0, 'frequency': 0, 'throttled': False},</text:p>
      <text:p text:style-name="Preformatted_20_Text"><text:soft-page-break/><text:s text:c="12"/>'memory': {'used_mb': 0, 'available_mb': 0, 'swap_used_mb': 0},</text:p>
      <text:p text:style-name="Preformatted_20_Text"><text:s text:c="12"/>'thermal': {'core_temp': 0, 'throttle_history': [], 'fan_speed': 0},</text:p>
      <text:p text:style-name="Preformatted_20_Text"><text:s text:c="12"/>'power': {'voltage': 0, 'current_ma': 0, 'battery_percent': 0},</text:p>
      <text:p text:style-name="Preformatted_20_Text"><text:s text:c="12"/>'npu': {'utilization': 0, 'temp': 0, 'throughput': 0}</text:p>
      <text:p text:style-name="Preformatted_20_Text"><text:s text:c="8"/>}</text:p>
      <text:p text:style-name="Preformatted_20_Text"><text:s text:c="8"/>self.thresholds = self.load_thresholds()</text:p>
      <text:p text:style-name="Preformatted_20_Text"><text:s text:c="8"/>self.performance_baseline = self.establish_baseline()</text:p>
      <text:p text:style-name="Preformatted_20_Text"><text:s text:c="4"/></text:p>
      <text:p text:style-name="Preformatted_20_Text"><text:s text:c="4"/>def get_current_state(self):</text:p>
      <text:p text:style-name="Preformatted_20_Text"><text:s text:c="8"/>"""Comprehensive hardware state assessment"""</text:p>
      <text:p text:style-name="Preformatted_20_Text"><text:s text:c="8"/>return {</text:p>
      <text:p text:style-name="Preformatted_20_Text"><text:s text:c="12"/>'timestamp': time.time(),</text:p>
      <text:p text:style-name="Preformatted_20_Text"><text:s text:c="12"/>'cpu_load': psutil.cpu_percent(interval=0.1, percpu=True),</text:p>
      <text:p text:style-name="Preformatted_20_Text"><text:s text:c="12"/>'cpu_temp': self.read_cpu_temp(),</text:p>
      <text:p text:style-name="Preformatted_20_Text"><text:s text:c="12"/>'memory': psutil.virtual_memory(),</text:p>
      <text:p text:style-name="Preformatted_20_Text"><text:s text:c="12"/>'swap': psutil.swap_memory(),</text:p>
      <text:p text:style-name="Preformatted_20_Text"><text:s text:c="12"/>'disk_io': psutil.disk_io_counters(),</text:p>
      <text:p text:style-name="Preformatted_20_Text"><text:s text:c="12"/>'network_io': psutil.net_io_counters(),</text:p>
      <text:p text:style-name="Preformatted_20_Text"><text:s text:c="12"/>'throttle_status': self.read_throttle_status(),</text:p>
      <text:p text:style-name="Preformatted_20_Text"><text:s text:c="12"/>'power_status': self.read_power_status()</text:p>
      <text:p text:style-name="Preformatted_20_Text"><text:s text:c="8"/>}</text:p>
      <text:p text:style-name="Preformatted_20_Text"><text:s text:c="4"/></text:p>
      <text:p text:style-name="Preformatted_20_Text"><text:s text:c="4"/>def assess_available_capacity(self):</text:p>
      <text:p text:style-name="Preformatted_20_Text"><text:s text:c="8"/>"""</text:p>
      <text:p text:style-name="Preformatted_20_Text"><text:s text:c="8"/>Calculate available processing capacity in weighted units</text:p>
      <text:p text:style-name="Preformatted_20_Text"><text:s text:c="8"/>"""</text:p>
      <text:p text:style-name="Preformatted_20_Text"><text:s text:c="8"/>current = self.get_current_state()</text:p>
      <text:p text:style-name="Preformatted_20_Text"><text:s text:c="8"/></text:p>
      <text:p text:style-name="Preformatted_20_Text"><text:s text:c="8"/># Calculate capacity scores (0-1)</text:p>
      <text:p text:style-name="Preformatted_20_Text"><text:s text:c="8"/>cpu_capacity = max(0, 1 - (np.mean(current['cpu_load']) / 100))</text:p>
      <text:p text:style-name="Preformatted_20_Text"><text:s text:c="8"/>thermal_capacity = max(0, 1 - (current['cpu_temp'] / 75)) <text:s/># 75°C is throttle limit</text:p>
      <text:p text:style-name="Preformatted_20_Text"><text:s text:c="8"/>memory_capacity = current['memory'].available / current['memory'].total</text:p>
      <text:p text:style-name="Preformatted_20_Text"><text:s text:c="8"/></text:p>
      <text:p text:style-name="Preformatted_20_Text"><text:s text:c="8"/># Weight the capacities</text:p>
      <text:p text:style-name="Preformatted_20_Text"><text:s text:c="8"/>total_capacity = (</text:p>
      <text:p text:style-name="Preformatted_20_Text"><text:s text:c="12"/>cpu_capacity * 0.4 +</text:p>
      <text:p text:style-name="Preformatted_20_Text"><text:s text:c="12"/>thermal_capacity * 0.3 +</text:p>
      <text:p text:style-name="Preformatted_20_Text"><text:s text:c="12"/>memory_capacity * 0.3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total_capacity': total_capacity,</text:p>
      <text:p text:style-name="Preformatted_20_Text"><text:s text:c="12"/>'components': {</text:p>
      <text:p text:style-name="Preformatted_20_Text"><text:s text:c="16"/>'cpu': cpu_capacity,</text:p>
      <text:p text:style-name="Preformatted_20_Text"><text:s text:c="16"/>'thermal': thermal_capacity,</text:p>
      <text:p text:style-name="Preformatted_20_Text"><text:s text:c="16"/>'memory': memory_capacity</text:p>
      <text:p text:style-name="Preformatted_20_Text"><text:s text:c="12"/>},</text:p>
      <text:p text:style-name="Preformatted_20_Text"><text:s text:c="12"/>'state': self.classify_state(total_capacity)</text:p>
      <text:p text:style-name="Preformatted_20_Text"><text:s text:c="8"/>}</text:p>
      <text:p text:style-name="Preformatted_20_Text"><text:s text:c="4"/></text:p>
      <text:p text:style-name="Preformatted_20_Text"><text:s text:c="4"/>def classify_state(self, capacity):</text:p>
      <text:p text:style-name="Preformatted_20_Text"><text:s text:c="8"/>"""Classify system state for protocol adjustment"""</text:p>
      <text:p text:style-name="Preformatted_20_Text"><text:s text:c="8"/>if capacity &gt; 0.7:</text:p>
      <text:p text:style-name="Preformatted_20_Text"><text:s text:c="12"/>return "high_capacity"</text:p>
      <text:p text:style-name="Preformatted_20_Text"><text:s text:c="8"/>elif capacity &gt; 0.4:</text:p>
      <text:p text:style-name="Preformatted_20_Text"><text:s text:c="12"/>return "normal_capacity"</text:p>
      <text:p text:style-name="Preformatted_20_Text"><text:s text:c="8"/>elif capacity &gt; 0.2:</text:p>
      <text:p text:style-name="Preformatted_20_Text"><text:s text:c="12"/>return "reduced_capacity"</text:p>
      <text:p text:style-name="Preformatted_20_Text"><text:s text:c="8"/>elif capacity &gt; 0.05:</text:p>
      <text:p text:style-name="Preformatted_20_Text"><text:s text:c="12"/>return "critical_capacity"</text:p>
      <text:p text:style-name="Preformatted_20_Text"><text:s text:c="8"/>else:</text:p>
      <text:p text:style-name="P5"><text:s text:c="12"/>return "overload"</text:p>
      <text:h text:style-name="Heading_20_2" text:outline-level="2"><text:soft-page-break/><text:span text:style-name="Strong_20_Emphasis">2. Dynamic Priority Calculation Engine</text:span></text:h>
      <text:h text:style-name="Heading_20_3" text:outline-level="3"><text:span text:style-name="Strong_20_Emphasis">A. Context-Aware Priority Matrix</text:span></text:h>
      <text:p text:style-name="Text_20_body">python</text:p>
      <text:p text:style-name="Preformatted_20_Text">class PriorityMatrixEngine:</text:p>
      <text:p text:style-name="Preformatted_20_Text"><text:s text:c="4"/>def __init__(self):</text:p>
      <text:p text:style-name="Preformatted_20_Text"><text:s text:c="8"/>self.context_weights = self.load_context_weights()</text:p>
      <text:p text:style-name="Preformatted_20_Text"><text:s text:c="8"/>self.protocol_relationships = self.map_protocol_dependencies()</text:p>
      <text:p text:style-name="Preformatted_20_Text"><text:s text:c="8"/>self.historical_effectiveness = {}</text:p>
      <text:p text:style-name="Preformatted_20_Text"><text:s text:c="4"/></text:p>
      <text:p text:style-name="Preformatted_20_Text"><text:s text:c="4"/>def calculate_dynamic_priority(self, protocol_name, context):</text:p>
      <text:p text:style-name="Preformatted_20_Text"><text:s text:c="8"/>"""</text:p>
      <text:p text:style-name="Preformatted_20_Text"><text:s text:c="8"/>Calculate real-time priority based on multiple factors</text:p>
      <text:p text:style-name="Preformatted_20_Text"><text:s text:c="8"/>"""</text:p>
      <text:p text:style-name="Preformatted_20_Text"><text:s text:c="8"/>base_priority = self.protocol_registry[protocol_name]['base_priority']</text:p>
      <text:p text:style-name="Preformatted_20_Text"><text:s text:c="8"/></text:p>
      <text:p text:style-name="Preformatted_20_Text"><text:s text:c="8"/># Adjust based on current system state</text:p>
      <text:p text:style-name="Preformatted_20_Text"><text:s text:c="8"/>system_factor = self.calculate_system_factor(</text:p>
      <text:p text:style-name="Preformatted_20_Text"><text:s text:c="12"/>self.hardware_monitor.assess_available_capacity()</text:p>
      <text:p text:style-name="Preformatted_20_Text"><text:s text:c="8"/>)</text:p>
      <text:p text:style-name="Preformatted_20_Text"><text:s text:c="8"/></text:p>
      <text:p text:style-name="Preformatted_20_Text"><text:s text:c="8"/># Adjust based on context criticality</text:p>
      <text:p text:style-name="Preformatted_20_Text"><text:s text:c="8"/>context_factor = self.calculate_context_factor(</text:p>
      <text:p text:style-name="Preformatted_20_Text"><text:s text:c="12"/>context, </text:p>
      <text:p text:style-name="Preformatted_20_Text"><text:s text:c="12"/>protocol_name</text:p>
      <text:p text:style-name="Preformatted_20_Text"><text:s text:c="8"/>)</text:p>
      <text:p text:style-name="Preformatted_20_Text"><text:s text:c="8"/></text:p>
      <text:p text:style-name="Preformatted_20_Text"><text:s text:c="8"/># Adjust based on recent effectiveness</text:p>
      <text:p text:style-name="Preformatted_20_Text"><text:s text:c="8"/>effectiveness_factor = self.calculate_effectiveness_factor(</text:p>
      <text:p text:style-name="Preformatted_20_Text"><text:s text:c="12"/>protocol_name,</text:p>
      <text:p text:style-name="Preformatted_20_Text"><text:s text:c="12"/>context.get('user_id')</text:p>
      <text:p text:style-name="Preformatted_20_Text"><text:s text:c="8"/>)</text:p>
      <text:p text:style-name="Preformatted_20_Text"><text:s text:c="8"/></text:p>
      <text:p text:style-name="Preformatted_20_Text"><text:s text:c="8"/># Adjust based on protocol interdependencies</text:p>
      <text:p text:style-name="Preformatted_20_Text"><text:s text:c="8"/>dependency_factor = self.calculate_dependency_factor(</text:p>
      <text:p text:style-name="Preformatted_20_Text"><text:s text:c="12"/>protocol_name,</text:p>
      <text:p text:style-name="Preformatted_20_Text"><text:s text:c="12"/>context.get('active_protocols', [])</text:p>
      <text:p text:style-name="Preformatted_20_Text"><text:s text:c="8"/>)</text:p>
      <text:p text:style-name="Preformatted_20_Text"><text:s text:c="8"/></text:p>
      <text:p text:style-name="Preformatted_20_Text"><text:s text:c="8"/># Calculate final priority (0-100)</text:p>
      <text:p text:style-name="Preformatted_20_Text"><text:s text:c="8"/>final_priority = (</text:p>
      <text:p text:style-name="Preformatted_20_Text"><text:s text:c="12"/>base_priority * 0.3 +</text:p>
      <text:p text:style-name="Preformatted_20_Text"><text:s text:c="12"/>system_factor * 20 * 0.2 +</text:p>
      <text:p text:style-name="Preformatted_20_Text"><text:s text:c="12"/>context_factor * 100 * 0.3 +</text:p>
      <text:p text:style-name="Preformatted_20_Text"><text:s text:c="12"/>effectiveness_factor * 100 * 0.1 +</text:p>
      <text:p text:style-name="Preformatted_20_Text"><text:s text:c="12"/>dependency_factor * 100 * 0.1</text:p>
      <text:p text:style-name="Preformatted_20_Text"><text:s text:c="8"/>)</text:p>
      <text:p text:style-name="Preformatted_20_Text"><text:s text:c="8"/></text:p>
      <text:p text:style-name="Preformatted_20_Text"><text:s text:c="8"/># Apply emergency overrides</text:p>
      <text:p text:style-name="Preformatted_20_Text"><text:s text:c="8"/>if context.get('emergency_situation'):</text:p>
      <text:p text:style-name="Preformatted_20_Text"><text:s text:c="12"/>final_priority = min(100, final_priority * 1.5)</text:p>
      <text:p text:style-name="Preformatted_20_Text"><text:s text:c="8"/></text:p>
      <text:p text:style-name="Preformatted_20_Text"><text:s text:c="8"/>return {</text:p>
      <text:p text:style-name="Preformatted_20_Text"><text:s text:c="12"/>'priority': min(100, max(0, final_priority)),</text:p>
      <text:p text:style-name="Preformatted_20_Text"><text:s text:c="12"/>'components': {</text:p>
      <text:p text:style-name="Preformatted_20_Text"><text:s text:c="16"/>'base': base_priority,</text:p>
      <text:p text:style-name="Preformatted_20_Text"><text:s text:c="16"/>'system': system_factor,</text:p>
      <text:p text:style-name="Preformatted_20_Text"><text:s text:c="16"/>'context': context_factor,</text:p>
      <text:p text:style-name="Preformatted_20_Text"><text:s text:c="16"/>'effectiveness': effectiveness_factor,</text:p>
      <text:p text:style-name="Preformatted_20_Text"><text:s text:c="16"/>'dependencies': dependency_factor</text:p>
      <text:p text:style-name="Preformatted_20_Text"><text:s text:c="12"/>},</text:p>
      <text:p text:style-name="Preformatted_20_Text"><text:soft-page-break/><text:s text:c="12"/>'recommended_action': self.determine_action(final_priority)</text:p>
      <text:p text:style-name="Preformatted_20_Text"><text:s text:c="8"/>}</text:p>
      <text:p text:style-name="Preformatted_20_Text"><text:s text:c="4"/></text:p>
      <text:p text:style-name="Preformatted_20_Text"><text:s text:c="4"/>def calculate_system_factor(self, capacity_assessment):</text:p>
      <text:p text:style-name="Preformatted_20_Text"><text:s text:c="8"/>"""</text:p>
      <text:p text:style-name="Preformatted_20_Text"><text:s text:c="8"/>Determine how much to prioritize protocols based on system state</text:p>
      <text:p text:style-name="Preformatted_20_Text"><text:s text:c="8"/>"""</text:p>
      <text:p text:style-name="Preformatted_20_Text"><text:s text:c="8"/>state = capacity_assessment['state']</text:p>
      <text:p text:style-name="Preformatted_20_Text"><text:s text:c="8"/></text:p>
      <text:p text:style-name="Preformatted_20_Text"><text:s text:c="8"/># Different states prioritize different protocol types</text:p>
      <text:p text:style-name="Preformatted_20_Text"><text:s text:c="8"/>system_factors = {</text:p>
      <text:p text:style-name="Preformatted_20_Text"><text:s text:c="12"/>'high_capacity': {</text:p>
      <text:p text:style-name="Preformatted_20_Text"><text:s text:c="16"/>'monitoring_protocols': 0.8,</text:p>
      <text:p text:style-name="Preformatted_20_Text"><text:s text:c="16"/>'analysis_protocols': 0.9,</text:p>
      <text:p text:style-name="Preformatted_20_Text"><text:s text:c="16"/>'preventive_protocols': 0.7,</text:p>
      <text:p text:style-name="Preformatted_20_Text"><text:s text:c="16"/>'learning_protocols': 1.0 <text:s/># Run learning when we have capacity</text:p>
      <text:p text:style-name="Preformatted_20_Text"><text:s text:c="12"/>},</text:p>
      <text:p text:style-name="Preformatted_20_Text"><text:s text:c="12"/>'normal_capacity': {</text:p>
      <text:p text:style-name="Preformatted_20_Text"><text:s text:c="16"/>'monitoring_protocols': 0.9,</text:p>
      <text:p text:style-name="Preformatted_20_Text"><text:s text:c="16"/>'analysis_protocols': 0.8,</text:p>
      <text:p text:style-name="Preformatted_20_Text"><text:s text:c="16"/>'preventive_protocols': 0.6,</text:p>
      <text:p text:style-name="Preformatted_20_Text"><text:s text:c="16"/>'learning_protocols': 0.5</text:p>
      <text:p text:style-name="Preformatted_20_Text"><text:s text:c="12"/>},</text:p>
      <text:p text:style-name="Preformatted_20_Text"><text:s text:c="12"/>'reduced_capacity': {</text:p>
      <text:p text:style-name="Preformatted_20_Text"><text:s text:c="16"/>'monitoring_protocols': 0.5,</text:p>
      <text:p text:style-name="Preformatted_20_Text"><text:s text:c="16"/>'analysis_protocols': 0.3,</text:p>
      <text:p text:style-name="Preformatted_20_Text"><text:s text:c="16"/>'preventive_protocols': 0.8, <text:s/># Prevention is key when stressed</text:p>
      <text:p text:style-name="Preformatted_20_Text"><text:s text:c="16"/>'learning_protocols': 0.1 <text:s/># Minimal learning</text:p>
      <text:p text:style-name="Preformatted_20_Text"><text:s text:c="12"/>},</text:p>
      <text:p text:style-name="Preformatted_20_Text"><text:s text:c="12"/>'critical_capacity': {</text:p>
      <text:p text:style-name="Preformatted_20_Text"><text:s text:c="16"/>'monitoring_protocols': 0.3,</text:p>
      <text:p text:style-name="Preformatted_20_Text"><text:s text:c="16"/>'analysis_protocols': 0.1,</text:p>
      <text:p text:style-name="Preformatted_20_Text"><text:s text:c="16"/>'preventive_protocols': 1.0, <text:s/># Max prevention</text:p>
      <text:p text:style-name="Preformatted_20_Text"><text:s text:c="16"/>'learning_protocols': 0.0 <text:s/># No learning</text:p>
      <text:p text:style-name="Preformatted_20_Text"><text:s text:c="12"/>},</text:p>
      <text:p text:style-name="Preformatted_20_Text"><text:s text:c="12"/>'overload': {</text:p>
      <text:p text:style-name="Preformatted_20_Text"><text:s text:c="16"/>'monitoring_protocols': 0.1,</text:p>
      <text:p text:style-name="Preformatted_20_Text"><text:s text:c="16"/>'analysis_protocols': 0.0,</text:p>
      <text:p text:style-name="Preformatted_20_Text"><text:s text:c="16"/>'preventive_protocols': 0.9, <text:s/># Bare minimum prevention</text:p>
      <text:p text:style-name="Preformatted_20_Text"><text:s text:c="16"/>'learning_protocols': 0.0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eturn system_factors[state]</text:p>
      <text:p text:style-name="Preformatted_20_Text"><text:s text:c="4"/></text:p>
      <text:p text:style-name="Preformatted_20_Text"><text:s text:c="4"/>def calculate_context_factor(self, context, protocol_name):</text:p>
      <text:p text:style-name="Preformatted_20_Text"><text:s text:c="8"/>"""</text:p>
      <text:p text:style-name="Preformatted_20_Text"><text:s text:c="8"/>Determine protocol importance based on current situation</text:p>
      <text:p text:style-name="Preformatted_20_Text"><text:s text:c="8"/>"""</text:p>
      <text:p text:style-name="Preformatted_20_Text"><text:s text:c="8"/>protocol = self.protocol_registry[protocol_name]</text:p>
      <text:p text:style-name="Preformatted_20_Text"><text:s text:c="8"/>context_criticality = protocol.get('criticality_contexts', {})</text:p>
      <text:p text:style-name="Preformatted_20_Text"><text:s text:c="8"/></text:p>
      <text:p text:style-name="Preformatted_20_Text"><text:s text:c="8"/># Check each context dimension</text:p>
      <text:p text:style-name="Preformatted_20_Text"><text:s text:c="8"/>factors = []</text:p>
      <text:p text:style-name="Preformatted_20_Text"><text:s text:c="8"/></text:p>
      <text:p text:style-name="Preformatted_20_Text"><text:s text:c="8"/># 1. User state context</text:p>
      <text:p text:style-name="Preformatted_20_Text"><text:s text:c="8"/>if context.get('user_state') in context_criticality.get('user_states', {}):</text:p>
      <text:p text:style-name="Preformatted_20_Text"><text:s text:c="12"/>factors.append(</text:p>
      <text:p text:style-name="Preformatted_20_Text"><text:s text:c="16"/>context_criticality['user_states'][context['user_state']]</text:p>
      <text:p text:style-name="Preformatted_20_Text"><text:s text:c="12"/>)</text:p>
      <text:p text:style-name="Preformatted_20_Text"><text:s text:c="8"/></text:p>
      <text:p text:style-name="Preformatted_20_Text"><text:s text:c="8"/># 2. Safety context</text:p>
      <text:p text:style-name="Preformatted_20_Text"><text:s text:c="8"/>if context.get('safety_concerns'):</text:p>
      <text:p text:style-name="Preformatted_20_Text"><text:soft-page-break/><text:s text:c="12"/>safety_factor = context_criticality.get('safety_impact', 0)</text:p>
      <text:p text:style-name="Preformatted_20_Text"><text:s text:c="12"/>factors.append(safety_factor * context['safety_concerns'])</text:p>
      <text:p text:style-name="Preformatted_20_Text"><text:s text:c="8"/></text:p>
      <text:p text:style-name="Preformatted_20_Text"><text:s text:c="8"/># 3. Time context (time of day, duration, etc.)</text:p>
      <text:p text:style-name="Preformatted_20_Text"><text:s text:c="8"/>time_factor = self.calculate_time_factor(context, protocol_name)</text:p>
      <text:p text:style-name="Preformatted_20_Text"><text:s text:c="8"/>factors.append(time_factor)</text:p>
      <text:p text:style-name="Preformatted_20_Text"><text:s text:c="8"/></text:p>
      <text:p text:style-name="Preformatted_20_Text"><text:s text:c="8"/># 4. Historical context (what's worked before)</text:p>
      <text:p text:style-name="Preformatted_20_Text"><text:s text:c="8"/>historical_factor = self.get_historical_context_factor(</text:p>
      <text:p text:style-name="Preformatted_20_Text"><text:s text:c="12"/>context.get('user_id'),</text:p>
      <text:p text:style-name="Preformatted_20_Text"><text:s text:c="12"/>protocol_name,</text:p>
      <text:p text:style-name="Preformatted_20_Text"><text:s text:c="12"/>context.get('similar_situations', [])</text:p>
      <text:p text:style-name="Preformatted_20_Text"><text:s text:c="8"/>)</text:p>
      <text:p text:style-name="Preformatted_20_Text"><text:s text:c="8"/>factors.append(historical_factor)</text:p>
      <text:p text:style-name="Preformatted_20_Text"><text:s text:c="8"/></text:p>
      <text:p text:style-name="P5"><text:s text:c="8"/>return np.mean(factors) if factors else 0.5</text:p>
      <text:h text:style-name="Heading_20_3" text:outline-level="3"><text:span text:style-name="Strong_20_Emphasis">B. Protocol Dependency &amp; Conflict Mapping</text:span></text:h>
      <text:p text:style-name="Text_20_body">python</text:p>
      <text:p text:style-name="Preformatted_20_Text">class ProtocolRelationshipMapper:</text:p>
      <text:p text:style-name="Preformatted_20_Text"><text:s text:c="4"/>def __init__(self):</text:p>
      <text:p text:style-name="Preformatted_20_Text"><text:s text:c="8"/>self.dependency_graph = nx.DiGraph()</text:p>
      <text:p text:style-name="Preformatted_20_Text"><text:s text:c="8"/>self.conflict_matrix = {}</text:p>
      <text:p text:style-name="Preformatted_20_Text"><text:s text:c="8"/>self.synergy_scores = {}</text:p>
      <text:p text:style-name="Preformatted_20_Text"><text:s text:c="4"/></text:p>
      <text:p text:style-name="Preformatted_20_Text"><text:s text:c="4"/>def map_protocol_relationships(self):</text:p>
      <text:p text:style-name="Preformatted_20_Text"><text:s text:c="8"/>"""</text:p>
      <text:p text:style-name="Preformatted_20_Text"><text:s text:c="8"/>Create relationship maps between protocols</text:p>
      <text:p text:style-name="Preformatted_20_Text"><text:s text:c="8"/>"""</text:p>
      <text:p text:style-name="Preformatted_20_Text"><text:s text:c="8"/># Example mappings</text:p>
      <text:p text:style-name="Preformatted_20_Text"><text:s text:c="8"/>relationships = {</text:p>
      <text:p text:style-name="Preformatted_20_Text"><text:s text:c="12"/>'neurological_assessment': {</text:p>
      <text:p text:style-name="Preformatted_20_Text"><text:s text:c="16"/>'depends_on': ['somatic_monitoring'],</text:p>
      <text:p text:style-name="Preformatted_20_Text"><text:s text:c="16"/>'conflicts_with': ['deep_learning_analysis'], <text:s/># Both CPU-intensive</text:p>
      <text:p text:style-name="Preformatted_20_Text"><text:s text:c="16"/>'synergizes_with': ['behavioral_analysis', 'age_approximation'],</text:p>
      <text:p text:style-name="Preformatted_20_Text"><text:s text:c="16"/>'enhances': ['crisis_detection'],</text:p>
      <text:p text:style-name="Preformatted_20_Text"><text:s text:c="16"/>'reduces_need_for': ['generic_monitoring']</text:p>
      <text:p text:style-name="Preformatted_20_Text"><text:s text:c="12"/>},</text:p>
      <text:p text:style-name="Preformatted_20_Text"><text:s text:c="12"/>'crisis_intervention': {</text:p>
      <text:p text:style-name="Preformatted_20_Text"><text:s text:c="16"/>'depends_on': ['neurological_assessment', 'behavioral_analysis'],</text:p>
      <text:p text:style-name="Preformatted_20_Text"><text:s text:c="16"/>'supersedes': ['all_other_protocols'], <text:s/># Emergency override</text:p>
      <text:p text:style-name="Preformatted_20_Text"><text:s text:c="16"/>'requires_full_resources': True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Build graph</text:p>
      <text:p text:style-name="Preformatted_20_Text"><text:s text:c="8"/>for protocol, rels in relationships.items():</text:p>
      <text:p text:style-name="Preformatted_20_Text"><text:s text:c="12"/>self.dependency_graph.add_node(protocol)</text:p>
      <text:p text:style-name="Preformatted_20_Text"><text:s text:c="12"/></text:p>
      <text:p text:style-name="Preformatted_20_Text"><text:s text:c="12"/>for dep in rels.get('depends_on', []):</text:p>
      <text:p text:style-name="Preformatted_20_Text"><text:s text:c="16"/>self.dependency_graph.add_edge(dep, protocol, weight=1.0)</text:p>
      <text:p text:style-name="Preformatted_20_Text"><text:s text:c="12"/></text:p>
      <text:p text:style-name="Preformatted_20_Text"><text:s text:c="12"/>for conflict in rels.get('conflicts_with', []):</text:p>
      <text:p text:style-name="Preformatted_20_Text"><text:s text:c="16"/>self.conflict_matrix.setdefault(protocol, {})[conflict] = -1.0</text:p>
      <text:p text:style-name="Preformatted_20_Text"><text:s text:c="16"/>self.conflict_matrix.setdefault(conflict, {})[protocol] = -1.0</text:p>
      <text:p text:style-name="Preformatted_20_Text"><text:s text:c="12"/></text:p>
      <text:p text:style-name="Preformatted_20_Text"><text:s text:c="12"/>for synergy in rels.get('synergizes_with', []):</text:p>
      <text:p text:style-name="Preformatted_20_Text"><text:s text:c="16"/>self.synergy_scores.setdefault(protocol, {})[synergy] = 0.7</text:p>
      <text:p text:style-name="Preformatted_20_Text"><text:s text:c="4"/></text:p>
      <text:p text:style-name="Preformatted_20_Text"><text:soft-page-break/><text:s text:c="4"/>def calculate_dependency_factor(self, protocol_name, active_protocols):</text:p>
      <text:p text:style-name="Preformatted_20_Text"><text:s text:c="8"/>"""</text:p>
      <text:p text:style-name="Preformatted_20_Text"><text:s text:c="8"/>Calculate how much this protocol depends on/conflicts with currently running protocols</text:p>
      <text:p text:style-name="Preformatted_20_Text"><text:s text:c="8"/>"""</text:p>
      <text:p text:style-name="Preformatted_20_Text"><text:s text:c="8"/>if not active_protocols:</text:p>
      <text:p text:style-name="Preformatted_20_Text"><text:s text:c="12"/>return 0.5 <text:s/># Neutral</text:p>
      <text:p text:style-name="Preformatted_20_Text"><text:s text:c="8"/></text:p>
      <text:p text:style-name="Preformatted_20_Text"><text:s text:c="8"/>scores = []</text:p>
      <text:p text:style-name="Preformatted_20_Text"><text:s text:c="8"/></text:p>
      <text:p text:style-name="Preformatted_20_Text"><text:s text:c="8"/>for active in active_protocols:</text:p>
      <text:p text:style-name="Preformatted_20_Text"><text:s text:c="12"/># Check for conflicts</text:p>
      <text:p text:style-name="Preformatted_20_Text"><text:s text:c="12"/>conflict_score = self.conflict_matrix.get(protocol_name, {}).get(active, 0)</text:p>
      <text:p text:style-name="Preformatted_20_Text"><text:s text:c="12"/>if conflict_score &lt; 0:</text:p>
      <text:p text:style-name="Preformatted_20_Text"><text:s text:c="16"/>scores.append(conflict_score) <text:s/># Negative impact</text:p>
      <text:p text:style-name="Preformatted_20_Text"><text:s text:c="12"/></text:p>
      <text:p text:style-name="Preformatted_20_Text"><text:s text:c="12"/># Check for synergies</text:p>
      <text:p text:style-name="Preformatted_20_Text"><text:s text:c="12"/>synergy_score = self.synergy_scores.get(protocol_name, {}).get(active, 0)</text:p>
      <text:p text:style-name="Preformatted_20_Text"><text:s text:c="12"/>if synergy_score &gt; 0:</text:p>
      <text:p text:style-name="Preformatted_20_Text"><text:s text:c="16"/>scores.append(synergy_score) <text:s/># Positive impact</text:p>
      <text:p text:style-name="Preformatted_20_Text"><text:s text:c="12"/></text:p>
      <text:p text:style-name="Preformatted_20_Text"><text:s text:c="12"/># Check dependencies</text:p>
      <text:p text:style-name="Preformatted_20_Text"><text:s text:c="12"/>if protocol_name in self.dependency_graph:</text:p>
      <text:p text:style-name="Preformatted_20_Text"><text:s text:c="16"/>if active in nx.ancestors(self.dependency_graph, protocol_name):</text:p>
      <text:p text:style-name="Preformatted_20_Text"><text:s text:c="20"/>scores.append(0.8) <text:s/># Dependency satisfied</text:p>
      <text:p text:style-name="Preformatted_20_Text"><text:s text:c="16"/>elif protocol_name in nx.ancestors(self.dependency_graph, active):</text:p>
      <text:p text:style-name="Preformatted_20_Text"><text:s text:c="20"/>scores.append(0.3) <text:s/># This enables others</text:p>
      <text:p text:style-name="Preformatted_20_Text"><text:s text:c="8"/></text:p>
      <text:p text:style-name="P5"><text:s text:c="8"/>return np.mean(scores) if scores else 0.5</text:p>
      <text:h text:style-name="Heading_20_2" text:outline-level="2"><text:span text:style-name="Strong_20_Emphasis">3. Adaptive Learning System</text:span></text:h>
      <text:h text:style-name="Heading_20_3" text:outline-level="3"><text:span text:style-name="Strong_20_Emphasis">A. Outcome-Based Protocol Effectiveness Learning</text:span></text:h>
      <text:p text:style-name="Text_20_body">python</text:p>
      <text:p text:style-name="Preformatted_20_Text">class ProtocolEffectivenessLearner:</text:p>
      <text:p text:style-name="Preformatted_20_Text"><text:s text:c="4"/>def __init__(self):</text:p>
      <text:p text:style-name="Preformatted_20_Text"><text:s text:c="8"/>self.outcome_database = {}</text:p>
      <text:p text:style-name="Preformatted_20_Text"><text:s text:c="8"/>self.protocol_performance_history = {}</text:p>
      <text:p text:style-name="Preformatted_20_Text"><text:s text:c="8"/>self.adaptation_rules = self.load_adaptation_rules()</text:p>
      <text:p text:style-name="Preformatted_20_Text"><text:s text:c="4"/></text:p>
      <text:p text:style-name="Preformatted_20_Text"><text:s text:c="4"/>def record_protocol_outcome(self, protocol_name, outcome_data):</text:p>
      <text:p text:style-name="Preformatted_20_Text"><text:s text:c="8"/>"""</text:p>
      <text:p text:style-name="Preformatted_20_Text"><text:s text:c="8"/>Record the outcome of running a protocol</text:p>
      <text:p text:style-name="Preformatted_20_Text"><text:s text:c="8"/>"""</text:p>
      <text:p text:style-name="Preformatted_20_Text"><text:s text:c="8"/>entry = {</text:p>
      <text:p text:style-name="Preformatted_20_Text"><text:s text:c="12"/>'timestamp': time.time(),</text:p>
      <text:p text:style-name="Preformatted_20_Text"><text:s text:c="12"/>'protocol': protocol_name,</text:p>
      <text:p text:style-name="Preformatted_20_Text"><text:s text:c="12"/>'resource_usage': outcome_data['resource_usage'],</text:p>
      <text:p text:style-name="Preformatted_20_Text"><text:s text:c="12"/>'effectiveness_score': outcome_data['effectiveness_score'],</text:p>
      <text:p text:style-name="Preformatted_20_Text"><text:s text:c="12"/>'context': outcome_data['context'],</text:p>
      <text:p text:style-name="Preformatted_20_Text"><text:s text:c="12"/>'system_state': outcome_data['system_state'],</text:p>
      <text:p text:style-name="Preformatted_20_Text"><text:s text:c="12"/>'user_response': outcome_data.get('user_response'),</text:p>
      <text:p text:style-name="Preformatted_20_Text"><text:s text:c="12"/>'alternative_protocols_considered': outcome_data.get('alternatives', [])</text:p>
      <text:p text:style-name="Preformatted_20_Text"><text:s text:c="8"/>}</text:p>
      <text:p text:style-name="Preformatted_20_Text"><text:s text:c="8"/></text:p>
      <text:p text:style-name="Preformatted_20_Text"><text:soft-page-break/><text:s text:c="8"/># Store outcome</text:p>
      <text:p text:style-name="Preformatted_20_Text"><text:s text:c="8"/>self.outcome_database.setdefault(protocol_name, []).append(entry)</text:p>
      <text:p text:style-name="Preformatted_20_Text"><text:s text:c="8"/></text:p>
      <text:p text:style-name="Preformatted_20_Text"><text:s text:c="8"/># Update performance metrics</text:p>
      <text:p text:style-name="Preformatted_20_Text"><text:s text:c="8"/>self.update_performance_metrics(protocol_name, entry)</text:p>
      <text:p text:style-name="Preformatted_20_Text"><text:s text:c="8"/></text:p>
      <text:p text:style-name="Preformatted_20_Text"><text:s text:c="8"/># Check if adaptation is needed</text:p>
      <text:p text:style-name="Preformatted_20_Text"><text:s text:c="8"/>adaptation = self.check_for_adaptation_needed(protocol_name)</text:p>
      <text:p text:style-name="Preformatted_20_Text"><text:s text:c="8"/></text:p>
      <text:p text:style-name="Preformatted_20_Text"><text:s text:c="8"/>return adaptation</text:p>
      <text:p text:style-name="Preformatted_20_Text"><text:s text:c="4"/></text:p>
      <text:p text:style-name="Preformatted_20_Text"><text:s text:c="4"/>def calculate_effectiveness_score(self, protocol_name, outcome_data):</text:p>
      <text:p text:style-name="Preformatted_20_Text"><text:s text:c="8"/>"""</text:p>
      <text:p text:style-name="Preformatted_20_Text"><text:s text:c="8"/>Calculate how effective the protocol was in this context</text:p>
      <text:p text:style-name="Preformatted_20_Text"><text:s text:c="8"/>"""</text:p>
      <text:p text:style-name="Preformatted_20_Text"><text:s text:c="8"/>components = []</text:p>
      <text:p text:style-name="Preformatted_20_Text"><text:s text:c="8"/></text:p>
      <text:p text:style-name="Preformatted_20_Text"><text:s text:c="8"/># 1. Resource efficiency score</text:p>
      <text:p text:style-name="Preformatted_20_Text"><text:s text:c="8"/>resource_score = self.calculate_resource_efficiency(</text:p>
      <text:p text:style-name="Preformatted_20_Text"><text:s text:c="12"/>outcome_data['resource_usage'],</text:p>
      <text:p text:style-name="Preformatted_20_Text"><text:s text:c="12"/>outcome_data['system_state']['capacity']</text:p>
      <text:p text:style-name="Preformatted_20_Text"><text:s text:c="8"/>)</text:p>
      <text:p text:style-name="Preformatted_20_Text"><text:s text:c="8"/>components.append(('resource_efficiency', resource_score, 0.3))</text:p>
      <text:p text:style-name="Preformatted_20_Text"><text:s text:c="8"/></text:p>
      <text:p text:style-name="Preformatted_20_Text"><text:s text:c="8"/># 2. Outcome success score</text:p>
      <text:p text:style-name="Preformatted_20_Text"><text:s text:c="8"/>success_score = self.calculate_outcome_success(</text:p>
      <text:p text:style-name="Preformatted_20_Text"><text:s text:c="12"/>outcome_data['context'],</text:p>
      <text:p text:style-name="Preformatted_20_Text"><text:s text:c="12"/>outcome_data.get('user_response', {})</text:p>
      <text:p text:style-name="Preformatted_20_Text"><text:s text:c="8"/>)</text:p>
      <text:p text:style-name="Preformatted_20_Text"><text:s text:c="8"/>components.append(('outcome_success', success_score, 0.4))</text:p>
      <text:p text:style-name="Preformatted_20_Text"><text:s text:c="8"/></text:p>
      <text:p text:style-name="Preformatted_20_Text"><text:s text:c="8"/># 3. System impact score</text:p>
      <text:p text:style-name="Preformatted_20_Text"><text:s text:c="8"/>system_score = self.calculate_system_impact(</text:p>
      <text:p text:style-name="Preformatted_20_Text"><text:s text:c="12"/>outcome_data['system_state'],</text:p>
      <text:p text:style-name="Preformatted_20_Text"><text:s text:c="12"/>outcome_data['resource_usage']</text:p>
      <text:p text:style-name="Preformatted_20_Text"><text:s text:c="8"/>)</text:p>
      <text:p text:style-name="Preformatted_20_Text"><text:s text:c="8"/>components.append(('system_impact', system_score, 0.2))</text:p>
      <text:p text:style-name="Preformatted_20_Text"><text:s text:c="8"/></text:p>
      <text:p text:style-name="Preformatted_20_Text"><text:s text:c="8"/># 4. Alternative comparison score</text:p>
      <text:p text:style-name="Preformatted_20_Text"><text:s text:c="8"/>alternative_score = self.compare_with_alternatives(</text:p>
      <text:p text:style-name="Preformatted_20_Text"><text:s text:c="12"/>protocol_name,</text:p>
      <text:p text:style-name="Preformatted_20_Text"><text:s text:c="12"/>outcome_data['context'],</text:p>
      <text:p text:style-name="Preformatted_20_Text"><text:s text:c="12"/>outcome_data.get('alternative_protocols_considered', [])</text:p>
      <text:p text:style-name="Preformatted_20_Text"><text:s text:c="8"/>)</text:p>
      <text:p text:style-name="Preformatted_20_Text"><text:s text:c="8"/>components.append(('alternative_comparison', alternative_score, 0.1))</text:p>
      <text:p text:style-name="Preformatted_20_Text"><text:s text:c="8"/></text:p>
      <text:p text:style-name="Preformatted_20_Text"><text:s text:c="8"/># Calculate weighted effectiveness</text:p>
      <text:p text:style-name="Preformatted_20_Text"><text:s text:c="8"/>effectiveness = sum(score * weight for _, score, weight in components)</text:p>
      <text:p text:style-name="Preformatted_20_Text"><text:s text:c="8"/></text:p>
      <text:p text:style-name="Preformatted_20_Text"><text:s text:c="8"/>return {</text:p>
      <text:p text:style-name="Preformatted_20_Text"><text:s text:c="12"/>'overall': effectiveness,</text:p>
      <text:p text:style-name="Preformatted_20_Text"><text:s text:c="12"/>'components': {name: score for name, score, _ in components}</text:p>
      <text:p text:style-name="Preformatted_20_Text"><text:s text:c="8"/>}</text:p>
      <text:p text:style-name="Preformatted_20_Text"><text:s text:c="4"/></text:p>
      <text:p text:style-name="Preformatted_20_Text"><text:s text:c="4"/>def update_performance_metrics(self, protocol_name, outcome_entry):</text:p>
      <text:p text:style-name="Preformatted_20_Text"><text:s text:c="8"/>"""</text:p>
      <text:p text:style-name="Preformatted_20_Text"><text:s text:c="8"/>Update historical performance data for this protocol</text:p>
      <text:p text:style-name="Preformatted_20_Text"><text:s text:c="8"/>"""</text:p>
      <text:p text:style-name="Preformatted_20_Text"><text:s text:c="8"/>if protocol_name not in self.protocol_performance_history:</text:p>
      <text:p text:style-name="Preformatted_20_Text"><text:s text:c="12"/>self.protocol_performance_history[protocol_name] = {</text:p>
      <text:p text:style-name="Preformatted_20_Text"><text:s text:c="16"/>'effectiveness_trend': [],</text:p>
      <text:p text:style-name="Preformatted_20_Text"><text:s text:c="16"/>'resource_usage_trend': [],</text:p>
      <text:p text:style-name="Preformatted_20_Text"><text:s text:c="16"/>'context_success_rates': {},</text:p>
      <text:p text:style-name="Preformatted_20_Text"><text:s text:c="16"/>'failure_patterns': [],</text:p>
      <text:p text:style-name="Preformatted_20_Text"><text:soft-page-break/><text:s text:c="16"/>'optimal_conditions': []</text:p>
      <text:p text:style-name="Preformatted_20_Text"><text:s text:c="12"/>}</text:p>
      <text:p text:style-name="Preformatted_20_Text"><text:s text:c="8"/></text:p>
      <text:p text:style-name="Preformatted_20_Text"><text:s text:c="8"/>history = self.protocol_performance_history[protocol_name]</text:p>
      <text:p text:style-name="Preformatted_20_Text"><text:s text:c="8"/></text:p>
      <text:p text:style-name="Preformatted_20_Text"><text:s text:c="8"/># Update effectiveness trend</text:p>
      <text:p text:style-name="Preformatted_20_Text"><text:s text:c="8"/>history['effectiveness_trend'].append({</text:p>
      <text:p text:style-name="Preformatted_20_Text"><text:s text:c="12"/>'timestamp': outcome_entry['timestamp'],</text:p>
      <text:p text:style-name="Preformatted_20_Text"><text:s text:c="12"/>'score': outcome_entry['effectiveness_score']['overall'],</text:p>
      <text:p text:style-name="Preformatted_20_Text"><text:s text:c="12"/>'context': outcome_entry['context'].get('situation_type', 'unknown')</text:p>
      <text:p text:style-name="Preformatted_20_Text"><text:s text:c="8"/>})</text:p>
      <text:p text:style-name="Preformatted_20_Text"><text:s text:c="8"/></text:p>
      <text:p text:style-name="Preformatted_20_Text"><text:s text:c="8"/># Update context success rates</text:p>
      <text:p text:style-name="Preformatted_20_Text"><text:s text:c="8"/>context_key = self.create_context_key(outcome_entry['context'])</text:p>
      <text:p text:style-name="Preformatted_20_Text"><text:s text:c="8"/>if context_key not in history['context_success_rates']:</text:p>
      <text:p text:style-name="Preformatted_20_Text"><text:s text:c="12"/>history['context_success_rates'][context_key] = {</text:p>
      <text:p text:style-name="Preformatted_20_Text"><text:s text:c="16"/>'successes': 0,</text:p>
      <text:p text:style-name="Preformatted_20_Text"><text:s text:c="16"/>'attempts': 0,</text:p>
      <text:p text:style-name="Preformatted_20_Text"><text:s text:c="16"/>'avg_effectiveness': 0</text:p>
      <text:p text:style-name="Preformatted_20_Text"><text:s text:c="12"/>}</text:p>
      <text:p text:style-name="Preformatted_20_Text"><text:s text:c="8"/></text:p>
      <text:p text:style-name="Preformatted_20_Text"><text:s text:c="8"/>ctx = history['context_success_rates'][context_key]</text:p>
      <text:p text:style-name="Preformatted_20_Text"><text:s text:c="8"/>ctx['attempts'] += 1</text:p>
      <text:p text:style-name="Preformatted_20_Text"><text:s text:c="8"/>if outcome_entry['effectiveness_score']['overall'] &gt; 0.7:</text:p>
      <text:p text:style-name="Preformatted_20_Text"><text:s text:c="12"/>ctx['successes'] += 1</text:p>
      <text:p text:style-name="Preformatted_20_Text"><text:s text:c="8"/>ctx['avg_effectiveness'] = (</text:p>
      <text:p text:style-name="Preformatted_20_Text"><text:s text:c="12"/>(ctx['avg_effectiveness'] * (ctx['attempts'] - 1) + </text:p>
      <text:p text:style-name="Preformatted_20_Text"><text:s text:c="13"/>outcome_entry['effectiveness_score']['overall']) / </text:p>
      <text:p text:style-name="Preformatted_20_Text"><text:s text:c="12"/>ctx['attempts']</text:p>
      <text:p text:style-name="Preformatted_20_Text"><text:s text:c="8"/>)</text:p>
      <text:p text:style-name="Preformatted_20_Text"><text:s text:c="8"/></text:p>
      <text:p text:style-name="Preformatted_20_Text"><text:s text:c="8"/># Store optimal conditions if highly effective</text:p>
      <text:p text:style-name="Preformatted_20_Text"><text:s text:c="8"/>if outcome_entry['effectiveness_score']['overall'] &gt; 0.85:</text:p>
      <text:p text:style-name="Preformatted_20_Text"><text:s text:c="12"/>history['optimal_conditions'].append({</text:p>
      <text:p text:style-name="Preformatted_20_Text"><text:s text:c="16"/>'context': outcome_entry['context'],</text:p>
      <text:p text:style-name="Preformatted_20_Text"><text:s text:c="16"/>'system_state': outcome_entry['system_state'],</text:p>
      <text:p text:style-name="Preformatted_20_Text"><text:s text:c="16"/>'effectiveness': outcome_entry['effectiveness_score']</text:p>
      <text:p text:style-name="Preformatted_20_Text"><text:s text:c="12"/>})</text:p>
      <text:p text:style-name="Preformatted_20_Text"><text:s text:c="8"/></text:p>
      <text:p text:style-name="Preformatted_20_Text"><text:s text:c="8"/># Prune old data to prevent memory issues</text:p>
      <text:p text:style-name="P5"><text:s text:c="8"/>self.prune_old_data(history)</text:p>
      <text:h text:style-name="Heading_20_3" text:outline-level="3"><text:span text:style-name="Strong_20_Emphasis">B. Pattern Recognition for Optimal Protocol Selection</text:span></text:h>
      <text:p text:style-name="Text_20_body">python</text:p>
      <text:p text:style-name="Preformatted_20_Text">class ProtocolPatternRecognizer:</text:p>
      <text:p text:style-name="Preformatted_20_Text"><text:s text:c="4"/>def __init__(self):</text:p>
      <text:p text:style-name="Preformatted_20_Text"><text:s text:c="8"/>self.pattern_database = {}</text:p>
      <text:p text:style-name="Preformatted_20_Text"><text:s text:c="8"/>self.cluster_models = {}</text:p>
      <text:p text:style-name="Preformatted_20_Text"><text:s text:c="8"/>self.recommendation_engine = {}</text:p>
      <text:p text:style-name="Preformatted_20_Text"><text:s text:c="4"/></text:p>
      <text:p text:style-name="Preformatted_20_Text"><text:s text:c="4"/>def analyze_success_patterns(self, protocol_history):</text:p>
      <text:p text:style-name="Preformatted_20_Text"><text:s text:c="8"/>"""</text:p>
      <text:p text:style-name="Preformatted_20_Text"><text:s text:c="8"/>Identify patterns in successful protocol executions</text:p>
      <text:p text:style-name="Preformatted_20_Text"><text:s text:c="8"/>"""</text:p>
      <text:p text:style-name="Preformatted_20_Text"><text:s text:c="8"/>patterns = {</text:p>
      <text:p text:style-name="Preformatted_20_Text"><text:s text:c="12"/>'context_patterns': {},</text:p>
      <text:p text:style-name="Preformatted_20_Text"><text:s text:c="12"/>'system_state_patterns': {},</text:p>
      <text:p text:style-name="Preformatted_20_Text"><text:s text:c="12"/>'temporal_patterns': {},</text:p>
      <text:p text:style-name="Preformatted_20_Text"><text:s text:c="12"/>'sequence_patterns': {}</text:p>
      <text:p text:style-name="Preformatted_20_Text"><text:s text:c="8"/>}</text:p>
      <text:p text:style-name="Preformatted_20_Text"><text:s text:c="8"/></text:p>
      <text:p text:style-name="Preformatted_20_Text"><text:soft-page-break/><text:s text:c="8"/># Cluster successful executions</text:p>
      <text:p text:style-name="Preformatted_20_Text"><text:s text:c="8"/>successful = [h for h in protocol_history </text:p>
      <text:p text:style-name="Preformatted_20_Text"><text:s text:c="21"/>if h['effectiveness_score']['overall'] &gt; 0.8]</text:p>
      <text:p text:style-name="Preformatted_20_Text"><text:s text:c="8"/></text:p>
      <text:p text:style-name="Preformatted_20_Text"><text:s text:c="8"/>if len(successful) &lt; 5:</text:p>
      <text:p text:style-name="Preformatted_20_Text"><text:s text:c="12"/>return patterns <text:s/># Not enough data</text:p>
      <text:p text:style-name="Preformatted_20_Text"><text:s text:c="8"/></text:p>
      <text:p text:style-name="Preformatted_20_Text"><text:s text:c="8"/># Analyze context patterns</text:p>
      <text:p text:style-name="Preformatted_20_Text"><text:s text:c="8"/>context_features = self.extract_context_features(successful)</text:p>
      <text:p text:style-name="Preformatted_20_Text"><text:s text:c="8"/>context_clusters = self.cluster_contexts(context_features)</text:p>
      <text:p text:style-name="Preformatted_20_Text"><text:s text:c="8"/></text:p>
      <text:p text:style-name="Preformatted_20_Text"><text:s text:c="8"/>patterns['context_patterns'] = {</text:p>
      <text:p text:style-name="Preformatted_20_Text"><text:s text:c="12"/>'clusters': context_clusters,</text:p>
      <text:p text:style-name="Preformatted_20_Text"><text:s text:c="12"/>'common_features': self.find_common_features(context_clusters)</text:p>
      <text:p text:style-name="Preformatted_20_Text"><text:s text:c="8"/>}</text:p>
      <text:p text:style-name="Preformatted_20_Text"><text:s text:c="8"/></text:p>
      <text:p text:style-name="Preformatted_20_Text"><text:s text:c="8"/># Analyze system state patterns</text:p>
      <text:p text:style-name="Preformatted_20_Text"><text:s text:c="8"/>system_states = [h['system_state'] for h in successful]</text:p>
      <text:p text:style-name="Preformatted_20_Text"><text:s text:c="8"/>optimal_states = self.find_optimal_system_states(system_states)</text:p>
      <text:p text:style-name="Preformatted_20_Text"><text:s text:c="8"/></text:p>
      <text:p text:style-name="Preformatted_20_Text"><text:s text:c="8"/>patterns['system_state_patterns'] = {</text:p>
      <text:p text:style-name="Preformatted_20_Text"><text:s text:c="12"/>'optimal_ranges': optimal_states,</text:p>
      <text:p text:style-name="Preformatted_20_Text"><text:s text:c="12"/>'avoid_states': self.find_avoid_states(protocol_history)</text:p>
      <text:p text:style-name="Preformatted_20_Text"><text:s text:c="8"/>}</text:p>
      <text:p text:style-name="Preformatted_20_Text"><text:s text:c="8"/></text:p>
      <text:p text:style-name="Preformatted_20_Text"><text:s text:c="8"/># Analyze temporal patterns (time of day, day of week, etc.)</text:p>
      <text:p text:style-name="Preformatted_20_Text"><text:s text:c="8"/>temporal_features = self.extract_temporal_features(successful)</text:p>
      <text:p text:style-name="Preformatted_20_Text"><text:s text:c="8"/>if temporal_features:</text:p>
      <text:p text:style-name="Preformatted_20_Text"><text:s text:c="12"/>patterns['temporal_patterns'] = self.identify_temporal_patterns(</text:p>
      <text:p text:style-name="Preformatted_20_Text"><text:s text:c="16"/>temporal_features</text:p>
      <text:p text:style-name="Preformatted_20_Text"><text:s text:c="12"/>)</text:p>
      <text:p text:style-name="Preformatted_20_Text"><text:s text:c="8"/></text:p>
      <text:p text:style-name="Preformatted_20_Text"><text:s text:c="8"/># Analyze sequence patterns (which protocols work well together)</text:p>
      <text:p text:style-name="Preformatted_20_Text"><text:s text:c="8"/>sequences = self.extract_protocol_sequences(protocol_history)</text:p>
      <text:p text:style-name="Preformatted_20_Text"><text:s text:c="8"/>patterns['sequence_patterns'] = self.identify_effective_sequences(sequences)</text:p>
      <text:p text:style-name="Preformatted_20_Text"><text:s text:c="8"/></text:p>
      <text:p text:style-name="Preformatted_20_Text"><text:s text:c="8"/>return patterns</text:p>
      <text:p text:style-name="Preformatted_20_Text"><text:s text:c="4"/></text:p>
      <text:p text:style-name="Preformatted_20_Text"><text:s text:c="4"/>def recommend_optimal_protocol(self, current_context, system_state):</text:p>
      <text:p text:style-name="Preformatted_20_Text"><text:s text:c="8"/>"""</text:p>
      <text:p text:style-name="Preformatted_20_Text"><text:s text:c="8"/>Recommend the best protocol(s) for current conditions</text:p>
      <text:p text:style-name="Preformatted_20_Text"><text:s text:c="8"/>"""</text:p>
      <text:p text:style-name="Preformatted_20_Text"><text:s text:c="8"/>recommendations = []</text:p>
      <text:p text:style-name="Preformatted_20_Text"><text:s text:c="8"/></text:p>
      <text:p text:style-name="Preformatted_20_Text"><text:s text:c="8"/># Check for exact pattern matches</text:p>
      <text:p text:style-name="Preformatted_20_Text"><text:s text:c="8"/>exact_match = self.find_exact_pattern_match(current_context, system_state)</text:p>
      <text:p text:style-name="Preformatted_20_Text"><text:s text:c="8"/>if exact_match:</text:p>
      <text:p text:style-name="Preformatted_20_Text"><text:s text:c="12"/>recommendations.append({</text:p>
      <text:p text:style-name="Preformatted_20_Text"><text:s text:c="16"/>'protocol': exact_match['protocol'],</text:p>
      <text:p text:style-name="Preformatted_20_Text"><text:s text:c="16"/>'confidence': 0.95,</text:p>
      <text:p text:style-name="Preformatted_20_Text"><text:s text:c="16"/>'match_type': 'exact_pattern',</text:p>
      <text:p text:style-name="Preformatted_20_Text"><text:s text:c="16"/>'expected_effectiveness': exact_match['avg_effectiveness']</text:p>
      <text:p text:style-name="Preformatted_20_Text"><text:s text:c="12"/>})</text:p>
      <text:p text:style-name="Preformatted_20_Text"><text:s text:c="8"/></text:p>
      <text:p text:style-name="Preformatted_20_Text"><text:s text:c="8"/># Check for similar contexts</text:p>
      <text:p text:style-name="Preformatted_20_Text"><text:s text:c="8"/>similar_contexts = self.find_similar_contexts(current_context)</text:p>
      <text:p text:style-name="Preformatted_20_Text"><text:s text:c="8"/>for similar in similar_contexts:</text:p>
      <text:p text:style-name="Preformatted_20_Text"><text:s text:c="12"/>effectiveness = self.predict_effectiveness(</text:p>
      <text:p text:style-name="Preformatted_20_Text"><text:s text:c="16"/>similar['protocol'],</text:p>
      <text:p text:style-name="Preformatted_20_Text"><text:s text:c="16"/>current_context,</text:p>
      <text:p text:style-name="Preformatted_20_Text"><text:s text:c="16"/>system_state</text:p>
      <text:p text:style-name="Preformatted_20_Text"><text:s text:c="12"/>)</text:p>
      <text:p text:style-name="Preformatted_20_Text"><text:soft-page-break/><text:s text:c="12"/></text:p>
      <text:p text:style-name="Preformatted_20_Text"><text:s text:c="12"/>if effectiveness['predicted'] &gt; 0.7:</text:p>
      <text:p text:style-name="Preformatted_20_Text"><text:s text:c="16"/>recommendations.append({</text:p>
      <text:p text:style-name="Preformatted_20_Text"><text:s text:c="20"/>'protocol': similar['protocol'],</text:p>
      <text:p text:style-name="Preformatted_20_Text"><text:s text:c="20"/>'confidence': effectiveness['confidence'],</text:p>
      <text:p text:style-name="Preformatted_20_Text"><text:s text:c="20"/>'match_type': 'similar_context',</text:p>
      <text:p text:style-name="Preformatted_20_Text"><text:s text:c="20"/>'expected_effectiveness': effectiveness['predicted']</text:p>
      <text:p text:style-name="Preformatted_20_Text"><text:s text:c="16"/>})</text:p>
      <text:p text:style-name="Preformatted_20_Text"><text:s text:c="8"/></text:p>
      <text:p text:style-name="Preformatted_20_Text"><text:s text:c="8"/># Check for system-optimal protocols</text:p>
      <text:p text:style-name="Preformatted_20_Text"><text:s text:c="8"/>system_optimal = self.find_system_optimal_protocols(system_state)</text:p>
      <text:p text:style-name="Preformatted_20_Text"><text:s text:c="8"/>for protocol in system_optimal:</text:p>
      <text:p text:style-name="Preformatted_20_Text"><text:s text:c="12"/>recommendations.append({</text:p>
      <text:p text:style-name="Preformatted_20_Text"><text:s text:c="16"/>'protocol': protocol['name'],</text:p>
      <text:p text:style-name="Preformatted_20_Text"><text:s text:c="16"/>'confidence': protocol['fit_score'],</text:p>
      <text:p text:style-name="Preformatted_20_Text"><text:s text:c="16"/>'match_type': 'system_optimized',</text:p>
      <text:p text:style-name="Preformatted_20_Text"><text:s text:c="16"/>'expected_effectiveness': protocol['expected_effectiveness']</text:p>
      <text:p text:style-name="Preformatted_20_Text"><text:s text:c="12"/>})</text:p>
      <text:p text:style-name="Preformatted_20_Text"><text:s text:c="8"/></text:p>
      <text:p text:style-name="Preformatted_20_Text"><text:s text:c="8"/># Sort by expected effectiveness</text:p>
      <text:p text:style-name="Preformatted_20_Text"><text:s text:c="8"/>recommendations.sort(key=lambda x: x['expected_effectiveness'], reverse=True)</text:p>
      <text:p text:style-name="Preformatted_20_Text"><text:s text:c="8"/></text:p>
      <text:p text:style-name="P5"><text:s text:c="8"/>return recommendations</text:p>
      <text:h text:style-name="Heading_20_2" text:outline-level="2"><text:span text:style-name="Strong_20_Emphasis">4. Dynamic Protocol Scaling &amp; Execution</text:span></text:h>
      <text:h text:style-name="Heading_20_3" text:outline-level="3"><text:span text:style-name="Strong_20_Emphasis">A. Protocol Scalability Manager</text:span></text:h>
      <text:p text:style-name="Text_20_body">python</text:p>
      <text:p text:style-name="Preformatted_20_Text">class ProtocolScalabilityManager:</text:p>
      <text:p text:style-name="Preformatted_20_Text"><text:s text:c="4"/>def __init__(self):</text:p>
      <text:p text:style-name="Preformatted_20_Text"><text:s text:c="8"/>self.scaling_profiles = {}</text:p>
      <text:p text:style-name="Preformatted_20_Text"><text:s text:c="8"/>self.quality_metrics = {}</text:p>
      <text:p text:style-name="Preformatted_20_Text"><text:s text:c="4"/></text:p>
      <text:p text:style-name="Preformatted_20_Text"><text:s text:c="4"/>def create_scaling_profile(self, protocol_name, base_profile):</text:p>
      <text:p text:style-name="Preformatted_20_Text"><text:s text:c="8"/>"""</text:p>
      <text:p text:style-name="Preformatted_20_Text"><text:s text:c="8"/>Create multiple scaling levels for a protocol</text:p>
      <text:p text:style-name="Preformatted_20_Text"><text:s text:c="8"/>"""</text:p>
      <text:p text:style-name="Preformatted_20_Text"><text:s text:c="8"/>self.scaling_profiles[protocol_name] = {</text:p>
      <text:p text:style-name="Preformatted_20_Text"><text:s text:c="12"/>'full': {</text:p>
      <text:p text:style-name="Preformatted_20_Text"><text:s text:c="16"/>'name': 'full',</text:p>
      <text:p text:style-name="Preformatted_20_Text"><text:s text:c="16"/>'description': 'Complete protocol with all features',</text:p>
      <text:p text:style-name="Preformatted_20_Text"><text:s text:c="16"/>'resource_multiplier': 1.0,</text:p>
      <text:p text:style-name="Preformatted_20_Text"><text:s text:c="16"/>'quality_score': 1.0,</text:p>
      <text:p text:style-name="Preformatted_20_Text"><text:s text:c="16"/>'features': base_profile['features']</text:p>
      <text:p text:style-name="Preformatted_20_Text"><text:s text:c="12"/>},</text:p>
      <text:p text:style-name="Preformatted_20_Text"><text:s text:c="12"/>'balanced': {</text:p>
      <text:p text:style-name="Preformatted_20_Text"><text:s text:c="16"/>'name': 'balanced',</text:p>
      <text:p text:style-name="Preformatted_20_Text"><text:s text:c="16"/>'description': 'Optimized balance of accuracy and speed',</text:p>
      <text:p text:style-name="Preformatted_20_Text"><text:s text:c="16"/>'resource_multiplier': 0.65,</text:p>
      <text:p text:style-name="Preformatted_20_Text"><text:s text:c="16"/>'quality_score': 0.85,</text:p>
      <text:p text:style-name="Preformatted_20_Text"><text:s text:c="16"/>'features': self.select_critical_features(base_profile['features'])</text:p>
      <text:p text:style-name="Preformatted_20_Text"><text:s text:c="12"/>},</text:p>
      <text:p text:style-name="Preformatted_20_Text"><text:s text:c="12"/>'light': {</text:p>
      <text:p text:style-name="Preformatted_20_Text"><text:s text:c="16"/>'name': 'light',</text:p>
      <text:p text:style-name="Preformatted_20_Text"><text:s text:c="16"/>'description': 'Minimal version for constrained resources',</text:p>
      <text:p text:style-name="Preformatted_20_Text"><text:s text:c="16"/>'resource_multiplier': 0.35,</text:p>
      <text:p text:style-name="Preformatted_20_Text"><text:s text:c="16"/>'quality_score': 0.65,</text:p>
      <text:p text:style-name="Preformatted_20_Text"><text:soft-page-break/><text:s text:c="16"/>'features': self.select_minimal_features(base_profile['features'])</text:p>
      <text:p text:style-name="Preformatted_20_Text"><text:s text:c="12"/>},</text:p>
      <text:p text:style-name="Preformatted_20_Text"><text:s text:c="12"/>'emergency': {</text:p>
      <text:p text:style-name="Preformatted_20_Text"><text:s text:c="16"/>'name': 'emergency',</text:p>
      <text:p text:style-name="Preformatted_20_Text"><text:s text:c="16"/>'description': 'Emergency mode - only critical safety checks',</text:p>
      <text:p text:style-name="Preformatted_20_Text"><text:s text:c="16"/>'resource_multiplier': 0.15,</text:p>
      <text:p text:style-name="Preformatted_20_Text"><text:s text:c="16"/>'quality_score': 0.4,</text:p>
      <text:p text:style-name="Preformatted_20_Text"><text:s text:c="16"/>'features': self.select_emergency_features(base_profile['features'])</text:p>
      <text:p text:style-name="Preformatted_20_Text"><text:s text:c="12"/>}</text:p>
      <text:p text:style-name="Preformatted_20_Text"><text:s text:c="8"/>}</text:p>
      <text:p text:style-name="Preformatted_20_Text"><text:s text:c="4"/></text:p>
      <text:p text:style-name="Preformatted_20_Text"><text:s text:c="4"/>def select_optimal_scale(self, protocol_name, available_capacity, context):</text:p>
      <text:p text:style-name="Preformatted_20_Text"><text:s text:c="8"/>"""</text:p>
      <text:p text:style-name="Preformatted_20_Text"><text:s text:c="8"/>Choose the best scaling level for current conditions</text:p>
      <text:p text:style-name="Preformatted_20_Text"><text:s text:c="8"/>"""</text:p>
      <text:p text:style-name="Preformatted_20_Text"><text:s text:c="8"/>profiles = self.scaling_profiles[protocol_name]</text:p>
      <text:p text:style-name="Preformatted_20_Text"><text:s text:c="8"/></text:p>
      <text:p text:style-name="Preformatted_20_Text"><text:s text:c="8"/># Calculate capacity requirements for each profile</text:p>
      <text:p text:style-name="Preformatted_20_Text"><text:s text:c="8"/>requirements = {}</text:p>
      <text:p text:style-name="Preformatted_20_Text"><text:s text:c="8"/>for name, profile in profiles.items():</text:p>
      <text:p text:style-name="Preformatted_20_Text"><text:s text:c="12"/># Estimate resource needs</text:p>
      <text:p text:style-name="Preformatted_20_Text"><text:s text:c="12"/>estimated_needs = self.estimate_resource_needs(profile, context)</text:p>
      <text:p text:style-name="Preformatted_20_Text"><text:s text:c="12"/></text:p>
      <text:p text:style-name="Preformatted_20_Text"><text:s text:c="12"/># Check if system can handle it</text:p>
      <text:p text:style-name="Preformatted_20_Text"><text:s text:c="12"/>can_run = self.can_system_handle(estimated_needs, available_capacity)</text:p>
      <text:p text:style-name="Preformatted_20_Text"><text:s text:c="12"/></text:p>
      <text:p text:style-name="Preformatted_20_Text"><text:s text:c="12"/>requirements[name] = {</text:p>
      <text:p text:style-name="Preformatted_20_Text"><text:s text:c="16"/>'profile': profile,</text:p>
      <text:p text:style-name="Preformatted_20_Text"><text:s text:c="16"/>'estimated_needs': estimated_needs,</text:p>
      <text:p text:style-name="Preformatted_20_Text"><text:s text:c="16"/>'can_run': can_run,</text:p>
      <text:p text:style-name="Preformatted_20_Text"><text:s text:c="16"/>'fitness_score': self.calculate_fitness_score(</text:p>
      <text:p text:style-name="Preformatted_20_Text"><text:s text:c="20"/>profile, context, available_capacity</text:p>
      <text:p text:style-name="Preformatted_20_Text"><text:s text:c="16"/>)</text:p>
      <text:p text:style-name="Preformatted_20_Text"><text:s text:c="12"/>}</text:p>
      <text:p text:style-name="Preformatted_20_Text"><text:s text:c="8"/></text:p>
      <text:p text:style-name="Preformatted_20_Text"><text:s text:c="8"/># Select best profile that can run</text:p>
      <text:p text:style-name="Preformatted_20_Text"><text:s text:c="8"/>runnable = {k: v for k, v in requirements.items() if v['can_run']}</text:p>
      <text:p text:style-name="Preformatted_20_Text"><text:s text:c="8"/>if not runnable:</text:p>
      <text:p text:style-name="Preformatted_20_Text"><text:s text:c="12"/>return None <text:s/># Cannot run any version</text:p>
      <text:p text:style-name="Preformatted_20_Text"><text:s text:c="8"/></text:p>
      <text:p text:style-name="Preformatted_20_Text"><text:s text:c="8"/># Choose highest fitness score</text:p>
      <text:p text:style-name="Preformatted_20_Text"><text:s text:c="8"/>best_profile = max(runnable.items(), key=lambda x: x[1]['fitness_score'])</text:p>
      <text:p text:style-name="Preformatted_20_Text"><text:s text:c="8"/></text:p>
      <text:p text:style-name="Preformatted_20_Text"><text:s text:c="8"/>return {</text:p>
      <text:p text:style-name="Preformatted_20_Text"><text:s text:c="12"/>'selected_profile': best_profile[0],</text:p>
      <text:p text:style-name="Preformatted_20_Text"><text:s text:c="12"/>'profile_details': best_profile[1]['profile'],</text:p>
      <text:p text:style-name="Preformatted_20_Text"><text:s text:c="12"/>'fitness_score': best_profile[1]['fitness_score'],</text:p>
      <text:p text:style-name="Preformatted_20_Text"><text:s text:c="12"/>'estimated_resource_usage': best_profile[1]['estimated_needs']</text:p>
      <text:p text:style-name="Preformatted_20_Text"><text:s text:c="8"/>}</text:p>
      <text:p text:style-name="Preformatted_20_Text"><text:s text:c="4"/></text:p>
      <text:p text:style-name="Preformatted_20_Text"><text:s text:c="4"/>def calculate_fitness_score(self, profile, context, available_capacity):</text:p>
      <text:p text:style-name="Preformatted_20_Text"><text:s text:c="8"/>"""</text:p>
      <text:p text:style-name="Preformatted_20_Text"><text:s text:c="8"/>Calculate how well this scaling level fits current situation</text:p>
      <text:p text:style-name="Preformatted_20_Text"><text:s text:c="8"/>"""</text:p>
      <text:p text:style-name="Preformatted_20_Text"><text:s text:c="8"/>scores = []</text:p>
      <text:p text:style-name="Preformatted_20_Text"><text:s text:c="8"/></text:p>
      <text:p text:style-name="Preformatted_20_Text"><text:s text:c="8"/># Quality vs speed tradeoff based on context</text:p>
      <text:p text:style-name="Preformatted_20_Text"><text:s text:c="8"/>if context.get('requires_high_accuracy'):</text:p>
      <text:p text:style-name="Preformatted_20_Text"><text:s text:c="12"/>quality_weight = 0.7</text:p>
      <text:p text:style-name="Preformatted_20_Text"><text:s text:c="12"/>speed_weight = 0.3</text:p>
      <text:p text:style-name="Preformatted_20_Text"><text:soft-page-break/><text:s text:c="8"/>elif context.get('requires_quick_response'):</text:p>
      <text:p text:style-name="Preformatted_20_Text"><text:s text:c="12"/>quality_weight = 0.3</text:p>
      <text:p text:style-name="Preformatted_20_Text"><text:s text:c="12"/>speed_weight = 0.7</text:p>
      <text:p text:style-name="Preformatted_20_Text"><text:s text:c="8"/>else:</text:p>
      <text:p text:style-name="Preformatted_20_Text"><text:s text:c="12"/>quality_weight = 0.5</text:p>
      <text:p text:style-name="Preformatted_20_Text"><text:s text:c="12"/>speed_weight = 0.5</text:p>
      <text:p text:style-name="Preformatted_20_Text"><text:s text:c="8"/></text:p>
      <text:p text:style-name="Preformatted_20_Text"><text:s text:c="8"/># Quality score</text:p>
      <text:p text:style-name="Preformatted_20_Text"><text:s text:c="8"/>quality_score = profile['quality_score'] * quality_weight</text:p>
      <text:p text:style-name="Preformatted_20_Text"><text:s text:c="8"/>scores.append(quality_score)</text:p>
      <text:p text:style-name="Preformatted_20_Text"><text:s text:c="8"/></text:p>
      <text:p text:style-name="Preformatted_20_Text"><text:s text:c="8"/># Speed/efficiency score</text:p>
      <text:p text:style-name="Preformatted_20_Text"><text:s text:c="8"/>efficiency_score = (1 - profile['resource_multiplier']) * speed_weight</text:p>
      <text:p text:style-name="Preformatted_20_Text"><text:s text:c="8"/>scores.append(efficiency_score)</text:p>
      <text:p text:style-name="Preformatted_20_Text"><text:s text:c="8"/></text:p>
      <text:p text:style-name="Preformatted_20_Text"><text:s text:c="8"/># System fit score</text:p>
      <text:p text:style-name="Preformatted_20_Text"><text:s text:c="8"/>system_fit = min(1.0, available_capacity / profile['resource_multiplier'])</text:p>
      <text:p text:style-name="Preformatted_20_Text"><text:s text:c="8"/>scores.append(system_fit * 0.3)</text:p>
      <text:p text:style-name="Preformatted_20_Text"><text:s text:c="8"/></text:p>
      <text:p text:style-name="Preformatted_20_Text"><text:s text:c="8"/># Context appropriateness</text:p>
      <text:p text:style-name="Preformatted_20_Text"><text:s text:c="8"/>context_fit = self.assess_context_fit(profile, context)</text:p>
      <text:p text:style-name="Preformatted_20_Text"><text:s text:c="8"/>scores.append(context_fit * 0.4)</text:p>
      <text:p text:style-name="Preformatted_20_Text"><text:s text:c="8"/></text:p>
      <text:p text:style-name="P5"><text:s text:c="8"/>return sum(scores) / len(scores)</text:p>
      <text:h text:style-name="Heading_20_3" text:outline-level="3"><text:span text:style-name="Strong_20_Emphasis">B. Protocol Execution Orchestrator</text:span></text:h>
      <text:p text:style-name="Text_20_body">python</text:p>
      <text:p text:style-name="Preformatted_20_Text">class ProtocolOrchestrator:</text:p>
      <text:p text:style-name="Preformatted_20_Text"><text:s text:c="4"/>def __init__(self):</text:p>
      <text:p text:style-name="Preformatted_20_Text"><text:s text:c="8"/>self.resource_manager = ProtocolResourceManager()</text:p>
      <text:p text:style-name="Preformatted_20_Text"><text:s text:c="8"/>self.priority_engine = PriorityMatrixEngine()</text:p>
      <text:p text:style-name="Preformatted_20_Text"><text:s text:c="8"/>self.hardware_monitor = RPi5HardwareMonitor()</text:p>
      <text:p text:style-name="Preformatted_20_Text"><text:s text:c="8"/>self.scaling_manager = ProtocolScalabilityManager()</text:p>
      <text:p text:style-name="Preformatted_20_Text"><text:s text:c="8"/>self.learning_engine = ProtocolEffectivenessLearner()</text:p>
      <text:p text:style-name="Preformatted_20_Text"><text:s text:c="8"/></text:p>
      <text:p text:style-name="Preformatted_20_Text"><text:s text:c="8"/>self.execution_queue = []</text:p>
      <text:p text:style-name="Preformatted_20_Text"><text:s text:c="8"/>self.active_protocols = []</text:p>
      <text:p text:style-name="Preformatted_20_Text"><text:s text:c="8"/>self.deferred_protocols = []</text:p>
      <text:p text:style-name="Preformatted_20_Text"><text:s text:c="8"/></text:p>
      <text:p text:style-name="Preformatted_20_Text"><text:s text:c="4"/>def process_situation(self, user_input, context):</text:p>
      <text:p text:style-name="Preformatted_20_Text"><text:s text:c="8"/>"""</text:p>
      <text:p text:style-name="Preformatted_20_Text"><text:s text:c="8"/>Main orchestration method</text:p>
      <text:p text:style-name="Preformatted_20_Text"><text:s text:c="8"/>"""</text:p>
      <text:p text:style-name="Preformatted_20_Text"><text:s text:c="8"/># 1. Assess current hardware state</text:p>
      <text:p text:style-name="Preformatted_20_Text"><text:s text:c="8"/>hardware_state = self.hardware_monitor.get_current_state()</text:p>
      <text:p text:style-name="Preformatted_20_Text"><text:s text:c="8"/>capacity = self.hardware_monitor.assess_available_capacity()</text:p>
      <text:p text:style-name="Preformatted_20_Text"><text:s text:c="8"/></text:p>
      <text:p text:style-name="Preformatted_20_Text"><text:s text:c="8"/># 2. Determine which protocols are needed</text:p>
      <text:p text:style-name="Preformatted_20_Text"><text:s text:c="8"/>needed_protocols = self.identify_needed_protocols(user_input, context)</text:p>
      <text:p text:style-name="Preformatted_20_Text"><text:s text:c="8"/></text:p>
      <text:p text:style-name="Preformatted_20_Text"><text:s text:c="8"/># 3. Calculate dynamic priorities</text:p>
      <text:p text:style-name="Preformatted_20_Text"><text:s text:c="8"/>prioritized_protocols = []</text:p>
      <text:p text:style-name="Preformatted_20_Text"><text:s text:c="8"/>for protocol in needed_protocols:</text:p>
      <text:p text:style-name="Preformatted_20_Text"><text:s text:c="12"/>priority_data = self.priority_engine.calculate_dynamic_priority(</text:p>
      <text:p text:style-name="Preformatted_20_Text"><text:s text:c="16"/>protocol['name'],</text:p>
      <text:p text:style-name="Preformatted_20_Text"><text:s text:c="16"/>{**context, 'hardware_state': hardware_state}</text:p>
      <text:p text:style-name="Preformatted_20_Text"><text:s text:c="12"/>)</text:p>
      <text:p text:style-name="Preformatted_20_Text"><text:s text:c="12"/></text:p>
      <text:p text:style-name="Preformatted_20_Text"><text:s text:c="12"/>prioritized_protocols.append({</text:p>
      <text:p text:style-name="Preformatted_20_Text"><text:s text:c="16"/>**protocol,</text:p>
      <text:p text:style-name="Preformatted_20_Text"><text:soft-page-break/><text:s text:c="16"/>'dynamic_priority': priority_data['priority'],</text:p>
      <text:p text:style-name="Preformatted_20_Text"><text:s text:c="16"/>'priority_components': priority_data['components']</text:p>
      <text:p text:style-name="Preformatted_20_Text"><text:s text:c="12"/>})</text:p>
      <text:p text:style-name="Preformatted_20_Text"><text:s text:c="8"/></text:p>
      <text:p text:style-name="Preformatted_20_Text"><text:s text:c="8"/># 4. Sort by priority</text:p>
      <text:p text:style-name="Preformatted_20_Text"><text:s text:c="8"/>prioritized_protocols.sort(key=lambda x: x['dynamic_priority'], reverse=True)</text:p>
      <text:p text:style-name="Preformatted_20_Text"><text:s text:c="8"/></text:p>
      <text:p text:style-name="Preformatted_20_Text"><text:s text:c="8"/># 5. Select which to run based on capacity</text:p>
      <text:p text:style-name="Preformatted_20_Text"><text:s text:c="8"/>protocols_to_run = []</text:p>
      <text:p text:style-name="Preformatted_20_Text"><text:s text:c="8"/>protocols_to_defer = []</text:p>
      <text:p text:style-name="Preformatted_20_Text"><text:s text:c="8"/></text:p>
      <text:p text:style-name="Preformatted_20_Text"><text:s text:c="8"/>current_load = 0</text:p>
      <text:p text:style-name="Preformatted_20_Text"><text:s text:c="8"/>max_load = capacity['total_capacity']</text:p>
      <text:p text:style-name="Preformatted_20_Text"><text:s text:c="8"/></text:p>
      <text:p text:style-name="Preformatted_20_Text"><text:s text:c="8"/>for protocol in prioritized_protocols:</text:p>
      <text:p text:style-name="Preformatted_20_Text"><text:s text:c="12"/># Select scaling level</text:p>
      <text:p text:style-name="Preformatted_20_Text"><text:s text:c="12"/>scaling_decision = self.scaling_manager.select_optimal_scale(</text:p>
      <text:p text:style-name="Preformatted_20_Text"><text:s text:c="16"/>protocol['name'],</text:p>
      <text:p text:style-name="Preformatted_20_Text"><text:s text:c="16"/>max_load - current_load,</text:p>
      <text:p text:style-name="Preformatted_20_Text"><text:s text:c="16"/>context</text:p>
      <text:p text:style-name="Preformatted_20_Text"><text:s text:c="12"/>)</text:p>
      <text:p text:style-name="Preformatted_20_Text"><text:s text:c="12"/></text:p>
      <text:p text:style-name="Preformatted_20_Text"><text:s text:c="12"/>if scaling_decision and (current_load + scaling_decision['estimated_resource_usage']) &lt;= max_load:</text:p>
      <text:p text:style-name="Preformatted_20_Text"><text:s text:c="16"/>protocols_to_run.append({</text:p>
      <text:p text:style-name="Preformatted_20_Text"><text:s text:c="20"/>**protocol,</text:p>
      <text:p text:style-name="Preformatted_20_Text"><text:s text:c="20"/>'scaling_level': scaling_decision['selected_profile'],</text:p>
      <text:p text:style-name="Preformatted_20_Text"><text:s text:c="20"/>'estimated_resources': scaling_decision['estimated_resource_usage']</text:p>
      <text:p text:style-name="Preformatted_20_Text"><text:s text:c="16"/>})</text:p>
      <text:p text:style-name="Preformatted_20_Text"><text:s text:c="16"/>current_load += scaling_decision['estimated_resource_usage']</text:p>
      <text:p text:style-name="Preformatted_20_Text"><text:s text:c="12"/>else:</text:p>
      <text:p text:style-name="Preformatted_20_Text"><text:s text:c="16"/>protocols_to_defer.append(protocol)</text:p>
      <text:p text:style-name="Preformatted_20_Text"><text:s text:c="8"/></text:p>
      <text:p text:style-name="Preformatted_20_Text"><text:s text:c="8"/># 6. Execute protocols</text:p>
      <text:p text:style-name="Preformatted_20_Text"><text:s text:c="8"/>execution_results = []</text:p>
      <text:p text:style-name="Preformatted_20_Text"><text:s text:c="8"/>for protocol in protocols_to_run:</text:p>
      <text:p text:style-name="Preformatted_20_Text"><text:s text:c="12"/>result = self.execute_protocol(protocol, context)</text:p>
      <text:p text:style-name="Preformatted_20_Text"><text:s text:c="12"/>execution_results.append(result)</text:p>
      <text:p text:style-name="Preformatted_20_Text"><text:s text:c="12"/></text:p>
      <text:p text:style-name="Preformatted_20_Text"><text:s text:c="12"/># Record outcome for learning</text:p>
      <text:p text:style-name="Preformatted_20_Text"><text:s text:c="12"/>self.learning_engine.record_protocol_outcome(</text:p>
      <text:p text:style-name="Preformatted_20_Text"><text:s text:c="16"/>protocol['name'],</text:p>
      <text:p text:style-name="Preformatted_20_Text"><text:s text:c="16"/>{</text:p>
      <text:p text:style-name="Preformatted_20_Text"><text:s text:c="20"/>'resource_usage': self.measure_actual_usage(protocol),</text:p>
      <text:p text:style-name="Preformatted_20_Text"><text:s text:c="20"/>'effectiveness_score': self.calculate_execution_effectiveness(result),</text:p>
      <text:p text:style-name="Preformatted_20_Text"><text:s text:c="20"/>'context': context,</text:p>
      <text:p text:style-name="Preformatted_20_Text"><text:s text:c="20"/>'system_state': hardware_state,</text:p>
      <text:p text:style-name="Preformatted_20_Text"><text:s text:c="20"/>'scaling_level': protocol['scaling_level']</text:p>
      <text:p text:style-name="Preformatted_20_Text"><text:s text:c="16"/>}</text:p>
      <text:p text:style-name="Preformatted_20_Text"><text:s text:c="12"/>)</text:p>
      <text:p text:style-name="Preformatted_20_Text"><text:s text:c="8"/></text:p>
      <text:p text:style-name="Preformatted_20_Text"><text:s text:c="8"/># 7. Handle deferred protocols</text:p>
      <text:p text:style-name="Preformatted_20_Text"><text:s text:c="8"/>if protocols_to_defer:</text:p>
      <text:p text:style-name="Preformatted_20_Text"><text:s text:c="12"/>self.handle_deferred_protocols(protocols_to_defer, context)</text:p>
      <text:p text:style-name="Preformatted_20_Text"><text:s text:c="8"/></text:p>
      <text:p text:style-name="Preformatted_20_Text"><text:s text:c="8"/># 8. Generate integrated response</text:p>
      <text:p text:style-name="Preformatted_20_Text"><text:s text:c="8"/>integrated_response = self.integrate_protocol_results(execution_results)</text:p>
      <text:p text:style-name="Preformatted_20_Text"><text:s text:c="8"/></text:p>
      <text:p text:style-name="Preformatted_20_Text"><text:s text:c="8"/># 9. Update system learning</text:p>
      <text:p text:style-name="Preformatted_20_Text"><text:s text:c="8"/>self.update_system_learning(execution_results, context)</text:p>
      <text:p text:style-name="Preformatted_20_Text"><text:s text:c="8"/></text:p>
      <text:p text:style-name="Preformatted_20_Text"><text:soft-page-break/><text:s text:c="8"/>return {</text:p>
      <text:p text:style-name="Preformatted_20_Text"><text:s text:c="12"/>'executed_protocols': protocols_to_run,</text:p>
      <text:p text:style-name="Preformatted_20_Text"><text:s text:c="12"/>'deferred_protocols': protocols_to_defer,</text:p>
      <text:p text:style-name="Preformatted_20_Text"><text:s text:c="12"/>'hardware_state': hardware_state,</text:p>
      <text:p text:style-name="Preformatted_20_Text"><text:s text:c="12"/>'capacity_used': current_load,</text:p>
      <text:p text:style-name="Preformatted_20_Text"><text:s text:c="12"/>'capacity_available': max_load - current_load,</text:p>
      <text:p text:style-name="Preformatted_20_Text"><text:s text:c="12"/>'integrated_response': integrated_response,</text:p>
      <text:p text:style-name="Preformatted_20_Text"><text:s text:c="12"/>'learning_updates': self.get_learning_updates()</text:p>
      <text:p text:style-name="Preformatted_20_Text"><text:s text:c="8"/>}</text:p>
      <text:p text:style-name="Preformatted_20_Text"><text:s text:c="4"/></text:p>
      <text:p text:style-name="Preformatted_20_Text"><text:s text:c="4"/>def execute_protocol(self, protocol, context):</text:p>
      <text:p text:style-name="Preformatted_20_Text"><text:s text:c="8"/>"""</text:p>
      <text:p text:style-name="Preformatted_20_Text"><text:s text:c="8"/>Execute a protocol at the selected scaling level</text:p>
      <text:p text:style-name="Preformatted_20_Text"><text:s text:c="8"/>"""</text:p>
      <text:p text:style-name="Preformatted_20_Text"><text:s text:c="8"/>try:</text:p>
      <text:p text:style-name="Preformatted_20_Text"><text:s text:c="12"/># Load the protocol implementation</text:p>
      <text:p text:style-name="Preformatted_20_Text"><text:s text:c="12"/>protocol_module = self.load_protocol_module(protocol['name'])</text:p>
      <text:p text:style-name="Preformatted_20_Text"><text:s text:c="12"/></text:p>
      <text:p text:style-name="Preformatted_20_Text"><text:s text:c="12"/># Apply scaling adjustments</text:p>
      <text:p text:style-name="Preformatted_20_Text"><text:s text:c="12"/>scaled_implementation = self.apply_scaling(</text:p>
      <text:p text:style-name="Preformatted_20_Text"><text:s text:c="16"/>protocol_module,</text:p>
      <text:p text:style-name="Preformatted_20_Text"><text:s text:c="16"/>protocol['scaling_level']</text:p>
      <text:p text:style-name="Preformatted_20_Text"><text:s text:c="12"/>)</text:p>
      <text:p text:style-name="Preformatted_20_Text"><text:s text:c="12"/></text:p>
      <text:p text:style-name="Preformatted_20_Text"><text:s text:c="12"/># Execute with resource limits</text:p>
      <text:p text:style-name="Preformatted_20_Text"><text:s text:c="12"/>with ResourceLimiter(protocol['estimated_resources']):</text:p>
      <text:p text:style-name="Preformatted_20_Text"><text:s text:c="16"/>result = scaled_implementation.execute(context)</text:p>
      <text:p text:style-name="Preformatted_20_Text"><text:s text:c="12"/></text:p>
      <text:p text:style-name="Preformatted_20_Text"><text:s text:c="12"/># Measure actual resource usage</text:p>
      <text:p text:style-name="Preformatted_20_Text"><text:s text:c="12"/>actual_usage = self.measure_resource_usage()</text:p>
      <text:p text:style-name="Preformatted_20_Text"><text:s text:c="12"/></text:p>
      <text:p text:style-name="Preformatted_20_Text"><text:s text:c="12"/>return {</text:p>
      <text:p text:style-name="Preformatted_20_Text"><text:s text:c="16"/>'protocol': protocol['name'],</text:p>
      <text:p text:style-name="Preformatted_20_Text"><text:s text:c="16"/>'scaling_level': protocol['scaling_level'],</text:p>
      <text:p text:style-name="Preformatted_20_Text"><text:s text:c="16"/>'result': result,</text:p>
      <text:p text:style-name="Preformatted_20_Text"><text:s text:c="16"/>'resource_usage': actual_usage,</text:p>
      <text:p text:style-name="Preformatted_20_Text"><text:s text:c="16"/>'execution_time': time.time() - start_time,</text:p>
      <text:p text:style-name="Preformatted_20_Text"><text:s text:c="16"/>'success': True</text:p>
      <text:p text:style-name="Preformatted_20_Text"><text:s text:c="12"/>}</text:p>
      <text:p text:style-name="Preformatted_20_Text"><text:s text:c="12"/></text:p>
      <text:p text:style-name="Preformatted_20_Text"><text:s text:c="8"/>except ResourceLimitExceeded:</text:p>
      <text:p text:style-name="Preformatted_20_Text"><text:s text:c="12"/># Protocol exceeded its allocation</text:p>
      <text:p text:style-name="Preformatted_20_Text"><text:s text:c="12"/>return {</text:p>
      <text:p text:style-name="Preformatted_20_Text"><text:s text:c="16"/>'protocol': protocol['name'],</text:p>
      <text:p text:style-name="Preformatted_20_Text"><text:s text:c="16"/>'error': 'resource_limit_exceeded',</text:p>
      <text:p text:style-name="Preformatted_20_Text"><text:s text:c="16"/>'partial_result': self.get_partial_result_if_any(),</text:p>
      <text:p text:style-name="Preformatted_20_Text"><text:s text:c="16"/>'recommendation': 'increase_scaling_or_defer'</text:p>
      <text:p text:style-name="Preformatted_20_Text"><text:s text:c="12"/>}</text:p>
      <text:p text:style-name="Preformatted_20_Text"><text:s text:c="8"/>except Exception as e:</text:p>
      <text:p text:style-name="Preformatted_20_Text"><text:s text:c="12"/># Other execution error</text:p>
      <text:p text:style-name="Preformatted_20_Text"><text:s text:c="12"/>return {</text:p>
      <text:p text:style-name="Preformatted_20_Text"><text:s text:c="16"/>'protocol': protocol['name'],</text:p>
      <text:p text:style-name="Preformatted_20_Text"><text:s text:c="16"/>'error': str(e),</text:p>
      <text:p text:style-name="Preformatted_20_Text"><text:s text:c="16"/>'success': False</text:p>
      <text:p text:style-name="Preformatted_20_Text"><text:s text:c="12"/>}</text:p>
      <text:p text:style-name="Preformatted_20_Text"><text:s text:c="4"/></text:p>
      <text:p text:style-name="Preformatted_20_Text"><text:s text:c="4"/>def handle_deferred_protocols(self, deferred_protocols, context):</text:p>
      <text:p text:style-name="Preformatted_20_Text"><text:s text:c="8"/>"""</text:p>
      <text:p text:style-name="Preformatted_20_Text"><text:s text:c="8"/>Handle protocols that couldn't run due to resource constraints</text:p>
      <text:p text:style-name="Preformatted_20_Text"><text:s text:c="8"/>"""</text:p>
      <text:p text:style-name="Preformatted_20_Text"><text:s text:c="8"/># Store for later execution if capacity frees up</text:p>
      <text:p text:style-name="Preformatted_20_Text"><text:s text:c="8"/>self.deferred_protocols.extend([</text:p>
      <text:p text:style-name="Preformatted_20_Text"><text:s text:c="12"/>{</text:p>
      <text:p text:style-name="Preformatted_20_Text"><text:s text:c="16"/>**protocol,</text:p>
      <text:p text:style-name="Preformatted_20_Text"><text:soft-page-break/><text:s text:c="16"/>'deferral_time': time.time(),</text:p>
      <text:p text:style-name="Preformatted_20_Text"><text:s text:c="16"/>'context_snapshot': context,</text:p>
      <text:p text:style-name="Preformatted_20_Text"><text:s text:c="16"/>'priority_at_deferral': protocol['dynamic_priority']</text:p>
      <text:p text:style-name="Preformatted_20_Text"><text:s text:c="12"/>}</text:p>
      <text:p text:style-name="Preformatted_20_Text"><text:s text:c="12"/>for protocol in deferred_protocols</text:p>
      <text:p text:style-name="Preformatted_20_Text"><text:s text:c="8"/>])</text:p>
      <text:p text:style-name="Preformatted_20_Text"><text:s text:c="8"/></text:p>
      <text:p text:style-name="Preformatted_20_Text"><text:s text:c="8"/># Sort deferred by priority</text:p>
      <text:p text:style-name="Preformatted_20_Text"><text:s text:c="8"/>self.deferred_protocols.sort(</text:p>
      <text:p text:style-name="Preformatted_20_Text"><text:s text:c="12"/>key=lambda x: x['priority_at_deferral'],</text:p>
      <text:p text:style-name="Preformatted_20_Text"><text:s text:c="12"/>reverse=True</text:p>
      <text:p text:style-name="Preformatted_20_Text"><text:s text:c="8"/>)</text:p>
      <text:p text:style-name="Preformatted_20_Text"><text:s text:c="8"/></text:p>
      <text:p text:style-name="Preformatted_20_Text"><text:s text:c="8"/># Prune old deferred protocols</text:p>
      <text:p text:style-name="Preformatted_20_Text"><text:s text:c="8"/>current_time = time.time()</text:p>
      <text:p text:style-name="Preformatted_20_Text"><text:s text:c="8"/>self.deferred_protocols = [</text:p>
      <text:p text:style-name="Preformatted_20_Text"><text:s text:c="12"/>p for p in self.deferred_protocols</text:p>
      <text:p text:style-name="Preformatted_20_Text"><text:s text:c="12"/>if current_time - p['deferral_time'] &lt; 300 <text:s/># 5 minutes max</text:p>
      <text:p text:style-name="Preformatted_20_Text"><text:s text:c="8"/>]</text:p>
      <text:p text:style-name="Preformatted_20_Text"><text:s text:c="8"/></text:p>
      <text:p text:style-name="Preformatted_20_Text"><text:s text:c="8"/># Log deferral for learning</text:p>
      <text:p text:style-name="Preformatted_20_Text"><text:s text:c="8"/>self.log_deferral_event(deferred_protocols, context)</text:p>
      <text:p text:style-name="Preformatted_20_Text"><text:s text:c="4"/></text:p>
      <text:p text:style-name="Preformatted_20_Text"><text:s text:c="4"/>def check_deferred_execution(self):</text:p>
      <text:p text:style-name="Preformatted_20_Text"><text:s text:c="8"/>"""</text:p>
      <text:p text:style-name="Preformatted_20_Text"><text:s text:c="8"/>Check if we can now run any deferred protocols</text:p>
      <text:p text:style-name="Preformatted_20_Text"><text:s text:c="8"/>"""</text:p>
      <text:p text:style-name="Preformatted_20_Text"><text:s text:c="8"/>if not self.deferred_protocols:</text:p>
      <text:p text:style-name="Preformatted_20_Text"><text:s text:c="12"/>return []</text:p>
      <text:p text:style-name="Preformatted_20_Text"><text:s text:c="8"/></text:p>
      <text:p text:style-name="Preformatted_20_Text"><text:s text:c="8"/>current_capacity = self.hardware_monitor.assess_available_capacity()</text:p>
      <text:p text:style-name="Preformatted_20_Text"><text:s text:c="8"/></text:p>
      <text:p text:style-name="Preformatted_20_Text"><text:s text:c="8"/># Only run deferred if we have spare capacity</text:p>
      <text:p text:style-name="Preformatted_20_Text"><text:s text:c="8"/>if current_capacity['state'] in ['high_capacity', 'normal_capacity']:</text:p>
      <text:p text:style-name="Preformatted_20_Text"><text:s text:c="12"/># Try to run highest priority deferred protocols</text:p>
      <text:p text:style-name="Preformatted_20_Text"><text:s text:c="12"/>executed = []</text:p>
      <text:p text:style-name="Preformatted_20_Text"><text:s text:c="12"/>remaining_capacity = current_capacity['total_capacity']</text:p>
      <text:p text:style-name="Preformatted_20_Text"><text:s text:c="12"/></text:p>
      <text:p text:style-name="Preformatted_20_Text"><text:s text:c="12"/>for protocol in list(self.deferred_protocols):</text:p>
      <text:p text:style-name="Preformatted_20_Text"><text:s text:c="16"/>scaling_decision = self.scaling_manager.select_optimal_scale(</text:p>
      <text:p text:style-name="Preformatted_20_Text"><text:s text:c="20"/>protocol['name'],</text:p>
      <text:p text:style-name="Preformatted_20_Text"><text:s text:c="20"/>remaining_capacity,</text:p>
      <text:p text:style-name="Preformatted_20_Text"><text:s text:c="20"/>protocol['context_snapshot']</text:p>
      <text:p text:style-name="Preformatted_20_Text"><text:s text:c="16"/>)</text:p>
      <text:p text:style-name="Preformatted_20_Text"><text:s text:c="16"/></text:p>
      <text:p text:style-name="Preformatted_20_Text"><text:s text:c="16"/>if scaling_decision:</text:p>
      <text:p text:style-name="Preformatted_20_Text"><text:s text:c="20"/># Execute deferred protocol</text:p>
      <text:p text:style-name="Preformatted_20_Text"><text:s text:c="20"/>result = self.execute_protocol({</text:p>
      <text:p text:style-name="Preformatted_20_Text"><text:s text:c="24"/>**protocol,</text:p>
      <text:p text:style-name="Preformatted_20_Text"><text:s text:c="24"/>'scaling_level': scaling_decision['selected_profile']</text:p>
      <text:p text:style-name="Preformatted_20_Text"><text:s text:c="20"/>}, protocol['context_snapshot'])</text:p>
      <text:p text:style-name="Preformatted_20_Text"><text:s text:c="20"/></text:p>
      <text:p text:style-name="Preformatted_20_Text"><text:s text:c="20"/>executed.append(result)</text:p>
      <text:p text:style-name="Preformatted_20_Text"><text:s text:c="20"/>self.deferred_protocols.remove(protocol)</text:p>
      <text:p text:style-name="Preformatted_20_Text"><text:s text:c="20"/></text:p>
      <text:p text:style-name="Preformatted_20_Text"><text:s text:c="20"/># Update capacity</text:p>
      <text:p text:style-name="Preformatted_20_Text"><text:s text:c="20"/>remaining_capacity -= scaling_decision['estimated_resource_usage']</text:p>
      <text:p text:style-name="Preformatted_20_Text"><text:s text:c="20"/></text:p>
      <text:p text:style-name="Preformatted_20_Text"><text:s text:c="20"/>if remaining_capacity &lt; 0.1: <text:s/># Leave some buffer</text:p>
      <text:p text:style-name="Preformatted_20_Text"><text:s text:c="24"/>break</text:p>
      <text:p text:style-name="Preformatted_20_Text"><text:s text:c="12"/></text:p>
      <text:p text:style-name="Preformatted_20_Text"><text:s text:c="12"/>return executed</text:p>
      <text:p text:style-name="Preformatted_20_Text"><text:s text:c="8"/></text:p>
      <text:p text:style-name="P5"><text:soft-page-break/><text:s text:c="8"/>return []</text:p>
      <text:h text:style-name="Heading_20_2" text:outline-level="2"><text:span text:style-name="Strong_20_Emphasis">5. Learning &amp; Adaptation System</text:span></text:h>
      <text:h text:style-name="Heading_20_3" text:outline-level="3"><text:span text:style-name="Strong_20_Emphasis">A. Continuous Optimization Engine</text:span></text:h>
      <text:p text:style-name="Text_20_body">python</text:p>
      <text:p text:style-name="Preformatted_20_Text">class ContinuousOptimizationEngine:</text:p>
      <text:p text:style-name="Preformatted_20_Text"><text:s text:c="4"/>def __init__(self):</text:p>
      <text:p text:style-name="Preformatted_20_Text"><text:s text:c="8"/>self.optimization_history = []</text:p>
      <text:p text:style-name="Preformatted_20_Text"><text:s text:c="8"/>self.parameter_space = self.define_parameter_space()</text:p>
      <text:p text:style-name="Preformatted_20_Text"><text:s text:c="8"/>self.bayesian_optimizer = BayesianOptimizer()</text:p>
      <text:p text:style-name="Preformatted_20_Text"><text:s text:c="8"/>self.genetic_algorithm = GeneticOptimizer()</text:p>
      <text:p text:style-name="Preformatted_20_Text"><text:s text:c="8"/></text:p>
      <text:p text:style-name="Preformatted_20_Text"><text:s text:c="4"/>def define_parameter_space(self):</text:p>
      <text:p text:style-name="Preformatted_20_Text"><text:s text:c="8"/>"""</text:p>
      <text:p text:style-name="Preformatted_20_Text"><text:s text:c="8"/>Define parameters that can be optimized</text:p>
      <text:p text:style-name="Preformatted_20_Text"><text:s text:c="8"/>"""</text:p>
      <text:p text:style-name="Preformatted_20_Text"><text:s text:c="8"/>return {</text:p>
      <text:p text:style-name="Preformatted_20_Text"><text:s text:c="12"/>'protocol_priorities': {</text:p>
      <text:p text:style-name="Preformatted_20_Text"><text:s text:c="16"/>'type': 'continuous',</text:p>
      <text:p text:style-name="Preformatted_20_Text"><text:s text:c="16"/>'bounds': [0, 100],</text:p>
      <text:p text:style-name="Preformatted_20_Text"><text:s text:c="16"/>'protocols': list(self.protocol_registry.keys())</text:p>
      <text:p text:style-name="Preformatted_20_Text"><text:s text:c="12"/>},</text:p>
      <text:p text:style-name="Preformatted_20_Text"><text:s text:c="12"/>'scaling_thresholds': {</text:p>
      <text:p text:style-name="Preformatted_20_Text"><text:s text:c="16"/>'type': 'continuous',</text:p>
      <text:p text:style-name="Preformatted_20_Text"><text:s text:c="16"/>'bounds': [0, 1],</text:p>
      <text:p text:style-name="Preformatted_20_Text"><text:s text:c="16"/>'parameters': ['high_capacity_threshold', 'normal_capacity_threshold']</text:p>
      <text:p text:style-name="Preformatted_20_Text"><text:s text:c="12"/>},</text:p>
      <text:p text:style-name="Preformatted_20_Text"><text:s text:c="12"/>'resource_allocation_strategy': {</text:p>
      <text:p text:style-name="Preformatted_20_Text"><text:s text:c="16"/>'type': 'categorical',</text:p>
      <text:p text:style-name="Preformatted_20_Text"><text:s text:c="16"/>'options': ['conservative', 'balanced', 'aggressive', 'adaptive']</text:p>
      <text:p text:style-name="Preformatted_20_Text"><text:s text:c="12"/>},</text:p>
      <text:p text:style-name="Preformatted_20_Text"><text:s text:c="12"/>'deferral_policy': {</text:p>
      <text:p text:style-name="Preformatted_20_Text"><text:s text:c="16"/>'type': 'categorical',</text:p>
      <text:p text:style-name="Preformatted_20_Text"><text:s text:c="16"/>'options': ['strict', 'flexible', 'context_aware', 'learning_based']</text:p>
      <text:p text:style-name="Preformatted_20_Text"><text:s text:c="12"/>}</text:p>
      <text:p text:style-name="Preformatted_20_Text"><text:s text:c="8"/>}</text:p>
      <text:p text:style-name="Preformatted_20_Text"><text:s text:c="4"/></text:p>
      <text:p text:style-name="Preformatted_20_Text"><text:s text:c="4"/>def run_optimization_cycle(self, performance_data):</text:p>
      <text:p text:style-name="Preformatted_20_Text"><text:s text:c="8"/>"""</text:p>
      <text:p text:style-name="Preformatted_20_Text"><text:s text:c="8"/>Run optimization to improve protocol management</text:p>
      <text:p text:style-name="Preformatted_20_Text"><text:s text:c="8"/>"""</text:p>
      <text:p text:style-name="Preformatted_20_Text"><text:s text:c="8"/># 1. Analyze current performance</text:p>
      <text:p text:style-name="Preformatted_20_Text"><text:s text:c="8"/>current_performance = self.analyze_performance(performance_data)</text:p>
      <text:p text:style-name="Preformatted_20_Text"><text:s text:c="8"/></text:p>
      <text:p text:style-name="Preformatted_20_Text"><text:s text:c="8"/># 2. Identify optimization opportunities</text:p>
      <text:p text:style-name="Preformatted_20_Text"><text:s text:c="8"/>opportunities = self.identify_optimization_opportunities(current_performance)</text:p>
      <text:p text:style-name="Preformatted_20_Text"><text:s text:c="8"/></text:p>
      <text:p text:style-name="Preformatted_20_Text"><text:s text:c="8"/># 3. Generate optimization hypotheses</text:p>
      <text:p text:style-name="Preformatted_20_Text"><text:s text:c="8"/>hypotheses = self.generate_optimization_hypotheses(opportunities)</text:p>
      <text:p text:style-name="Preformatted_20_Text"><text:s text:c="8"/></text:p>
      <text:p text:style-name="Preformatted_20_Text"><text:s text:c="8"/># 4. Test hypotheses (simulated or small-scale)</text:p>
      <text:p text:style-name="Preformatted_20_Text"><text:s text:c="8"/>test_results = self.test_hypotheses(hypotheses)</text:p>
      <text:p text:style-name="Preformatted_20_Text"><text:s text:c="8"/></text:p>
      <text:p text:style-name="Preformatted_20_Text"><text:s text:c="8"/># 5. Select best improvements</text:p>
      <text:p text:style-name="Preformatted_20_Text"><text:soft-page-break/><text:s text:c="8"/>improvements = self.select_best_improvements(test_results)</text:p>
      <text:p text:style-name="Preformatted_20_Text"><text:s text:c="8"/></text:p>
      <text:p text:style-name="Preformatted_20_Text"><text:s text:c="8"/># 6. Apply improvements</text:p>
      <text:p text:style-name="Preformatted_20_Text"><text:s text:c="8"/>self.apply_improvements(improvements)</text:p>
      <text:p text:style-name="Preformatted_20_Text"><text:s text:c="8"/></text:p>
      <text:p text:style-name="Preformatted_20_Text"><text:s text:c="8"/># 7. Monitor results</text:p>
      <text:p text:style-name="Preformatted_20_Text"><text:s text:c="8"/>self.monitor_improvement_impact(improvements)</text:p>
      <text:p text:style-name="Preformatted_20_Text"><text:s text:c="8"/></text:p>
      <text:p text:style-name="Preformatted_20_Text"><text:s text:c="8"/>return {</text:p>
      <text:p text:style-name="Preformatted_20_Text"><text:s text:c="12"/>'optimization_cycle': len(self.optimization_history) + 1,</text:p>
      <text:p text:style-name="Preformatted_20_Text"><text:s text:c="12"/>'opportunities_found': len(opportunities),</text:p>
      <text:p text:style-name="Preformatted_20_Text"><text:s text:c="12"/>'hypotheses_tested': len(test_results),</text:p>
      <text:p text:style-name="Preformatted_20_Text"><text:s text:c="12"/>'improvements_applied': len(improvements),</text:p>
      <text:p text:style-name="Preformatted_20_Text"><text:s text:c="12"/>'expected_improvement': self.calculate_expected_improvement(improvements)</text:p>
      <text:p text:style-name="Preformatted_20_Text"><text:s text:c="8"/>}</text:p>
      <text:p text:style-name="Preformatted_20_Text"><text:s text:c="4"/></text:p>
      <text:p text:style-name="Preformatted_20_Text"><text:s text:c="4"/>def identify_optimization_opportunities(self, performance_data):</text:p>
      <text:p text:style-name="Preformatted_20_Text"><text:s text:c="8"/>"""</text:p>
      <text:p text:style-name="Preformatted_20_Text"><text:s text:c="8"/>Find areas where the system could be improved</text:p>
      <text:p text:style-name="Preformatted_20_Text"><text:s text:c="8"/>"""</text:p>
      <text:p text:style-name="Preformatted_20_Text"><text:s text:c="8"/>opportunities = []</text:p>
      <text:p text:style-name="Preformatted_20_Text"><text:s text:c="8"/></text:p>
      <text:p text:style-name="Preformatted_20_Text"><text:s text:c="8"/># Look for protocols with consistently poor effectiveness</text:p>
      <text:p text:style-name="Preformatted_20_Text"><text:s text:c="8"/>for protocol, data in performance_data['protocol_effectiveness'].items():</text:p>
      <text:p text:style-name="Preformatted_20_Text"><text:s text:c="12"/>if data['avg_effectiveness'] &lt; 0.6:</text:p>
      <text:p text:style-name="Preformatted_20_Text"><text:s text:c="16"/>opportunities.append({</text:p>
      <text:p text:style-name="Preformatted_20_Text"><text:s text:c="20"/>'type': 'low_effectiveness',</text:p>
      <text:p text:style-name="Preformatted_20_Text"><text:s text:c="20"/>'protocol': protocol,</text:p>
      <text:p text:style-name="Preformatted_20_Text"><text:s text:c="20"/>'avg_score': data['avg_effectiveness'],</text:p>
      <text:p text:style-name="Preformatted_20_Text"><text:s text:c="20"/>'suggested_action': 'adjust_priority_or_scaling'</text:p>
      <text:p text:style-name="Preformatted_20_Text"><text:s text:c="16"/>})</text:p>
      <text:p text:style-name="Preformatted_20_Text"><text:s text:c="8"/></text:p>
      <text:p text:style-name="Preformatted_20_Text"><text:s text:c="8"/># Look for resource bottlenecks</text:p>
      <text:p text:style-name="Preformatted_20_Text"><text:s text:c="8"/>resource_bottlenecks = self.identify_resource_bottlenecks(</text:p>
      <text:p text:style-name="Preformatted_20_Text"><text:s text:c="12"/>performance_data['resource_usage']</text:p>
      <text:p text:style-name="Preformatted_20_Text"><text:s text:c="8"/>)</text:p>
      <text:p text:style-name="Preformatted_20_Text"><text:s text:c="8"/>opportunities.extend(resource_bottlenecks)</text:p>
      <text:p text:style-name="Preformatted_20_Text"><text:s text:c="8"/></text:p>
      <text:p text:style-name="Preformatted_20_Text"><text:s text:c="8"/># Look for protocols that are frequently deferred</text:p>
      <text:p text:style-name="Preformatted_20_Text"><text:s text:c="8"/>deferral_analysis = self.analyze_deferral_patterns(</text:p>
      <text:p text:style-name="Preformatted_20_Text"><text:s text:c="12"/>performance_data['deferral_log']</text:p>
      <text:p text:style-name="Preformatted_20_Text"><text:s text:c="8"/>)</text:p>
      <text:p text:style-name="Preformatted_20_Text"><text:s text:c="8"/>opportunities.extend(deferral_analysis)</text:p>
      <text:p text:style-name="Preformatted_20_Text"><text:s text:c="8"/></text:p>
      <text:p text:style-name="Preformatted_20_Text"><text:s text:c="8"/># Look for context mismatches</text:p>
      <text:p text:style-name="Preformatted_20_Text"><text:s text:c="8"/>context_mismatches = self.find_context_mismatches(</text:p>
      <text:p text:style-name="Preformatted_20_Text"><text:s text:c="12"/>performance_data['context_success_rates']</text:p>
      <text:p text:style-name="Preformatted_20_Text"><text:s text:c="8"/>)</text:p>
      <text:p text:style-name="Preformatted_20_Text"><text:s text:c="8"/>opportunities.extend(context_mismatches)</text:p>
      <text:p text:style-name="Preformatted_20_Text"><text:s text:c="8"/></text:p>
      <text:p text:style-name="Preformatted_20_Text"><text:s text:c="8"/>return opportunities</text:p>
      <text:p text:style-name="Preformatted_20_Text"><text:s text:c="4"/></text:p>
      <text:p text:style-name="Preformatted_20_Text"><text:s text:c="4"/>def apply_improvements(self, improvements):</text:p>
      <text:p text:style-name="Preformatted_20_Text"><text:s text:c="8"/>"""</text:p>
      <text:p text:style-name="Preformatted_20_Text"><text:s text:c="8"/>Apply the selected improvements to the system</text:p>
      <text:p text:style-name="Preformatted_20_Text"><text:s text:c="8"/>"""</text:p>
      <text:p text:style-name="Preformatted_20_Text"><text:s text:c="8"/>applied = []</text:p>
      <text:p text:style-name="Preformatted_20_Text"><text:s text:c="8"/></text:p>
      <text:p text:style-name="Preformatted_20_Text"><text:s text:c="8"/>for improvement in improvements:</text:p>
      <text:p text:style-name="Preformatted_20_Text"><text:s text:c="12"/>try:</text:p>
      <text:p text:style-name="Preformatted_20_Text"><text:s text:c="16"/>if improvement['type'] == 'protocol_priority_adjustment':</text:p>
      <text:p text:style-name="Preformatted_20_Text"><text:s text:c="20"/># Update protocol priority</text:p>
      <text:p text:style-name="Preformatted_20_Text"><text:soft-page-break/><text:s text:c="20"/>self.protocol_registry[improvement['protocol']]['base_priority'] = \</text:p>
      <text:p text:style-name="Preformatted_20_Text"><text:s text:c="24"/>improvement['new_priority']</text:p>
      <text:p text:style-name="Preformatted_20_Text"><text:s text:c="20"/>applied.append(improvement)</text:p>
      <text:p text:style-name="Preformatted_20_Text"><text:s text:c="16"/></text:p>
      <text:p text:style-name="Preformatted_20_Text"><text:s text:c="16"/>elif improvement['type'] == 'scaling_adjustment':</text:p>
      <text:p text:style-name="Preformatted_20_Text"><text:s text:c="20"/># Update scaling profile</text:p>
      <text:p text:style-name="Preformatted_20_Text"><text:s text:c="20"/>self.scaling_manager.update_scaling_profile(</text:p>
      <text:p text:style-name="Preformatted_20_Text"><text:s text:c="24"/>improvement['protocol'],</text:p>
      <text:p text:style-name="Preformatted_20_Text"><text:s text:c="24"/>improvement['new_profile']</text:p>
      <text:p text:style-name="Preformatted_20_Text"><text:s text:c="20"/>)</text:p>
      <text:p text:style-name="Preformatted_20_Text"><text:s text:c="20"/>applied.append(improvement)</text:p>
      <text:p text:style-name="Preformatted_20_Text"><text:s text:c="16"/></text:p>
      <text:p text:style-name="Preformatted_20_Text"><text:s text:c="16"/>elif improvement['type'] == 'resource_allocation_adjustment':</text:p>
      <text:p text:style-name="Preformatted_20_Text"><text:s text:c="20"/># Update allocation strategy</text:p>
      <text:p text:style-name="Preformatted_20_Text"><text:s text:c="20"/>self.resource_manager.set_allocation_strategy(</text:p>
      <text:p text:style-name="Preformatted_20_Text"><text:s text:c="24"/>improvement['new_strategy']</text:p>
      <text:p text:style-name="Preformatted_20_Text"><text:s text:c="20"/>)</text:p>
      <text:p text:style-name="Preformatted_20_Text"><text:s text:c="20"/>applied.append(improvement)</text:p>
      <text:p text:style-name="Preformatted_20_Text"><text:s text:c="16"/></text:p>
      <text:p text:style-name="Preformatted_20_Text"><text:s text:c="16"/>elif improvement['type'] == 'deferral_policy_adjustment':</text:p>
      <text:p text:style-name="Preformatted_20_Text"><text:s text:c="20"/># Update deferral policy</text:p>
      <text:p text:style-name="Preformatted_20_Text"><text:s text:c="20"/>self.orchestrator.set_deferral_policy(</text:p>
      <text:p text:style-name="Preformatted_20_Text"><text:s text:c="24"/>improvement['new_policy']</text:p>
      <text:p text:style-name="Preformatted_20_Text"><text:s text:c="20"/>)</text:p>
      <text:p text:style-name="Preformatted_20_Text"><text:s text:c="20"/>applied.append(improvement)</text:p>
      <text:p text:style-name="Preformatted_20_Text"><text:s text:c="16"/></text:p>
      <text:p text:style-name="Preformatted_20_Text"><text:s text:c="16"/># Log the improvement</text:p>
      <text:p text:style-name="Preformatted_20_Text"><text:s text:c="16"/>self.log_improvement(improvement)</text:p>
      <text:p text:style-name="Preformatted_20_Text"><text:s text:c="16"/></text:p>
      <text:p text:style-name="Preformatted_20_Text"><text:s text:c="12"/>except Exception as e:</text:p>
      <text:p text:style-name="Preformatted_20_Text"><text:s text:c="16"/>self.log_improvement_error(improvement, e)</text:p>
      <text:p text:style-name="Preformatted_20_Text"><text:s text:c="8"/></text:p>
      <text:p text:style-name="P5"><text:s text:c="8"/>return applied</text:p>
      <text:h text:style-name="Heading_20_3" text:outline-level="3"><text:span text:style-name="Strong_20_Emphasis">B. Self-Monitoring &amp; Health Assessment</text:span></text:h>
      <text:p text:style-name="Text_20_body">python</text:p>
      <text:p text:style-name="Preformatted_20_Text">class SystemHealthMonitor:</text:p>
      <text:p text:style-name="Preformatted_20_Text"><text:s text:c="4"/>def __init__(self):</text:p>
      <text:p text:style-name="Preformatted_20_Text"><text:s text:c="8"/>self.health_metrics = {}</text:p>
      <text:p text:style-name="Preformatted_20_Text"><text:s text:c="8"/>self.performance_trends = {}</text:p>
      <text:p text:style-name="Preformatted_20_Text"><text:s text:c="8"/>self.anomaly_detector = AnomalyDetector()</text:p>
      <text:p text:style-name="Preformatted_20_Text"><text:s text:c="8"/></text:p>
      <text:p text:style-name="Preformatted_20_Text"><text:s text:c="4"/>def assess_system_health(self):</text:p>
      <text:p text:style-name="Preformatted_20_Text"><text:s text:c="8"/>"""</text:p>
      <text:p text:style-name="Preformatted_20_Text"><text:s text:c="8"/>Comprehensive health assessment of the protocol management system</text:p>
      <text:p text:style-name="Preformatted_20_Text"><text:s text:c="8"/>"""</text:p>
      <text:p text:style-name="Preformatted_20_Text"><text:s text:c="8"/>health_report = {</text:p>
      <text:p text:style-name="Preformatted_20_Text"><text:s text:c="12"/>'timestamp': time.time(),</text:p>
      <text:p text:style-name="Preformatted_20_Text"><text:s text:c="12"/>'overall_health': 0,</text:p>
      <text:p text:style-name="Preformatted_20_Text"><text:s text:c="12"/>'components': {},</text:p>
      <text:p text:style-name="Preformatted_20_Text"><text:s text:c="12"/>'recommendations': [],</text:p>
      <text:p text:style-name="Preformatted_20_Text"><text:s text:c="12"/>'anomalies': []</text:p>
      <text:p text:style-name="Preformatted_20_Text"><text:s text:c="8"/>}</text:p>
      <text:p text:style-name="Preformatted_20_Text"><text:s text:c="8"/></text:p>
      <text:p text:style-name="Preformatted_20_Text"><text:s text:c="8"/># 1. Hardware health</text:p>
      <text:p text:style-name="Preformatted_20_Text"><text:s text:c="8"/>hardware_health = self.assess_hardware_health()</text:p>
      <text:p text:style-name="Preformatted_20_Text"><text:s text:c="8"/>health_report['components']['hardware'] = hardware_health</text:p>
      <text:p text:style-name="Preformatted_20_Text"><text:s text:c="8"/></text:p>
      <text:p text:style-name="Preformatted_20_Text"><text:s text:c="8"/># 2. Protocol execution health</text:p>
      <text:p text:style-name="Preformatted_20_Text"><text:s text:c="8"/>protocol_health = self.assess_protocol_health()</text:p>
      <text:p text:style-name="Preformatted_20_Text"><text:soft-page-break/><text:s text:c="8"/>health_report['components']['protocols'] = protocol_health</text:p>
      <text:p text:style-name="Preformatted_20_Text"><text:s text:c="8"/></text:p>
      <text:p text:style-name="Preformatted_20_Text"><text:s text:c="8"/># 3. Learning system health</text:p>
      <text:p text:style-name="Preformatted_20_Text"><text:s text:c="8"/>learning_health = self.assess_learning_health()</text:p>
      <text:p text:style-name="Preformatted_20_Text"><text:s text:c="8"/>health_report['components']['learning'] = learning_health</text:p>
      <text:p text:style-name="Preformatted_20_Text"><text:s text:c="8"/></text:p>
      <text:p text:style-name="Preformatted_20_Text"><text:s text:c="8"/># 4. Resource management health</text:p>
      <text:p text:style-name="Preformatted_20_Text"><text:s text:c="8"/>resource_health = self.assess_resource_management_health()</text:p>
      <text:p text:style-name="Preformatted_20_Text"><text:s text:c="8"/>health_report['components']['resource_management'] = resource_health</text:p>
      <text:p text:style-name="Preformatted_20_Text"><text:s text:c="8"/></text:p>
      <text:p text:style-name="Preformatted_20_Text"><text:s text:c="8"/># 5. Calculate overall health</text:p>
      <text:p text:style-name="Preformatted_20_Text"><text:s text:c="8"/>component_scores = [c['score'] for c in health_report['components'].values()]</text:p>
      <text:p text:style-name="Preformatted_20_Text"><text:s text:c="8"/>health_report['overall_health'] = np.mean(component_scores)</text:p>
      <text:p text:style-name="Preformatted_20_Text"><text:s text:c="8"/></text:p>
      <text:p text:style-name="Preformatted_20_Text"><text:s text:c="8"/># 6. Detect anomalies</text:p>
      <text:p text:style-name="Preformatted_20_Text"><text:s text:c="8"/>anomalies = self.anomaly_detector.detect_anomalies(health_report)</text:p>
      <text:p text:style-name="Preformatted_20_Text"><text:s text:c="8"/>health_report['anomalies'] = anomalies</text:p>
      <text:p text:style-name="Preformatted_20_Text"><text:s text:c="8"/></text:p>
      <text:p text:style-name="Preformatted_20_Text"><text:s text:c="8"/># 7. Generate recommendations</text:p>
      <text:p text:style-name="Preformatted_20_Text"><text:s text:c="8"/>recommendations = self.generate_health_recommendations(health_report)</text:p>
      <text:p text:style-name="Preformatted_20_Text"><text:s text:c="8"/>health_report['recommendations'] = recommendations</text:p>
      <text:p text:style-name="Preformatted_20_Text"><text:s text:c="8"/></text:p>
      <text:p text:style-name="Preformatted_20_Text"><text:s text:c="8"/># 8. Store health history</text:p>
      <text:p text:style-name="Preformatted_20_Text"><text:s text:c="8"/>self.store_health_history(health_report)</text:p>
      <text:p text:style-name="Preformatted_20_Text"><text:s text:c="8"/></text:p>
      <text:p text:style-name="Preformatted_20_Text"><text:s text:c="8"/>return health_report</text:p>
      <text:p text:style-name="Preformatted_20_Text"><text:s text:c="4"/></text:p>
      <text:p text:style-name="Preformatted_20_Text"><text:s text:c="4"/>def generate_health_recommendations(self, health_report):</text:p>
      <text:p text:style-name="Preformatted_20_Text"><text:s text:c="8"/>"""</text:p>
      <text:p text:style-name="Preformatted_20_Text"><text:s text:c="8"/>Generate specific recommendations to improve system health</text:p>
      <text:p text:style-name="Preformatted_20_Text"><text:s text:c="8"/>"""</text:p>
      <text:p text:style-name="Preformatted_20_Text"><text:s text:c="8"/>recommendations = []</text:p>
      <text:p text:style-name="Preformatted_20_Text"><text:s text:c="8"/></text:p>
      <text:p text:style-name="Preformatted_20_Text"><text:s text:c="8"/># Check hardware health</text:p>
      <text:p text:style-name="Preformatted_20_Text"><text:s text:c="8"/>if health_report['components']['hardware']['score'] &lt; 0.7:</text:p>
      <text:p text:style-name="Preformatted_20_Text"><text:s text:c="12"/>recommendations.append({</text:p>
      <text:p text:style-name="Preformatted_20_Text"><text:s text:c="16"/>'priority': 'high',</text:p>
      <text:p text:style-name="Preformatted_20_Text"><text:s text:c="16"/>'action': 'hardware_maintenance',</text:p>
      <text:p text:style-name="Preformatted_20_Text"><text:s text:c="16"/>'description': 'Hardware showing signs of stress. Consider cooling improvements or load reduction.',</text:p>
      <text:p text:style-name="Preformatted_20_Text"><text:s text:c="16"/>'specifics': health_report['components']['hardware']['issues']</text:p>
      <text:p text:style-name="Preformatted_20_Text"><text:s text:c="12"/>})</text:p>
      <text:p text:style-name="Preformatted_20_Text"><text:s text:c="8"/></text:p>
      <text:p text:style-name="Preformatted_20_Text"><text:s text:c="8"/># Check protocol health</text:p>
      <text:p text:style-name="Preformatted_20_Text"><text:s text:c="8"/>low_performance_protocols = [</text:p>
      <text:p text:style-name="Preformatted_20_Text"><text:s text:c="12"/>p for p, data in health_report['components']['protocols']['protocol_details'].items()</text:p>
      <text:p text:style-name="Preformatted_20_Text"><text:s text:c="12"/>if data['effectiveness'] &lt; 0.6</text:p>
      <text:p text:style-name="Preformatted_20_Text"><text:s text:c="8"/>]</text:p>
      <text:p text:style-name="Preformatted_20_Text"><text:s text:c="8"/></text:p>
      <text:p text:style-name="Preformatted_20_Text"><text:s text:c="8"/>if low_performance_protocols:</text:p>
      <text:p text:style-name="Preformatted_20_Text"><text:s text:c="12"/>recommendations.append({</text:p>
      <text:p text:style-name="Preformatted_20_Text"><text:s text:c="16"/>'priority': 'medium',</text:p>
      <text:p text:style-name="Preformatted_20_Text"><text:s text:c="16"/>'action': 'protocol_optimization',</text:p>
      <text:p text:style-name="Preformatted_20_Text"><text:s text:c="16"/>'description': f'{len(low_performance_protocols)} protocols showing low effectiveness.',</text:p>
      <text:p text:style-name="Preformatted_20_Text"><text:s text:c="16"/>'protocols': low_performance_protocols,</text:p>
      <text:p text:style-name="Preformatted_20_Text"><text:s text:c="16"/>'suggested_actions': [</text:p>
      <text:p text:style-name="Preformatted_20_Text"><text:s text:c="20"/>'Review scaling profiles',</text:p>
      <text:p text:style-name="Preformatted_20_Text"><text:s text:c="20"/>'Adjust priority weights',</text:p>
      <text:p text:style-name="Preformatted_20_Text"><text:s text:c="20"/>'Consider alternative implementations'</text:p>
      <text:p text:style-name="Preformatted_20_Text"><text:s text:c="16"/>]</text:p>
      <text:p text:style-name="Preformatted_20_Text"><text:s text:c="12"/>})</text:p>
      <text:p text:style-name="Preformatted_20_Text"><text:soft-page-break/><text:s text:c="8"/></text:p>
      <text:p text:style-name="Preformatted_20_Text"><text:s text:c="8"/># Check learning health</text:p>
      <text:p text:style-name="Preformatted_20_Text"><text:s text:c="8"/>if health_report['components']['learning']['score'] &lt; 0.5:</text:p>
      <text:p text:style-name="Preformatted_20_Text"><text:s text:c="12"/>recommendations.append({</text:p>
      <text:p text:style-name="Preformatted_20_Text"><text:s text:c="16"/>'priority': 'medium',</text:p>
      <text:p text:style-name="Preformatted_20_Text"><text:s text:c="16"/>'action': 'learning_system_maintenance',</text:p>
      <text:p text:style-name="Preformatted_20_Text"><text:s text:c="16"/>'description': 'Learning system not converging effectively.',</text:p>
      <text:p text:style-name="Preformatted_20_Text"><text:s text:c="16"/>'suggested_actions': [</text:p>
      <text:p text:style-name="Preformatted_20_Text"><text:s text:c="20"/>'Reset learning rates',</text:p>
      <text:p text:style-name="Preformatted_20_Text"><text:s text:c="20"/>'Increase exploration',</text:p>
      <text:p text:style-name="Preformatted_20_Text"><text:s text:c="20"/>'Review reward function'</text:p>
      <text:p text:style-name="Preformatted_20_Text"><text:s text:c="16"/>]</text:p>
      <text:p text:style-name="Preformatted_20_Text"><text:s text:c="12"/>})</text:p>
      <text:p text:style-name="Preformatted_20_Text"><text:s text:c="8"/></text:p>
      <text:p text:style-name="P5"><text:s text:c="8"/>return recommendations</text:p>
      <text:h text:style-name="Heading_20_2" text:outline-level="2"><text:span text:style-name="Strong_20_Emphasis">6. Implementation Strategy</text:span></text:h>
      <text:h text:style-name="Heading_20_3" text:outline-level="3"><text:span text:style-name="Strong_20_Emphasis">A. Phased Implementation Plan</text:span></text:h>
      <text:p text:style-name="Text_20_body"><text:span text:style-name="Strong_20_Emphasis">Phase 1: Foundation (Weeks 1-2)</text:span></text:p>
      <text:p text:style-name="Text_20_body">yaml</text:p>
      <text:p text:style-name="Preformatted_20_Text">Objectives:</text:p>
      <text:p text:style-name="Preformatted_20_Text"><text:s text:c="2"/>- Implement basic hardware monitoring</text:p>
      <text:p text:style-name="Preformatted_20_Text"><text:s text:c="2"/>- Create protocol registry with static priorities</text:p>
      <text:p text:style-name="Preformatted_20_Text"><text:s text:c="2"/>- Build simple capacity-based protocol selection</text:p>
      <text:p text:style-name="Preformatted_20_Text"><text:s text:c="2"/>- Establish basic execution orchestration</text:p>
      <text:p text:style-name="Preformatted_20_Text"/>
      <text:p text:style-name="Preformatted_20_Text">Key Components:</text:p>
      <text:p text:style-name="Preformatted_20_Text"><text:s text:c="2"/>- RPi5HardwareMonitor (basic)</text:p>
      <text:p text:style-name="Preformatted_20_Text"><text:s text:c="2"/>- ProtocolResourceManager (static)</text:p>
      <text:p text:style-name="P5"><text:s text:c="2"/>- SimpleProtocolOrchestrator</text:p>
      <text:p text:style-name="Text_20_body"><text:span text:style-name="Strong_20_Emphasis">Phase 2: Dynamic Adaptation (Weeks 3-4)</text:span></text:p>
      <text:p text:style-name="Text_20_body">yaml</text:p>
      <text:p text:style-name="Preformatted_20_Text">Objectives:</text:p>
      <text:p text:style-name="Preformatted_20_Text"><text:s text:c="2"/>- Implement dynamic priority calculation</text:p>
      <text:p text:style-name="Preformatted_20_Text"><text:s text:c="2"/>- Add protocol scaling profiles</text:p>
      <text:p text:style-name="Preformatted_20_Text"><text:s text:c="2"/>- Create basic learning system</text:p>
      <text:p text:style-name="Preformatted_20_Text"><text:s text:c="2"/>- Add deferral handling</text:p>
      <text:p text:style-name="Preformatted_20_Text"/>
      <text:p text:style-name="Preformatted_20_Text">Key Components:</text:p>
      <text:p text:style-name="Preformatted_20_Text"><text:s text:c="2"/>- PriorityMatrixEngine</text:p>
      <text:p text:style-name="Preformatted_20_Text"><text:s text:c="2"/>- ProtocolScalabilityManager</text:p>
      <text:p text:style-name="Preformatted_20_Text"><text:s text:c="2"/>- BasicProtocolEffectivenessLearner</text:p>
      <text:p text:style-name="P5"><text:s text:c="2"/>- DeferredProtocolHandler</text:p>
      <text:p text:style-name="Text_20_body"><text:span text:style-name="Strong_20_Emphasis">Phase 3: Advanced Learning (Weeks 5-6)</text:span></text:p>
      <text:p text:style-name="Text_20_body">yaml</text:p>
      <text:p text:style-name="Preformatted_20_Text">Objectives:</text:p>
      <text:p text:style-name="Preformatted_20_Text"><text:s text:c="2"/>- Implement pattern recognition</text:p>
      <text:p text:style-name="Preformatted_20_Text"><text:s text:c="2"/>- Add Bayesian optimization</text:p>
      <text:p text:style-name="Preformatted_20_Text"><text:s text:c="2"/>- Create health monitoring</text:p>
      <text:p text:style-name="Preformatted_20_Text"><text:s text:c="2"/>- Add anomaly detection</text:p>
      <text:p text:style-name="Preformatted_20_Text"/>
      <text:p text:style-name="Preformatted_20_Text">Key Components:</text:p>
      <text:p text:style-name="Preformatted_20_Text"><text:soft-page-break/><text:s text:c="2"/>- ProtocolPatternRecognizer</text:p>
      <text:p text:style-name="Preformatted_20_Text"><text:s text:c="2"/>- ContinuousOptimizationEngine</text:p>
      <text:p text:style-name="Preformatted_20_Text"><text:s text:c="2"/>- SystemHealthMonitor</text:p>
      <text:p text:style-name="P5"><text:s text:c="2"/>- AnomalyDetector</text:p>
      <text:p text:style-name="Text_20_body"><text:span text:style-name="Strong_20_Emphasis">Phase 4: Integration &amp; Refinement (Weeks 7-8)</text:span></text:p>
      <text:p text:style-name="Text_20_body">yaml</text:p>
      <text:p text:style-name="Preformatted_20_Text">Objectives:</text:p>
      <text:p text:style-name="Preformatted_20_Text"><text:s text:c="2"/>- Full system integration</text:p>
      <text:p text:style-name="Preformatted_20_Text"><text:s text:c="2"/>- Performance optimization for RPi5</text:p>
      <text:p text:style-name="Preformatted_20_Text"><text:s text:c="2"/>- Real-world testing</text:p>
      <text:p text:style-name="Preformatted_20_Text"><text:s text:c="2"/>- Iterative refinement</text:p>
      <text:p text:style-name="Preformatted_20_Text"/>
      <text:p text:style-name="Preformatted_20_Text">Key Components:</text:p>
      <text:p text:style-name="Preformatted_20_Text"><text:s text:c="2"/>- Complete ProtocolOrchestrator</text:p>
      <text:p text:style-name="Preformatted_20_Text"><text:s text:c="2"/>- Performance tuning</text:p>
      <text:p text:style-name="Preformatted_20_Text"><text:s text:c="2"/>- Field testing framework</text:p>
      <text:p text:style-name="P5"><text:s text:c="2"/>- Feedback integration</text:p>
      <text:h text:style-name="Heading_20_3" text:outline-level="3"><text:span text:style-name="Strong_20_Emphasis">B. Configuration Files</text:span></text:h>
      <text:p text:style-name="Text_20_body"><text:span text:style-name="Strong_20_Emphasis"><text:span text:style-name="Source_20_Text">protocol_configuration.json</text:span></text:span></text:p>
      <text:p text:style-name="Text_20_body">json</text:p>
      <text:p text:style-name="Preformatted_20_Text">{</text:p>
      <text:p text:style-name="Preformatted_20_Text"><text:s text:c="2"/>"protocol_registry": {</text:p>
      <text:p text:style-name="Preformatted_20_Text"><text:s text:c="4"/>"neurological_assessment": {</text:p>
      <text:p text:style-name="Preformatted_20_Text"><text:s text:c="6"/>"base_priority": 85,</text:p>
      <text:p text:style-name="Preformatted_20_Text"><text:s text:c="6"/>"minimum_requirements": {</text:p>
      <text:p text:style-name="Preformatted_20_Text"><text:s text:c="8"/>"cpu_percent": 15,</text:p>
      <text:p text:style-name="Preformatted_20_Text"><text:s text:c="8"/>"memory_mb": 50,</text:p>
      <text:p text:style-name="Preformatted_20_Text"><text:s text:c="8"/>"processing_time_ms": 200</text:p>
      <text:p text:style-name="Preformatted_20_Text"><text:s text:c="6"/>},</text:p>
      <text:p text:style-name="Preformatted_20_Text"><text:s text:c="6"/>"can_defer": true,</text:p>
      <text:p text:style-name="Preformatted_20_Text"><text:s text:c="6"/>"can_scale_down": true,</text:p>
      <text:p text:style-name="Preformatted_20_Text"><text:s text:c="6"/>"scaling_options": {</text:p>
      <text:p text:style-name="Preformatted_20_Text"><text:s text:c="8"/>"full": {"cpu": 20, "memory": 80, "accuracy": 0.95},</text:p>
      <text:p text:style-name="Preformatted_20_Text"><text:s text:c="8"/>"balanced": {"cpu": 12, "memory": 50, "accuracy": 0.85},</text:p>
      <text:p text:style-name="Preformatted_20_Text"><text:s text:c="8"/>"light": {"cpu": 7, "memory": 30, "accuracy": 0.70},</text:p>
      <text:p text:style-name="Preformatted_20_Text"><text:s text:c="8"/>"emergency": {"cpu": 3, "memory": 15, "accuracy": 0.50}</text:p>
      <text:p text:style-name="Preformatted_20_Text"><text:s text:c="6"/>},</text:p>
      <text:p text:style-name="Preformatted_20_Text"><text:s text:c="6"/>"criticality_contexts": {</text:p>
      <text:p text:style-name="Preformatted_20_Text"><text:s text:c="8"/>"user_states": {"crisis": 0.9, "distressed": 0.7, "normal": 0.5},</text:p>
      <text:p text:style-name="Preformatted_20_Text"><text:s text:c="8"/>"safety_impact": 0.8,</text:p>
      <text:p text:style-name="Preformatted_20_Text"><text:s text:c="8"/>"time_factors": {"night": 0.6, "weekend": 0.5}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resource_management": {</text:p>
      <text:p text:style-name="Preformatted_20_Text"><text:s text:c="4"/>"capacity_thresholds": {</text:p>
      <text:p text:style-name="Preformatted_20_Text"><text:s text:c="6"/>"high_capacity": 0.7,</text:p>
      <text:p text:style-name="Preformatted_20_Text"><text:s text:c="6"/>"normal_capacity": 0.4,</text:p>
      <text:p text:style-name="Preformatted_20_Text"><text:s text:c="6"/>"reduced_capacity": 0.2,</text:p>
      <text:p text:style-name="Preformatted_20_Text"><text:s text:c="6"/>"critical_capacity": 0.05</text:p>
      <text:p text:style-name="Preformatted_20_Text"><text:s text:c="4"/>},</text:p>
      <text:p text:style-name="Preformatted_20_Text"><text:s text:c="4"/>"allocation_strategies": {</text:p>
      <text:p text:style-name="Preformatted_20_Text"><text:s text:c="6"/>"conservative": {"buffer": 0.3, "safety_margin": 0.2},</text:p>
      <text:p text:style-name="Preformatted_20_Text"><text:s text:c="6"/>"balanced": {"buffer": 0.2, "safety_margin": 0.1},</text:p>
      <text:p text:style-name="Preformatted_20_Text"><text:s text:c="6"/>"aggressive": {"buffer": 0.1, "safety_margin": 0.05},</text:p>
      <text:p text:style-name="Preformatted_20_Text"><text:soft-page-break/><text:s text:c="6"/>"adaptive": {"buffer": "dynamic", "safety_margin": "context_aware"}</text:p>
      <text:p text:style-name="Preformatted_20_Text"><text:s text:c="4"/>}</text:p>
      <text:p text:style-name="Preformatted_20_Text"><text:s text:c="2"/>}</text:p>
      <text:p text:style-name="P5">}</text:p>
      <text:p text:style-name="Text_20_body"><text:span text:style-name="Strong_20_Emphasis"><text:span text:style-name="Source_20_Text">learning_configuration.json</text:span></text:span></text:p>
      <text:p text:style-name="Text_20_body">json</text:p>
      <text:p text:style-name="Preformatted_20_Text">{</text:p>
      <text:p text:style-name="Preformatted_20_Text"><text:s text:c="2"/>"learning_parameters": {</text:p>
      <text:p text:style-name="Preformatted_20_Text"><text:s text:c="4"/>"effectiveness_learning": {</text:p>
      <text:p text:style-name="Preformatted_20_Text"><text:s text:c="6"/>"min_samples_for_learning": 10,</text:p>
      <text:p text:style-name="Preformatted_20_Text"><text:s text:c="6"/>"learning_rate": 0.1,</text:p>
      <text:p text:style-name="Preformatted_20_Text"><text:s text:c="6"/>"forgetting_factor": 0.95,</text:p>
      <text:p text:style-name="Preformatted_20_Text"><text:s text:c="6"/>"exploration_rate": 0.1</text:p>
      <text:p text:style-name="Preformatted_20_Text"><text:s text:c="4"/>},</text:p>
      <text:p text:style-name="Preformatted_20_Text"><text:s text:c="4"/>"pattern_recognition": {</text:p>
      <text:p text:style-name="Preformatted_20_Text"><text:s text:c="6"/>"context_clustering_samples": 20,</text:p>
      <text:p text:style-name="Preformatted_20_Text"><text:s text:c="6"/>"temporal_pattern_min_occurrences": 5,</text:p>
      <text:p text:style-name="Preformatted_20_Text"><text:s text:c="6"/>"sequence_pattern_min_length": 3</text:p>
      <text:p text:style-name="Preformatted_20_Text"><text:s text:c="4"/>},</text:p>
      <text:p text:style-name="Preformatted_20_Text"><text:s text:c="4"/>"optimization": {</text:p>
      <text:p text:style-name="Preformatted_20_Text"><text:s text:c="6"/>"optimization_cycle_hours": 24,</text:p>
      <text:p text:style-name="Preformatted_20_Text"><text:s text:c="6"/>"hypothesis_test_duration_minutes": 30,</text:p>
      <text:p text:style-name="Preformatted_20_Text"><text:s text:c="6"/>"improvement_evaluation_period_hours": 12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performance_targets": {</text:p>
      <text:p text:style-name="Preformatted_20_Text"><text:s text:c="4"/>"protocol_effectiveness": {</text:p>
      <text:p text:style-name="Preformatted_20_Text"><text:s text:c="6"/>"target_score": 0.8,</text:p>
      <text:p text:style-name="Preformatted_20_Text"><text:s text:c="6"/>"minimum_acceptable": 0.6,</text:p>
      <text:p text:style-name="Preformatted_20_Text"><text:s text:c="6"/>"exceptional_threshold": 0.9</text:p>
      <text:p text:style-name="Preformatted_20_Text"><text:s text:c="4"/>},</text:p>
      <text:p text:style-name="Preformatted_20_Text"><text:s text:c="4"/>"resource_efficiency": {</text:p>
      <text:p text:style-name="Preformatted_20_Text"><text:s text:c="6"/>"cpu_utilization_target": 0.7,</text:p>
      <text:p text:style-name="Preformatted_20_Text"><text:s text:c="6"/>"memory_utilization_target": 0.75,</text:p>
      <text:p text:style-name="Preformatted_20_Text"><text:s text:c="6"/>"thermal_safety_margin": 10</text:p>
      <text:p text:style-name="Preformatted_20_Text"><text:s text:c="4"/>},</text:p>
      <text:p text:style-name="Preformatted_20_Text"><text:s text:c="4"/>"response_times": {</text:p>
      <text:p text:style-name="Preformatted_20_Text"><text:s text:c="6"/>"initial_response_max_ms": 1000,</text:p>
      <text:p text:style-name="Preformatted_20_Text"><text:s text:c="6"/>"protocol_execution_max_ms": 500,</text:p>
      <text:p text:style-name="Preformatted_20_Text"><text:s text:c="6"/>"learning_update_max_ms": 100</text:p>
      <text:p text:style-name="Preformatted_20_Text"><text:s text:c="4"/>}</text:p>
      <text:p text:style-name="Preformatted_20_Text"><text:s text:c="2"/>}</text:p>
      <text:p text:style-name="P5">}</text:p>
      <text:h text:style-name="Heading_20_2" text:outline-level="2"><text:span text:style-name="Strong_20_Emphasis">7. Key Benefits &amp; Innovations</text:span></text:h>
      <text:h text:style-name="Heading_20_3" text:outline-level="3"><text:span text:style-name="Strong_20_Emphasis">A. System Advantages</text:span></text:h>
      <text:list xml:id="list5438294373631766218" text:style-name="L1">
        <text:list-item>
          <text:p text:style-name="P1"><text:span text:style-name="Strong_20_Emphasis">Hardware-Aware Optimization</text:span>: Every decision considers current RPi5 state</text:p>
        </text:list-item>
        <text:list-item>
          <text:p text:style-name="P1"><text:span text:style-name="Strong_20_Emphasis">Dynamic Priority Calculation</text:span>: Priorities change based on context, not just static rules</text:p>
        </text:list-item>
        <text:list-item>
          <text:p text:style-name="P1"><text:span text:style-name="Strong_20_Emphasis">Adaptive Scaling</text:span>: Protocols automatically adjust to available resources</text:p>
        </text:list-item>
        <text:list-item>
          <text:p text:style-name="P1"><text:span text:style-name="Strong_20_Emphasis">Continuous Learning</text:span>: System improves with every interaction</text:p>
        </text:list-item>
        <text:list-item>
          <text:p text:style-name="P1"><text:span text:style-name="Strong_20_Emphasis">Graceful Degradation</text:span>: Maintains core functions even under heavy load</text:p>
        </text:list-item>
        <text:list-item>
          <text:p text:style-name="P1"><text:soft-page-break/><text:span text:style-name="Strong_20_Emphasis">Self-Healing</text:span>: Detects and corrects performance issues automatically</text:p>
        </text:list-item>
      </text:list>
      <text:h text:style-name="Heading_20_3" text:outline-level="3"><text:span text:style-name="Strong_20_Emphasis">B. RPi5-Specific Optimizations</text:span></text:h>
      <text:list xml:id="list7435520122962479622" text:style-name="L2">
        <text:list-item>
          <text:p text:style-name="P2"><text:span text:style-name="Strong_20_Emphasis">Thermal Management</text:span>: Protocols adjust based on CPU temperature</text:p>
        </text:list-item>
        <text:list-item>
          <text:p text:style-name="P2"><text:span text:style-name="Strong_20_Emphasis">NPU Utilization</text:span>: Leverages AI accelerator when available</text:p>
        </text:list-item>
        <text:list-item>
          <text:p text:style-name="P2"><text:span text:style-name="Strong_20_Emphasis">Memory-Aware Execution</text:span>: Prevents swap usage as configured</text:p>
        </text:list-item>
        <text:list-item>
          <text:p text:style-name="P2"><text:span text:style-name="Strong_20_Emphasis">Power-Aware Scheduling</text:span>: Optimizes for battery life when applicable</text:p>
        </text:list-item>
        <text:list-item>
          <text:p text:style-name="P2"><text:span text:style-name="Strong_20_Emphasis">Real-Time Adaptation</text:span>: Responds to changing hardware conditions within seconds</text:p>
        </text:list-item>
      </text:list>
      <text:h text:style-name="Heading_20_3" text:outline-level="3"><text:span text:style-name="Strong_20_Emphasis">C. Learning Capabilities</text:span></text:h>
      <text:list xml:id="list8138920675688241349" text:style-name="L3">
        <text:list-item>
          <text:p text:style-name="P3"><text:span text:style-name="Strong_20_Emphasis">Protocol Effectiveness Learning</text:span>: Learns which protocols work best in which contexts</text:p>
        </text:list-item>
        <text:list-item>
          <text:p text:style-name="P3"><text:span text:style-name="Strong_20_Emphasis">Resource Usage Prediction</text:span>: Improves resource estimation accuracy over time</text:p>
        </text:list-item>
        <text:list-item>
          <text:p text:style-name="P3"><text:span text:style-name="Strong_20_Emphasis">Pattern Recognition</text:span>: Identifies successful protocol combinations</text:p>
        </text:list-item>
        <text:list-item>
          <text:p text:style-name="P3"><text:span text:style-name="Strong_20_Emphasis">Optimization Loop</text:span>: Continuously improves system parameters</text:p>
        </text:list-item>
        <text:list-item>
          <text:p text:style-name="P3"><text:span text:style-name="Strong_20_Emphasis">Anomaly Detection</text:span>: Identifies and addresses performance issues</text:p>
        </text:list-item>
      </text:list>
      <text:h text:style-name="Heading_20_2" text:outline-level="2"><text:span text:style-name="Strong_20_Emphasis">Conclusion</text:span></text:h>
      <text:p text:style-name="Text_20_body">The <text:span text:style-name="Strong_20_Emphasis">Dynamic Protocol Priority Learning Engine (DPPLE)</text:span> transforms hardware limitations from a constraint into an <text:span text:style-name="Strong_20_Emphasis">optimization opportunity</text:span>. By:</text:p>
      <text:list xml:id="list2734621999371631509" text:style-name="L4">
        <text:list-item>
          <text:p text:style-name="P4"><text:span text:style-name="Strong_20_Emphasis">Continuously monitoring</text:span> hardware state</text:p>
        </text:list-item>
        <text:list-item>
          <text:p text:style-name="P4"><text:span text:style-name="Strong_20_Emphasis">Dynamically calculating</text:span> protocol priorities</text:p>
        </text:list-item>
        <text:list-item>
          <text:p text:style-name="P4"><text:span text:style-name="Strong_20_Emphasis">Intelligently scaling</text:span> protocol execution</text:p>
        </text:list-item>
        <text:list-item>
          <text:p text:style-name="P4"><text:span text:style-name="Strong_20_Emphasis">Learning from every outcome</text:span></text:p>
        </text:list-item>
        <text:list-item>
          <text:p text:style-name="P4"><text:span text:style-name="Strong_20_Emphasis">Self-optimizing</text:span> over time</text:p>
        </text:list-item>
      </text:list>
      <text:p text:style-name="Text_20_body">We create a system that becomes <text:span text:style-name="Strong_20_Emphasis">more efficient and effective</text:span> precisely when resources are constrained. The RPi5's limitations become the training ground for an exceptionally resource-aware AI system.</text:p>
      <text:p text:style-name="Text_20_body">This approach embodies the resilience principle: <text:span text:style-name="Strong_20_Emphasis">"What doesn't kill the system makes it smarter."</text:span> Each resource-constrained situation teaches the system how to better allocate its limited resources, creating a positive feedback loop of increasing efficiency and effectiveness.</text:p>
      <text:p text:style-name="Text_20_body">The system learns not just about user needs, but about <text:span text:style-name="Strong_20_Emphasis">its own operational capabilities</text:span>—creating a truly self-aware AI that optimizes both its external protective functions and its internal resource management in harmo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09:00:56.05</meta:creation-date>
    <meta:document-statistic meta:table-count="0" meta:image-count="0" meta:object-count="0" meta:page-count="23" meta:paragraph-count="1300" meta:word-count="3487" meta:character-count="48775"/>
    <dc:date>2025-12-23T09:01:36.90</dc:date>
    <dc:creator>Peter Thompson</dc:creator>
    <meta:editing-duration>PT41S</meta:editing-duration>
    <meta:editing-cycles>1</meta:editing-cycles>
    <meta:generator>OpenOffice/4.1.15$Win32 OpenOffice.org_project/4115m2$Build-9813</meta:generator>
  </office:meta>
</office:document-meta>
</file>