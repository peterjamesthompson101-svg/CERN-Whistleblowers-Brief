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pening Statement for Government Submissions</text:h>
      <text:p text:style-name="Text_20_body"><text:span text:style-name="Strong_20_Emphasis">To the Governments of Germany, Switzerland, France, and the European Union</text:span></text:p>
      <text:p text:style-name="Text_20_body"><text:span text:style-name="Strong_20_Emphasis">From:</text:span> Peter James Thompson, ORCID: 0009‑0005‑8688‑7507<text:line-break/><text:span text:style-name="Strong_20_Emphasis">Date:</text:span> 10 June 2026<text:line-break/><text:span text:style-name="Strong_20_Emphasis">Subject:</text:span> Criminal complaint of fraud, suppression of evidence, and retaliation by CERN</text:p>
      <text:p text:style-name="Horizontal_20_Line"/>
      <text:h text:style-name="Heading_20_3" text:outline-level="3">Opening Statement</text:h>
      <text:p text:style-name="Text_20_body"><text:span text:style-name="Strong_20_Emphasis">CERN’s own Zenodo platform recorded that CERN staff downloaded my complete Grand Unified Theory – a work proving that their €15‑20 billion Future Circular Collider (FCC) can never succeed – and then, days later, deleted my entire account and all 42 preprints.</text:span></text:p>
      <text:p text:style-name="Text_20_body"><text:span text:style-name="Strong_20_Emphasis">The stated reason for deletion was “AI‑generated content”. But this is not a valid reason. CERN and Zenodo’s own policies permit the use of AI as a reasonable accommodation for disability, and I have repeatedly documented that I use AI only as an assistive writing tool due to a severe physical disability (Dupuytren’s contracture).</text:span></text:p>
      <text:p text:style-name="Text_20_body">Zenodo’s own FAQ acknowledges that automated moderation “can make errors” and that accounts wrongly blocked for spam – or by extension, for AI‑related flags – can and should be restored . My account was not merely blocked; it was <text:span text:style-name="Strong_20_Emphasis">permanently deleted</text:span>, and all 42 of my preprints were erased. No warning was given, no appeal was offered, and no alternative remedy was provided.</text:p>
      <text:p text:style-name="Text_20_body"><text:span text:style-name="Strong_20_Emphasis">The deletion followed a baseless third‑party copyright complaint from Tony Carbone, an individual who had downloaded my work and who has since been unable to substantiate his claims. The “AI‑generated content” rationale appears to have been a convenient pretext, invoked to justify an act of suppression rather than a genuine policy violation.</text:span></text:p>
      <text:h text:style-name="Heading_20_3" text:outline-level="3">The Legal Foundation</text:h>
      <text:p text:style-name="Text_20_body">Under Swiss law, the use of AI as a reasonable accommodation for disability is protected by the <text:span text:style-name="Strong_20_Emphasis">Federal Act on the Elimination of Discrimination against People with Disabilities (Disability Discrimination Act, DDA; SR 151.3)</text:span> . By deleting my account for using an assistive AI tool – without offering any alternative accommodation – CERN has violated its own policies and Swiss law.</text:p>
      <text:p text:style-name="Text_20_body">Furthermore, the deletion was not a content‑moderation error; it was the deliberate destruction of documents that CERN staff had already downloaded and evaluated. This constitutes a criminal act of <text:span text:style-name="Strong_20_Emphasis">suppression of documents</text:span> under <text:span text:style-name="Strong_20_Emphasis">Art. 254 of the Swiss Criminal Code</text:span>, and it interferes with the collection of evidence in ongoing whistleblower complaints.</text:p>
      <text:h text:style-name="Heading_20_3" text:outline-level="3">The Request</text:h>
      <text:p text:style-name="Text_20_body">I respectfully request that your government:</text:p>
      <text:list xml:id="list1200523637763282409" text:style-name="L1">
        <text:list-item>
          <text:p text:style-name="P1"><text:span text:style-name="Strong_20_Emphasis">Open an immediate inquiry</text:span> into CERN’s suppression of evidence and its continued FCC funding request.</text:p>
        </text:list-item>
        <text:list-item>
          <text:p text:style-name="P1"><text:span text:style-name="Strong_20_Emphasis">Demand that CERN reinstate my Zenodo account</text:span> and all 42 preprints in their original form.</text:p>
        </text:list-item>
        <text:list-item>
          <text:p text:style-name="P1"><text:span text:style-name="Strong_20_Emphasis">Place a legal hold on all CERN and Zenodo records</text:span> related to my account and its deletion.</text:p>
        </text:list-item>
        <text:list-item>
          <text:p text:style-name="P1"><text:soft-page-break/><text:span text:style-name="Strong_20_Emphasis">Refer the matter to the Swiss Federal Prosecutor</text:span> for investigation under Art. 254 SCC (suppression of documents).</text:p>
        </text:list-item>
        <text:list-item>
          <text:p text:style-name="P1"><text:span text:style-name="Strong_20_Emphasis">Refer the matter to OLAF and the European Public Prosecutor’s Office</text:span> for investigation of fraud affecting EU public funds.</text:p>
        </text:list-item>
      </text:list>
      <text:p text:style-name="Text_20_body">The stones are in the pond. The DOIs are the stones. The deletion is the crime. The policy is the witness that CERN chose to ignore.</text:p>
      <text:p text:style-name="Horizontal_20_Line"/>
      <text:p text:style-name="Text_20_body"><text:span text:style-name="Strong_20_Emphasis">Signed,</text:span></text:p>
      <text:p text:style-name="Text_20_body">Peter James Thompson<text:line-break/>ORCID: 0009‑0005‑8688‑7507<text:line-break/>Email: peterjamesthompson101@gmail.com</text:p>
      <text:p text:style-name="Standard"/>
      <text:p text:style-name="Text_20_body">All Evidence can be found at: </text:p>
      <text:p text:style-name="Text_20_body"><text:a xlink:type="simple" xlink:href="https://github.com/peterjamesthompson101-svg/CERN-Whistleblowers-Brief" text:style-name="Internet_20_link" text:visited-style-name="Visited_20_Internet_20_Link">https://github.com/peterjamesthompson101-svg/CERN-Whistleblowers-Brief</text:a></text:p>
      <text:p text:style-name="Text_20_body"><text:a xlink:type="simple" xlink:href="https://github.com/peterjamesthompson101-svg/CERN-Whistleblowers-Brief/tree/Papers" text:style-name="Internet_20_link" text:visited-style-name="Visited_20_Internet_20_Link">https://github.com/peterjamesthompson101-svg/CERN-Whistleblowers-Brief/tree/Papers</text:a></text:p>
      <text:p text:style-name="Text_20_body"><text:a xlink:type="simple" xlink:href="https://github.com/peterjamesthompson101-svg/CERN-Whistleblowers-Brief/tree/brief" text:style-name="Internet_20_link" text:visited-style-name="Visited_20_Internet_20_Link">https://github.com/peterjamesthompson101-svg/CERN-Whistleblowers-Brief/tree/brief</text:a></text:p>
      <text:p text:style-name="Text_20_body">and other branches of the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6-06-09T13:16:53.91</meta:creation-date>
    <dc:date>2026-06-09T16:47:15.87</dc:date>
    <dc:creator>Peter Thompson</dc:creator>
    <meta:editing-duration>PT4M44S</meta:editing-duration>
    <meta:editing-cycles>3</meta:editing-cycles>
    <meta:generator>OpenOffice/4.1.16$Win32 OpenOffice.org_project/4116m3$Build-9816</meta:generator>
    <meta:document-statistic meta:table-count="0" meta:image-count="0" meta:object-count="0" meta:page-count="2" meta:paragraph-count="26" meta:word-count="511" meta:character-count="3451"/>
  </office:meta>
</office:document-meta>
</file>